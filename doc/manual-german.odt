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4000002D57327A2C9.png" manifest:media-type="image/png"/>
  <manifest:file-entry manifest:full-path="Pictures/1000000000000269000002F3004F842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face style:name="Arial Unicode MS" svg:font-family="'Arial Unicode MS'" style:font-pitch="variable"/>
    <style:font-face style:name="Arial1" svg:font-family="Arial" style:font-family-generic="swiss"/>
    <style:font-face style:name="Arial2" svg:font-family="Arial" style:font-adornments="Bold" style:font-family-generic="swiss" style:font-pitch="variable"/>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 svg:font-family="Cumberland"/>
    <style:font-face style:name="Cumberland1" svg:font-family="Cumberland" style:font-family-generic="modern" style:font-pitch="fixed"/>
    <style:font-face style:name="HG Mincho Light J" svg:font-family="'HG Mincho Light J'" style:font-pitch="variable"/>
    <style:font-face style:name="Monospace" svg:font-family="Monospac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mily-generic="swiss"/>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NewRomanPS-BoldItalicMT" svg:font-family="TimesNewRomanPS-BoldItalicMT" style:font-family-generic="roman"/>
    <style:font-face style:name="Verdana" svg:font-family="Verdana" style:font-family-generic="swiss" style:font-pitch="variable"/>
    <style:font-face style:name="Verdana1" svg:font-family="Verdana" style:font-adornments="Regular" style:font-family-generic="swiss" style:font-pitch="variable"/>
    <style:font-face style:name="monospace" svg:font-family="monospace"/>
  </office:font-face-decls>
  <office:automatic-styles>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579cm" style:rel-column-width="13258*"/>
    </style:style>
    <style:style style:name="Tableau6.B" style:family="table-column">
      <style:table-column-properties style:column-width="10.04cm" style:rel-column-width="37194*"/>
    </style:style>
    <style:style style:name="Tableau6.C" style:family="table-column">
      <style:table-column-properties style:column-width="4.071cm" style:rel-column-width="15083*"/>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A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6.A30" style:family="table-cell">
      <style:table-cell-properties fo:padding="0.097cm" fo:border-left="0.05pt solid #000000" fo:border-right="none" fo:border-top="none" fo:border-bottom="0.05pt solid #000000"/>
    </style:style>
    <style:style style:name="Tableau6.C30" style:family="table-cell">
      <style:table-cell-properties fo:padding="0.097cm" fo:border-left="0.05pt solid #000000" fo:border-right="0.05pt solid #000000" fo:border-top="none" fo:border-bottom="0.05pt solid #000000"/>
    </style:style>
    <style:style style:name="Tableau6.A31" style:family="table-cell">
      <style:table-cell-properties fo:padding="0.097cm" fo:border-left="0.05pt solid #000000" fo:border-right="none" fo:border-top="none" fo:border-bottom="0.05pt solid #000000"/>
    </style:style>
    <style:style style:name="Tableau6.C31" style:family="table-cell">
      <style:table-cell-properties fo:padding="0.097cm" fo:border-left="0.05pt solid #000000" fo:border-right="0.05pt solid #000000" fo:border-top="none" fo:border-bottom="0.05pt solid #000000"/>
    </style:style>
    <style:style style:name="Tableau8" style:family="table">
      <style:table-properties style:width="17.699cm" table:align="margins"/>
    </style:style>
    <style:style style:name="Tableau8.A" style:family="table-column">
      <style:table-column-properties style:column-width="4.002cm" style:rel-column-width="14822*"/>
    </style:style>
    <style:style style:name="Tableau8.B" style:family="table-column">
      <style:table-column-properties style:column-width="2cm" style:rel-column-width="7407*"/>
    </style:style>
    <style:style style:name="Tableau8.C" style:family="table-column">
      <style:table-column-properties style:column-width="7.779cm" style:rel-column-width="28802*"/>
    </style:style>
    <style:style style:name="Tableau8.D" style:family="table-column">
      <style:table-column-properties style:column-width="3.918cm" style:rel-column-width="14504*"/>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16" style:family="table">
      <style:table-properties style:width="17.648cm" fo:margin-left="0cm" fo:margin-right="0.051cm" fo:break-before="auto" fo:break-after="auto" table:align="margins"/>
    </style:style>
    <style:style style:name="Tableau16.A" style:family="table-column">
      <style:table-column-properties style:column-width="3.18cm" style:rel-column-width="11812*"/>
    </style:style>
    <style:style style:name="Tableau16.B" style:family="table-column">
      <style:table-column-properties style:column-width="2.514cm" style:rel-column-width="9335*"/>
    </style:style>
    <style:style style:name="Tableau16.C" style:family="table-column">
      <style:table-column-properties style:column-width="9.511cm" style:rel-column-width="35319*"/>
    </style:style>
    <style:style style:name="Tableau16.D" style:family="table-column">
      <style:table-column-properties style:column-width="2.443cm" style:rel-column-width="9069*"/>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style:vertical-align="top"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style:vertical-align="top"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0.05pt solid #000000" fo:border-top="none" fo:border-bottom="0.05pt solid #000000"/>
    </style:style>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4.579cm" style:rel-column-width="16963*"/>
    </style:style>
    <style:style style:name="Tableau1.B" style:family="table-column">
      <style:table-column-properties style:column-width="13.113cm" style:rel-column-width="485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Code" style:family="table">
      <style:table-properties style:width="17.692cm" fo:margin-left="0cm" fo:margin-right="0.007cm" fo:break-before="auto" fo:break-after="auto" table:align="margins"/>
    </style:style>
    <style:style style:name="Code.A" style:family="table-column">
      <style:table-column-properties style:column-width="3.182cm" style:rel-column-width="11788*"/>
    </style:style>
    <style:style style:name="Code.B" style:family="table-column">
      <style:table-column-properties style:column-width="2.514cm" style:rel-column-width="9311*"/>
    </style:style>
    <style:style style:name="Code.C" style:family="table-column">
      <style:table-column-properties style:column-width="9.509cm" style:rel-column-width="35221*"/>
    </style:style>
    <style:style style:name="Code.D" style:family="table-column">
      <style:table-column-properties style:column-width="2.487cm" style:rel-column-width="9215*"/>
    </style:style>
    <style:style style:name="Code.A1" style:family="table-cell">
      <style:table-cell-properties fo:padding="0.097cm" fo:border-left="0.05pt solid #000000" fo:border-right="none" fo:border-top="0.05pt solid #000000" fo:border-bottom="0.05pt solid #000000"/>
    </style:style>
    <style:style style:name="Code.B1" style:family="table-cell">
      <style:table-cell-properties style:vertical-align="top" fo:padding="0.097cm" fo:border-left="0.05pt solid #000000" fo:border-right="none" fo:border-top="0.05pt solid #000000" fo:border-bottom="0.05pt solid #000000"/>
    </style:style>
    <style:style style:name="Code.D1" style:family="table-cell">
      <style:table-cell-properties fo:padding="0.097cm" fo:border="0.05pt solid #000000"/>
    </style:style>
    <style:style style:name="Code.A2" style:family="table-cell">
      <style:table-cell-properties fo:padding="0.097cm" fo:border-left="0.05pt solid #000000" fo:border-right="none" fo:border-top="none" fo:border-bottom="0.05pt solid #000000"/>
    </style:style>
    <style:style style:name="Code.B2" style:family="table-cell">
      <style:table-cell-properties style:vertical-align="top" fo:padding="0.097cm" fo:border-left="0.05pt solid #000000" fo:border-right="none" fo:border-top="none" fo:border-bottom="0.05pt solid #000000"/>
    </style:style>
    <style:style style:name="Code.C2" style:family="table-cell">
      <style:table-cell-properties fo:padding="0.097cm" fo:border-left="0.05pt solid #000000" fo:border-right="none" fo:border-top="none" fo:border-bottom="0.05pt solid #000000"/>
    </style:style>
    <style:style style:name="Code.D2" style:family="table-cell">
      <style:table-cell-properties fo:padding="0.097cm" fo:border-left="0.05pt solid #000000" fo:border-right="0.05pt solid #000000" fo:border-top="none" fo:border-bottom="0.05pt solid #000000"/>
    </style:style>
    <style:style style:name="Code.A3" style:family="table-cell">
      <style:table-cell-properties fo:padding="0.097cm" fo:border-left="0.05pt solid #000000" fo:border-right="none" fo:border-top="none" fo:border-bottom="0.05pt solid #000000"/>
    </style:style>
    <style:style style:name="Code.C3" style:family="table-cell">
      <style:table-cell-properties fo:padding="0.097cm" fo:border-left="0.05pt solid #000000" fo:border-right="none" fo:border-top="none" fo:border-bottom="0.05pt solid #000000"/>
    </style:style>
    <style:style style:name="Code.D3" style:family="table-cell">
      <style:table-cell-properties fo:padding="0.097cm" fo:border-left="0.05pt solid #000000" fo:border-right="0.05pt solid #000000" fo:border-top="none" fo:border-bottom="0.05pt solid #000000"/>
    </style:style>
    <style:style style:name="Code.A4" style:family="table-cell">
      <style:table-cell-properties fo:padding="0.097cm" fo:border-left="0.05pt solid #000000" fo:border-right="none" fo:border-top="none" fo:border-bottom="0.05pt solid #000000"/>
    </style:style>
    <style:style style:name="Code.C4" style:family="table-cell">
      <style:table-cell-properties fo:padding="0.097cm" fo:border-left="0.05pt solid #000000" fo:border-right="none" fo:border-top="none" fo:border-bottom="0.05pt solid #000000"/>
    </style:style>
    <style:style style:name="Code.D4" style:family="table-cell">
      <style:table-cell-properties fo:padding="0.097cm" fo:border-left="0.05pt solid #000000" fo:border-right="0.05pt solid #000000" fo:border-top="none" fo:border-bottom="0.05pt solid #000000"/>
    </style:style>
    <style:style style:name="Code.A5" style:family="table-cell">
      <style:table-cell-properties fo:padding="0.097cm" fo:border-left="0.05pt solid #000000" fo:border-right="none" fo:border-top="none" fo:border-bottom="0.05pt solid #000000"/>
    </style:style>
    <style:style style:name="Code.C5" style:family="table-cell">
      <style:table-cell-properties fo:padding="0.097cm" fo:border-left="0.05pt solid #000000" fo:border-right="none" fo:border-top="none" fo:border-bottom="0.05pt solid #000000"/>
    </style:style>
    <style:style style:name="Code.D5" style:family="table-cell">
      <style:table-cell-properties fo:padding="0.097cm" fo:border-left="0.05pt solid #000000" fo:border-right="0.05pt solid #000000" fo:border-top="none" fo:border-bottom="0.05pt solid #000000"/>
    </style:style>
    <style:style style:name="Code.A6" style:family="table-cell">
      <style:table-cell-properties fo:padding="0.097cm" fo:border-left="0.05pt solid #000000" fo:border-right="none" fo:border-top="none" fo:border-bottom="0.05pt solid #000000"/>
    </style:style>
    <style:style style:name="Code.C6" style:family="table-cell">
      <style:table-cell-properties fo:padding="0.097cm" fo:border-left="0.05pt solid #000000" fo:border-right="none" fo:border-top="none" fo:border-bottom="0.05pt solid #000000"/>
    </style:style>
    <style:style style:name="Code.D6" style:family="table-cell">
      <style:table-cell-properties fo:padding="0.097cm" fo:border-left="0.05pt solid #000000" fo:border-right="0.05pt solid #000000" fo:border-top="none" fo:border-bottom="0.05pt solid #000000"/>
    </style:style>
    <style:style style:name="Code.A7" style:family="table-cell">
      <style:table-cell-properties fo:padding="0.097cm" fo:border-left="0.05pt solid #000000" fo:border-right="none" fo:border-top="none" fo:border-bottom="0.05pt solid #000000"/>
    </style:style>
    <style:style style:name="Code.C7" style:family="table-cell">
      <style:table-cell-properties fo:padding="0.097cm" fo:border-left="0.05pt solid #000000" fo:border-right="none" fo:border-top="none" fo:border-bottom="0.05pt solid #000000"/>
    </style:style>
    <style:style style:name="Code.D7" style:family="table-cell">
      <style:table-cell-properties fo:padding="0.097cm" fo:border-left="0.05pt solid #000000" fo:border-right="0.05pt solid #000000" fo:border-top="none" fo:border-bottom="0.05pt solid #000000"/>
    </style:style>
    <style:style style:name="Code.A8" style:family="table-cell">
      <style:table-cell-properties fo:padding="0.097cm" fo:border-left="0.05pt solid #000000" fo:border-right="none" fo:border-top="none" fo:border-bottom="0.05pt solid #000000"/>
    </style:style>
    <style:style style:name="Code.C8" style:family="table-cell">
      <style:table-cell-properties fo:padding="0.097cm" fo:border-left="0.05pt solid #000000" fo:border-right="none" fo:border-top="none" fo:border-bottom="0.05pt solid #000000"/>
    </style:style>
    <style:style style:name="Code.D8" style:family="table-cell">
      <style:table-cell-properties fo:padding="0.097cm" fo:border-left="0.05pt solid #000000" fo:border-right="0.05pt solid #000000" fo:border-top="none" fo:border-bottom="0.05pt solid #000000"/>
    </style:style>
    <style:style style:name="Code.A9" style:family="table-cell">
      <style:table-cell-properties fo:padding="0.097cm" fo:border-left="0.05pt solid #000000" fo:border-right="none" fo:border-top="none" fo:border-bottom="0.05pt solid #000000"/>
    </style:style>
    <style:style style:name="Code.C9" style:family="table-cell">
      <style:table-cell-properties fo:padding="0.097cm" fo:border-left="0.05pt solid #000000" fo:border-right="none" fo:border-top="none" fo:border-bottom="0.05pt solid #000000"/>
    </style:style>
    <style:style style:name="Code.D9" style:family="table-cell">
      <style:table-cell-properties fo:padding="0.097cm" fo:border-left="0.05pt solid #000000" fo:border-right="0.05pt solid #000000" fo:border-top="none" fo:border-bottom="0.05pt solid #000000"/>
    </style:style>
    <style:style style:name="Code.A10" style:family="table-cell">
      <style:table-cell-properties fo:padding="0.097cm" fo:border-left="0.05pt solid #000000" fo:border-right="none" fo:border-top="none" fo:border-bottom="0.05pt solid #000000"/>
    </style:style>
    <style:style style:name="Code.C10" style:family="table-cell">
      <style:table-cell-properties fo:padding="0.097cm" fo:border-left="0.05pt solid #000000" fo:border-right="none" fo:border-top="none" fo:border-bottom="0.05pt solid #000000"/>
    </style:style>
    <style:style style:name="Code.D10" style:family="table-cell">
      <style:table-cell-properties fo:padding="0.097cm" fo:border-left="0.05pt solid #000000" fo:border-right="0.05pt solid #000000" fo:border-top="none" fo:border-bottom="0.05pt solid #000000"/>
    </style:style>
    <style:style style:name="Code.A11" style:family="table-cell">
      <style:table-cell-properties fo:padding="0.097cm" fo:border-left="0.05pt solid #000000" fo:border-right="none" fo:border-top="none" fo:border-bottom="0.05pt solid #000000"/>
    </style:style>
    <style:style style:name="Code.C11" style:family="table-cell">
      <style:table-cell-properties fo:padding="0.097cm" fo:border-left="0.05pt solid #000000" fo:border-right="none" fo:border-top="none" fo:border-bottom="0.05pt solid #000000"/>
    </style:style>
    <style:style style:name="Code.D11" style:family="table-cell">
      <style:table-cell-properties fo:padding="0.097cm" fo:border-left="0.05pt solid #000000" fo:border-right="0.05pt solid #000000" fo:border-top="none" fo:border-bottom="0.05pt solid #000000"/>
    </style:style>
    <style:style style:name="Code.A12" style:family="table-cell">
      <style:table-cell-properties fo:padding="0.097cm" fo:border-left="0.05pt solid #000000" fo:border-right="none" fo:border-top="none" fo:border-bottom="0.05pt solid #000000"/>
    </style:style>
    <style:style style:name="Code.C12" style:family="table-cell">
      <style:table-cell-properties fo:padding="0.097cm" fo:border-left="0.05pt solid #000000" fo:border-right="none" fo:border-top="none" fo:border-bottom="0.05pt solid #000000"/>
    </style:style>
    <style:style style:name="Code.D12" style:family="table-cell">
      <style:table-cell-properties fo:padding="0.097cm" fo:border-left="0.05pt solid #000000" fo:border-right="0.05pt solid #000000" fo:border-top="none" fo:border-bottom="0.05pt solid #000000"/>
    </style:style>
    <style:style style:name="Code.A13" style:family="table-cell">
      <style:table-cell-properties fo:padding="0.097cm" fo:border-left="0.05pt solid #000000" fo:border-right="none" fo:border-top="none" fo:border-bottom="0.05pt solid #000000"/>
    </style:style>
    <style:style style:name="Code.C13" style:family="table-cell">
      <style:table-cell-properties fo:padding="0.097cm" fo:border-left="0.05pt solid #000000" fo:border-right="none" fo:border-top="none" fo:border-bottom="0.05pt solid #000000"/>
    </style:style>
    <style:style style:name="Code.D13" style:family="table-cell">
      <style:table-cell-properties fo:padding="0.097cm" fo:border-left="0.05pt solid #000000" fo:border-right="0.05pt solid #000000" fo:border-top="none" fo:border-bottom="0.05pt solid #000000"/>
    </style:style>
    <style:style style:name="Code.A14" style:family="table-cell">
      <style:table-cell-properties fo:padding="0.097cm" fo:border-left="0.05pt solid #000000" fo:border-right="none" fo:border-top="none" fo:border-bottom="0.05pt solid #000000"/>
    </style:style>
    <style:style style:name="Code.C14" style:family="table-cell">
      <style:table-cell-properties fo:padding="0.097cm" fo:border-left="0.05pt solid #000000" fo:border-right="none" fo:border-top="none" fo:border-bottom="0.05pt solid #000000"/>
    </style:style>
    <style:style style:name="Code.D14" style:family="table-cell">
      <style:table-cell-properties fo:padding="0.097cm" fo:border-left="0.05pt solid #000000" fo:border-right="0.05pt solid #000000" fo:border-top="none" fo:border-bottom="0.05pt solid #000000"/>
    </style:style>
    <style:style style:name="Code.A15" style:family="table-cell">
      <style:table-cell-properties fo:padding="0.097cm" fo:border-left="0.05pt solid #000000" fo:border-right="none" fo:border-top="none" fo:border-bottom="0.05pt solid #000000"/>
    </style:style>
    <style:style style:name="Code.C15" style:family="table-cell">
      <style:table-cell-properties fo:padding="0.097cm" fo:border-left="0.05pt solid #000000" fo:border-right="none" fo:border-top="none" fo:border-bottom="0.05pt solid #000000"/>
    </style:style>
    <style:style style:name="Code.D15" style:family="table-cell">
      <style:table-cell-properties fo:padding="0.097cm" fo:border-left="0.05pt solid #000000" fo:border-right="0.05pt solid #000000" fo:border-top="none" fo:border-bottom="0.05pt solid #000000"/>
    </style:style>
    <style:style style:name="Code.A16" style:family="table-cell">
      <style:table-cell-properties fo:padding="0.097cm" fo:border-left="0.05pt solid #000000" fo:border-right="none" fo:border-top="none" fo:border-bottom="0.05pt solid #000000"/>
    </style:style>
    <style:style style:name="Code.C16" style:family="table-cell">
      <style:table-cell-properties fo:padding="0.097cm" fo:border-left="0.05pt solid #000000" fo:border-right="none" fo:border-top="none" fo:border-bottom="0.05pt solid #000000"/>
    </style:style>
    <style:style style:name="Code.D16" style:family="table-cell">
      <style:table-cell-properties fo:padding="0.097cm" fo:border-left="0.05pt solid #000000" fo:border-right="0.05pt solid #000000" fo:border-top="none" fo:border-bottom="0.05pt solid #000000"/>
    </style:style>
    <style:style style:name="Code.A17" style:family="table-cell">
      <style:table-cell-properties fo:padding="0.097cm" fo:border-left="0.05pt solid #000000" fo:border-right="none" fo:border-top="none" fo:border-bottom="0.05pt solid #000000"/>
    </style:style>
    <style:style style:name="Code.C17" style:family="table-cell">
      <style:table-cell-properties fo:padding="0.097cm" fo:border-left="0.05pt solid #000000" fo:border-right="none" fo:border-top="none" fo:border-bottom="0.05pt solid #000000"/>
    </style:style>
    <style:style style:name="Code.D17" style:family="table-cell">
      <style:table-cell-properties fo:padding="0.097cm" fo:border-left="0.05pt solid #000000" fo:border-right="0.05pt solid #000000" fo:border-top="none" fo:border-bottom="0.05pt solid #000000"/>
    </style:style>
    <style:style style:name="Code.A18" style:family="table-cell">
      <style:table-cell-properties fo:padding="0.097cm" fo:border-left="0.05pt solid #000000" fo:border-right="none" fo:border-top="none" fo:border-bottom="0.05pt solid #000000"/>
    </style:style>
    <style:style style:name="Code.C18" style:family="table-cell">
      <style:table-cell-properties fo:padding="0.097cm" fo:border-left="0.05pt solid #000000" fo:border-right="none" fo:border-top="none" fo:border-bottom="0.05pt solid #000000"/>
    </style:style>
    <style:style style:name="Code.D18" style:family="table-cell">
      <style:table-cell-properties fo:padding="0.097cm" fo:border-left="0.05pt solid #000000" fo:border-right="0.05pt solid #000000" fo:border-top="none" fo:border-bottom="0.05pt solid #000000"/>
    </style:style>
    <style:style style:name="Code.A19" style:family="table-cell">
      <style:table-cell-properties fo:padding="0.097cm" fo:border-left="0.05pt solid #000000" fo:border-right="none" fo:border-top="none" fo:border-bottom="0.05pt solid #000000"/>
    </style:style>
    <style:style style:name="Code.C19" style:family="table-cell">
      <style:table-cell-properties fo:padding="0.097cm" fo:border-left="0.05pt solid #000000" fo:border-right="none" fo:border-top="none" fo:border-bottom="0.05pt solid #000000"/>
    </style:style>
    <style:style style:name="Code.D19" style:family="table-cell">
      <style:table-cell-properties fo:padding="0.097cm" fo:border-left="0.05pt solid #000000" fo:border-right="0.05pt solid #000000" fo:border-top="none" fo:border-bottom="0.05pt solid #000000"/>
    </style:style>
    <style:style style:name="Code.A20" style:family="table-cell">
      <style:table-cell-properties fo:padding="0.097cm" fo:border-left="0.05pt solid #000000" fo:border-right="none" fo:border-top="none" fo:border-bottom="0.05pt solid #000000"/>
    </style:style>
    <style:style style:name="Code.C20" style:family="table-cell">
      <style:table-cell-properties fo:padding="0.097cm" fo:border-left="0.05pt solid #000000" fo:border-right="none" fo:border-top="none" fo:border-bottom="0.05pt solid #000000"/>
    </style:style>
    <style:style style:name="Code.D20" style:family="table-cell">
      <style:table-cell-properties fo:padding="0.097cm" fo:border-left="0.05pt solid #000000" fo:border-right="0.05pt solid #000000" fo:border-top="none" fo:border-bottom="0.05pt solid #000000"/>
    </style:style>
    <style:style style:name="Code.A21" style:family="table-cell">
      <style:table-cell-properties fo:padding="0.097cm" fo:border-left="0.05pt solid #000000" fo:border-right="none" fo:border-top="none" fo:border-bottom="0.05pt solid #000000"/>
    </style:style>
    <style:style style:name="Code.C21" style:family="table-cell">
      <style:table-cell-properties fo:padding="0.097cm" fo:border-left="0.05pt solid #000000" fo:border-right="none" fo:border-top="none" fo:border-bottom="0.05pt solid #000000"/>
    </style:style>
    <style:style style:name="Code.D21" style:family="table-cell">
      <style:table-cell-properties fo:padding="0.097cm" fo:border-left="0.05pt solid #000000" fo:border-right="0.05pt solid #000000" fo:border-top="none" fo:border-bottom="0.05pt solid #000000"/>
    </style:style>
    <style:style style:name="Code.A22" style:family="table-cell">
      <style:table-cell-properties fo:padding="0.097cm" fo:border-left="0.05pt solid #000000" fo:border-right="none" fo:border-top="none" fo:border-bottom="0.05pt solid #000000"/>
    </style:style>
    <style:style style:name="Code.C22" style:family="table-cell">
      <style:table-cell-properties fo:padding="0.097cm" fo:border-left="0.05pt solid #000000" fo:border-right="none" fo:border-top="none" fo:border-bottom="0.05pt solid #000000"/>
    </style:style>
    <style:style style:name="Code.D22" style:family="table-cell">
      <style:table-cell-properties fo:padding="0.097cm" fo:border-left="0.05pt solid #000000" fo:border-right="0.05pt solid #000000" fo:border-top="none" fo:border-bottom="0.05pt solid #000000"/>
    </style:style>
    <style:style style:name="Code.A23" style:family="table-cell">
      <style:table-cell-properties fo:padding="0.097cm" fo:border-left="0.05pt solid #000000" fo:border-right="none" fo:border-top="none" fo:border-bottom="0.05pt solid #000000"/>
    </style:style>
    <style:style style:name="Code.C23" style:family="table-cell">
      <style:table-cell-properties fo:padding="0.097cm" fo:border-left="0.05pt solid #000000" fo:border-right="none" fo:border-top="none" fo:border-bottom="0.05pt solid #000000"/>
    </style:style>
    <style:style style:name="Code.D23" style:family="table-cell">
      <style:table-cell-properties fo:padding="0.097cm" fo:border-left="0.05pt solid #000000" fo:border-right="0.05pt solid #000000" fo:border-top="none" fo:border-bottom="0.05pt solid #000000"/>
    </style:style>
    <style:style style:name="Code.A24" style:family="table-cell">
      <style:table-cell-properties fo:padding="0.097cm" fo:border-left="0.05pt solid #000000" fo:border-right="none" fo:border-top="none" fo:border-bottom="0.05pt solid #000000"/>
    </style:style>
    <style:style style:name="Code.C24" style:family="table-cell">
      <style:table-cell-properties fo:padding="0.097cm" fo:border-left="0.05pt solid #000000" fo:border-right="none" fo:border-top="none" fo:border-bottom="0.05pt solid #000000"/>
    </style:style>
    <style:style style:name="Code.D24" style:family="table-cell">
      <style:table-cell-properties fo:padding="0.097cm" fo:border-left="0.05pt solid #000000" fo:border-right="0.05pt solid #000000" fo:border-top="none" fo:border-bottom="0.05pt solid #000000"/>
    </style:style>
    <style:style style:name="Code.A25" style:family="table-cell">
      <style:table-cell-properties fo:padding="0.097cm" fo:border-left="0.05pt solid #000000" fo:border-right="none" fo:border-top="none" fo:border-bottom="0.05pt solid #000000"/>
    </style:style>
    <style:style style:name="Code.C25" style:family="table-cell">
      <style:table-cell-properties fo:padding="0.097cm" fo:border-left="0.05pt solid #000000" fo:border-right="none" fo:border-top="none" fo:border-bottom="0.05pt solid #000000"/>
    </style:style>
    <style:style style:name="Code.D25" style:family="table-cell">
      <style:table-cell-properties fo:padding="0.097cm" fo:border-left="0.05pt solid #000000" fo:border-right="0.05pt solid #000000" fo:border-top="none" fo:border-bottom="0.05pt solid #000000"/>
    </style:style>
    <style:style style:name="Code.A26" style:family="table-cell">
      <style:table-cell-properties fo:padding="0.097cm" fo:border-left="0.05pt solid #000000" fo:border-right="none" fo:border-top="none" fo:border-bottom="0.05pt solid #000000"/>
    </style:style>
    <style:style style:name="Code.C26" style:family="table-cell">
      <style:table-cell-properties fo:padding="0.097cm" fo:border-left="0.05pt solid #000000" fo:border-right="none" fo:border-top="none" fo:border-bottom="0.05pt solid #000000"/>
    </style:style>
    <style:style style:name="Code.D26" style:family="table-cell">
      <style:table-cell-properties fo:padding="0.097cm" fo:border-left="0.05pt solid #000000" fo:border-right="0.05pt solid #000000" fo:border-top="none" fo:border-bottom="0.05pt solid #000000"/>
    </style:style>
    <style:style style:name="Code.A27" style:family="table-cell">
      <style:table-cell-properties fo:padding="0.097cm" fo:border-left="0.05pt solid #000000" fo:border-right="none" fo:border-top="none" fo:border-bottom="0.05pt solid #000000"/>
    </style:style>
    <style:style style:name="Code.C27" style:family="table-cell">
      <style:table-cell-properties fo:padding="0.097cm" fo:border-left="0.05pt solid #000000" fo:border-right="none" fo:border-top="none" fo:border-bottom="0.05pt solid #000000"/>
    </style:style>
    <style:style style:name="Code.D27" style:family="table-cell">
      <style:table-cell-properties fo:padding="0.097cm" fo:border-left="0.05pt solid #000000" fo:border-right="0.05pt solid #000000" fo:border-top="none" fo:border-bottom="0.05pt solid #000000"/>
    </style:style>
    <style:style style:name="Code.A28" style:family="table-cell">
      <style:table-cell-properties fo:padding="0.097cm" fo:border-left="0.05pt solid #000000" fo:border-right="none" fo:border-top="none" fo:border-bottom="0.05pt solid #000000"/>
    </style:style>
    <style:style style:name="Code.C28" style:family="table-cell">
      <style:table-cell-properties fo:padding="0.097cm" fo:border-left="0.05pt solid #000000" fo:border-right="none" fo:border-top="none" fo:border-bottom="0.05pt solid #000000"/>
    </style:style>
    <style:style style:name="Code.D28" style:family="table-cell">
      <style:table-cell-properties fo:padding="0.097cm" fo:border-left="0.05pt solid #000000" fo:border-right="0.05pt solid #000000" fo:border-top="none" fo:border-bottom="0.05pt solid #000000"/>
    </style:style>
    <style:style style:name="Code.A29" style:family="table-cell">
      <style:table-cell-properties fo:padding="0.097cm" fo:border-left="0.05pt solid #000000" fo:border-right="none" fo:border-top="none" fo:border-bottom="0.05pt solid #000000"/>
    </style:style>
    <style:style style:name="Code.C29" style:family="table-cell">
      <style:table-cell-properties fo:padding="0.097cm" fo:border-left="0.05pt solid #000000" fo:border-right="none" fo:border-top="none" fo:border-bottom="0.05pt solid #000000"/>
    </style:style>
    <style:style style:name="Code.D29" style:family="table-cell">
      <style:table-cell-properties fo:padding="0.097cm" fo:border-left="0.05pt solid #000000" fo:border-right="0.05pt solid #000000" fo:border-top="none" fo:border-bottom="0.05pt solid #000000"/>
    </style:style>
    <style:style style:name="Code.A30" style:family="table-cell">
      <style:table-cell-properties fo:padding="0.097cm" fo:border-left="0.05pt solid #000000" fo:border-right="none" fo:border-top="none" fo:border-bottom="0.05pt solid #000000"/>
    </style:style>
    <style:style style:name="Code.C30" style:family="table-cell">
      <style:table-cell-properties fo:padding="0.097cm" fo:border-left="0.05pt solid #000000" fo:border-right="none" fo:border-top="none" fo:border-bottom="0.05pt solid #000000"/>
    </style:style>
    <style:style style:name="Code.D30" style:family="table-cell">
      <style:table-cell-properties fo:padding="0.097cm" fo:border-left="0.05pt solid #000000" fo:border-right="0.05pt solid #000000" fo:border-top="none" fo:border-bottom="0.05pt solid #000000"/>
    </style:style>
    <style:style style:name="Code.A31" style:family="table-cell">
      <style:table-cell-properties fo:padding="0.097cm" fo:border-left="0.05pt solid #000000" fo:border-right="none" fo:border-top="none" fo:border-bottom="0.05pt solid #000000"/>
    </style:style>
    <style:style style:name="Code.C31" style:family="table-cell">
      <style:table-cell-properties fo:padding="0.097cm" fo:border-left="0.05pt solid #000000" fo:border-right="none" fo:border-top="none" fo:border-bottom="0.05pt solid #000000"/>
    </style:style>
    <style:style style:name="Code.D31" style:family="table-cell">
      <style:table-cell-properties fo:padding="0.097cm" fo:border-left="0.05pt solid #000000" fo:border-right="0.05pt solid #000000" fo:border-top="none" fo:border-bottom="0.05pt solid #000000"/>
    </style:style>
    <style:style style:name="Code.A32" style:family="table-cell">
      <style:table-cell-properties fo:padding="0.097cm" fo:border-left="0.05pt solid #000000" fo:border-right="none" fo:border-top="none" fo:border-bottom="0.05pt solid #000000"/>
    </style:style>
    <style:style style:name="Code.C32" style:family="table-cell">
      <style:table-cell-properties fo:padding="0.097cm" fo:border-left="0.05pt solid #000000" fo:border-right="none" fo:border-top="none" fo:border-bottom="0.05pt solid #000000"/>
    </style:style>
    <style:style style:name="Code.D32" style:family="table-cell">
      <style:table-cell-properties fo:padding="0.097cm" fo:border-left="0.05pt solid #000000" fo:border-right="0.05pt solid #000000" fo:border-top="none" fo:border-bottom="0.05pt solid #000000"/>
    </style:style>
    <style:style style:name="Code.A33" style:family="table-cell">
      <style:table-cell-properties fo:padding="0.097cm" fo:border-left="0.05pt solid #000000" fo:border-right="none" fo:border-top="none" fo:border-bottom="0.05pt solid #000000"/>
    </style:style>
    <style:style style:name="Code.C33" style:family="table-cell">
      <style:table-cell-properties fo:padding="0.097cm" fo:border-left="0.05pt solid #000000" fo:border-right="none" fo:border-top="none" fo:border-bottom="0.05pt solid #000000"/>
    </style:style>
    <style:style style:name="Code.D33" style:family="table-cell">
      <style:table-cell-properties fo:padding="0.097cm" fo:border-left="0.05pt solid #000000" fo:border-right="0.05pt solid #000000" fo:border-top="none" fo:border-bottom="0.05pt solid #000000"/>
    </style:style>
    <style:style style:name="Code.A34" style:family="table-cell">
      <style:table-cell-properties fo:padding="0.097cm" fo:border-left="0.05pt solid #000000" fo:border-right="none" fo:border-top="none" fo:border-bottom="0.05pt solid #000000"/>
    </style:style>
    <style:style style:name="Code.C34" style:family="table-cell">
      <style:table-cell-properties fo:padding="0.097cm" fo:border-left="0.05pt solid #000000" fo:border-right="none" fo:border-top="none" fo:border-bottom="0.05pt solid #000000"/>
    </style:style>
    <style:style style:name="Code.D34" style:family="table-cell">
      <style:table-cell-properties fo:padding="0.097cm" fo:border-left="0.05pt solid #000000" fo:border-right="0.05pt solid #000000" fo:border-top="none" fo:border-bottom="0.05pt solid #000000"/>
    </style:style>
    <style:style style:name="Code.A35" style:family="table-cell">
      <style:table-cell-properties fo:padding="0.097cm" fo:border-left="0.05pt solid #000000" fo:border-right="none" fo:border-top="none" fo:border-bottom="0.05pt solid #000000"/>
    </style:style>
    <style:style style:name="Code.C35" style:family="table-cell">
      <style:table-cell-properties fo:padding="0.097cm" fo:border-left="0.05pt solid #000000" fo:border-right="none" fo:border-top="none" fo:border-bottom="0.05pt solid #000000"/>
    </style:style>
    <style:style style:name="Code.D35" style:family="table-cell">
      <style:table-cell-properties fo:padding="0.097cm" fo:border-left="0.05pt solid #000000" fo:border-right="0.05pt solid #000000" fo:border-top="none" fo:border-bottom="0.05pt solid #000000"/>
    </style:style>
    <style:style style:name="Code.A36" style:family="table-cell">
      <style:table-cell-properties fo:padding="0.097cm" fo:border-left="0.05pt solid #000000" fo:border-right="none" fo:border-top="none" fo:border-bottom="0.05pt solid #000000"/>
    </style:style>
    <style:style style:name="Code.C36" style:family="table-cell">
      <style:table-cell-properties fo:padding="0.097cm" fo:border-left="0.05pt solid #000000" fo:border-right="none" fo:border-top="none" fo:border-bottom="0.05pt solid #000000"/>
    </style:style>
    <style:style style:name="Code.D36" style:family="table-cell">
      <style:table-cell-properties fo:padding="0.097cm" fo:border-left="0.05pt solid #000000" fo:border-right="0.05pt solid #000000" fo:border-top="none" fo:border-bottom="0.05pt solid #000000"/>
    </style:style>
    <style:style style:name="Code.A37" style:family="table-cell">
      <style:table-cell-properties fo:padding="0.097cm" fo:border-left="0.05pt solid #000000" fo:border-right="none" fo:border-top="none" fo:border-bottom="0.05pt solid #000000"/>
    </style:style>
    <style:style style:name="Code.C37" style:family="table-cell">
      <style:table-cell-properties fo:padding="0.097cm" fo:border-left="0.05pt solid #000000" fo:border-right="none" fo:border-top="none" fo:border-bottom="0.05pt solid #000000"/>
    </style:style>
    <style:style style:name="Code.D37" style:family="table-cell">
      <style:table-cell-properties fo:padding="0.097cm" fo:border-left="0.05pt solid #000000" fo:border-right="0.05pt solid #000000" fo:border-top="none" fo:border-bottom="0.05pt solid #000000"/>
    </style:style>
    <style:style style:name="Code.A38" style:family="table-cell">
      <style:table-cell-properties fo:padding="0.097cm" fo:border-left="0.05pt solid #000000" fo:border-right="none" fo:border-top="none" fo:border-bottom="0.05pt solid #000000"/>
    </style:style>
    <style:style style:name="Code.C38" style:family="table-cell">
      <style:table-cell-properties fo:padding="0.097cm" fo:border-left="0.05pt solid #000000" fo:border-right="none" fo:border-top="none" fo:border-bottom="0.05pt solid #000000"/>
    </style:style>
    <style:style style:name="Code.D38" style:family="table-cell">
      <style:table-cell-properties fo:padding="0.097cm" fo:border-left="0.05pt solid #000000" fo:border-right="0.05pt solid #000000" fo:border-top="none" fo:border-bottom="0.05pt solid #000000"/>
    </style:style>
    <style:style style:name="Code.A39" style:family="table-cell">
      <style:table-cell-properties fo:padding="0.097cm" fo:border-left="0.05pt solid #000000" fo:border-right="none" fo:border-top="none" fo:border-bottom="0.05pt solid #000000"/>
    </style:style>
    <style:style style:name="Code.C39" style:family="table-cell">
      <style:table-cell-properties fo:padding="0.097cm" fo:border-left="0.05pt solid #000000" fo:border-right="none" fo:border-top="none" fo:border-bottom="0.05pt solid #000000"/>
    </style:style>
    <style:style style:name="Code.D39" style:family="table-cell">
      <style:table-cell-properties fo:padding="0.097cm" fo:border-left="0.05pt solid #000000" fo:border-right="0.05pt solid #000000" fo:border-top="none" fo:border-bottom="0.05pt solid #000000"/>
    </style:style>
    <style:style style:name="Code.A40" style:family="table-cell">
      <style:table-cell-properties fo:padding="0.097cm" fo:border-left="0.05pt solid #000000" fo:border-right="none" fo:border-top="none" fo:border-bottom="0.05pt solid #000000"/>
    </style:style>
    <style:style style:name="Code.C40" style:family="table-cell">
      <style:table-cell-properties fo:padding="0.097cm" fo:border-left="0.05pt solid #000000" fo:border-right="none" fo:border-top="none" fo:border-bottom="0.05pt solid #000000"/>
    </style:style>
    <style:style style:name="Code.D40" style:family="table-cell">
      <style:table-cell-properties fo:padding="0.097cm" fo:border-left="0.05pt solid #000000" fo:border-right="0.05pt solid #000000" fo:border-top="none" fo:border-bottom="0.05pt solid #000000"/>
    </style:style>
    <style:style style:name="Code.A41" style:family="table-cell">
      <style:table-cell-properties fo:padding="0.097cm" fo:border-left="0.05pt solid #000000" fo:border-right="none" fo:border-top="none" fo:border-bottom="0.05pt solid #000000"/>
    </style:style>
    <style:style style:name="Code.C41" style:family="table-cell">
      <style:table-cell-properties fo:padding="0.097cm" fo:border-left="0.05pt solid #000000" fo:border-right="none" fo:border-top="none" fo:border-bottom="0.05pt solid #000000"/>
    </style:style>
    <style:style style:name="Code.D41" style:family="table-cell">
      <style:table-cell-properties fo:padding="0.097cm" fo:border-left="0.05pt solid #000000" fo:border-right="0.05pt solid #000000" fo:border-top="none" fo:border-bottom="0.05pt solid #000000"/>
    </style:style>
    <style:style style:name="Code.A42" style:family="table-cell">
      <style:table-cell-properties fo:padding="0.097cm" fo:border-left="0.05pt solid #000000" fo:border-right="none" fo:border-top="none" fo:border-bottom="0.05pt solid #000000"/>
    </style:style>
    <style:style style:name="Code.C42" style:family="table-cell">
      <style:table-cell-properties fo:padding="0.097cm" fo:border-left="0.05pt solid #000000" fo:border-right="none" fo:border-top="none" fo:border-bottom="0.05pt solid #000000"/>
    </style:style>
    <style:style style:name="Code.D42" style:family="table-cell">
      <style:table-cell-properties fo:padding="0.097cm" fo:border-left="0.05pt solid #000000" fo:border-right="0.05pt solid #000000" fo:border-top="none" fo:border-bottom="0.05pt solid #000000"/>
    </style:style>
    <style:style style:name="Code.A43" style:family="table-cell">
      <style:table-cell-properties fo:padding="0.097cm" fo:border-left="0.05pt solid #000000" fo:border-right="none" fo:border-top="none" fo:border-bottom="0.05pt solid #000000"/>
    </style:style>
    <style:style style:name="Code.C43" style:family="table-cell">
      <style:table-cell-properties fo:padding="0.097cm" fo:border-left="0.05pt solid #000000" fo:border-right="none" fo:border-top="none" fo:border-bottom="0.05pt solid #000000"/>
    </style:style>
    <style:style style:name="Code.D43" style:family="table-cell">
      <style:table-cell-properties fo:padding="0.097cm" fo:border-left="0.05pt solid #000000" fo:border-right="0.05pt solid #000000" fo:border-top="none" fo:border-bottom="0.05pt solid #000000"/>
    </style:style>
    <style:style style:name="Code.A44" style:family="table-cell">
      <style:table-cell-properties fo:padding="0.097cm" fo:border-left="0.05pt solid #000000" fo:border-right="none" fo:border-top="none" fo:border-bottom="0.05pt solid #000000"/>
    </style:style>
    <style:style style:name="Code.C44" style:family="table-cell">
      <style:table-cell-properties fo:padding="0.097cm" fo:border-left="0.05pt solid #000000" fo:border-right="none" fo:border-top="none" fo:border-bottom="0.05pt solid #000000"/>
    </style:style>
    <style:style style:name="Code.D44" style:family="table-cell">
      <style:table-cell-properties fo:padding="0.097cm" fo:border-left="0.05pt solid #000000" fo:border-right="0.05pt solid #000000" fo:border-top="none" fo:border-bottom="0.05pt solid #000000"/>
    </style:style>
    <style:style style:name="Code.A45" style:family="table-cell">
      <style:table-cell-properties fo:padding="0.097cm" fo:border-left="0.05pt solid #000000" fo:border-right="none" fo:border-top="none" fo:border-bottom="0.05pt solid #000000"/>
    </style:style>
    <style:style style:name="Code.C45" style:family="table-cell">
      <style:table-cell-properties fo:padding="0.097cm" fo:border-left="0.05pt solid #000000" fo:border-right="none" fo:border-top="none" fo:border-bottom="0.05pt solid #000000"/>
    </style:style>
    <style:style style:name="Code.D45" style:family="table-cell">
      <style:table-cell-properties fo:padding="0.097cm" fo:border-left="0.05pt solid #000000" fo:border-right="0.05pt solid #000000" fo:border-top="none" fo:border-bottom="0.05pt solid #000000"/>
    </style:style>
    <style:style style:name="Code.A46" style:family="table-cell">
      <style:table-cell-properties fo:padding="0.097cm" fo:border-left="0.05pt solid #000000" fo:border-right="none" fo:border-top="none" fo:border-bottom="0.05pt solid #000000"/>
    </style:style>
    <style:style style:name="Code.C46" style:family="table-cell">
      <style:table-cell-properties fo:padding="0.097cm" fo:border-left="0.05pt solid #000000" fo:border-right="none" fo:border-top="none" fo:border-bottom="0.05pt solid #000000"/>
    </style:style>
    <style:style style:name="Code.D46" style:family="table-cell">
      <style:table-cell-properties fo:padding="0.097cm" fo:border-left="0.05pt solid #000000" fo:border-right="0.05pt solid #000000" fo:border-top="none" fo:border-bottom="0.05pt solid #000000"/>
    </style:style>
    <style:style style:name="Code.A47" style:family="table-cell">
      <style:table-cell-properties fo:padding="0.097cm" fo:border-left="0.05pt solid #000000" fo:border-right="none" fo:border-top="none" fo:border-bottom="0.05pt solid #000000"/>
    </style:style>
    <style:style style:name="Code.C47" style:family="table-cell">
      <style:table-cell-properties fo:padding="0.097cm" fo:border-left="0.05pt solid #000000" fo:border-right="none" fo:border-top="none" fo:border-bottom="0.05pt solid #000000"/>
    </style:style>
    <style:style style:name="Code.D47" style:family="table-cell">
      <style:table-cell-properties fo:padding="0.097cm" fo:border-left="0.05pt solid #000000" fo:border-right="0.05pt solid #000000" fo:border-top="none" fo:border-bottom="0.05pt solid #000000"/>
    </style:style>
    <style:style style:name="Code.A48" style:family="table-cell">
      <style:table-cell-properties fo:padding="0.097cm" fo:border-left="0.05pt solid #000000" fo:border-right="none" fo:border-top="none" fo:border-bottom="0.05pt solid #000000"/>
    </style:style>
    <style:style style:name="Code.C48" style:family="table-cell">
      <style:table-cell-properties fo:padding="0.097cm" fo:border-left="0.05pt solid #000000" fo:border-right="none" fo:border-top="none" fo:border-bottom="0.05pt solid #000000"/>
    </style:style>
    <style:style style:name="Code.D48" style:family="table-cell">
      <style:table-cell-properties fo:padding="0.097cm" fo:border-left="0.05pt solid #000000" fo:border-right="0.05pt solid #000000" fo:border-top="none" fo:border-bottom="0.05pt solid #000000"/>
    </style:style>
    <style:style style:name="Code.A49" style:family="table-cell">
      <style:table-cell-properties fo:padding="0.097cm" fo:border-left="0.05pt solid #000000" fo:border-right="none" fo:border-top="none" fo:border-bottom="0.05pt solid #000000"/>
    </style:style>
    <style:style style:name="Code.C49" style:family="table-cell">
      <style:table-cell-properties fo:padding="0.097cm" fo:border-left="0.05pt solid #000000" fo:border-right="none" fo:border-top="none" fo:border-bottom="0.05pt solid #000000"/>
    </style:style>
    <style:style style:name="Code.D49" style:family="table-cell">
      <style:table-cell-properties fo:padding="0.097cm" fo:border-left="0.05pt solid #000000" fo:border-right="0.05pt solid #000000" fo:border-top="none" fo:border-bottom="0.05pt solid #000000"/>
    </style:style>
    <style:style style:name="Code.A50" style:family="table-cell">
      <style:table-cell-properties fo:padding="0.097cm" fo:border-left="0.05pt solid #000000" fo:border-right="none" fo:border-top="none" fo:border-bottom="0.05pt solid #000000"/>
    </style:style>
    <style:style style:name="Code.C50" style:family="table-cell">
      <style:table-cell-properties fo:padding="0.097cm" fo:border-left="0.05pt solid #000000" fo:border-right="none" fo:border-top="none" fo:border-bottom="0.05pt solid #000000"/>
    </style:style>
    <style:style style:name="Code.D50" style:family="table-cell">
      <style:table-cell-properties fo:padding="0.097cm" fo:border-left="0.05pt solid #000000" fo:border-right="0.05pt solid #000000" fo:border-top="none" fo:border-bottom="0.05pt solid #000000"/>
    </style:style>
    <style:style style:name="Code.A51" style:family="table-cell">
      <style:table-cell-properties fo:padding="0.097cm" fo:border-left="0.05pt solid #000000" fo:border-right="none" fo:border-top="none" fo:border-bottom="0.05pt solid #000000"/>
    </style:style>
    <style:style style:name="Code.C51" style:family="table-cell">
      <style:table-cell-properties fo:padding="0.097cm" fo:border-left="0.05pt solid #000000" fo:border-right="none" fo:border-top="none" fo:border-bottom="0.05pt solid #000000"/>
    </style:style>
    <style:style style:name="Code.D51" style:family="table-cell">
      <style:table-cell-properties fo:padding="0.097cm" fo:border-left="0.05pt solid #000000" fo:border-right="0.05pt solid #000000" fo:border-top="none" fo:border-bottom="0.05pt solid #000000"/>
    </style:style>
    <style:style style:name="Code.A52" style:family="table-cell">
      <style:table-cell-properties fo:padding="0.097cm" fo:border-left="0.05pt solid #000000" fo:border-right="none" fo:border-top="none" fo:border-bottom="0.05pt solid #000000"/>
    </style:style>
    <style:style style:name="Code.C52" style:family="table-cell">
      <style:table-cell-properties fo:padding="0.097cm" fo:border-left="0.05pt solid #000000" fo:border-right="none" fo:border-top="none" fo:border-bottom="0.05pt solid #000000"/>
    </style:style>
    <style:style style:name="Code.D52" style:family="table-cell">
      <style:table-cell-properties fo:padding="0.097cm" fo:border-left="0.05pt solid #000000" fo:border-right="0.05pt solid #000000" fo:border-top="none" fo:border-bottom="0.05pt solid #000000"/>
    </style:style>
    <style:style style:name="Code.A53" style:family="table-cell">
      <style:table-cell-properties fo:padding="0.097cm" fo:border-left="0.05pt solid #000000" fo:border-right="none" fo:border-top="none" fo:border-bottom="0.05pt solid #000000"/>
    </style:style>
    <style:style style:name="Code.C53" style:family="table-cell">
      <style:table-cell-properties fo:padding="0.097cm" fo:border-left="0.05pt solid #000000" fo:border-right="none" fo:border-top="none" fo:border-bottom="0.05pt solid #000000"/>
    </style:style>
    <style:style style:name="Code.D53" style:family="table-cell">
      <style:table-cell-properties fo:padding="0.097cm" fo:border-left="0.05pt solid #000000" fo:border-right="0.05pt solid #000000" fo:border-top="none" fo:border-bottom="0.05pt solid #000000"/>
    </style:style>
    <style:style style:name="Code.A54" style:family="table-cell">
      <style:table-cell-properties fo:padding="0.097cm" fo:border-left="0.05pt solid #000000" fo:border-right="none" fo:border-top="none" fo:border-bottom="0.05pt solid #000000"/>
    </style:style>
    <style:style style:name="Code.C54" style:family="table-cell">
      <style:table-cell-properties fo:padding="0.097cm" fo:border-left="0.05pt solid #000000" fo:border-right="none" fo:border-top="none" fo:border-bottom="0.05pt solid #000000"/>
    </style:style>
    <style:style style:name="Code.D54" style:family="table-cell">
      <style:table-cell-properties fo:padding="0.097cm" fo:border-left="0.05pt solid #000000" fo:border-right="0.05pt solid #000000" fo:border-top="none" fo:border-bottom="0.05pt solid #000000"/>
    </style:style>
    <style:style style:name="Code.A55" style:family="table-cell">
      <style:table-cell-properties fo:padding="0.097cm" fo:border-left="0.05pt solid #000000" fo:border-right="none" fo:border-top="none" fo:border-bottom="0.05pt solid #000000"/>
    </style:style>
    <style:style style:name="Code.C55" style:family="table-cell">
      <style:table-cell-properties fo:padding="0.097cm" fo:border-left="0.05pt solid #000000" fo:border-right="none" fo:border-top="none" fo:border-bottom="0.05pt solid #000000"/>
    </style:style>
    <style:style style:name="Code.D55" style:family="table-cell">
      <style:table-cell-properties fo:padding="0.097cm" fo:border-left="0.05pt solid #000000" fo:border-right="0.05pt solid #000000" fo:border-top="none" fo:border-bottom="0.05pt solid #000000"/>
    </style:style>
    <style:style style:name="Code.A56" style:family="table-cell">
      <style:table-cell-properties fo:padding="0.097cm" fo:border-left="0.05pt solid #000000" fo:border-right="none" fo:border-top="none" fo:border-bottom="0.05pt solid #000000"/>
    </style:style>
    <style:style style:name="Code.C56" style:family="table-cell">
      <style:table-cell-properties fo:padding="0.097cm" fo:border-left="0.05pt solid #000000" fo:border-right="none" fo:border-top="none" fo:border-bottom="0.05pt solid #000000"/>
    </style:style>
    <style:style style:name="Code.D56" style:family="table-cell">
      <style:table-cell-properties fo:padding="0.097cm" fo:border-left="0.05pt solid #000000" fo:border-right="0.05pt solid #000000" fo:border-top="none" fo:border-bottom="0.05pt solid #000000"/>
    </style:style>
    <style:style style:name="Code.A57" style:family="table-cell">
      <style:table-cell-properties fo:padding="0.097cm" fo:border-left="0.05pt solid #000000" fo:border-right="none" fo:border-top="none" fo:border-bottom="0.05pt solid #000000"/>
    </style:style>
    <style:style style:name="Code.C57" style:family="table-cell">
      <style:table-cell-properties fo:padding="0.097cm" fo:border-left="0.05pt solid #000000" fo:border-right="none" fo:border-top="none" fo:border-bottom="0.05pt solid #000000"/>
    </style:style>
    <style:style style:name="Code.D57" style:family="table-cell">
      <style:table-cell-properties fo:padding="0.097cm" fo:border-left="0.05pt solid #000000" fo:border-right="0.05pt solid #000000" fo:border-top="none" fo:border-bottom="0.05pt solid #000000"/>
    </style:style>
    <style:style style:name="Code.A58" style:family="table-cell">
      <style:table-cell-properties fo:padding="0.097cm" fo:border-left="0.05pt solid #000000" fo:border-right="none" fo:border-top="none" fo:border-bottom="0.05pt solid #000000"/>
    </style:style>
    <style:style style:name="Code.C58" style:family="table-cell">
      <style:table-cell-properties fo:padding="0.097cm" fo:border-left="0.05pt solid #000000" fo:border-right="none" fo:border-top="none" fo:border-bottom="0.05pt solid #000000"/>
    </style:style>
    <style:style style:name="Code.D58" style:family="table-cell">
      <style:table-cell-properties fo:padding="0.097cm" fo:border-left="0.05pt solid #000000" fo:border-right="0.05pt solid #000000" fo:border-top="none" fo:border-bottom="0.05pt solid #000000"/>
    </style:style>
    <style:style style:name="Code.A59" style:family="table-cell">
      <style:table-cell-properties fo:padding="0.097cm" fo:border-left="0.05pt solid #000000" fo:border-right="none" fo:border-top="none" fo:border-bottom="0.05pt solid #000000"/>
    </style:style>
    <style:style style:name="Code.C59" style:family="table-cell">
      <style:table-cell-properties fo:padding="0.097cm" fo:border-left="0.05pt solid #000000" fo:border-right="none" fo:border-top="none" fo:border-bottom="0.05pt solid #000000"/>
    </style:style>
    <style:style style:name="Code.D59" style:family="table-cell">
      <style:table-cell-properties fo:padding="0.097cm" fo:border-left="0.05pt solid #000000" fo:border-right="0.05pt solid #000000" fo:border-top="none" fo:border-bottom="0.05pt solid #000000"/>
    </style:style>
    <style:style style:name="Code.A60" style:family="table-cell">
      <style:table-cell-properties fo:padding="0.097cm" fo:border-left="0.05pt solid #000000" fo:border-right="none" fo:border-top="none" fo:border-bottom="0.05pt solid #000000"/>
    </style:style>
    <style:style style:name="Code.C60" style:family="table-cell">
      <style:table-cell-properties fo:padding="0.097cm" fo:border-left="0.05pt solid #000000" fo:border-right="none" fo:border-top="none" fo:border-bottom="0.05pt solid #000000"/>
    </style:style>
    <style:style style:name="Code.D60" style:family="table-cell">
      <style:table-cell-properties fo:padding="0.097cm" fo:border-left="0.05pt solid #000000" fo:border-right="0.05pt solid #000000" fo:border-top="none" fo:border-bottom="0.05pt solid #000000"/>
    </style:style>
    <style:style style:name="Code.A61" style:family="table-cell">
      <style:table-cell-properties fo:padding="0.097cm" fo:border-left="0.05pt solid #000000" fo:border-right="none" fo:border-top="none" fo:border-bottom="0.05pt solid #000000"/>
    </style:style>
    <style:style style:name="Code.C61" style:family="table-cell">
      <style:table-cell-properties fo:padding="0.097cm" fo:border-left="0.05pt solid #000000" fo:border-right="none" fo:border-top="none" fo:border-bottom="0.05pt solid #000000"/>
    </style:style>
    <style:style style:name="Code.D61" style:family="table-cell">
      <style:table-cell-properties fo:padding="0.097cm" fo:border-left="0.05pt solid #000000" fo:border-right="0.05pt solid #000000" fo:border-top="none" fo:border-bottom="0.05pt solid #000000"/>
    </style:style>
    <style:style style:name="Code.A62" style:family="table-cell">
      <style:table-cell-properties fo:padding="0.097cm" fo:border-left="0.05pt solid #000000" fo:border-right="none" fo:border-top="none" fo:border-bottom="0.05pt solid #000000"/>
    </style:style>
    <style:style style:name="Code.C62" style:family="table-cell">
      <style:table-cell-properties fo:padding="0.097cm" fo:border-left="0.05pt solid #000000" fo:border-right="none" fo:border-top="none" fo:border-bottom="0.05pt solid #000000"/>
    </style:style>
    <style:style style:name="Code.D62" style:family="table-cell">
      <style:table-cell-properties fo:padding="0.097cm" fo:border-left="0.05pt solid #000000" fo:border-right="0.05pt solid #000000" fo:border-top="none" fo:border-bottom="0.05pt solid #000000"/>
    </style:style>
    <style:style style:name="Code.A63" style:family="table-cell">
      <style:table-cell-properties fo:padding="0.097cm" fo:border-left="0.05pt solid #000000" fo:border-right="none" fo:border-top="none" fo:border-bottom="0.05pt solid #000000"/>
    </style:style>
    <style:style style:name="Code.C63" style:family="table-cell">
      <style:table-cell-properties fo:padding="0.097cm" fo:border-left="0.05pt solid #000000" fo:border-right="none" fo:border-top="none" fo:border-bottom="0.05pt solid #000000"/>
    </style:style>
    <style:style style:name="Code.D63" style:family="table-cell">
      <style:table-cell-properties fo:padding="0.097cm" fo:border-left="0.05pt solid #000000" fo:border-right="0.05pt solid #000000" fo:border-top="none" fo:border-bottom="0.05pt solid #000000"/>
    </style:style>
    <style:style style:name="Code.A64" style:family="table-cell">
      <style:table-cell-properties fo:padding="0.097cm" fo:border-left="0.05pt solid #000000" fo:border-right="none" fo:border-top="none" fo:border-bottom="0.05pt solid #000000"/>
    </style:style>
    <style:style style:name="Code.B64" style:family="table-cell">
      <style:table-cell-properties style:vertical-align="top" fo:padding="0.097cm" fo:border-left="0.05pt solid #000000" fo:border-right="none" fo:border-top="none" fo:border-bottom="0.05pt solid #000000"/>
    </style:style>
    <style:style style:name="Code.C64" style:family="table-cell">
      <style:table-cell-properties fo:padding="0.097cm" fo:border-left="0.05pt solid #000000" fo:border-right="none" fo:border-top="none" fo:border-bottom="0.05pt solid #000000"/>
    </style:style>
    <style:style style:name="Code.D64" style:family="table-cell" style:data-style-name="N0">
      <style:table-cell-properties style:vertical-align="bottom" fo:padding="0.097cm" fo:border-left="0.05pt solid #000000" fo:border-right="0.05pt solid #000000" fo:border-top="none" fo:border-bottom="0.05pt solid #000000"/>
    </style:style>
    <style:style style:name="Code.A65" style:family="table-cell">
      <style:table-cell-properties fo:padding="0.097cm" fo:border-left="0.05pt solid #000000" fo:border-right="none" fo:border-top="none" fo:border-bottom="0.05pt solid #000000"/>
    </style:style>
    <style:style style:name="Code.B65" style:family="table-cell">
      <style:table-cell-properties style:vertical-align="top" fo:padding="0.097cm" fo:border-left="0.05pt solid #000000" fo:border-right="none" fo:border-top="none" fo:border-bottom="0.05pt solid #000000"/>
    </style:style>
    <style:style style:name="Code.C65" style:family="table-cell">
      <style:table-cell-properties fo:padding="0.097cm" fo:border-left="0.05pt solid #000000" fo:border-right="none" fo:border-top="none" fo:border-bottom="0.05pt solid #000000"/>
    </style:style>
    <style:style style:name="Code.A66" style:family="table-cell">
      <style:table-cell-properties fo:padding="0.097cm" fo:border-left="0.05pt solid #000000" fo:border-right="none" fo:border-top="none" fo:border-bottom="0.05pt solid #000000"/>
    </style:style>
    <style:style style:name="Code.B66" style:family="table-cell">
      <style:table-cell-properties style:vertical-align="top" fo:padding="0.097cm" fo:border-left="0.05pt solid #000000" fo:border-right="none" fo:border-top="none" fo:border-bottom="0.05pt solid #000000"/>
    </style:style>
    <style:style style:name="Code.C66" style:family="table-cell">
      <style:table-cell-properties fo:padding="0.097cm" fo:border-left="0.05pt solid #000000" fo:border-right="none" fo:border-top="none" fo:border-bottom="0.05pt solid #000000"/>
    </style:style>
    <style:style style:name="Code.A67" style:family="table-cell">
      <style:table-cell-properties fo:padding="0.097cm" fo:border-left="0.05pt solid #000000" fo:border-right="none" fo:border-top="none" fo:border-bottom="0.05pt solid #000000"/>
    </style:style>
    <style:style style:name="Code.B67" style:family="table-cell">
      <style:table-cell-properties style:vertical-align="top" fo:padding="0.097cm" fo:border-left="0.05pt solid #000000" fo:border-right="none" fo:border-top="none" fo:border-bottom="0.05pt solid #000000"/>
    </style:style>
    <style:style style:name="Code.C67" style:family="table-cell">
      <style:table-cell-properties fo:padding="0.097cm" fo:border-left="0.05pt solid #000000" fo:border-right="none" fo:border-top="none" fo:border-bottom="0.05pt solid #000000"/>
    </style:style>
    <style:style style:name="Code.A68" style:family="table-cell">
      <style:table-cell-properties fo:padding="0.097cm" fo:border-left="0.05pt solid #000000" fo:border-right="none" fo:border-top="none" fo:border-bottom="0.05pt solid #000000"/>
    </style:style>
    <style:style style:name="Code.B68" style:family="table-cell">
      <style:table-cell-properties style:vertical-align="top" fo:padding="0.097cm" fo:border-left="0.05pt solid #000000" fo:border-right="none" fo:border-top="none" fo:border-bottom="0.05pt solid #000000"/>
    </style:style>
    <style:style style:name="Code.C68" style:family="table-cell">
      <style:table-cell-properties fo:padding="0.097cm" fo:border-left="0.05pt solid #000000" fo:border-right="none" fo:border-top="none" fo:border-bottom="0.05pt solid #000000"/>
    </style:style>
    <style:style style:name="Code.A69" style:family="table-cell">
      <style:table-cell-properties fo:padding="0.097cm" fo:border-left="0.05pt solid #000000" fo:border-right="none" fo:border-top="none" fo:border-bottom="0.05pt solid #000000"/>
    </style:style>
    <style:style style:name="Code.B69" style:family="table-cell">
      <style:table-cell-properties style:vertical-align="top" fo:padding="0.097cm" fo:border-left="0.05pt solid #000000" fo:border-right="none" fo:border-top="none" fo:border-bottom="0.05pt solid #000000"/>
    </style:style>
    <style:style style:name="Code.C69" style:family="table-cell">
      <style:table-cell-properties fo:padding="0.097cm" fo:border-left="0.05pt solid #000000" fo:border-right="none" fo:border-top="none" fo:border-bottom="0.05pt solid #000000"/>
    </style:style>
    <style:style style:name="Code.A70" style:family="table-cell">
      <style:table-cell-properties fo:padding="0.097cm" fo:border-left="0.05pt solid #000000" fo:border-right="none" fo:border-top="none" fo:border-bottom="0.05pt solid #000000"/>
    </style:style>
    <style:style style:name="Code.B70" style:family="table-cell">
      <style:table-cell-properties style:vertical-align="top" fo:padding="0.097cm" fo:border-left="0.05pt solid #000000" fo:border-right="none" fo:border-top="none" fo:border-bottom="0.05pt solid #000000"/>
    </style:style>
    <style:style style:name="Code.C70" style:family="table-cell">
      <style:table-cell-properties fo:padding="0.097cm" fo:border-left="0.05pt solid #000000" fo:border-right="none" fo:border-top="none" fo:border-bottom="0.05pt solid #000000"/>
    </style:style>
    <style:style style:name="Code.A71" style:family="table-cell">
      <style:table-cell-properties fo:padding="0.097cm" fo:border-left="0.05pt solid #000000" fo:border-right="none" fo:border-top="none" fo:border-bottom="0.05pt solid #000000"/>
    </style:style>
    <style:style style:name="Code.C71" style:family="table-cell">
      <style:table-cell-properties fo:padding="0.097cm" fo:border-left="0.05pt solid #000000" fo:border-right="none" fo:border-top="none" fo:border-bottom="0.05pt solid #000000"/>
    </style:style>
    <style:style style:name="Code.D71" style:family="table-cell">
      <style:table-cell-properties fo:padding="0.097cm" fo:border-left="0.05pt solid #000000" fo:border-right="0.05pt solid #000000" fo:border-top="none" fo:border-bottom="0.05pt solid #000000"/>
    </style:style>
    <style:style style:name="Code.A72" style:family="table-cell">
      <style:table-cell-properties fo:padding="0.097cm" fo:border-left="0.05pt solid #000000" fo:border-right="none" fo:border-top="none" fo:border-bottom="0.05pt solid #000000"/>
    </style:style>
    <style:style style:name="Code.C72" style:family="table-cell">
      <style:table-cell-properties fo:padding="0.097cm" fo:border-left="0.05pt solid #000000" fo:border-right="none" fo:border-top="none" fo:border-bottom="0.05pt solid #000000"/>
    </style:style>
    <style:style style:name="Code.D72" style:family="table-cell">
      <style:table-cell-properties fo:padding="0.097cm" fo:border-left="0.05pt solid #000000" fo:border-right="0.05pt solid #000000" fo:border-top="none" fo:border-bottom="0.05pt solid #000000"/>
    </style:style>
    <style:style style:name="Code.A73" style:family="table-cell">
      <style:table-cell-properties fo:padding="0.097cm" fo:border-left="0.05pt solid #000000" fo:border-right="none" fo:border-top="none" fo:border-bottom="0.05pt solid #000000"/>
    </style:style>
    <style:style style:name="Code.C73" style:family="table-cell">
      <style:table-cell-properties fo:padding="0.097cm" fo:border-left="0.05pt solid #000000" fo:border-right="none" fo:border-top="none" fo:border-bottom="0.05pt solid #000000"/>
    </style:style>
    <style:style style:name="Code.D73" style:family="table-cell">
      <style:table-cell-properties fo:padding="0.097cm" fo:border-left="0.05pt solid #000000" fo:border-right="0.05pt solid #000000" fo:border-top="none" fo:border-bottom="0.05pt solid #000000"/>
    </style:style>
    <style:style style:name="Code.A74" style:family="table-cell">
      <style:table-cell-properties fo:padding="0.097cm" fo:border-left="0.05pt solid #000000" fo:border-right="none" fo:border-top="none" fo:border-bottom="0.05pt solid #000000"/>
    </style:style>
    <style:style style:name="Code.C74" style:family="table-cell">
      <style:table-cell-properties fo:padding="0.097cm" fo:border-left="0.05pt solid #000000" fo:border-right="none" fo:border-top="none" fo:border-bottom="0.05pt solid #000000"/>
    </style:style>
    <style:style style:name="Code.D74" style:family="table-cell">
      <style:table-cell-properties fo:padding="0.097cm" fo:border-left="0.05pt solid #000000" fo:border-right="0.05pt solid #000000" fo:border-top="none" fo:border-bottom="0.05pt solid #000000"/>
    </style:style>
    <style:style style:name="Code.A75" style:family="table-cell">
      <style:table-cell-properties fo:padding="0.097cm" fo:border-left="0.05pt solid #000000" fo:border-right="none" fo:border-top="none" fo:border-bottom="0.05pt solid #000000"/>
    </style:style>
    <style:style style:name="Code.C75" style:family="table-cell">
      <style:table-cell-properties fo:padding="0.097cm" fo:border-left="0.05pt solid #000000" fo:border-right="none" fo:border-top="none" fo:border-bottom="0.05pt solid #000000"/>
    </style:style>
    <style:style style:name="Code.D75" style:family="table-cell">
      <style:table-cell-properties fo:padding="0.097cm" fo:border-left="0.05pt solid #000000" fo:border-right="0.05pt solid #000000" fo:border-top="none" fo:border-bottom="0.05pt solid #000000"/>
    </style:style>
    <style:style style:name="Code.A76" style:family="table-cell">
      <style:table-cell-properties fo:padding="0.097cm" fo:border-left="0.05pt solid #000000" fo:border-right="none" fo:border-top="none" fo:border-bottom="0.05pt solid #000000"/>
    </style:style>
    <style:style style:name="Code.C76" style:family="table-cell">
      <style:table-cell-properties fo:padding="0.097cm" fo:border-left="0.05pt solid #000000" fo:border-right="none" fo:border-top="none" fo:border-bottom="0.05pt solid #000000"/>
    </style:style>
    <style:style style:name="Code.D76" style:family="table-cell">
      <style:table-cell-properties fo:padding="0.097cm" fo:border-left="0.05pt solid #000000" fo:border-right="0.05pt solid #000000" fo:border-top="none" fo:border-bottom="0.05pt solid #000000"/>
    </style:style>
    <style:style style:name="Code.A77" style:family="table-cell">
      <style:table-cell-properties fo:padding="0.097cm" fo:border-left="0.05pt solid #000000" fo:border-right="none" fo:border-top="none" fo:border-bottom="0.05pt solid #000000"/>
    </style:style>
    <style:style style:name="Code.C77" style:family="table-cell">
      <style:table-cell-properties fo:padding="0.097cm" fo:border-left="0.05pt solid #000000" fo:border-right="none" fo:border-top="none" fo:border-bottom="0.05pt solid #000000"/>
    </style:style>
    <style:style style:name="Code.D77" style:family="table-cell">
      <style:table-cell-properties fo:padding="0.097cm" fo:border-left="0.05pt solid #000000" fo:border-right="0.05pt solid #000000" fo:border-top="none" fo:border-bottom="0.05pt solid #000000"/>
    </style:style>
    <style:style style:name="Code.A78" style:family="table-cell">
      <style:table-cell-properties fo:padding="0.097cm" fo:border-left="0.05pt solid #000000" fo:border-right="none" fo:border-top="none" fo:border-bottom="0.05pt solid #000000"/>
    </style:style>
    <style:style style:name="Code.C78" style:family="table-cell">
      <style:table-cell-properties fo:padding="0.097cm" fo:border-left="0.05pt solid #000000" fo:border-right="none" fo:border-top="none" fo:border-bottom="0.05pt solid #000000"/>
    </style:style>
    <style:style style:name="Code.D78" style:family="table-cell">
      <style:table-cell-properties fo:padding="0.097cm" fo:border-left="0.05pt solid #000000" fo:border-right="0.05pt solid #000000" fo:border-top="none" fo:border-bottom="0.05pt solid #000000"/>
    </style:style>
    <style:style style:name="Code.A79" style:family="table-cell">
      <style:table-cell-properties fo:padding="0.097cm" fo:border-left="0.05pt solid #000000" fo:border-right="none" fo:border-top="none" fo:border-bottom="0.05pt solid #000000"/>
    </style:style>
    <style:style style:name="Code.C79" style:family="table-cell">
      <style:table-cell-properties fo:padding="0.097cm" fo:border-left="0.05pt solid #000000" fo:border-right="none" fo:border-top="none" fo:border-bottom="0.05pt solid #000000"/>
    </style:style>
    <style:style style:name="Code.D79" style:family="table-cell">
      <style:table-cell-properties fo:padding="0.097cm" fo:border-left="0.05pt solid #000000" fo:border-right="0.05pt solid #000000" fo:border-top="none" fo:border-bottom="0.05pt solid #000000"/>
    </style:style>
    <style:style style:name="Code.A80" style:family="table-cell">
      <style:table-cell-properties fo:padding="0.097cm" fo:border-left="0.05pt solid #000000" fo:border-right="none" fo:border-top="none" fo:border-bottom="0.05pt solid #000000"/>
    </style:style>
    <style:style style:name="Code.C80" style:family="table-cell">
      <style:table-cell-properties fo:padding="0.097cm" fo:border-left="0.05pt solid #000000" fo:border-right="none" fo:border-top="none" fo:border-bottom="0.05pt solid #000000"/>
    </style:style>
    <style:style style:name="Code.D80" style:family="table-cell">
      <style:table-cell-properties fo:padding="0.097cm" fo:border-left="0.05pt solid #000000" fo:border-right="0.05pt solid #000000" fo:border-top="none" fo:border-bottom="0.05pt solid #000000"/>
    </style:style>
    <style:style style:name="Code.A81" style:family="table-cell">
      <style:table-cell-properties fo:padding="0.097cm" fo:border-left="0.05pt solid #000000" fo:border-right="none" fo:border-top="none" fo:border-bottom="0.05pt solid #000000"/>
    </style:style>
    <style:style style:name="Code.C81" style:family="table-cell">
      <style:table-cell-properties fo:padding="0.097cm" fo:border-left="0.05pt solid #000000" fo:border-right="none" fo:border-top="none" fo:border-bottom="0.05pt solid #000000"/>
    </style:style>
    <style:style style:name="Code.D81" style:family="table-cell">
      <style:table-cell-properties fo:padding="0.097cm" fo:border-left="0.05pt solid #000000" fo:border-right="0.05pt solid #000000" fo:border-top="none" fo:border-bottom="0.05pt solid #000000"/>
    </style:style>
    <style:style style:name="Code.A82" style:family="table-cell">
      <style:table-cell-properties fo:padding="0.097cm" fo:border-left="0.05pt solid #000000" fo:border-right="none" fo:border-top="none" fo:border-bottom="0.05pt solid #000000"/>
    </style:style>
    <style:style style:name="Code.C82" style:family="table-cell">
      <style:table-cell-properties fo:padding="0.097cm" fo:border-left="0.05pt solid #000000" fo:border-right="none" fo:border-top="none" fo:border-bottom="0.05pt solid #000000"/>
    </style:style>
    <style:style style:name="Code.D82" style:family="table-cell">
      <style:table-cell-properties fo:padding="0.097cm" fo:border-left="0.05pt solid #000000" fo:border-right="0.05pt solid #000000" fo:border-top="none" fo:border-bottom="0.05pt solid #000000"/>
    </style:style>
    <style:style style:name="Code.A83" style:family="table-cell">
      <style:table-cell-properties fo:padding="0.097cm" fo:border-left="0.05pt solid #000000" fo:border-right="none" fo:border-top="none" fo:border-bottom="0.05pt solid #000000"/>
    </style:style>
    <style:style style:name="Code.C83" style:family="table-cell">
      <style:table-cell-properties fo:padding="0.097cm" fo:border-left="0.05pt solid #000000" fo:border-right="none" fo:border-top="none" fo:border-bottom="0.05pt solid #000000"/>
    </style:style>
    <style:style style:name="Code.D83" style:family="table-cell">
      <style:table-cell-properties fo:padding="0.097cm" fo:border-left="0.05pt solid #000000" fo:border-right="0.05pt solid #000000" fo:border-top="none" fo:border-bottom="0.05pt solid #000000"/>
    </style:style>
    <style:style style:name="Code.A84" style:family="table-cell">
      <style:table-cell-properties fo:padding="0.097cm" fo:border-left="0.05pt solid #000000" fo:border-right="none" fo:border-top="none" fo:border-bottom="0.05pt solid #000000"/>
    </style:style>
    <style:style style:name="Code.C84" style:family="table-cell">
      <style:table-cell-properties fo:padding="0.097cm" fo:border-left="0.05pt solid #000000" fo:border-right="none" fo:border-top="none" fo:border-bottom="0.05pt solid #000000"/>
    </style:style>
    <style:style style:name="Code.D84" style:family="table-cell">
      <style:table-cell-properties fo:padding="0.097cm" fo:border-left="0.05pt solid #000000" fo:border-right="0.05pt solid #000000" fo:border-top="none" fo:border-bottom="0.05pt solid #000000"/>
    </style:style>
    <style:style style:name="Code.A85" style:family="table-cell">
      <style:table-cell-properties fo:padding="0.097cm" fo:border-left="0.05pt solid #000000" fo:border-right="none" fo:border-top="none" fo:border-bottom="0.05pt solid #000000"/>
    </style:style>
    <style:style style:name="Code.C85" style:family="table-cell">
      <style:table-cell-properties fo:padding="0.097cm" fo:border-left="0.05pt solid #000000" fo:border-right="none" fo:border-top="none" fo:border-bottom="0.05pt solid #000000"/>
    </style:style>
    <style:style style:name="Code.D85" style:family="table-cell">
      <style:table-cell-properties fo:padding="0.097cm" fo:border-left="0.05pt solid #000000" fo:border-right="0.05pt solid #000000" fo:border-top="none" fo:border-bottom="0.05pt solid #000000"/>
    </style:style>
    <style:style style:name="Code.A86" style:family="table-cell">
      <style:table-cell-properties fo:padding="0.097cm" fo:border-left="0.05pt solid #000000" fo:border-right="none" fo:border-top="none" fo:border-bottom="0.05pt solid #000000"/>
    </style:style>
    <style:style style:name="Code.C86" style:family="table-cell">
      <style:table-cell-properties fo:padding="0.097cm" fo:border-left="0.05pt solid #000000" fo:border-right="none" fo:border-top="none" fo:border-bottom="0.05pt solid #000000"/>
    </style:style>
    <style:style style:name="Code.D86" style:family="table-cell">
      <style:table-cell-properties fo:padding="0.097cm" fo:border-left="0.05pt solid #000000" fo:border-right="0.05pt solid #000000" fo:border-top="none" fo:border-bottom="0.05pt solid #000000"/>
    </style:style>
    <style:style style:name="Code.A87" style:family="table-cell">
      <style:table-cell-properties fo:padding="0.097cm" fo:border-left="0.05pt solid #000000" fo:border-right="none" fo:border-top="none" fo:border-bottom="0.05pt solid #000000"/>
    </style:style>
    <style:style style:name="Code.C87" style:family="table-cell">
      <style:table-cell-properties fo:padding="0.097cm" fo:border-left="0.05pt solid #000000" fo:border-right="none" fo:border-top="none" fo:border-bottom="0.05pt solid #000000"/>
    </style:style>
    <style:style style:name="Code.D87" style:family="table-cell">
      <style:table-cell-properties fo:padding="0.097cm" fo:border-left="0.05pt solid #000000" fo:border-right="0.05pt solid #000000" fo:border-top="none" fo:border-bottom="0.05pt solid #000000"/>
    </style:style>
    <style:style style:name="Code.A88" style:family="table-cell">
      <style:table-cell-properties fo:padding="0.097cm" fo:border-left="0.05pt solid #000000" fo:border-right="none" fo:border-top="none" fo:border-bottom="0.05pt solid #000000"/>
    </style:style>
    <style:style style:name="Code.C88" style:family="table-cell">
      <style:table-cell-properties fo:padding="0.097cm" fo:border-left="0.05pt solid #000000" fo:border-right="none" fo:border-top="none" fo:border-bottom="0.05pt solid #000000"/>
    </style:style>
    <style:style style:name="Code.D88" style:family="table-cell">
      <style:table-cell-properties fo:padding="0.097cm" fo:border-left="0.05pt solid #000000" fo:border-right="0.05pt solid #000000" fo:border-top="none" fo:border-bottom="0.05pt solid #000000"/>
    </style:style>
    <style:style style:name="Code.A89" style:family="table-cell">
      <style:table-cell-properties fo:padding="0.097cm" fo:border-left="0.05pt solid #000000" fo:border-right="none" fo:border-top="none" fo:border-bottom="0.05pt solid #000000"/>
    </style:style>
    <style:style style:name="Code.C89" style:family="table-cell">
      <style:table-cell-properties fo:padding="0.097cm" fo:border-left="0.05pt solid #000000" fo:border-right="none" fo:border-top="none" fo:border-bottom="0.05pt solid #000000"/>
    </style:style>
    <style:style style:name="Code.D89" style:family="table-cell">
      <style:table-cell-properties fo:padding="0.097cm" fo:border-left="0.05pt solid #000000" fo:border-right="0.05pt solid #000000" fo:border-top="none" fo:border-bottom="0.05pt solid #000000"/>
    </style:style>
    <style:style style:name="Code.A90" style:family="table-cell">
      <style:table-cell-properties fo:padding="0.097cm" fo:border-left="0.05pt solid #000000" fo:border-right="none" fo:border-top="none" fo:border-bottom="0.05pt solid #000000"/>
    </style:style>
    <style:style style:name="Code.C90" style:family="table-cell">
      <style:table-cell-properties fo:padding="0.097cm" fo:border-left="0.05pt solid #000000" fo:border-right="none" fo:border-top="none" fo:border-bottom="0.05pt solid #000000"/>
    </style:style>
    <style:style style:name="Code.D90" style:family="table-cell">
      <style:table-cell-properties fo:padding="0.097cm" fo:border-left="0.05pt solid #000000" fo:border-right="0.05pt solid #000000" fo:border-top="none" fo:border-bottom="0.05pt solid #000000"/>
    </style:style>
    <style:style style:name="Code.A91" style:family="table-cell">
      <style:table-cell-properties fo:padding="0.097cm" fo:border-left="0.05pt solid #000000" fo:border-right="none" fo:border-top="none" fo:border-bottom="0.05pt solid #000000"/>
    </style:style>
    <style:style style:name="Code.C91" style:family="table-cell">
      <style:table-cell-properties fo:padding="0.097cm" fo:border-left="0.05pt solid #000000" fo:border-right="none" fo:border-top="none" fo:border-bottom="0.05pt solid #000000"/>
    </style:style>
    <style:style style:name="Code.D91" style:family="table-cell">
      <style:table-cell-properties fo:padding="0.097cm" fo:border-left="0.05pt solid #000000" fo:border-right="0.05pt solid #000000" fo:border-top="none" fo:border-bottom="0.05pt solid #000000"/>
    </style:style>
    <style:style style:name="Code.A92" style:family="table-cell">
      <style:table-cell-properties fo:padding="0.097cm" fo:border-left="0.05pt solid #000000" fo:border-right="none" fo:border-top="none" fo:border-bottom="0.05pt solid #000000"/>
    </style:style>
    <style:style style:name="Code.C92" style:family="table-cell">
      <style:table-cell-properties fo:padding="0.097cm" fo:border-left="0.05pt solid #000000" fo:border-right="none" fo:border-top="none" fo:border-bottom="0.05pt solid #000000"/>
    </style:style>
    <style:style style:name="Code.D92" style:family="table-cell">
      <style:table-cell-properties fo:padding="0.097cm" fo:border-left="0.05pt solid #000000" fo:border-right="0.05pt solid #000000" fo:border-top="none" fo:border-bottom="0.05pt solid #000000"/>
    </style:style>
    <style:style style:name="Code.A93" style:family="table-cell">
      <style:table-cell-properties fo:padding="0.097cm" fo:border-left="0.05pt solid #000000" fo:border-right="none" fo:border-top="none" fo:border-bottom="0.05pt solid #000000"/>
    </style:style>
    <style:style style:name="Code.C93" style:family="table-cell">
      <style:table-cell-properties fo:padding="0.097cm" fo:border-left="0.05pt solid #000000" fo:border-right="none" fo:border-top="none" fo:border-bottom="0.05pt solid #000000"/>
    </style:style>
    <style:style style:name="Code.D93" style:family="table-cell">
      <style:table-cell-properties fo:padding="0.097cm" fo:border-left="0.05pt solid #000000" fo:border-right="0.05pt solid #000000" fo:border-top="none" fo:border-bottom="0.05pt solid #000000"/>
    </style:style>
    <style:style style:name="Code.A94" style:family="table-cell">
      <style:table-cell-properties fo:padding="0.097cm" fo:border-left="0.05pt solid #000000" fo:border-right="none" fo:border-top="none" fo:border-bottom="0.05pt solid #000000"/>
    </style:style>
    <style:style style:name="Code.C94" style:family="table-cell">
      <style:table-cell-properties fo:padding="0.097cm" fo:border-left="0.05pt solid #000000" fo:border-right="none" fo:border-top="none" fo:border-bottom="0.05pt solid #000000"/>
    </style:style>
    <style:style style:name="Code.D94" style:family="table-cell">
      <style:table-cell-properties fo:padding="0.097cm" fo:border-left="0.05pt solid #000000" fo:border-right="0.05pt solid #000000" fo:border-top="none" fo:border-bottom="0.05pt solid #000000"/>
    </style:style>
    <style:style style:name="Code.A95" style:family="table-cell">
      <style:table-cell-properties fo:padding="0.097cm" fo:border-left="0.05pt solid #000000" fo:border-right="none" fo:border-top="none" fo:border-bottom="0.05pt solid #000000"/>
    </style:style>
    <style:style style:name="Code.C95" style:family="table-cell">
      <style:table-cell-properties fo:padding="0.097cm" fo:border-left="0.05pt solid #000000" fo:border-right="none" fo:border-top="none" fo:border-bottom="0.05pt solid #000000"/>
    </style:style>
    <style:style style:name="Code.D95" style:family="table-cell">
      <style:table-cell-properties fo:padding="0.097cm" fo:border-left="0.05pt solid #000000" fo:border-right="0.05pt solid #000000" fo:border-top="none" fo:border-bottom="0.05pt solid #000000"/>
    </style:style>
    <style:style style:name="Code.A96" style:family="table-cell">
      <style:table-cell-properties fo:padding="0.097cm" fo:border-left="0.05pt solid #000000" fo:border-right="none" fo:border-top="none" fo:border-bottom="0.05pt solid #000000"/>
    </style:style>
    <style:style style:name="Code.C96" style:family="table-cell">
      <style:table-cell-properties fo:padding="0.097cm" fo:border-left="0.05pt solid #000000" fo:border-right="none" fo:border-top="none" fo:border-bottom="0.05pt solid #000000"/>
    </style:style>
    <style:style style:name="Code.D96" style:family="table-cell">
      <style:table-cell-properties fo:padding="0.097cm" fo:border-left="0.05pt solid #000000" fo:border-right="0.05pt solid #000000" fo:border-top="none" fo:border-bottom="0.05pt solid #000000"/>
    </style:style>
    <style:style style:name="Code.A97" style:family="table-cell">
      <style:table-cell-properties fo:padding="0.097cm" fo:border-left="0.05pt solid #000000" fo:border-right="none" fo:border-top="none" fo:border-bottom="0.05pt solid #000000"/>
    </style:style>
    <style:style style:name="Code.C97" style:family="table-cell">
      <style:table-cell-properties fo:padding="0.097cm" fo:border-left="0.05pt solid #000000" fo:border-right="none" fo:border-top="none" fo:border-bottom="0.05pt solid #000000"/>
    </style:style>
    <style:style style:name="Code.D97" style:family="table-cell">
      <style:table-cell-properties fo:padding="0.097cm" fo:border-left="0.05pt solid #000000" fo:border-right="0.05pt solid #000000" fo:border-top="none" fo:border-bottom="0.05pt solid #000000"/>
    </style:style>
    <style:style style:name="Code.A98" style:family="table-cell">
      <style:table-cell-properties fo:padding="0.097cm" fo:border-left="0.05pt solid #000000" fo:border-right="none" fo:border-top="none" fo:border-bottom="0.05pt solid #000000"/>
    </style:style>
    <style:style style:name="Code.C98" style:family="table-cell">
      <style:table-cell-properties fo:padding="0.097cm" fo:border-left="0.05pt solid #000000" fo:border-right="none" fo:border-top="none" fo:border-bottom="0.05pt solid #000000"/>
    </style:style>
    <style:style style:name="Code.D98" style:family="table-cell">
      <style:table-cell-properties fo:padding="0.097cm" fo:border-left="0.05pt solid #000000" fo:border-right="0.05pt solid #000000" fo:border-top="none" fo:border-bottom="0.05pt solid #000000"/>
    </style:style>
    <style:style style:name="Code.A99" style:family="table-cell">
      <style:table-cell-properties fo:padding="0.097cm" fo:border-left="0.05pt solid #000000" fo:border-right="none" fo:border-top="none" fo:border-bottom="0.05pt solid #000000"/>
    </style:style>
    <style:style style:name="Code.C99" style:family="table-cell">
      <style:table-cell-properties fo:padding="0.097cm" fo:border-left="0.05pt solid #000000" fo:border-right="none" fo:border-top="none" fo:border-bottom="0.05pt solid #000000"/>
    </style:style>
    <style:style style:name="Code.D99" style:family="table-cell">
      <style:table-cell-properties fo:padding="0.097cm" fo:border-left="0.05pt solid #000000" fo:border-right="0.05pt solid #000000" fo:border-top="none" fo:border-bottom="0.05pt solid #000000"/>
    </style:style>
    <style:style style:name="Code.A100" style:family="table-cell">
      <style:table-cell-properties fo:padding="0.097cm" fo:border-left="0.05pt solid #000000" fo:border-right="none" fo:border-top="none" fo:border-bottom="0.05pt solid #000000"/>
    </style:style>
    <style:style style:name="Code.C100" style:family="table-cell">
      <style:table-cell-properties fo:padding="0.097cm" fo:border-left="0.05pt solid #000000" fo:border-right="none" fo:border-top="none" fo:border-bottom="0.05pt solid #000000"/>
    </style:style>
    <style:style style:name="Code.D100" style:family="table-cell">
      <style:table-cell-properties fo:padding="0.097cm" fo:border-left="0.05pt solid #000000" fo:border-right="0.05pt solid #000000" fo:border-top="none" fo:border-bottom="0.05pt solid #000000"/>
    </style:style>
    <style:style style:name="Code.A101" style:family="table-cell">
      <style:table-cell-properties fo:padding="0.097cm" fo:border-left="0.05pt solid #000000" fo:border-right="none" fo:border-top="none" fo:border-bottom="0.05pt solid #000000"/>
    </style:style>
    <style:style style:name="Code.C101" style:family="table-cell">
      <style:table-cell-properties fo:padding="0.097cm" fo:border-left="0.05pt solid #000000" fo:border-right="none" fo:border-top="none" fo:border-bottom="0.05pt solid #000000"/>
    </style:style>
    <style:style style:name="Code.D101" style:family="table-cell">
      <style:table-cell-properties fo:padding="0.097cm" fo:border-left="0.05pt solid #000000" fo:border-right="0.05pt solid #000000" fo:border-top="none" fo:border-bottom="0.05pt solid #000000"/>
    </style:style>
    <style:style style:name="Code.A102" style:family="table-cell">
      <style:table-cell-properties fo:padding="0.097cm" fo:border-left="0.05pt solid #000000" fo:border-right="none" fo:border-top="none" fo:border-bottom="0.05pt solid #000000"/>
    </style:style>
    <style:style style:name="Code.C102" style:family="table-cell">
      <style:table-cell-properties fo:padding="0.097cm" fo:border-left="0.05pt solid #000000" fo:border-right="none" fo:border-top="none" fo:border-bottom="0.05pt solid #000000"/>
    </style:style>
    <style:style style:name="Code.D102" style:family="table-cell">
      <style:table-cell-properties fo:padding="0.097cm" fo:border-left="0.05pt solid #000000" fo:border-right="0.05pt solid #000000" fo:border-top="none" fo:border-bottom="0.05pt solid #000000"/>
    </style:style>
    <style:style style:name="Code.A103" style:family="table-cell">
      <style:table-cell-properties fo:padding="0.097cm" fo:border-left="0.05pt solid #000000" fo:border-right="none" fo:border-top="none" fo:border-bottom="0.05pt solid #000000"/>
    </style:style>
    <style:style style:name="Code.C103" style:family="table-cell">
      <style:table-cell-properties fo:padding="0.097cm" fo:border-left="0.05pt solid #000000" fo:border-right="none" fo:border-top="none" fo:border-bottom="0.05pt solid #000000"/>
    </style:style>
    <style:style style:name="Code.D103" style:family="table-cell">
      <style:table-cell-properties fo:padding="0.097cm" fo:border-left="0.05pt solid #000000" fo:border-right="0.05pt solid #000000" fo:border-top="none" fo:border-bottom="0.05pt solid #000000"/>
    </style:style>
    <style:style style:name="Code.A104" style:family="table-cell">
      <style:table-cell-properties fo:padding="0.097cm" fo:border-left="0.05pt solid #000000" fo:border-right="none" fo:border-top="none" fo:border-bottom="0.05pt solid #000000"/>
    </style:style>
    <style:style style:name="Code.C104" style:family="table-cell">
      <style:table-cell-properties fo:padding="0.097cm" fo:border-left="0.05pt solid #000000" fo:border-right="none" fo:border-top="none" fo:border-bottom="0.05pt solid #000000"/>
    </style:style>
    <style:style style:name="Code.D104" style:family="table-cell">
      <style:table-cell-properties fo:padding="0.097cm" fo:border-left="0.05pt solid #000000" fo:border-right="0.05pt solid #000000" fo:border-top="none" fo:border-bottom="0.05pt solid #000000"/>
    </style:style>
    <style:style style:name="Code.A105" style:family="table-cell">
      <style:table-cell-properties fo:padding="0.097cm" fo:border-left="0.05pt solid #000000" fo:border-right="none" fo:border-top="none" fo:border-bottom="0.05pt solid #000000"/>
    </style:style>
    <style:style style:name="Code.C105" style:family="table-cell">
      <style:table-cell-properties fo:padding="0.097cm" fo:border-left="0.05pt solid #000000" fo:border-right="none" fo:border-top="none" fo:border-bottom="0.05pt solid #000000"/>
    </style:style>
    <style:style style:name="Code.D105" style:family="table-cell">
      <style:table-cell-properties fo:padding="0.097cm" fo:border-left="0.05pt solid #000000" fo:border-right="0.05pt solid #000000" fo:border-top="none" fo:border-bottom="0.05pt solid #000000"/>
    </style:style>
    <style:style style:name="Code.A106" style:family="table-cell">
      <style:table-cell-properties fo:padding="0.097cm" fo:border-left="0.05pt solid #000000" fo:border-right="none" fo:border-top="none" fo:border-bottom="0.05pt solid #000000"/>
    </style:style>
    <style:style style:name="Code.C106" style:family="table-cell">
      <style:table-cell-properties fo:padding="0.097cm" fo:border-left="0.05pt solid #000000" fo:border-right="none" fo:border-top="none" fo:border-bottom="0.05pt solid #000000"/>
    </style:style>
    <style:style style:name="Code.D106" style:family="table-cell">
      <style:table-cell-properties fo:padding="0.097cm" fo:border-left="0.05pt solid #000000" fo:border-right="0.05pt solid #000000" fo:border-top="none" fo:border-bottom="0.05pt solid #000000"/>
    </style:style>
    <style:style style:name="Code.A107" style:family="table-cell">
      <style:table-cell-properties fo:padding="0.097cm" fo:border-left="0.05pt solid #000000" fo:border-right="none" fo:border-top="none" fo:border-bottom="0.05pt solid #000000"/>
    </style:style>
    <style:style style:name="Code.C107" style:family="table-cell">
      <style:table-cell-properties fo:padding="0.097cm" fo:border-left="0.05pt solid #000000" fo:border-right="none" fo:border-top="none" fo:border-bottom="0.05pt solid #000000"/>
    </style:style>
    <style:style style:name="Code.D107" style:family="table-cell">
      <style:table-cell-properties fo:padding="0.097cm" fo:border-left="0.05pt solid #000000" fo:border-right="0.05pt solid #000000" fo:border-top="none" fo:border-bottom="0.05pt solid #000000"/>
    </style:style>
    <style:style style:name="Code.A108" style:family="table-cell">
      <style:table-cell-properties fo:padding="0.097cm" fo:border-left="0.05pt solid #000000" fo:border-right="none" fo:border-top="none" fo:border-bottom="0.05pt solid #000000"/>
    </style:style>
    <style:style style:name="Code.C108" style:family="table-cell">
      <style:table-cell-properties fo:padding="0.097cm" fo:border-left="0.05pt solid #000000" fo:border-right="none" fo:border-top="none" fo:border-bottom="0.05pt solid #000000"/>
    </style:style>
    <style:style style:name="Code.D108" style:family="table-cell">
      <style:table-cell-properties fo:padding="0.097cm" fo:border-left="0.05pt solid #000000" fo:border-right="0.05pt solid #000000" fo:border-top="none" fo:border-bottom="0.05pt solid #000000"/>
    </style:style>
    <style:style style:name="Code.A109" style:family="table-cell">
      <style:table-cell-properties fo:padding="0.097cm" fo:border-left="0.05pt solid #000000" fo:border-right="none" fo:border-top="none" fo:border-bottom="0.05pt solid #000000"/>
    </style:style>
    <style:style style:name="Code.C109" style:family="table-cell">
      <style:table-cell-properties fo:padding="0.097cm" fo:border-left="0.05pt solid #000000" fo:border-right="none" fo:border-top="none" fo:border-bottom="0.05pt solid #000000"/>
    </style:style>
    <style:style style:name="Code.D109" style:family="table-cell">
      <style:table-cell-properties fo:padding="0.097cm" fo:border-left="0.05pt solid #000000" fo:border-right="0.05pt solid #000000" fo:border-top="none" fo:border-bottom="0.05pt solid #000000"/>
    </style:style>
    <style:style style:name="Code.A110" style:family="table-cell">
      <style:table-cell-properties fo:padding="0.097cm" fo:border-left="0.05pt solid #000000" fo:border-right="none" fo:border-top="none" fo:border-bottom="0.05pt solid #000000"/>
    </style:style>
    <style:style style:name="Code.C110" style:family="table-cell">
      <style:table-cell-properties fo:padding="0.097cm" fo:border-left="0.05pt solid #000000" fo:border-right="none" fo:border-top="none" fo:border-bottom="0.05pt solid #000000"/>
    </style:style>
    <style:style style:name="Code.D110" style:family="table-cell">
      <style:table-cell-properties fo:padding="0.097cm" fo:border-left="0.05pt solid #000000" fo:border-right="0.05pt solid #000000" fo:border-top="none" fo:border-bottom="0.05pt solid #000000"/>
    </style:style>
    <style:style style:name="Code.A111" style:family="table-cell">
      <style:table-cell-properties fo:padding="0.097cm" fo:border-left="0.05pt solid #000000" fo:border-right="none" fo:border-top="none" fo:border-bottom="0.05pt solid #000000"/>
    </style:style>
    <style:style style:name="Code.C111" style:family="table-cell">
      <style:table-cell-properties fo:padding="0.097cm" fo:border-left="0.05pt solid #000000" fo:border-right="none" fo:border-top="none" fo:border-bottom="0.05pt solid #000000"/>
    </style:style>
    <style:style style:name="Code.D111" style:family="table-cell">
      <style:table-cell-properties fo:padding="0.097cm" fo:border-left="0.05pt solid #000000" fo:border-right="0.05pt solid #000000" fo:border-top="none" fo:border-bottom="0.05pt solid #000000"/>
    </style:style>
    <style:style style:name="Code.A112" style:family="table-cell">
      <style:table-cell-properties fo:padding="0.097cm" fo:border-left="0.05pt solid #000000" fo:border-right="none" fo:border-top="none" fo:border-bottom="0.05pt solid #000000"/>
    </style:style>
    <style:style style:name="Code.C112" style:family="table-cell">
      <style:table-cell-properties fo:padding="0.097cm" fo:border-left="0.05pt solid #000000" fo:border-right="none" fo:border-top="none" fo:border-bottom="0.05pt solid #000000"/>
    </style:style>
    <style:style style:name="Code.D112" style:family="table-cell">
      <style:table-cell-properties fo:padding="0.097cm" fo:border-left="0.05pt solid #000000" fo:border-right="0.05pt solid #000000" fo:border-top="none" fo:border-bottom="0.05pt solid #000000"/>
    </style:style>
    <style:style style:name="Code.A113" style:family="table-cell">
      <style:table-cell-properties fo:padding="0.097cm" fo:border-left="0.05pt solid #000000" fo:border-right="none" fo:border-top="none" fo:border-bottom="0.05pt solid #000000"/>
    </style:style>
    <style:style style:name="Code.C113" style:family="table-cell">
      <style:table-cell-properties fo:padding="0.097cm" fo:border-left="0.05pt solid #000000" fo:border-right="none" fo:border-top="none" fo:border-bottom="0.05pt solid #000000"/>
    </style:style>
    <style:style style:name="Code.D113" style:family="table-cell">
      <style:table-cell-properties fo:padding="0.097cm" fo:border-left="0.05pt solid #000000" fo:border-right="0.05pt solid #000000" fo:border-top="none" fo:border-bottom="0.05pt solid #000000"/>
    </style:style>
    <style:style style:name="Code.A114" style:family="table-cell">
      <style:table-cell-properties fo:padding="0.097cm" fo:border-left="0.05pt solid #000000" fo:border-right="none" fo:border-top="none" fo:border-bottom="0.05pt solid #000000"/>
    </style:style>
    <style:style style:name="Code.C114" style:family="table-cell">
      <style:table-cell-properties fo:padding="0.097cm" fo:border-left="0.05pt solid #000000" fo:border-right="none" fo:border-top="none" fo:border-bottom="0.05pt solid #000000"/>
    </style:style>
    <style:style style:name="Code.D114" style:family="table-cell">
      <style:table-cell-properties fo:padding="0.097cm" fo:border-left="0.05pt solid #000000" fo:border-right="0.05pt solid #000000" fo:border-top="none" fo:border-bottom="0.05pt solid #000000"/>
    </style:style>
    <style:style style:name="Code.A115" style:family="table-cell">
      <style:table-cell-properties fo:padding="0.097cm" fo:border-left="0.05pt solid #000000" fo:border-right="none" fo:border-top="none" fo:border-bottom="0.05pt solid #000000"/>
    </style:style>
    <style:style style:name="Code.C115" style:family="table-cell">
      <style:table-cell-properties fo:padding="0.097cm" fo:border-left="0.05pt solid #000000" fo:border-right="none" fo:border-top="none" fo:border-bottom="0.05pt solid #000000"/>
    </style:style>
    <style:style style:name="Code.D115" style:family="table-cell">
      <style:table-cell-properties fo:padding="0.097cm" fo:border-left="0.05pt solid #000000" fo:border-right="0.05pt solid #000000" fo:border-top="none" fo:border-bottom="0.05pt solid #000000"/>
    </style:style>
    <style:style style:name="Code.A116" style:family="table-cell">
      <style:table-cell-properties fo:padding="0.097cm" fo:border-left="0.05pt solid #000000" fo:border-right="none" fo:border-top="none" fo:border-bottom="0.05pt solid #000000"/>
    </style:style>
    <style:style style:name="Code.C116" style:family="table-cell">
      <style:table-cell-properties fo:padding="0.097cm" fo:border-left="0.05pt solid #000000" fo:border-right="none" fo:border-top="none" fo:border-bottom="0.05pt solid #000000"/>
    </style:style>
    <style:style style:name="Code.D116" style:family="table-cell">
      <style:table-cell-properties fo:padding="0.097cm" fo:border-left="0.05pt solid #000000" fo:border-right="0.05pt solid #000000" fo:border-top="none" fo:border-bottom="0.05pt solid #000000"/>
    </style:style>
    <style:style style:name="Code.A117" style:family="table-cell">
      <style:table-cell-properties fo:padding="0.097cm" fo:border-left="0.05pt solid #000000" fo:border-right="none" fo:border-top="none" fo:border-bottom="0.05pt solid #000000"/>
    </style:style>
    <style:style style:name="Code.C117" style:family="table-cell">
      <style:table-cell-properties fo:padding="0.097cm" fo:border-left="0.05pt solid #000000" fo:border-right="none" fo:border-top="none" fo:border-bottom="0.05pt solid #000000"/>
    </style:style>
    <style:style style:name="Code.D117" style:family="table-cell">
      <style:table-cell-properties fo:padding="0.097cm" fo:border-left="0.05pt solid #000000" fo:border-right="0.05pt solid #000000" fo:border-top="none" fo:border-bottom="0.05pt solid #000000"/>
    </style:style>
    <style:style style:name="Code.A118" style:family="table-cell">
      <style:table-cell-properties fo:padding="0.097cm" fo:border-left="0.05pt solid #000000" fo:border-right="none" fo:border-top="none" fo:border-bottom="0.05pt solid #000000"/>
    </style:style>
    <style:style style:name="Code.C118" style:family="table-cell">
      <style:table-cell-properties fo:padding="0.097cm" fo:border-left="0.05pt solid #000000" fo:border-right="none" fo:border-top="none" fo:border-bottom="0.05pt solid #000000"/>
    </style:style>
    <style:style style:name="Code.D118" style:family="table-cell">
      <style:table-cell-properties fo:padding="0.097cm" fo:border-left="0.05pt solid #000000" fo:border-right="0.05pt solid #000000" fo:border-top="none" fo:border-bottom="0.05pt solid #000000"/>
    </style:style>
    <style:style style:name="Code.A119" style:family="table-cell">
      <style:table-cell-properties fo:padding="0.097cm" fo:border-left="0.05pt solid #000000" fo:border-right="none" fo:border-top="none" fo:border-bottom="0.05pt solid #000000"/>
    </style:style>
    <style:style style:name="Code.C119" style:family="table-cell">
      <style:table-cell-properties fo:padding="0.097cm" fo:border-left="0.05pt solid #000000" fo:border-right="none" fo:border-top="none" fo:border-bottom="0.05pt solid #000000"/>
    </style:style>
    <style:style style:name="Code.D119" style:family="table-cell">
      <style:table-cell-properties fo:padding="0.097cm" fo:border-left="0.05pt solid #000000" fo:border-right="0.05pt solid #000000" fo:border-top="none" fo:border-bottom="0.05pt solid #000000"/>
    </style:style>
    <style:style style:name="Code.A120" style:family="table-cell">
      <style:table-cell-properties fo:padding="0.097cm" fo:border-left="0.05pt solid #000000" fo:border-right="none" fo:border-top="none" fo:border-bottom="0.05pt solid #000000"/>
    </style:style>
    <style:style style:name="Code.C120" style:family="table-cell">
      <style:table-cell-properties fo:padding="0.097cm" fo:border-left="0.05pt solid #000000" fo:border-right="none" fo:border-top="none" fo:border-bottom="0.05pt solid #000000"/>
    </style:style>
    <style:style style:name="Code.D120" style:family="table-cell">
      <style:table-cell-properties fo:padding="0.097cm" fo:border-left="0.05pt solid #000000" fo:border-right="0.05pt solid #000000" fo:border-top="none" fo:border-bottom="0.05pt solid #000000"/>
    </style:style>
    <style:style style:name="Code.A121" style:family="table-cell">
      <style:table-cell-properties fo:padding="0.097cm" fo:border-left="0.05pt solid #000000" fo:border-right="none" fo:border-top="none" fo:border-bottom="0.05pt solid #000000"/>
    </style:style>
    <style:style style:name="Code.C121" style:family="table-cell">
      <style:table-cell-properties fo:padding="0.097cm" fo:border-left="0.05pt solid #000000" fo:border-right="none" fo:border-top="none" fo:border-bottom="0.05pt solid #000000"/>
    </style:style>
    <style:style style:name="Code.D121" style:family="table-cell">
      <style:table-cell-properties fo:padding="0.097cm" fo:border-left="0.05pt solid #000000" fo:border-right="0.05pt solid #000000" fo:border-top="none" fo:border-bottom="0.05pt solid #000000"/>
    </style:style>
    <style:style style:name="Code.A122" style:family="table-cell">
      <style:table-cell-properties fo:padding="0.097cm" fo:border-left="0.05pt solid #000000" fo:border-right="none" fo:border-top="none" fo:border-bottom="0.05pt solid #000000"/>
    </style:style>
    <style:style style:name="Code.C122" style:family="table-cell">
      <style:table-cell-properties fo:padding="0.097cm" fo:border-left="0.05pt solid #000000" fo:border-right="none" fo:border-top="none" fo:border-bottom="0.05pt solid #000000"/>
    </style:style>
    <style:style style:name="Code.D122" style:family="table-cell">
      <style:table-cell-properties fo:padding="0.097cm" fo:border-left="0.05pt solid #000000" fo:border-right="0.05pt solid #000000" fo:border-top="none" fo:border-bottom="0.05pt solid #000000"/>
    </style:style>
    <style:style style:name="Code.A123" style:family="table-cell">
      <style:table-cell-properties fo:padding="0.097cm" fo:border-left="0.05pt solid #000000" fo:border-right="none" fo:border-top="none" fo:border-bottom="0.05pt solid #000000"/>
    </style:style>
    <style:style style:name="Code.C123" style:family="table-cell">
      <style:table-cell-properties fo:padding="0.097cm" fo:border-left="0.05pt solid #000000" fo:border-right="none" fo:border-top="none" fo:border-bottom="0.05pt solid #000000"/>
    </style:style>
    <style:style style:name="Code.D123" style:family="table-cell">
      <style:table-cell-properties fo:padding="0.097cm" fo:border-left="0.05pt solid #000000" fo:border-right="0.05pt solid #000000" fo:border-top="none" fo:border-bottom="0.05pt solid #000000"/>
    </style:style>
    <style:style style:name="Code.A124" style:family="table-cell">
      <style:table-cell-properties fo:padding="0.097cm" fo:border-left="0.05pt solid #000000" fo:border-right="none" fo:border-top="none" fo:border-bottom="0.05pt solid #000000"/>
    </style:style>
    <style:style style:name="Code.C124" style:family="table-cell">
      <style:table-cell-properties fo:padding="0.097cm" fo:border-left="0.05pt solid #000000" fo:border-right="none" fo:border-top="none" fo:border-bottom="0.05pt solid #000000"/>
    </style:style>
    <style:style style:name="Code.D124" style:family="table-cell">
      <style:table-cell-properties fo:padding="0.097cm" fo:border-left="0.05pt solid #000000" fo:border-right="0.05pt solid #000000" fo:border-top="none" fo:border-bottom="0.05pt solid #000000"/>
    </style:style>
    <style:style style:name="Code.A125" style:family="table-cell">
      <style:table-cell-properties fo:padding="0.097cm" fo:border-left="0.05pt solid #000000" fo:border-right="none" fo:border-top="none" fo:border-bottom="0.05pt solid #000000"/>
    </style:style>
    <style:style style:name="Code.C125" style:family="table-cell">
      <style:table-cell-properties fo:padding="0.097cm" fo:border-left="0.05pt solid #000000" fo:border-right="none" fo:border-top="none" fo:border-bottom="0.05pt solid #000000"/>
    </style:style>
    <style:style style:name="Code.D125" style:family="table-cell">
      <style:table-cell-properties fo:padding="0.097cm" fo:border-left="0.05pt solid #000000" fo:border-right="0.05pt solid #000000" fo:border-top="none" fo:border-bottom="0.05pt solid #000000"/>
    </style:style>
    <style:style style:name="Code.A126" style:family="table-cell">
      <style:table-cell-properties fo:padding="0.097cm" fo:border-left="0.05pt solid #000000" fo:border-right="none" fo:border-top="none" fo:border-bottom="0.05pt solid #000000"/>
    </style:style>
    <style:style style:name="Code.C126" style:family="table-cell">
      <style:table-cell-properties fo:padding="0.097cm" fo:border-left="0.05pt solid #000000" fo:border-right="none" fo:border-top="none" fo:border-bottom="0.05pt solid #000000"/>
    </style:style>
    <style:style style:name="Code.D126" style:family="table-cell">
      <style:table-cell-properties fo:padding="0.097cm" fo:border-left="0.05pt solid #000000" fo:border-right="0.05pt solid #000000" fo:border-top="none" fo:border-bottom="0.05pt solid #000000"/>
    </style:style>
    <style:style style:name="Code.A127" style:family="table-cell">
      <style:table-cell-properties fo:padding="0.097cm" fo:border-left="0.05pt solid #000000" fo:border-right="none" fo:border-top="none" fo:border-bottom="0.05pt solid #000000"/>
    </style:style>
    <style:style style:name="Code.C127" style:family="table-cell">
      <style:table-cell-properties fo:padding="0.097cm" fo:border-left="0.05pt solid #000000" fo:border-right="none" fo:border-top="none" fo:border-bottom="0.05pt solid #000000"/>
    </style:style>
    <style:style style:name="Code.D127" style:family="table-cell">
      <style:table-cell-properties fo:padding="0.097cm" fo:border-left="0.05pt solid #000000" fo:border-right="0.05pt solid #000000" fo:border-top="none" fo:border-bottom="0.05pt solid #000000"/>
    </style:style>
    <style:style style:name="Code.A128" style:family="table-cell">
      <style:table-cell-properties fo:padding="0.097cm" fo:border-left="0.05pt solid #000000" fo:border-right="none" fo:border-top="none" fo:border-bottom="0.05pt solid #000000"/>
    </style:style>
    <style:style style:name="Code.C128" style:family="table-cell">
      <style:table-cell-properties fo:padding="0.097cm" fo:border-left="0.05pt solid #000000" fo:border-right="none" fo:border-top="none" fo:border-bottom="0.05pt solid #000000"/>
    </style:style>
    <style:style style:name="Code.D128" style:family="table-cell">
      <style:table-cell-properties fo:padding="0.097cm" fo:border-left="0.05pt solid #000000" fo:border-right="0.05pt solid #000000" fo:border-top="none" fo:border-bottom="0.05pt solid #000000"/>
    </style:style>
    <style:style style:name="Code.A129" style:family="table-cell">
      <style:table-cell-properties fo:padding="0.097cm" fo:border-left="0.05pt solid #000000" fo:border-right="none" fo:border-top="none" fo:border-bottom="0.05pt solid #000000"/>
    </style:style>
    <style:style style:name="Code.C129" style:family="table-cell">
      <style:table-cell-properties fo:padding="0.097cm" fo:border-left="0.05pt solid #000000" fo:border-right="none" fo:border-top="none" fo:border-bottom="0.05pt solid #000000"/>
    </style:style>
    <style:style style:name="Code.D129" style:family="table-cell">
      <style:table-cell-properties fo:padding="0.097cm" fo:border-left="0.05pt solid #000000" fo:border-right="0.05pt solid #000000" fo:border-top="none" fo:border-bottom="0.05pt solid #000000"/>
    </style:style>
    <style:style style:name="Code.A130" style:family="table-cell">
      <style:table-cell-properties fo:padding="0.097cm" fo:border-left="0.05pt solid #000000" fo:border-right="none" fo:border-top="none" fo:border-bottom="0.05pt solid #000000"/>
    </style:style>
    <style:style style:name="Code.C130" style:family="table-cell">
      <style:table-cell-properties fo:padding="0.097cm" fo:border-left="0.05pt solid #000000" fo:border-right="none" fo:border-top="none" fo:border-bottom="0.05pt solid #000000"/>
    </style:style>
    <style:style style:name="Code.D130" style:family="table-cell">
      <style:table-cell-properties fo:padding="0.097cm" fo:border-left="0.05pt solid #000000" fo:border-right="0.05pt solid #000000" fo:border-top="none" fo:border-bottom="0.05pt solid #000000"/>
    </style:style>
    <style:style style:name="Code.A131" style:family="table-cell">
      <style:table-cell-properties fo:padding="0.097cm" fo:border-left="0.05pt solid #000000" fo:border-right="none" fo:border-top="none" fo:border-bottom="0.05pt solid #000000"/>
    </style:style>
    <style:style style:name="Code.C131" style:family="table-cell">
      <style:table-cell-properties fo:padding="0.097cm" fo:border-left="0.05pt solid #000000" fo:border-right="none" fo:border-top="none" fo:border-bottom="0.05pt solid #000000"/>
    </style:style>
    <style:style style:name="Code.D131" style:family="table-cell">
      <style:table-cell-properties fo:padding="0.097cm" fo:border-left="0.05pt solid #000000" fo:border-right="0.05pt solid #000000" fo:border-top="none" fo:border-bottom="0.05pt solid #000000"/>
    </style:style>
    <style:style style:name="Code.A132" style:family="table-cell">
      <style:table-cell-properties fo:padding="0.097cm" fo:border-left="0.05pt solid #000000" fo:border-right="none" fo:border-top="none" fo:border-bottom="0.05pt solid #000000"/>
    </style:style>
    <style:style style:name="Code.C132" style:family="table-cell">
      <style:table-cell-properties fo:padding="0.097cm" fo:border-left="0.05pt solid #000000" fo:border-right="none" fo:border-top="none" fo:border-bottom="0.05pt solid #000000"/>
    </style:style>
    <style:style style:name="Code.D132" style:family="table-cell">
      <style:table-cell-properties fo:padding="0.097cm" fo:border-left="0.05pt solid #000000" fo:border-right="0.05pt solid #000000" fo:border-top="none" fo:border-bottom="0.05pt solid #000000"/>
    </style:style>
    <style:style style:name="Code.A133" style:family="table-cell">
      <style:table-cell-properties fo:padding="0.097cm" fo:border-left="0.05pt solid #000000" fo:border-right="none" fo:border-top="none" fo:border-bottom="0.05pt solid #000000"/>
    </style:style>
    <style:style style:name="Code.C133" style:family="table-cell">
      <style:table-cell-properties fo:padding="0.097cm" fo:border-left="0.05pt solid #000000" fo:border-right="none" fo:border-top="none" fo:border-bottom="0.05pt solid #000000"/>
    </style:style>
    <style:style style:name="Code.D133" style:family="table-cell">
      <style:table-cell-properties fo:padding="0.097cm" fo:border-left="0.05pt solid #000000" fo:border-right="0.05pt solid #000000" fo:border-top="none" fo:border-bottom="0.05pt solid #000000"/>
    </style:style>
    <style:style style:name="Code.A134" style:family="table-cell">
      <style:table-cell-properties fo:padding="0.097cm" fo:border-left="0.05pt solid #000000" fo:border-right="none" fo:border-top="none" fo:border-bottom="0.05pt solid #000000"/>
    </style:style>
    <style:style style:name="Code.C134" style:family="table-cell">
      <style:table-cell-properties fo:padding="0.097cm" fo:border-left="0.05pt solid #000000" fo:border-right="none" fo:border-top="none" fo:border-bottom="0.05pt solid #000000"/>
    </style:style>
    <style:style style:name="Code.D134" style:family="table-cell">
      <style:table-cell-properties fo:padding="0.097cm" fo:border-left="0.05pt solid #000000" fo:border-right="0.05pt solid #000000" fo:border-top="none" fo:border-bottom="0.05pt solid #000000"/>
    </style:style>
    <style:style style:name="Code.A135" style:family="table-cell">
      <style:table-cell-properties fo:padding="0.097cm" fo:border-left="0.05pt solid #000000" fo:border-right="none" fo:border-top="none" fo:border-bottom="0.05pt solid #000000"/>
    </style:style>
    <style:style style:name="Code.C135" style:family="table-cell">
      <style:table-cell-properties fo:padding="0.097cm" fo:border-left="0.05pt solid #000000" fo:border-right="none" fo:border-top="none" fo:border-bottom="0.05pt solid #000000"/>
    </style:style>
    <style:style style:name="Code.D135" style:family="table-cell">
      <style:table-cell-properties fo:padding="0.097cm" fo:border-left="0.05pt solid #000000" fo:border-right="0.05pt solid #000000" fo:border-top="none" fo:border-bottom="0.05pt solid #000000"/>
    </style:style>
    <style:style style:name="Code.A136" style:family="table-cell">
      <style:table-cell-properties fo:padding="0.097cm" fo:border-left="0.05pt solid #000000" fo:border-right="none" fo:border-top="none" fo:border-bottom="0.05pt solid #000000"/>
    </style:style>
    <style:style style:name="Code.C136" style:family="table-cell">
      <style:table-cell-properties fo:padding="0.097cm" fo:border-left="0.05pt solid #000000" fo:border-right="none" fo:border-top="none" fo:border-bottom="0.05pt solid #000000"/>
    </style:style>
    <style:style style:name="Code.D136" style:family="table-cell">
      <style:table-cell-properties fo:padding="0.097cm" fo:border-left="0.05pt solid #000000" fo:border-right="0.05pt solid #000000" fo:border-top="none" fo:border-bottom="0.05pt solid #000000"/>
    </style:style>
    <style:style style:name="Code.A137" style:family="table-cell">
      <style:table-cell-properties fo:padding="0.097cm" fo:border-left="0.05pt solid #000000" fo:border-right="none" fo:border-top="none" fo:border-bottom="0.05pt solid #000000"/>
    </style:style>
    <style:style style:name="Code.C137" style:family="table-cell">
      <style:table-cell-properties fo:padding="0.097cm" fo:border-left="0.05pt solid #000000" fo:border-right="none" fo:border-top="none" fo:border-bottom="0.05pt solid #000000"/>
    </style:style>
    <style:style style:name="Code.D137" style:family="table-cell">
      <style:table-cell-properties fo:padding="0.097cm" fo:border-left="0.05pt solid #000000" fo:border-right="0.05pt solid #000000" fo:border-top="none" fo:border-bottom="0.05pt solid #000000"/>
    </style:style>
    <style:style style:name="Code.A138" style:family="table-cell">
      <style:table-cell-properties fo:padding="0.097cm" fo:border-left="0.05pt solid #000000" fo:border-right="none" fo:border-top="none" fo:border-bottom="0.05pt solid #000000"/>
    </style:style>
    <style:style style:name="Code.C138" style:family="table-cell">
      <style:table-cell-properties fo:padding="0.097cm" fo:border-left="0.05pt solid #000000" fo:border-right="none" fo:border-top="none" fo:border-bottom="0.05pt solid #000000"/>
    </style:style>
    <style:style style:name="Code.D138" style:family="table-cell">
      <style:table-cell-properties fo:padding="0.097cm" fo:border-left="0.05pt solid #000000" fo:border-right="0.05pt solid #000000" fo:border-top="none" fo:border-bottom="0.05pt solid #000000"/>
    </style:style>
    <style:style style:name="Code.A139" style:family="table-cell">
      <style:table-cell-properties fo:padding="0.097cm" fo:border-left="0.05pt solid #000000" fo:border-right="none" fo:border-top="none" fo:border-bottom="0.05pt solid #000000"/>
    </style:style>
    <style:style style:name="Code.C139" style:family="table-cell">
      <style:table-cell-properties fo:padding="0.097cm" fo:border-left="0.05pt solid #000000" fo:border-right="none" fo:border-top="none" fo:border-bottom="0.05pt solid #000000"/>
    </style:style>
    <style:style style:name="Code.D139" style:family="table-cell">
      <style:table-cell-properties fo:padding="0.097cm" fo:border-left="0.05pt solid #000000" fo:border-right="0.05pt solid #000000" fo:border-top="none" fo:border-bottom="0.05pt solid #000000"/>
    </style:style>
    <style:style style:name="Code.A140" style:family="table-cell">
      <style:table-cell-properties fo:padding="0.097cm" fo:border-left="0.05pt solid #000000" fo:border-right="none" fo:border-top="none" fo:border-bottom="0.05pt solid #000000"/>
    </style:style>
    <style:style style:name="Code.C140" style:family="table-cell">
      <style:table-cell-properties fo:padding="0.097cm" fo:border-left="0.05pt solid #000000" fo:border-right="none" fo:border-top="none" fo:border-bottom="0.05pt solid #000000"/>
    </style:style>
    <style:style style:name="Code.D140" style:family="table-cell">
      <style:table-cell-properties fo:padding="0.097cm" fo:border-left="0.05pt solid #000000" fo:border-right="0.05pt solid #000000" fo:border-top="none" fo:border-bottom="0.05pt solid #000000"/>
    </style:style>
    <style:style style:name="Code.A141" style:family="table-cell">
      <style:table-cell-properties fo:padding="0.097cm" fo:border-left="0.05pt solid #000000" fo:border-right="none" fo:border-top="none" fo:border-bottom="0.05pt solid #000000"/>
    </style:style>
    <style:style style:name="Code.C141" style:family="table-cell">
      <style:table-cell-properties fo:padding="0.097cm" fo:border-left="0.05pt solid #000000" fo:border-right="none" fo:border-top="none" fo:border-bottom="0.05pt solid #000000"/>
    </style:style>
    <style:style style:name="Code.D141" style:family="table-cell">
      <style:table-cell-properties fo:padding="0.097cm" fo:border-left="0.05pt solid #000000" fo:border-right="0.05pt solid #000000" fo:border-top="none" fo:border-bottom="0.05pt solid #000000"/>
    </style:style>
    <style:style style:name="Code.A142" style:family="table-cell">
      <style:table-cell-properties fo:padding="0.097cm" fo:border-left="0.05pt solid #000000" fo:border-right="none" fo:border-top="none" fo:border-bottom="0.05pt solid #000000"/>
    </style:style>
    <style:style style:name="Code.C142" style:family="table-cell">
      <style:table-cell-properties fo:padding="0.097cm" fo:border-left="0.05pt solid #000000" fo:border-right="none" fo:border-top="none" fo:border-bottom="0.05pt solid #000000"/>
    </style:style>
    <style:style style:name="Code.D142" style:family="table-cell">
      <style:table-cell-properties fo:padding="0.097cm" fo:border-left="0.05pt solid #000000" fo:border-right="0.05pt solid #000000" fo:border-top="none" fo:border-bottom="0.05pt solid #000000"/>
    </style:style>
    <style:style style:name="Code.A143" style:family="table-cell">
      <style:table-cell-properties fo:padding="0.097cm" fo:border-left="0.05pt solid #000000" fo:border-right="none" fo:border-top="none" fo:border-bottom="0.05pt solid #000000"/>
    </style:style>
    <style:style style:name="Code.C143" style:family="table-cell">
      <style:table-cell-properties fo:padding="0.097cm" fo:border-left="0.05pt solid #000000" fo:border-right="none" fo:border-top="none" fo:border-bottom="0.05pt solid #000000"/>
    </style:style>
    <style:style style:name="Code.D143" style:family="table-cell">
      <style:table-cell-properties fo:padding="0.097cm" fo:border-left="0.05pt solid #000000" fo:border-right="0.05pt solid #000000" fo:border-top="none" fo:border-bottom="0.05pt solid #000000"/>
    </style:style>
    <style:style style:name="Code.A144" style:family="table-cell">
      <style:table-cell-properties fo:padding="0.097cm" fo:border-left="0.05pt solid #000000" fo:border-right="none" fo:border-top="none" fo:border-bottom="0.05pt solid #000000"/>
    </style:style>
    <style:style style:name="Code.C144" style:family="table-cell">
      <style:table-cell-properties fo:padding="0.097cm" fo:border-left="0.05pt solid #000000" fo:border-right="none" fo:border-top="none" fo:border-bottom="0.05pt solid #000000"/>
    </style:style>
    <style:style style:name="Code.D144" style:family="table-cell">
      <style:table-cell-properties fo:padding="0.097cm" fo:border-left="0.05pt solid #000000" fo:border-right="0.05pt solid #000000" fo:border-top="none" fo:border-bottom="0.05pt solid #000000"/>
    </style:style>
    <style:style style:name="Code.A145" style:family="table-cell">
      <style:table-cell-properties fo:padding="0.097cm" fo:border-left="0.05pt solid #000000" fo:border-right="none" fo:border-top="none" fo:border-bottom="0.05pt solid #000000"/>
    </style:style>
    <style:style style:name="Code.C145" style:family="table-cell">
      <style:table-cell-properties fo:padding="0.097cm" fo:border-left="0.05pt solid #000000" fo:border-right="none" fo:border-top="none" fo:border-bottom="0.05pt solid #000000"/>
    </style:style>
    <style:style style:name="Code.D145" style:family="table-cell">
      <style:table-cell-properties fo:padding="0.097cm" fo:border-left="0.05pt solid #000000" fo:border-right="0.05pt solid #000000" fo:border-top="none" fo:border-bottom="0.05pt solid #000000"/>
    </style:style>
    <style:style style:name="Code.A146" style:family="table-cell">
      <style:table-cell-properties fo:padding="0.097cm" fo:border-left="0.05pt solid #000000" fo:border-right="none" fo:border-top="none" fo:border-bottom="0.05pt solid #000000"/>
    </style:style>
    <style:style style:name="Code.C146" style:family="table-cell">
      <style:table-cell-properties fo:padding="0.097cm" fo:border-left="0.05pt solid #000000" fo:border-right="none" fo:border-top="none" fo:border-bottom="0.05pt solid #000000"/>
    </style:style>
    <style:style style:name="Code.D146" style:family="table-cell">
      <style:table-cell-properties fo:padding="0.097cm" fo:border-left="0.05pt solid #000000" fo:border-right="0.05pt solid #000000" fo:border-top="none" fo:border-bottom="0.05pt solid #000000"/>
    </style:style>
    <style:style style:name="Code.A147" style:family="table-cell">
      <style:table-cell-properties fo:padding="0.097cm" fo:border-left="0.05pt solid #000000" fo:border-right="none" fo:border-top="none" fo:border-bottom="0.05pt solid #000000"/>
    </style:style>
    <style:style style:name="Code.C147" style:family="table-cell">
      <style:table-cell-properties fo:padding="0.097cm" fo:border-left="0.05pt solid #000000" fo:border-right="none" fo:border-top="none" fo:border-bottom="0.05pt solid #000000"/>
    </style:style>
    <style:style style:name="Code.D147" style:family="table-cell">
      <style:table-cell-properties fo:padding="0.097cm" fo:border-left="0.05pt solid #000000" fo:border-right="0.05pt solid #000000" fo:border-top="none" fo:border-bottom="0.05pt solid #000000"/>
    </style:style>
    <style:style style:name="Code.A148" style:family="table-cell">
      <style:table-cell-properties fo:padding="0.097cm" fo:border-left="0.05pt solid #000000" fo:border-right="none" fo:border-top="none" fo:border-bottom="0.05pt solid #000000"/>
    </style:style>
    <style:style style:name="Code.C148" style:family="table-cell">
      <style:table-cell-properties fo:padding="0.097cm" fo:border-left="0.05pt solid #000000" fo:border-right="none" fo:border-top="none" fo:border-bottom="0.05pt solid #000000"/>
    </style:style>
    <style:style style:name="Code.D148" style:family="table-cell">
      <style:table-cell-properties fo:padding="0.097cm" fo:border-left="0.05pt solid #000000" fo:border-right="0.05pt solid #000000" fo:border-top="none" fo:border-bottom="0.05pt solid #000000"/>
    </style:style>
    <style:style style:name="Code.A149" style:family="table-cell">
      <style:table-cell-properties fo:padding="0.097cm" fo:border-left="0.05pt solid #000000" fo:border-right="none" fo:border-top="none" fo:border-bottom="0.05pt solid #000000"/>
    </style:style>
    <style:style style:name="Code.B149" style:family="table-cell">
      <style:table-cell-properties style:vertical-align="top" fo:padding="0.097cm" fo:border-left="0.05pt solid #000000" fo:border-right="none" fo:border-top="none" fo:border-bottom="0.05pt solid #000000"/>
    </style:style>
    <style:style style:name="Code.C149" style:family="table-cell">
      <style:table-cell-properties fo:padding="0.097cm" fo:border-left="0.05pt solid #000000" fo:border-right="none" fo:border-top="none" fo:border-bottom="0.05pt solid #000000"/>
    </style:style>
    <style:style style:name="Code.D149" style:family="table-cell" style:data-style-name="N0">
      <style:table-cell-properties style:vertical-align="top" fo:padding="0.097cm" fo:border-left="0.05pt solid #000000" fo:border-right="0.05pt solid #000000" fo:border-top="none" fo:border-bottom="0.05pt solid #000000"/>
    </style:style>
    <style:style style:name="Code.A150" style:family="table-cell">
      <style:table-cell-properties fo:padding="0.097cm" fo:border-left="0.05pt solid #000000" fo:border-right="none" fo:border-top="none" fo:border-bottom="0.05pt solid #000000"/>
    </style:style>
    <style:style style:name="Code.B150" style:family="table-cell">
      <style:table-cell-properties style:vertical-align="top" fo:padding="0.097cm" fo:border-left="0.05pt solid #000000" fo:border-right="none" fo:border-top="none" fo:border-bottom="0.05pt solid #000000"/>
    </style:style>
    <style:style style:name="Code.C150" style:family="table-cell">
      <style:table-cell-properties fo:padding="0.097cm" fo:border-left="0.05pt solid #000000" fo:border-right="none" fo:border-top="none" fo:border-bottom="0.05pt solid #000000"/>
    </style:style>
    <style:style style:name="Code.A151" style:family="table-cell">
      <style:table-cell-properties fo:padding="0.097cm" fo:border-left="0.05pt solid #000000" fo:border-right="none" fo:border-top="none" fo:border-bottom="0.05pt solid #000000"/>
    </style:style>
    <style:style style:name="Code.B151" style:family="table-cell">
      <style:table-cell-properties style:vertical-align="top" fo:padding="0.097cm" fo:border-left="0.05pt solid #000000" fo:border-right="none" fo:border-top="none" fo:border-bottom="0.05pt solid #000000"/>
    </style:style>
    <style:style style:name="Code.C151" style:family="table-cell">
      <style:table-cell-properties fo:padding="0.097cm" fo:border-left="0.05pt solid #000000" fo:border-right="none" fo:border-top="none" fo:border-bottom="0.05pt solid #000000"/>
    </style:style>
    <style:style style:name="Code.D151" style:family="table-cell">
      <style:table-cell-properties style:vertical-align="top" fo:padding="0.097cm" fo:border-left="0.05pt solid #000000" fo:border-right="0.05pt solid #000000" fo:border-top="none" fo:border-bottom="0.05pt solid #000000"/>
    </style:style>
    <style:style style:name="Code.A152" style:family="table-cell">
      <style:table-cell-properties fo:padding="0.097cm" fo:border-left="0.05pt solid #000000" fo:border-right="none" fo:border-top="none" fo:border-bottom="0.05pt solid #000000"/>
    </style:style>
    <style:style style:name="Code.C152" style:family="table-cell">
      <style:table-cell-properties fo:padding="0.097cm" fo:border-left="0.05pt solid #000000" fo:border-right="none" fo:border-top="none" fo:border-bottom="0.05pt solid #000000"/>
    </style:style>
    <style:style style:name="Code.D152" style:family="table-cell">
      <style:table-cell-properties style:vertical-align="top" fo:padding="0.097cm" fo:border-left="0.05pt solid #000000" fo:border-right="0.05pt solid #000000" fo:border-top="none" fo:border-bottom="0.05pt solid #000000"/>
    </style:style>
    <style:style style:name="Code.A153" style:family="table-cell">
      <style:table-cell-properties fo:padding="0.097cm" fo:border-left="0.05pt solid #000000" fo:border-right="none" fo:border-top="none" fo:border-bottom="0.05pt solid #000000"/>
    </style:style>
    <style:style style:name="Code.B153" style:family="table-cell">
      <style:table-cell-properties style:vertical-align="top" fo:padding="0.097cm" fo:border-left="0.05pt solid #000000" fo:border-right="none" fo:border-top="none" fo:border-bottom="0.05pt solid #000000"/>
    </style:style>
    <style:style style:name="Code.C153" style:family="table-cell">
      <style:table-cell-properties fo:padding="0.097cm" fo:border-left="0.05pt solid #000000" fo:border-right="none" fo:border-top="none" fo:border-bottom="0.05pt solid #000000"/>
    </style:style>
    <style:style style:name="Code.D153" style:family="table-cell">
      <style:table-cell-properties style:vertical-align="top" fo:padding="0.097cm" fo:border-left="0.05pt solid #000000" fo:border-right="0.05pt solid #000000" fo:border-top="none" fo:border-bottom="0.05pt solid #000000"/>
    </style:style>
    <style:style style:name="Code.A154" style:family="table-cell">
      <style:table-cell-properties fo:padding="0.097cm" fo:border-left="0.05pt solid #000000" fo:border-right="none" fo:border-top="none" fo:border-bottom="0.05pt solid #000000"/>
    </style:style>
    <style:style style:name="Code.B154" style:family="table-cell">
      <style:table-cell-properties style:vertical-align="top" fo:padding="0.097cm" fo:border-left="0.05pt solid #000000" fo:border-right="none" fo:border-top="none" fo:border-bottom="0.05pt solid #000000"/>
    </style:style>
    <style:style style:name="Code.C154" style:family="table-cell">
      <style:table-cell-properties fo:padding="0.097cm" fo:border-left="0.05pt solid #000000" fo:border-right="none" fo:border-top="none" fo:border-bottom="0.05pt solid #000000"/>
    </style:style>
    <style:style style:name="Code.D154" style:family="table-cell">
      <style:table-cell-properties style:vertical-align="top" fo:padding="0.097cm" fo:border-left="0.05pt solid #000000" fo:border-right="0.05pt solid #000000" fo:border-top="none" fo:border-bottom="0.05pt solid #000000"/>
    </style:style>
    <style:style style:name="Code.A155" style:family="table-cell">
      <style:table-cell-properties fo:padding="0.097cm" fo:border-left="0.05pt solid #000000" fo:border-right="none" fo:border-top="none" fo:border-bottom="0.05pt solid #000000"/>
    </style:style>
    <style:style style:name="Code.C155" style:family="table-cell">
      <style:table-cell-properties fo:padding="0.097cm" fo:border-left="0.05pt solid #000000" fo:border-right="none" fo:border-top="none" fo:border-bottom="0.05pt solid #000000"/>
    </style:style>
    <style:style style:name="Code.A156" style:family="table-cell">
      <style:table-cell-properties fo:padding="0.097cm" fo:border-left="0.05pt solid #000000" fo:border-right="none" fo:border-top="none" fo:border-bottom="0.05pt solid #000000"/>
    </style:style>
    <style:style style:name="Code.C156" style:family="table-cell">
      <style:table-cell-properties fo:padding="0.097cm" fo:border-left="0.05pt solid #000000" fo:border-right="none" fo:border-top="none" fo:border-bottom="0.05pt solid #000000"/>
    </style:style>
    <style:style style:name="Code.A157" style:family="table-cell">
      <style:table-cell-properties fo:padding="0.097cm" fo:border-left="0.05pt solid #000000" fo:border-right="none" fo:border-top="none" fo:border-bottom="0.05pt solid #000000"/>
    </style:style>
    <style:style style:name="Code.C157" style:family="table-cell">
      <style:table-cell-properties fo:padding="0.097cm" fo:border-left="0.05pt solid #000000" fo:border-right="none" fo:border-top="none" fo:border-bottom="0.05pt solid #000000"/>
    </style:style>
    <style:style style:name="Code.D157" style:family="table-cell">
      <style:table-cell-properties style:vertical-align="bottom" fo:padding="0.097cm" fo:border-left="0.05pt solid #000000" fo:border-right="0.05pt solid #000000" fo:border-top="none" fo:border-bottom="0.05pt solid #000000"/>
    </style:style>
    <style:style style:name="Code.A158" style:family="table-cell">
      <style:table-cell-properties fo:padding="0.097cm" fo:border-left="0.05pt solid #000000" fo:border-right="none" fo:border-top="none" fo:border-bottom="0.05pt solid #000000"/>
    </style:style>
    <style:style style:name="Code.C158" style:family="table-cell">
      <style:table-cell-properties fo:padding="0.097cm" fo:border-left="0.05pt solid #000000" fo:border-right="none" fo:border-top="none" fo:border-bottom="0.05pt solid #000000"/>
    </style:style>
    <style:style style:name="Code.A159" style:family="table-cell">
      <style:table-cell-properties fo:padding="0.097cm" fo:border-left="0.05pt solid #000000" fo:border-right="none" fo:border-top="none" fo:border-bottom="0.05pt solid #000000"/>
    </style:style>
    <style:style style:name="Code.B159" style:family="table-cell">
      <style:table-cell-properties style:vertical-align="top" fo:padding="0.097cm" fo:border-left="0.05pt solid #000000" fo:border-right="none" fo:border-top="none" fo:border-bottom="0.05pt solid #000000"/>
    </style:style>
    <style:style style:name="Code.C159" style:family="table-cell">
      <style:table-cell-properties fo:padding="0.097cm" fo:border-left="0.05pt solid #000000" fo:border-right="none" fo:border-top="none" fo:border-bottom="0.05pt solid #000000"/>
    </style:style>
    <style:style style:name="Code.D159" style:family="table-cell">
      <style:table-cell-properties fo:padding="0.097cm" fo:border-left="0.05pt solid #000000" fo:border-right="0.05pt solid #000000" fo:border-top="none" fo:border-bottom="0.05pt solid #000000"/>
    </style:style>
    <style:style style:name="Code.A160" style:family="table-cell">
      <style:table-cell-properties fo:padding="0.097cm" fo:border-left="0.05pt solid #000000" fo:border-right="none" fo:border-top="none" fo:border-bottom="0.05pt solid #000000"/>
    </style:style>
    <style:style style:name="Code.B160" style:family="table-cell">
      <style:table-cell-properties style:vertical-align="top" fo:padding="0.097cm" fo:border-left="0.05pt solid #000000" fo:border-right="none" fo:border-top="none" fo:border-bottom="0.05pt solid #000000"/>
    </style:style>
    <style:style style:name="Code.C160" style:family="table-cell">
      <style:table-cell-properties fo:padding="0.097cm" fo:border-left="0.05pt solid #000000" fo:border-right="none" fo:border-top="none" fo:border-bottom="0.05pt solid #000000"/>
    </style:style>
    <style:style style:name="Code.D160" style:family="table-cell">
      <style:table-cell-properties fo:padding="0.097cm" fo:border-left="0.05pt solid #000000" fo:border-right="0.05pt solid #000000" fo:border-top="none" fo:border-bottom="0.05pt solid #000000"/>
    </style:style>
    <style:style style:name="Code.A161" style:family="table-cell">
      <style:table-cell-properties fo:padding="0.097cm" fo:border-left="0.05pt solid #000000" fo:border-right="none" fo:border-top="none" fo:border-bottom="0.05pt solid #000000"/>
    </style:style>
    <style:style style:name="Code.B161" style:family="table-cell">
      <style:table-cell-properties style:vertical-align="top" fo:padding="0.097cm" fo:border-left="0.05pt solid #000000" fo:border-right="none" fo:border-top="none" fo:border-bottom="0.05pt solid #000000"/>
    </style:style>
    <style:style style:name="Code.C161" style:family="table-cell">
      <style:table-cell-properties fo:padding="0.097cm" fo:border-left="0.05pt solid #000000" fo:border-right="none" fo:border-top="none" fo:border-bottom="0.05pt solid #000000"/>
    </style:style>
    <style:style style:name="Code.D161" style:family="table-cell">
      <style:table-cell-properties fo:padding="0.097cm" fo:border-left="0.05pt solid #000000" fo:border-right="0.05pt solid #000000" fo:border-top="none" fo:border-bottom="0.05pt solid #000000"/>
    </style:style>
    <style:style style:name="Code.A162" style:family="table-cell">
      <style:table-cell-properties fo:padding="0.097cm" fo:border-left="0.05pt solid #000000" fo:border-right="none" fo:border-top="none" fo:border-bottom="0.05pt solid #000000"/>
    </style:style>
    <style:style style:name="Code.B162" style:family="table-cell">
      <style:table-cell-properties style:vertical-align="top" fo:padding="0.097cm" fo:border-left="0.05pt solid #000000" fo:border-right="none" fo:border-top="none" fo:border-bottom="0.05pt solid #000000"/>
    </style:style>
    <style:style style:name="Code.C162" style:family="table-cell">
      <style:table-cell-properties fo:padding="0.097cm" fo:border-left="0.05pt solid #000000" fo:border-right="none" fo:border-top="none" fo:border-bottom="0.05pt solid #000000"/>
    </style:style>
    <style:style style:name="Code.D162" style:family="table-cell">
      <style:table-cell-properties fo:padding="0.097cm" fo:border-left="0.05pt solid #000000" fo:border-right="0.05pt solid #000000" fo:border-top="none" fo:border-bottom="0.05pt solid #000000"/>
    </style:style>
    <style:style style:name="Code.A163" style:family="table-cell">
      <style:table-cell-properties fo:padding="0.097cm" fo:border-left="0.05pt solid #000000" fo:border-right="none" fo:border-top="none" fo:border-bottom="0.05pt solid #000000"/>
    </style:style>
    <style:style style:name="Code.B163" style:family="table-cell">
      <style:table-cell-properties style:vertical-align="top" fo:padding="0.097cm" fo:border-left="0.05pt solid #000000" fo:border-right="none" fo:border-top="none" fo:border-bottom="0.05pt solid #000000"/>
    </style:style>
    <style:style style:name="Code.C163" style:family="table-cell">
      <style:table-cell-properties fo:padding="0.097cm" fo:border-left="0.05pt solid #000000" fo:border-right="none" fo:border-top="none" fo:border-bottom="0.05pt solid #000000"/>
    </style:style>
    <style:style style:name="Code.D163" style:family="table-cell">
      <style:table-cell-properties fo:padding="0.097cm" fo:border-left="0.05pt solid #000000" fo:border-right="0.05pt solid #000000" fo:border-top="none" fo:border-bottom="0.05pt solid #000000"/>
    </style:style>
    <style:style style:name="Code.A164" style:family="table-cell">
      <style:table-cell-properties fo:padding="0.097cm" fo:border-left="0.05pt solid #000000" fo:border-right="none" fo:border-top="none" fo:border-bottom="0.05pt solid #000000"/>
    </style:style>
    <style:style style:name="Code.B164" style:family="table-cell">
      <style:table-cell-properties style:vertical-align="top" fo:padding="0.097cm" fo:border-left="0.05pt solid #000000" fo:border-right="none" fo:border-top="none" fo:border-bottom="0.05pt solid #000000"/>
    </style:style>
    <style:style style:name="Code.C164" style:family="table-cell">
      <style:table-cell-properties fo:padding="0.097cm" fo:border-left="0.05pt solid #000000" fo:border-right="none" fo:border-top="none" fo:border-bottom="0.05pt solid #000000"/>
    </style:style>
    <style:style style:name="Code.D164" style:family="table-cell">
      <style:table-cell-properties style:vertical-align="top" fo:padding="0.097cm" fo:border-left="0.05pt solid #000000" fo:border-right="0.05pt solid #000000" fo:border-top="none" fo:border-bottom="0.05pt solid #000000"/>
    </style:style>
    <style:style style:name="Code.A165" style:family="table-cell">
      <style:table-cell-properties fo:padding="0.097cm" fo:border-left="0.05pt solid #000000" fo:border-right="none" fo:border-top="none" fo:border-bottom="0.05pt solid #000000"/>
    </style:style>
    <style:style style:name="Code.B165" style:family="table-cell">
      <style:table-cell-properties style:vertical-align="top" fo:padding="0.097cm" fo:border-left="0.05pt solid #000000" fo:border-right="none" fo:border-top="none" fo:border-bottom="0.05pt solid #000000"/>
    </style:style>
    <style:style style:name="Code.C165" style:family="table-cell">
      <style:table-cell-properties fo:padding="0.097cm" fo:border-left="0.05pt solid #000000" fo:border-right="none" fo:border-top="none" fo:border-bottom="0.05pt solid #000000"/>
    </style:style>
    <style:style style:name="Code.D165" style:family="table-cell">
      <style:table-cell-properties fo:padding="0.097cm" fo:border-left="0.05pt solid #000000" fo:border-right="0.05pt solid #000000" fo:border-top="none" fo:border-bottom="0.05pt solid #000000"/>
    </style:style>
    <style:style style:name="Code.A166" style:family="table-cell">
      <style:table-cell-properties fo:padding="0.097cm" fo:border-left="0.05pt solid #000000" fo:border-right="none" fo:border-top="none" fo:border-bottom="0.05pt solid #000000"/>
    </style:style>
    <style:style style:name="Code.B166" style:family="table-cell">
      <style:table-cell-properties style:vertical-align="top" fo:padding="0.097cm" fo:border-left="0.05pt solid #000000" fo:border-right="none" fo:border-top="none" fo:border-bottom="0.05pt solid #000000"/>
    </style:style>
    <style:style style:name="Code.C166" style:family="table-cell">
      <style:table-cell-properties fo:padding="0.097cm" fo:border-left="0.05pt solid #000000" fo:border-right="none" fo:border-top="none" fo:border-bottom="0.05pt solid #000000"/>
    </style:style>
    <style:style style:name="Code.D166" style:family="table-cell">
      <style:table-cell-properties fo:padding="0.097cm" fo:border-left="0.05pt solid #000000" fo:border-right="0.05pt solid #000000" fo:border-top="none" fo:border-bottom="0.05pt solid #000000"/>
    </style:style>
    <style:style style:name="Code.A167" style:family="table-cell">
      <style:table-cell-properties fo:padding="0.097cm" fo:border-left="0.05pt solid #000000" fo:border-right="none" fo:border-top="none" fo:border-bottom="0.05pt solid #000000"/>
    </style:style>
    <style:style style:name="Code.B167" style:family="table-cell">
      <style:table-cell-properties style:vertical-align="top" fo:padding="0.097cm" fo:border-left="0.05pt solid #000000" fo:border-right="none" fo:border-top="none" fo:border-bottom="0.05pt solid #000000"/>
    </style:style>
    <style:style style:name="Code.C167" style:family="table-cell">
      <style:table-cell-properties fo:padding="0.097cm" fo:border-left="0.05pt solid #000000" fo:border-right="none" fo:border-top="none" fo:border-bottom="0.05pt solid #000000"/>
    </style:style>
    <style:style style:name="Code.D167" style:family="table-cell">
      <style:table-cell-properties style:vertical-align="top" fo:padding="0.097cm" fo:border-left="0.05pt solid #000000" fo:border-right="0.05pt solid #000000" fo:border-top="none" fo:border-bottom="0.05pt solid #000000"/>
    </style:style>
    <style:style style:name="Code.A168" style:family="table-cell">
      <style:table-cell-properties fo:padding="0.097cm" fo:border-left="0.05pt solid #000000" fo:border-right="none" fo:border-top="none" fo:border-bottom="0.05pt solid #000000"/>
    </style:style>
    <style:style style:name="Code.B168" style:family="table-cell">
      <style:table-cell-properties style:vertical-align="top" fo:padding="0.097cm" fo:border-left="0.05pt solid #000000" fo:border-right="none" fo:border-top="none" fo:border-bottom="0.05pt solid #000000"/>
    </style:style>
    <style:style style:name="Code.C168" style:family="table-cell">
      <style:table-cell-properties fo:padding="0.097cm" fo:border-left="0.05pt solid #000000" fo:border-right="none" fo:border-top="none" fo:border-bottom="0.05pt solid #000000"/>
    </style:style>
    <style:style style:name="Code.A169" style:family="table-cell">
      <style:table-cell-properties fo:padding="0.097cm" fo:border-left="0.05pt solid #000000" fo:border-right="none" fo:border-top="none" fo:border-bottom="0.05pt solid #000000"/>
    </style:style>
    <style:style style:name="Code.B169" style:family="table-cell">
      <style:table-cell-properties style:vertical-align="top" fo:padding="0.097cm" fo:border-left="0.05pt solid #000000" fo:border-right="none" fo:border-top="none" fo:border-bottom="0.05pt solid #000000"/>
    </style:style>
    <style:style style:name="Code.C169" style:family="table-cell">
      <style:table-cell-properties fo:padding="0.097cm" fo:border-left="0.05pt solid #000000" fo:border-right="none" fo:border-top="none" fo:border-bottom="0.05pt solid #000000"/>
    </style:style>
    <style:style style:name="Code.D169" style:family="table-cell">
      <style:table-cell-properties style:vertical-align="top" fo:padding="0.097cm" fo:border-left="0.05pt solid #000000" fo:border-right="0.05pt solid #000000" fo:border-top="none" fo:border-bottom="0.05pt solid #000000"/>
    </style:style>
    <style:style style:name="Code.A170" style:family="table-cell">
      <style:table-cell-properties fo:padding="0.097cm" fo:border-left="0.05pt solid #000000" fo:border-right="none" fo:border-top="none" fo:border-bottom="0.05pt solid #000000"/>
    </style:style>
    <style:style style:name="Code.B170" style:family="table-cell">
      <style:table-cell-properties style:vertical-align="top" fo:padding="0.097cm" fo:border-left="0.05pt solid #000000" fo:border-right="none" fo:border-top="none" fo:border-bottom="0.05pt solid #000000"/>
    </style:style>
    <style:style style:name="Code.C170" style:family="table-cell">
      <style:table-cell-properties fo:padding="0.097cm" fo:border-left="0.05pt solid #000000" fo:border-right="none" fo:border-top="none" fo:border-bottom="0.05pt solid #000000"/>
    </style:style>
    <style:style style:name="Code.A171" style:family="table-cell">
      <style:table-cell-properties fo:padding="0.097cm" fo:border-left="0.05pt solid #000000" fo:border-right="none" fo:border-top="none" fo:border-bottom="0.05pt solid #000000"/>
    </style:style>
    <style:style style:name="Code.B171" style:family="table-cell">
      <style:table-cell-properties style:vertical-align="top" fo:padding="0.097cm" fo:border-left="0.05pt solid #000000" fo:border-right="none" fo:border-top="none" fo:border-bottom="0.05pt solid #000000"/>
    </style:style>
    <style:style style:name="Code.C171" style:family="table-cell">
      <style:table-cell-properties fo:padding="0.097cm" fo:border-left="0.05pt solid #000000" fo:border-right="none" fo:border-top="none" fo:border-bottom="0.05pt solid #000000"/>
    </style:style>
    <style:style style:name="Code.D171" style:family="table-cell">
      <style:table-cell-properties fo:padding="0.097cm" fo:border-left="0.05pt solid #000000" fo:border-right="0.05pt solid #000000" fo:border-top="none" fo:border-bottom="0.05pt solid #000000"/>
    </style:style>
    <style:style style:name="Code.A172" style:family="table-cell">
      <style:table-cell-properties fo:padding="0.097cm" fo:border-left="0.05pt solid #000000" fo:border-right="none" fo:border-top="none" fo:border-bottom="0.05pt solid #000000"/>
    </style:style>
    <style:style style:name="Code.B172" style:family="table-cell">
      <style:table-cell-properties style:vertical-align="top" fo:padding="0.097cm" fo:border-left="0.05pt solid #000000" fo:border-right="none" fo:border-top="none" fo:border-bottom="0.05pt solid #000000"/>
    </style:style>
    <style:style style:name="Code.C172" style:family="table-cell">
      <style:table-cell-properties fo:padding="0.097cm" fo:border-left="0.05pt solid #000000" fo:border-right="none" fo:border-top="none" fo:border-bottom="0.05pt solid #000000"/>
    </style:style>
    <style:style style:name="Code.D172" style:family="table-cell">
      <style:table-cell-properties fo:padding="0.097cm" fo:border-left="0.05pt solid #000000" fo:border-right="0.05pt solid #000000" fo:border-top="none" fo:border-bottom="0.05pt solid #000000"/>
    </style:style>
    <style:style style:name="Code.A173" style:family="table-cell">
      <style:table-cell-properties fo:padding="0.097cm" fo:border-left="0.05pt solid #000000" fo:border-right="none" fo:border-top="none" fo:border-bottom="0.05pt solid #000000"/>
    </style:style>
    <style:style style:name="Code.B173" style:family="table-cell">
      <style:table-cell-properties style:vertical-align="top" fo:padding="0.097cm" fo:border-left="0.05pt solid #000000" fo:border-right="none" fo:border-top="none" fo:border-bottom="0.05pt solid #000000"/>
    </style:style>
    <style:style style:name="Code.C173" style:family="table-cell">
      <style:table-cell-properties fo:padding="0.097cm" fo:border-left="0.05pt solid #000000" fo:border-right="none" fo:border-top="none" fo:border-bottom="0.05pt solid #000000"/>
    </style:style>
    <style:style style:name="Code.D173" style:family="table-cell">
      <style:table-cell-properties fo:padding="0.097cm" fo:border-left="0.05pt solid #000000" fo:border-right="0.05pt solid #000000" fo:border-top="none" fo:border-bottom="0.05pt solid #000000"/>
    </style:style>
    <style:style style:name="Code.A174" style:family="table-cell">
      <style:table-cell-properties fo:padding="0.097cm" fo:border-left="0.05pt solid #000000" fo:border-right="none" fo:border-top="none" fo:border-bottom="0.05pt solid #000000"/>
    </style:style>
    <style:style style:name="Code.B174" style:family="table-cell">
      <style:table-cell-properties style:vertical-align="top" fo:padding="0.097cm" fo:border-left="0.05pt solid #000000" fo:border-right="none" fo:border-top="none" fo:border-bottom="0.05pt solid #000000"/>
    </style:style>
    <style:style style:name="Code.C174" style:family="table-cell">
      <style:table-cell-properties fo:padding="0.097cm" fo:border-left="0.05pt solid #000000" fo:border-right="none" fo:border-top="none" fo:border-bottom="0.05pt solid #000000"/>
    </style:style>
    <style:style style:name="Code.D174" style:family="table-cell">
      <style:table-cell-properties style:vertical-align="top" fo:padding="0.097cm" fo:border-left="0.05pt solid #000000" fo:border-right="0.05pt solid #000000" fo:border-top="none" fo:border-bottom="0.05pt solid #000000"/>
    </style:style>
    <style:style style:name="Code.A175" style:family="table-cell">
      <style:table-cell-properties fo:padding="0.097cm" fo:border-left="0.05pt solid #000000" fo:border-right="none" fo:border-top="none" fo:border-bottom="0.05pt solid #000000"/>
    </style:style>
    <style:style style:name="Code.B175" style:family="table-cell">
      <style:table-cell-properties style:vertical-align="top" fo:padding="0.097cm" fo:border-left="0.05pt solid #000000" fo:border-right="none" fo:border-top="none" fo:border-bottom="0.05pt solid #000000"/>
    </style:style>
    <style:style style:name="Code.C175" style:family="table-cell">
      <style:table-cell-properties fo:padding="0.097cm" fo:border-left="0.05pt solid #000000" fo:border-right="none" fo:border-top="none" fo:border-bottom="0.05pt solid #000000"/>
    </style:style>
    <style:style style:name="Code.D175" style:family="table-cell">
      <style:table-cell-properties fo:padding="0.097cm" fo:border-left="0.05pt solid #000000" fo:border-right="0.05pt solid #000000" fo:border-top="none" fo:border-bottom="0.05pt solid #000000"/>
    </style:style>
    <style:style style:name="Code.A176" style:family="table-cell">
      <style:table-cell-properties fo:padding="0.097cm" fo:border-left="0.05pt solid #000000" fo:border-right="none" fo:border-top="none" fo:border-bottom="0.05pt solid #000000"/>
    </style:style>
    <style:style style:name="Code.B176" style:family="table-cell">
      <style:table-cell-properties style:vertical-align="top" fo:padding="0.097cm" fo:border-left="0.05pt solid #000000" fo:border-right="none" fo:border-top="none" fo:border-bottom="0.05pt solid #000000"/>
    </style:style>
    <style:style style:name="Code.C176" style:family="table-cell">
      <style:table-cell-properties fo:padding="0.097cm" fo:border-left="0.05pt solid #000000" fo:border-right="none" fo:border-top="none" fo:border-bottom="0.05pt solid #000000"/>
    </style:style>
    <style:style style:name="Code.D176" style:family="table-cell">
      <style:table-cell-properties fo:padding="0.097cm" fo:border-left="0.05pt solid #000000" fo:border-right="0.05pt solid #000000" fo:border-top="none" fo:border-bottom="0.05pt solid #000000"/>
    </style:style>
    <style:style style:name="Code.A177" style:family="table-cell">
      <style:table-cell-properties fo:padding="0.097cm" fo:border-left="0.05pt solid #000000" fo:border-right="none" fo:border-top="none" fo:border-bottom="0.05pt solid #000000"/>
    </style:style>
    <style:style style:name="Code.B177" style:family="table-cell">
      <style:table-cell-properties style:vertical-align="top" fo:padding="0.097cm" fo:border-left="0.05pt solid #000000" fo:border-right="none" fo:border-top="none" fo:border-bottom="0.05pt solid #000000"/>
    </style:style>
    <style:style style:name="Code.C177" style:family="table-cell">
      <style:table-cell-properties fo:padding="0.097cm" fo:border-left="0.05pt solid #000000" fo:border-right="none" fo:border-top="none" fo:border-bottom="0.05pt solid #000000"/>
    </style:style>
    <style:style style:name="Code.D177" style:family="table-cell">
      <style:table-cell-properties fo:padding="0.097cm" fo:border-left="0.05pt solid #000000" fo:border-right="0.05pt solid #000000" fo:border-top="none" fo:border-bottom="0.05pt solid #000000"/>
    </style:style>
    <style:style style:name="Code.A178" style:family="table-cell">
      <style:table-cell-properties fo:padding="0.097cm" fo:border-left="0.05pt solid #000000" fo:border-right="none" fo:border-top="none" fo:border-bottom="0.05pt solid #000000"/>
    </style:style>
    <style:style style:name="Code.B178" style:family="table-cell">
      <style:table-cell-properties style:vertical-align="top" fo:padding="0.097cm" fo:border-left="0.05pt solid #000000" fo:border-right="none" fo:border-top="none" fo:border-bottom="0.05pt solid #000000"/>
    </style:style>
    <style:style style:name="Code.C178" style:family="table-cell">
      <style:table-cell-properties fo:padding="0.097cm" fo:border-left="0.05pt solid #000000" fo:border-right="none" fo:border-top="none" fo:border-bottom="0.05pt solid #000000"/>
    </style:style>
    <style:style style:name="Code.D178" style:family="table-cell">
      <style:table-cell-properties fo:padding="0.097cm" fo:border-left="0.05pt solid #000000" fo:border-right="0.05pt solid #000000" fo:border-top="none" fo:border-bottom="0.05pt solid #000000"/>
    </style:style>
    <style:style style:name="Code.A179" style:family="table-cell">
      <style:table-cell-properties fo:padding="0.097cm" fo:border-left="0.05pt solid #000000" fo:border-right="none" fo:border-top="none" fo:border-bottom="0.05pt solid #000000"/>
    </style:style>
    <style:style style:name="Code.C179" style:family="table-cell">
      <style:table-cell-properties fo:padding="0.097cm" fo:border-left="0.05pt solid #000000" fo:border-right="none" fo:border-top="none" fo:border-bottom="0.05pt solid #000000"/>
    </style:style>
    <style:style style:name="Code.D179" style:family="table-cell">
      <style:table-cell-properties fo:padding="0.097cm" fo:border-left="0.05pt solid #000000" fo:border-right="0.05pt solid #000000" fo:border-top="none" fo:border-bottom="0.05pt solid #000000"/>
    </style:style>
    <style:style style:name="Tableau9" style:family="table">
      <style:table-properties style:width="17.657cm" fo:margin-left="0cm" fo:margin-right="0.042cm" fo:break-before="auto" fo:break-after="auto" table:align="margins"/>
    </style:style>
    <style:style style:name="Tableau9.A" style:family="table-column">
      <style:table-column-properties style:column-width="5.68cm" style:rel-column-width="21083*"/>
    </style:style>
    <style:style style:name="Tableau9.B" style:family="table-column">
      <style:table-column-properties style:column-width="2.612cm" style:rel-column-width="9693*"/>
    </style:style>
    <style:style style:name="Tableau9.C" style:family="table-column">
      <style:table-column-properties style:column-width="9.364cm" style:rel-column-width="34759*"/>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top"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top"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0.05pt solid #000000" fo:border-top="none" fo:border-bottom="0.05pt solid #000000"/>
    </style:style>
    <style:style style:name="Tableau9.A20" style:family="table-cell">
      <style:table-cell-properties fo:padding="0.097cm" fo:border-left="0.05pt solid #000000" fo:border-right="none" fo:border-top="none" fo:border-bottom="0.05pt solid #000000"/>
    </style:style>
    <style:style style:name="Tableau9.C20" style:family="table-cell">
      <style:table-cell-properties fo:padding="0.097cm" fo:border-left="0.05pt solid #000000" fo:border-right="0.05pt solid #000000" fo:border-top="none" fo:border-bottom="0.05pt solid #000000"/>
    </style:style>
    <style:style style:name="Tableau9.A21" style:family="table-cell">
      <style:table-cell-properties fo:padding="0.097cm" fo:border-left="0.05pt solid #000000" fo:border-right="none" fo:border-top="none" fo:border-bottom="0.05pt solid #000000"/>
    </style:style>
    <style:style style:name="Tableau9.C21" style:family="table-cell">
      <style:table-cell-properties fo:padding="0.097cm" fo:border-left="0.05pt solid #000000" fo:border-right="0.05pt solid #000000" fo:border-top="none" fo:border-bottom="0.05pt solid #000000"/>
    </style:style>
    <style:style style:name="Tableau9.A22" style:family="table-cell">
      <style:table-cell-properties fo:padding="0.097cm" fo:border-left="0.05pt solid #000000" fo:border-right="none" fo:border-top="none" fo:border-bottom="0.05pt solid #000000"/>
    </style:style>
    <style:style style:name="Tableau9.C22" style:family="table-cell">
      <style:table-cell-properties fo:padding="0.097cm" fo:border-left="0.05pt solid #000000" fo:border-right="0.05pt solid #000000" fo:border-top="none" fo:border-bottom="0.05pt solid #000000"/>
    </style:style>
    <style:style style:name="Tableau9.A23" style:family="table-cell">
      <style:table-cell-properties fo:padding="0.097cm" fo:border-left="0.05pt solid #000000" fo:border-right="none" fo:border-top="none" fo:border-bottom="0.05pt solid #000000"/>
    </style:style>
    <style:style style:name="Tableau9.C23" style:family="table-cell">
      <style:table-cell-properties fo:padding="0.097cm" fo:border-left="0.05pt solid #000000" fo:border-right="0.05pt solid #000000" fo:border-top="none" fo:border-bottom="0.05pt solid #000000"/>
    </style:style>
    <style:style style:name="Tableau9.A24" style:family="table-cell">
      <style:table-cell-properties fo:padding="0.097cm" fo:border-left="0.05pt solid #000000" fo:border-right="none" fo:border-top="none" fo:border-bottom="0.05pt solid #000000"/>
    </style:style>
    <style:style style:name="Tableau9.C24" style:family="table-cell">
      <style:table-cell-properties fo:padding="0.097cm" fo:border-left="0.05pt solid #000000" fo:border-right="0.05pt solid #000000" fo:border-top="none" fo:border-bottom="0.05pt solid #000000"/>
    </style:style>
    <style:style style:name="Tableau9.A25" style:family="table-cell">
      <style:table-cell-properties fo:padding="0.097cm" fo:border-left="0.05pt solid #000000" fo:border-right="none" fo:border-top="none" fo:border-bottom="0.05pt solid #000000"/>
    </style:style>
    <style:style style:name="Tableau9.C25" style:family="table-cell">
      <style:table-cell-properties fo:padding="0.097cm" fo:border-left="0.05pt solid #000000" fo:border-right="0.05pt solid #000000" fo:border-top="none" fo:border-bottom="0.05pt solid #000000"/>
    </style:style>
    <style:style style:name="Tableau9.A26" style:family="table-cell">
      <style:table-cell-properties fo:padding="0.097cm" fo:border-left="0.05pt solid #000000" fo:border-right="none" fo:border-top="none" fo:border-bottom="0.05pt solid #000000"/>
    </style:style>
    <style:style style:name="Tableau9.C26" style:family="table-cell">
      <style:table-cell-properties fo:padding="0.097cm" fo:border-left="0.05pt solid #000000" fo:border-right="0.05pt solid #000000" fo:border-top="none" fo:border-bottom="0.05pt solid #000000"/>
    </style:style>
    <style:style style:name="Tableau9.A27" style:family="table-cell">
      <style:table-cell-properties fo:padding="0.097cm" fo:border-left="0.05pt solid #000000" fo:border-right="none" fo:border-top="none" fo:border-bottom="0.05pt solid #000000"/>
    </style:style>
    <style:style style:name="Tableau9.C27" style:family="table-cell">
      <style:table-cell-properties fo:padding="0.097cm" fo:border-left="0.05pt solid #000000" fo:border-right="0.05pt solid #000000" fo:border-top="none" fo:border-bottom="0.05pt solid #000000"/>
    </style:style>
    <style:style style:name="Tableau9.A28" style:family="table-cell">
      <style:table-cell-properties fo:padding="0.097cm" fo:border-left="0.05pt solid #000000" fo:border-right="none" fo:border-top="none" fo:border-bottom="0.05pt solid #000000"/>
    </style:style>
    <style:style style:name="Tableau9.C28" style:family="table-cell">
      <style:table-cell-properties fo:padding="0.097cm" fo:border-left="0.05pt solid #000000" fo:border-right="0.05pt solid #000000" fo:border-top="none" fo:border-bottom="0.05pt solid #000000"/>
    </style:style>
    <style:style style:name="Tableau9.A29" style:family="table-cell">
      <style:table-cell-properties fo:padding="0.097cm" fo:border-left="0.05pt solid #000000" fo:border-right="none" fo:border-top="none" fo:border-bottom="0.05pt solid #000000"/>
    </style:style>
    <style:style style:name="Tableau9.C29" style:family="table-cell">
      <style:table-cell-properties fo:padding="0.097cm" fo:border-left="0.05pt solid #000000" fo:border-right="0.05pt solid #000000" fo:border-top="none" fo:border-bottom="0.05pt solid #000000"/>
    </style:style>
    <style:style style:name="Tableau9.A30" style:family="table-cell">
      <style:table-cell-properties fo:padding="0.097cm" fo:border-left="0.05pt solid #000000" fo:border-right="none" fo:border-top="none" fo:border-bottom="0.05pt solid #000000"/>
    </style:style>
    <style:style style:name="Tableau9.C30" style:family="table-cell">
      <style:table-cell-properties fo:padding="0.097cm" fo:border-left="0.05pt solid #000000" fo:border-right="0.05pt solid #000000" fo:border-top="none" fo:border-bottom="0.05pt solid #000000"/>
    </style:style>
    <style:style style:name="Tableau9.A31" style:family="table-cell">
      <style:table-cell-properties fo:padding="0.097cm" fo:border-left="0.05pt solid #000000" fo:border-right="none" fo:border-top="none" fo:border-bottom="0.05pt solid #000000"/>
    </style:style>
    <style:style style:name="Tableau9.C31" style:family="table-cell">
      <style:table-cell-properties fo:padding="0.097cm" fo:border-left="0.05pt solid #000000" fo:border-right="0.05pt solid #000000" fo:border-top="none" fo:border-bottom="0.05pt solid #000000"/>
    </style:style>
    <style:style style:name="Tableau9.A32" style:family="table-cell">
      <style:table-cell-properties fo:padding="0.097cm" fo:border-left="0.05pt solid #000000" fo:border-right="none" fo:border-top="none" fo:border-bottom="0.05pt solid #000000"/>
    </style:style>
    <style:style style:name="Tableau9.C32" style:family="table-cell">
      <style:table-cell-properties fo:padding="0.097cm" fo:border-left="0.05pt solid #000000" fo:border-right="0.05pt solid #000000" fo:border-top="none" fo:border-bottom="0.05pt solid #000000"/>
    </style:style>
    <style:style style:name="Tableau9.A33" style:family="table-cell">
      <style:table-cell-properties fo:padding="0.097cm" fo:border-left="0.05pt solid #000000" fo:border-right="none" fo:border-top="none" fo:border-bottom="0.05pt solid #000000"/>
    </style:style>
    <style:style style:name="Tableau9.C33" style:family="table-cell">
      <style:table-cell-properties fo:padding="0.097cm" fo:border-left="0.05pt solid #000000" fo:border-right="0.05pt solid #000000" fo:border-top="none" fo:border-bottom="0.05pt solid #000000"/>
    </style:style>
    <style:style style:name="Tableau9.A34" style:family="table-cell">
      <style:table-cell-properties fo:padding="0.097cm" fo:border-left="0.05pt solid #000000" fo:border-right="none" fo:border-top="none" fo:border-bottom="0.05pt solid #000000"/>
    </style:style>
    <style:style style:name="Tableau9.C34" style:family="table-cell">
      <style:table-cell-properties fo:padding="0.097cm" fo:border-left="0.05pt solid #000000" fo:border-right="0.05pt solid #000000" fo:border-top="none" fo:border-bottom="0.05pt solid #000000"/>
    </style:style>
    <style:style style:name="Tableau9.A35" style:family="table-cell">
      <style:table-cell-properties fo:padding="0.097cm" fo:border-left="0.05pt solid #000000" fo:border-right="none" fo:border-top="none" fo:border-bottom="0.05pt solid #000000"/>
    </style:style>
    <style:style style:name="Tableau9.C35" style:family="table-cell">
      <style:table-cell-properties fo:padding="0.097cm" fo:border-left="0.05pt solid #000000" fo:border-right="0.05pt solid #000000" fo:border-top="none" fo:border-bottom="0.05pt solid #000000"/>
    </style:style>
    <style:style style:name="Tableau9.A36" style:family="table-cell">
      <style:table-cell-properties fo:padding="0.097cm" fo:border-left="0.05pt solid #000000" fo:border-right="none" fo:border-top="none" fo:border-bottom="0.05pt solid #000000"/>
    </style:style>
    <style:style style:name="Tableau9.C36" style:family="table-cell">
      <style:table-cell-properties fo:padding="0.097cm" fo:border-left="0.05pt solid #000000" fo:border-right="0.05pt solid #000000" fo:border-top="none" fo:border-bottom="0.05pt solid #000000"/>
    </style:style>
    <style:style style:name="Tableau9.A37" style:family="table-cell">
      <style:table-cell-properties fo:padding="0.097cm" fo:border-left="0.05pt solid #000000" fo:border-right="none" fo:border-top="none" fo:border-bottom="0.05pt solid #000000"/>
    </style:style>
    <style:style style:name="Tableau9.C37" style:family="table-cell">
      <style:table-cell-properties fo:padding="0.097cm" fo:border-left="0.05pt solid #000000" fo:border-right="0.05pt solid #000000" fo:border-top="none" fo:border-bottom="0.05pt solid #000000"/>
    </style:style>
    <style:style style:name="Tableau9.A38" style:family="table-cell">
      <style:table-cell-properties fo:padding="0.097cm" fo:border-left="0.05pt solid #000000" fo:border-right="none" fo:border-top="none" fo:border-bottom="0.05pt solid #000000"/>
    </style:style>
    <style:style style:name="Tableau9.C38" style:family="table-cell">
      <style:table-cell-properties fo:padding="0.097cm" fo:border-left="0.05pt solid #000000" fo:border-right="0.05pt solid #000000" fo:border-top="none" fo:border-bottom="0.05pt solid #000000"/>
    </style:style>
    <style:style style:name="Tableau9.A39" style:family="table-cell">
      <style:table-cell-properties fo:padding="0.097cm" fo:border-left="0.05pt solid #000000" fo:border-right="none" fo:border-top="none" fo:border-bottom="0.05pt solid #000000"/>
    </style:style>
    <style:style style:name="Tableau9.C39" style:family="table-cell">
      <style:table-cell-properties fo:padding="0.097cm" fo:border-left="0.05pt solid #000000" fo:border-right="0.05pt solid #000000" fo:border-top="none" fo:border-bottom="0.05pt solid #000000"/>
    </style:style>
    <style:style style:name="Tableau9.A40" style:family="table-cell">
      <style:table-cell-properties fo:padding="0.097cm" fo:border-left="0.05pt solid #000000" fo:border-right="none" fo:border-top="none" fo:border-bottom="0.05pt solid #000000"/>
    </style:style>
    <style:style style:name="Tableau9.C40" style:family="table-cell">
      <style:table-cell-properties fo:padding="0.097cm" fo:border-left="0.05pt solid #000000" fo:border-right="0.05pt solid #000000" fo:border-top="none" fo:border-bottom="0.05pt solid #000000"/>
    </style:style>
    <style:style style:name="Tableau9.A41" style:family="table-cell">
      <style:table-cell-properties fo:padding="0.097cm" fo:border-left="0.05pt solid #000000" fo:border-right="none" fo:border-top="none" fo:border-bottom="0.05pt solid #000000"/>
    </style:style>
    <style:style style:name="Tableau9.C41" style:family="table-cell">
      <style:table-cell-properties fo:padding="0.097cm" fo:border-left="0.05pt solid #000000" fo:border-right="0.05pt solid #000000" fo:border-top="none" fo:border-bottom="0.05pt solid #000000"/>
    </style:style>
    <style:style style:name="Tableau14" style:family="table">
      <style:table-properties style:width="17.648cm" fo:margin-left="0cm" fo:margin-right="0.051cm" fo:break-before="auto" fo:break-after="auto" table:align="margins"/>
    </style:style>
    <style:style style:name="Tableau14.A" style:family="table-column">
      <style:table-column-properties style:column-width="3.182cm" style:rel-column-width="11815*"/>
    </style:style>
    <style:style style:name="Tableau14.B" style:family="table-column">
      <style:table-column-properties style:column-width="2.515cm" style:rel-column-width="9338*"/>
    </style:style>
    <style:style style:name="Tableau14.C" style:family="table-column">
      <style:table-column-properties style:column-width="9.509cm" style:rel-column-width="35310*"/>
    </style:style>
    <style:style style:name="Tableau14.D" style:family="table-column">
      <style:table-column-properties style:column-width="2.443cm" style:rel-column-width="9072*"/>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style:vertical-align="top"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style:vertical-align="top"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4" style:family="table">
      <style:table-properties style:width="17.648cm" fo:margin-left="0cm" fo:margin-right="0.051cm" fo:break-before="auto" fo:break-after="auto" table:align="margins"/>
    </style:style>
    <style:style style:name="Tableau4.A" style:family="table-column">
      <style:table-column-properties style:column-width="3.182cm" style:rel-column-width="11815*"/>
    </style:style>
    <style:style style:name="Tableau4.B" style:family="table-column">
      <style:table-column-properties style:column-width="2.515cm" style:rel-column-width="9338*"/>
    </style:style>
    <style:style style:name="Tableau4.C" style:family="table-column">
      <style:table-column-properties style:column-width="9.509cm" style:rel-column-width="35310*"/>
    </style:style>
    <style:style style:name="Tableau4.D" style:family="table-column">
      <style:table-column-properties style:column-width="2.443cm" style:rel-column-width="9072*"/>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0.05pt solid #000000" fo:border-top="none" fo:border-bottom="0.05pt solid #000000"/>
    </style:style>
    <style:style style:name="Table1" style:family="table">
      <style:table-properties style:width="17.648cm" fo:margin-left="0cm" fo:margin-right="0.051cm" fo:break-before="auto" fo:break-after="auto" table:align="margins"/>
    </style:style>
    <style:style style:name="Table1.A" style:family="table-column">
      <style:table-column-properties style:column-width="3.182cm" style:rel-column-width="11815*"/>
    </style:style>
    <style:style style:name="Table1.B" style:family="table-column">
      <style:table-column-properties style:column-width="2.515cm" style:rel-column-width="9338*"/>
    </style:style>
    <style:style style:name="Table1.C" style:family="table-column">
      <style:table-column-properties style:column-width="9.509cm" style:rel-column-width="35310*"/>
    </style:style>
    <style:style style:name="Table1.D" style:family="table-column">
      <style:table-column-properties style:column-width="2.443cm" style:rel-column-width="907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5" style:family="table">
      <style:table-properties style:width="17.648cm" fo:margin-left="0cm" fo:margin-right="0.051cm" fo:break-before="auto" fo:break-after="auto" table:align="margins"/>
    </style:style>
    <style:style style:name="Tableau5.A" style:family="table-column">
      <style:table-column-properties style:column-width="3.182cm" style:rel-column-width="11815*"/>
    </style:style>
    <style:style style:name="Tableau5.B" style:family="table-column">
      <style:table-column-properties style:column-width="2.515cm" style:rel-column-width="9338*"/>
    </style:style>
    <style:style style:name="Tableau5.C" style:family="table-column">
      <style:table-column-properties style:column-width="9.509cm" style:rel-column-width="35310*"/>
    </style:style>
    <style:style style:name="Tableau5.D" style:family="table-column">
      <style:table-column-properties style:column-width="2.443cm" style:rel-column-width="907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style:vertical-align="top"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5.A21" style:family="table-cell">
      <style:table-cell-properties fo:padding="0.097cm" fo:border-left="0.05pt solid #000000" fo:border-right="none" fo:border-top="none" fo:border-bottom="0.05pt solid #000000"/>
    </style:style>
    <style:style style:name="Tableau5.C21" style:family="table-cell">
      <style:table-cell-properties fo:padding="0.097cm" fo:border-left="0.05pt solid #000000" fo:border-right="none" fo:border-top="none" fo:border-bottom="0.05pt solid #000000"/>
    </style:style>
    <style:style style:name="Tableau5.D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none" fo:border-bottom="0.05pt solid #000000"/>
    </style:style>
    <style:style style:name="Tableau5.C22" style:family="table-cell">
      <style:table-cell-properties fo:padding="0.097cm" fo:border-left="0.05pt solid #000000" fo:border-right="none" fo:border-top="none" fo:border-bottom="0.05pt solid #000000"/>
    </style:style>
    <style:style style:name="Tableau5.D22" style:family="table-cell">
      <style:table-cell-properties fo:padding="0.097cm" fo:border-left="0.05pt solid #000000" fo:border-right="0.05pt solid #000000" fo:border-top="none" fo:border-bottom="0.05pt solid #000000"/>
    </style:style>
    <style:style style:name="Tableau5.A23" style:family="table-cell">
      <style:table-cell-properties fo:padding="0.097cm" fo:border-left="0.05pt solid #000000" fo:border-right="none" fo:border-top="none" fo:border-bottom="0.05pt solid #000000"/>
    </style:style>
    <style:style style:name="Tableau5.C23" style:family="table-cell">
      <style:table-cell-properties fo:padding="0.097cm" fo:border-left="0.05pt solid #000000" fo:border-right="none" fo:border-top="none" fo:border-bottom="0.05pt solid #000000"/>
    </style:style>
    <style:style style:name="Tableau5.D23" style:family="table-cell">
      <style:table-cell-properties fo:padding="0.097cm" fo:border-left="0.05pt solid #000000" fo:border-right="0.05pt solid #000000" fo:border-top="none" fo:border-bottom="0.05pt solid #000000"/>
    </style:style>
    <style:style style:name="Tableau5.A24" style:family="table-cell">
      <style:table-cell-properties fo:padding="0.097cm" fo:border-left="0.05pt solid #000000" fo:border-right="none" fo:border-top="none" fo:border-bottom="0.05pt solid #000000"/>
    </style:style>
    <style:style style:name="Tableau5.C24" style:family="table-cell">
      <style:table-cell-properties fo:padding="0.097cm" fo:border-left="0.05pt solid #000000" fo:border-right="none" fo:border-top="none" fo:border-bottom="0.05pt solid #000000"/>
    </style:style>
    <style:style style:name="Tableau5.D24" style:family="table-cell">
      <style:table-cell-properties fo:padding="0.097cm" fo:border-left="0.05pt solid #000000" fo:border-right="0.05pt solid #000000" fo:border-top="none" fo:border-bottom="0.05pt solid #000000"/>
    </style:style>
    <style:style style:name="Tableau5.A25" style:family="table-cell">
      <style:table-cell-properties fo:padding="0.097cm" fo:border-left="0.05pt solid #000000" fo:border-right="none" fo:border-top="none" fo:border-bottom="0.05pt solid #000000"/>
    </style:style>
    <style:style style:name="Tableau5.C25" style:family="table-cell">
      <style:table-cell-properties fo:padding="0.097cm" fo:border-left="0.05pt solid #000000" fo:border-right="none" fo:border-top="none" fo:border-bottom="0.05pt solid #000000"/>
    </style:style>
    <style:style style:name="Tableau5.D25" style:family="table-cell">
      <style:table-cell-properties fo:padding="0.097cm" fo:border-left="0.05pt solid #000000" fo:border-right="0.05pt solid #000000" fo:border-top="none" fo:border-bottom="0.05pt solid #000000"/>
    </style:style>
    <style:style style:name="Tableau5.A26" style:family="table-cell">
      <style:table-cell-properties fo:padding="0.097cm" fo:border-left="0.05pt solid #000000" fo:border-right="none" fo:border-top="none" fo:border-bottom="0.05pt solid #000000"/>
    </style:style>
    <style:style style:name="Tableau5.C26" style:family="table-cell">
      <style:table-cell-properties fo:padding="0.097cm" fo:border-left="0.05pt solid #000000" fo:border-right="none" fo:border-top="none" fo:border-bottom="0.05pt solid #000000"/>
    </style:style>
    <style:style style:name="Tableau5.D26" style:family="table-cell">
      <style:table-cell-properties fo:padding="0.097cm" fo:border-left="0.05pt solid #000000" fo:border-right="0.05pt solid #000000" fo:border-top="none" fo:border-bottom="0.05pt solid #000000"/>
    </style:style>
    <style:style style:name="Tableau5.A27" style:family="table-cell">
      <style:table-cell-properties fo:padding="0.097cm" fo:border-left="0.05pt solid #000000" fo:border-right="none" fo:border-top="none" fo:border-bottom="0.05pt solid #000000"/>
    </style:style>
    <style:style style:name="Tableau5.C27" style:family="table-cell">
      <style:table-cell-properties fo:padding="0.097cm" fo:border-left="0.05pt solid #000000" fo:border-right="none" fo:border-top="none" fo:border-bottom="0.05pt solid #000000"/>
    </style:style>
    <style:style style:name="Tableau5.D27" style:family="table-cell">
      <style:table-cell-properties fo:padding="0.097cm" fo:border-left="0.05pt solid #000000" fo:border-right="0.05pt solid #000000" fo:border-top="none" fo:border-bottom="0.05pt solid #000000"/>
    </style:style>
    <style:style style:name="Tableau5.A28" style:family="table-cell">
      <style:table-cell-properties fo:padding="0.097cm" fo:border-left="0.05pt solid #000000" fo:border-right="none" fo:border-top="none" fo:border-bottom="0.05pt solid #000000"/>
    </style:style>
    <style:style style:name="Tableau5.C28" style:family="table-cell">
      <style:table-cell-properties fo:padding="0.097cm" fo:border-left="0.05pt solid #000000" fo:border-right="none" fo:border-top="none" fo:border-bottom="0.05pt solid #000000"/>
    </style:style>
    <style:style style:name="Tableau5.D28" style:family="table-cell">
      <style:table-cell-properties fo:padding="0.097cm" fo:border-left="0.05pt solid #000000" fo:border-right="0.05pt solid #000000" fo:border-top="none" fo:border-bottom="0.05pt solid #000000"/>
    </style:style>
    <style:style style:name="Tableau5.A29" style:family="table-cell">
      <style:table-cell-properties fo:padding="0.097cm" fo:border-left="0.05pt solid #000000" fo:border-right="none" fo:border-top="none" fo:border-bottom="0.05pt solid #000000"/>
    </style:style>
    <style:style style:name="Tableau5.C29" style:family="table-cell">
      <style:table-cell-properties fo:padding="0.097cm" fo:border-left="0.05pt solid #000000" fo:border-right="none" fo:border-top="none" fo:border-bottom="0.05pt solid #000000"/>
    </style:style>
    <style:style style:name="Tableau5.D29" style:family="table-cell">
      <style:table-cell-properties fo:padding="0.097cm" fo:border-left="0.05pt solid #000000" fo:border-right="0.05pt solid #000000" fo:border-top="none" fo:border-bottom="0.05pt solid #000000"/>
    </style:style>
    <style:style style:name="Tableau5.A30" style:family="table-cell">
      <style:table-cell-properties fo:padding="0.097cm" fo:border-left="0.05pt solid #000000" fo:border-right="none" fo:border-top="none" fo:border-bottom="0.05pt solid #000000"/>
    </style:style>
    <style:style style:name="Tableau5.C30" style:family="table-cell">
      <style:table-cell-properties fo:padding="0.097cm" fo:border-left="0.05pt solid #000000" fo:border-right="none" fo:border-top="none" fo:border-bottom="0.05pt solid #000000"/>
    </style:style>
    <style:style style:name="Tableau5.D30" style:family="table-cell">
      <style:table-cell-properties fo:padding="0.097cm" fo:border-left="0.05pt solid #000000" fo:border-right="0.05pt solid #000000" fo:border-top="none" fo:border-bottom="0.05pt solid #000000"/>
    </style:style>
    <style:style style:name="Tableau5.A31" style:family="table-cell">
      <style:table-cell-properties fo:padding="0.097cm" fo:border-left="0.05pt solid #000000" fo:border-right="none" fo:border-top="none" fo:border-bottom="0.05pt solid #000000"/>
    </style:style>
    <style:style style:name="Tableau5.C31" style:family="table-cell">
      <style:table-cell-properties fo:padding="0.097cm" fo:border-left="0.05pt solid #000000" fo:border-right="none" fo:border-top="none" fo:border-bottom="0.05pt solid #000000"/>
    </style:style>
    <style:style style:name="Tableau5.D31" style:family="table-cell">
      <style:table-cell-properties fo:padding="0.097cm" fo:border-left="0.05pt solid #000000" fo:border-right="0.05pt solid #000000" fo:border-top="none" fo:border-bottom="0.05pt solid #000000"/>
    </style:style>
    <style:style style:name="Tableau5.A32" style:family="table-cell">
      <style:table-cell-properties fo:padding="0.097cm" fo:border-left="0.05pt solid #000000" fo:border-right="none" fo:border-top="none" fo:border-bottom="0.05pt solid #000000"/>
    </style:style>
    <style:style style:name="Tableau5.C32" style:family="table-cell">
      <style:table-cell-properties fo:padding="0.097cm" fo:border-left="0.05pt solid #000000" fo:border-right="none" fo:border-top="none" fo:border-bottom="0.05pt solid #000000"/>
    </style:style>
    <style:style style:name="Tableau5.D32" style:family="table-cell">
      <style:table-cell-properties fo:padding="0.097cm" fo:border-left="0.05pt solid #000000" fo:border-right="0.05pt solid #000000" fo:border-top="none" fo:border-bottom="0.05pt solid #000000"/>
    </style:style>
    <style:style style:name="Tableau5.A33" style:family="table-cell">
      <style:table-cell-properties fo:padding="0.097cm" fo:border-left="0.05pt solid #000000" fo:border-right="none" fo:border-top="none" fo:border-bottom="0.05pt solid #000000"/>
    </style:style>
    <style:style style:name="Tableau5.C33" style:family="table-cell">
      <style:table-cell-properties fo:padding="0.097cm" fo:border-left="0.05pt solid #000000" fo:border-right="none" fo:border-top="none" fo:border-bottom="0.05pt solid #000000"/>
    </style:style>
    <style:style style:name="Tableau5.D33" style:family="table-cell">
      <style:table-cell-properties fo:padding="0.097cm" fo:border-left="0.05pt solid #000000" fo:border-right="0.05pt solid #000000" fo:border-top="none" fo:border-bottom="0.05pt solid #000000"/>
    </style:style>
    <style:style style:name="Tableau10" style:family="table">
      <style:table-properties style:width="17.667cm" fo:margin-left="0cm" fo:margin-right="0.032cm" fo:break-before="auto" fo:break-after="auto" table:align="margins"/>
    </style:style>
    <style:style style:name="Tableau10.A" style:family="table-column">
      <style:table-column-properties style:column-width="3.182cm" style:rel-column-width="11801*"/>
    </style:style>
    <style:style style:name="Tableau10.B" style:family="table-column">
      <style:table-column-properties style:column-width="2.514cm" style:rel-column-width="9327*"/>
    </style:style>
    <style:style style:name="Tableau10.C" style:family="table-column">
      <style:table-column-properties style:column-width="9.511cm" style:rel-column-width="35281*"/>
    </style:style>
    <style:style style:name="Tableau10.D" style:family="table-column">
      <style:table-column-properties style:column-width="2.461cm" style:rel-column-width="912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top"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top"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1" style:family="table">
      <style:table-properties style:width="17.667cm" fo:margin-left="0cm" fo:margin-right="0.032cm" fo:break-before="auto" fo:break-after="auto" table:align="margins"/>
    </style:style>
    <style:style style:name="Tableau11.A" style:family="table-column">
      <style:table-column-properties style:column-width="3.182cm" style:rel-column-width="11801*"/>
    </style:style>
    <style:style style:name="Tableau11.B" style:family="table-column">
      <style:table-column-properties style:column-width="2.514cm" style:rel-column-width="9327*"/>
    </style:style>
    <style:style style:name="Tableau11.C" style:family="table-column">
      <style:table-column-properties style:column-width="9.511cm" style:rel-column-width="35281*"/>
    </style:style>
    <style:style style:name="Tableau11.D" style:family="table-column">
      <style:table-column-properties style:column-width="2.461cm" style:rel-column-width="9126*"/>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top"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style:vertical-align="top"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none" fo:border-top="none" fo:border-bottom="0.05pt solid #000000"/>
    </style:style>
    <style:style style:name="Tableau11.D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C7" style:family="table-cell">
      <style:table-cell-properties fo:padding="0.097cm" fo:border-left="0.05pt solid #000000" fo:border-right="none" fo:border-top="none" fo:border-bottom="0.05pt solid #000000"/>
    </style:style>
    <style:style style:name="Tableau11.D7" style:family="table-cell">
      <style:table-cell-properties fo:padding="0.097cm" fo:border-left="0.05pt solid #000000" fo:border-right="0.05pt solid #000000" fo:border-top="none" fo:border-bottom="0.05pt solid #000000"/>
    </style:style>
    <style:style style:name="Tableau17" style:family="table">
      <style:table-properties style:width="17.667cm" fo:margin-left="0cm" fo:margin-right="0.032cm" fo:break-before="auto" fo:break-after="auto" table:align="margins"/>
    </style:style>
    <style:style style:name="Tableau17.A" style:family="table-column">
      <style:table-column-properties style:column-width="3.182cm" style:rel-column-width="11801*"/>
    </style:style>
    <style:style style:name="Tableau17.B" style:family="table-column">
      <style:table-column-properties style:column-width="2.514cm" style:rel-column-width="9327*"/>
    </style:style>
    <style:style style:name="Tableau17.C" style:family="table-column">
      <style:table-column-properties style:column-width="9.511cm" style:rel-column-width="35281*"/>
    </style:style>
    <style:style style:name="Tableau17.D" style:family="table-column">
      <style:table-column-properties style:column-width="2.461cm" style:rel-column-width="9126*"/>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style:vertical-align="top"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style:vertical-align="top"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2" style:family="table">
      <style:table-properties style:width="17.657cm" fo:margin-left="0cm" fo:margin-right="0.042cm" fo:break-before="auto" fo:break-after="auto" table:align="margins"/>
    </style:style>
    <style:style style:name="Tableau2.A" style:family="table-column">
      <style:table-column-properties style:column-width="3.18cm" style:rel-column-width="11804*"/>
    </style:style>
    <style:style style:name="Tableau2.B" style:family="table-column">
      <style:table-column-properties style:column-width="2.515cm" style:rel-column-width="9335*"/>
    </style:style>
    <style:style style:name="Tableau2.C" style:family="table-column">
      <style:table-column-properties style:column-width="9.421cm" style:rel-column-width="34967*"/>
    </style:style>
    <style:style style:name="Tableau2.D" style:family="table-column">
      <style:table-column-properties style:column-width="2.54cm" style:rel-column-width="9429*"/>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top"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top"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B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0.05pt solid #000000" fo:border-top="none" fo:border-bottom="0.05pt solid #000000"/>
    </style:style>
    <style:style style:name="Tableau2.A31" style:family="table-cell">
      <style:table-cell-properties fo:padding="0.097cm" fo:border-left="0.05pt solid #000000" fo:border-right="none" fo:border-top="none" fo:border-bottom="0.05pt solid #000000"/>
    </style:style>
    <style:style style:name="Tableau2.C31" style:family="table-cell">
      <style:table-cell-properties fo:padding="0.097cm" fo:border-left="0.05pt solid #000000" fo:border-right="none" fo:border-top="none" fo:border-bottom="0.05pt solid #000000"/>
    </style:style>
    <style:style style:name="Tableau2.D31" style:family="table-cell">
      <style:table-cell-properties fo:padding="0.097cm" fo:border-left="0.05pt solid #000000" fo:border-right="0.05pt solid #000000" fo:border-top="none" fo:border-bottom="0.05pt solid #000000"/>
    </style:style>
    <style:style style:name="Tableau2.A32" style:family="table-cell">
      <style:table-cell-properties fo:padding="0.097cm" fo:border-left="0.05pt solid #000000" fo:border-right="none" fo:border-top="none" fo:border-bottom="0.05pt solid #000000"/>
    </style:style>
    <style:style style:name="Tableau2.C32" style:family="table-cell">
      <style:table-cell-properties fo:padding="0.097cm" fo:border-left="0.05pt solid #000000" fo:border-right="none" fo:border-top="none" fo:border-bottom="0.05pt solid #000000"/>
    </style:style>
    <style:style style:name="Tableau2.D32" style:family="table-cell">
      <style:table-cell-properties fo:padding="0.097cm" fo:border-left="0.05pt solid #000000" fo:border-right="0.05pt solid #000000" fo:border-top="none" fo:border-bottom="0.05pt solid #000000"/>
    </style:style>
    <style:style style:name="Tableau2.A33" style:family="table-cell">
      <style:table-cell-properties fo:padding="0.097cm" fo:border-left="0.05pt solid #000000" fo:border-right="none" fo:border-top="none" fo:border-bottom="0.05pt solid #000000"/>
    </style:style>
    <style:style style:name="Tableau2.C33" style:family="table-cell">
      <style:table-cell-properties fo:padding="0.097cm" fo:border-left="0.05pt solid #000000" fo:border-right="none" fo:border-top="none" fo:border-bottom="0.05pt solid #000000"/>
    </style:style>
    <style:style style:name="Tableau2.D33" style:family="table-cell">
      <style:table-cell-properties fo:padding="0.097cm" fo:border-left="0.05pt solid #000000" fo:border-right="0.05pt solid #000000" fo:border-top="none" fo:border-bottom="0.05pt solid #000000"/>
    </style:style>
    <style:style style:name="Tableau2.A34" style:family="table-cell">
      <style:table-cell-properties fo:padding="0.097cm" fo:border-left="0.05pt solid #000000" fo:border-right="none" fo:border-top="none" fo:border-bottom="0.05pt solid #000000"/>
    </style:style>
    <style:style style:name="Tableau2.C34" style:family="table-cell">
      <style:table-cell-properties fo:padding="0.097cm" fo:border-left="0.05pt solid #000000" fo:border-right="none" fo:border-top="none" fo:border-bottom="0.05pt solid #000000"/>
    </style:style>
    <style:style style:name="Tableau2.D34" style:family="table-cell">
      <style:table-cell-properties fo:padding="0.097cm" fo:border-left="0.05pt solid #000000" fo:border-right="0.05pt solid #000000" fo:border-top="none" fo:border-bottom="0.05pt solid #000000"/>
    </style:style>
    <style:style style:name="Tableau2.A35" style:family="table-cell">
      <style:table-cell-properties fo:padding="0.097cm" fo:border-left="0.05pt solid #000000" fo:border-right="none" fo:border-top="none" fo:border-bottom="0.05pt solid #000000"/>
    </style:style>
    <style:style style:name="Tableau2.C35" style:family="table-cell">
      <style:table-cell-properties fo:padding="0.097cm" fo:border-left="0.05pt solid #000000" fo:border-right="none" fo:border-top="none" fo:border-bottom="0.05pt solid #000000"/>
    </style:style>
    <style:style style:name="Tableau2.D35" style:family="table-cell">
      <style:table-cell-properties fo:padding="0.097cm" fo:border-left="0.05pt solid #000000" fo:border-right="0.05pt solid #000000" fo:border-top="none" fo:border-bottom="0.05pt solid #000000"/>
    </style:style>
    <style:style style:name="Tableau2.A36" style:family="table-cell">
      <style:table-cell-properties fo:padding="0.097cm" fo:border-left="0.05pt solid #000000" fo:border-right="none" fo:border-top="none" fo:border-bottom="0.05pt solid #000000"/>
    </style:style>
    <style:style style:name="Tableau2.B36" style:family="table-cell">
      <style:table-cell-properties style:vertical-align="top" fo:padding="0.097cm" fo:border-left="0.05pt solid #000000" fo:border-right="none" fo:border-top="none" fo:border-bottom="0.05pt solid #000000"/>
    </style:style>
    <style:style style:name="Tableau2.C36" style:family="table-cell">
      <style:table-cell-properties fo:padding="0.097cm" fo:border-left="0.05pt solid #000000" fo:border-right="none" fo:border-top="none" fo:border-bottom="0.05pt solid #000000"/>
    </style:style>
    <style:style style:name="Tableau2.D36" style:family="table-cell">
      <style:table-cell-properties fo:padding="0.097cm" fo:border-left="0.05pt solid #000000" fo:border-right="0.05pt solid #000000" fo:border-top="none" fo:border-bottom="0.05pt solid #000000"/>
    </style:style>
    <style:style style:name="Tableau2.A37" style:family="table-cell">
      <style:table-cell-properties fo:padding="0.097cm" fo:border-left="0.05pt solid #000000" fo:border-right="none" fo:border-top="none" fo:border-bottom="0.05pt solid #000000"/>
    </style:style>
    <style:style style:name="Tableau2.B37" style:family="table-cell">
      <style:table-cell-properties style:vertical-align="top" fo:padding="0.097cm" fo:border-left="0.05pt solid #000000" fo:border-right="none" fo:border-top="none" fo:border-bottom="0.05pt solid #000000"/>
    </style:style>
    <style:style style:name="Tableau2.C37" style:family="table-cell">
      <style:table-cell-properties fo:padding="0.097cm" fo:border-left="0.05pt solid #000000" fo:border-right="none" fo:border-top="none" fo:border-bottom="0.05pt solid #000000"/>
    </style:style>
    <style:style style:name="Tableau2.D37" style:family="table-cell">
      <style:table-cell-properties fo:padding="0.097cm" fo:border-left="0.05pt solid #000000" fo:border-right="0.05pt solid #000000" fo:border-top="none" fo:border-bottom="0.05pt solid #000000"/>
    </style:style>
    <style:style style:name="Tableau2.A38" style:family="table-cell">
      <style:table-cell-properties fo:padding="0.097cm" fo:border-left="0.05pt solid #000000" fo:border-right="none" fo:border-top="none" fo:border-bottom="0.05pt solid #000000"/>
    </style:style>
    <style:style style:name="Tableau2.C38" style:family="table-cell">
      <style:table-cell-properties fo:padding="0.097cm" fo:border-left="0.05pt solid #000000" fo:border-right="none" fo:border-top="none" fo:border-bottom="0.05pt solid #000000"/>
    </style:style>
    <style:style style:name="Tableau2.D38" style:family="table-cell">
      <style:table-cell-properties fo:padding="0.097cm" fo:border-left="0.05pt solid #000000" fo:border-right="0.05pt solid #000000" fo:border-top="none" fo:border-bottom="0.05pt solid #000000"/>
    </style:style>
    <style:style style:name="Tableau2.A39" style:family="table-cell">
      <style:table-cell-properties fo:padding="0.097cm" fo:border-left="0.05pt solid #000000" fo:border-right="0.05pt solid #000000" fo:border-top="none" fo:border-bottom="0.05pt solid #000000"/>
    </style:style>
    <style:style style:name="Tableau2.A40" style:family="table-cell">
      <style:table-cell-properties fo:padding="0.097cm" fo:border-left="0.05pt solid #000000" fo:border-right="none" fo:border-top="none" fo:border-bottom="0.05pt solid #000000"/>
    </style:style>
    <style:style style:name="Tableau2.C40" style:family="table-cell">
      <style:table-cell-properties fo:padding="0.097cm" fo:border-left="0.05pt solid #000000" fo:border-right="none" fo:border-top="none" fo:border-bottom="0.05pt solid #000000"/>
    </style:style>
    <style:style style:name="Tableau2.D40" style:family="table-cell">
      <style:table-cell-properties fo:padding="0.097cm" fo:border-left="0.05pt solid #000000" fo:border-right="0.05pt solid #000000" fo:border-top="none" fo:border-bottom="0.05pt solid #000000"/>
    </style:style>
    <style:style style:name="Tableau2.A41" style:family="table-cell">
      <style:table-cell-properties fo:padding="0.097cm" fo:border-left="0.05pt solid #000000" fo:border-right="none" fo:border-top="none" fo:border-bottom="0.05pt solid #000000"/>
    </style:style>
    <style:style style:name="Tableau2.C41" style:family="table-cell">
      <style:table-cell-properties fo:padding="0.097cm" fo:border-left="0.05pt solid #000000" fo:border-right="none" fo:border-top="none" fo:border-bottom="0.05pt solid #000000"/>
    </style:style>
    <style:style style:name="Tableau2.D41" style:family="table-cell">
      <style:table-cell-properties fo:padding="0.097cm" fo:border-left="0.05pt solid #000000" fo:border-right="0.05pt solid #000000" fo:border-top="none" fo:border-bottom="0.05pt solid #000000"/>
    </style:style>
    <style:style style:name="Tableau2.A42" style:family="table-cell">
      <style:table-cell-properties fo:padding="0.097cm" fo:border-left="0.05pt solid #000000" fo:border-right="none" fo:border-top="none" fo:border-bottom="0.05pt solid #000000"/>
    </style:style>
    <style:style style:name="Tableau2.C42" style:family="table-cell">
      <style:table-cell-properties fo:padding="0.097cm" fo:border-left="0.05pt solid #000000" fo:border-right="none" fo:border-top="none" fo:border-bottom="0.05pt solid #000000"/>
    </style:style>
    <style:style style:name="Tableau2.D42" style:family="table-cell">
      <style:table-cell-properties fo:padding="0.097cm" fo:border-left="0.05pt solid #000000" fo:border-right="0.05pt solid #000000" fo:border-top="none" fo:border-bottom="0.05pt solid #000000"/>
    </style:style>
    <style:style style:name="Tableau2.A43" style:family="table-cell">
      <style:table-cell-properties fo:padding="0.097cm" fo:border-left="0.05pt solid #000000" fo:border-right="none" fo:border-top="none" fo:border-bottom="0.05pt solid #000000"/>
    </style:style>
    <style:style style:name="Tableau2.C43" style:family="table-cell">
      <style:table-cell-properties fo:padding="0.097cm" fo:border-left="0.05pt solid #000000" fo:border-right="none" fo:border-top="none" fo:border-bottom="0.05pt solid #000000"/>
    </style:style>
    <style:style style:name="Tableau2.D43" style:family="table-cell">
      <style:table-cell-properties fo:padding="0.097cm" fo:border-left="0.05pt solid #000000" fo:border-right="0.05pt solid #000000" fo:border-top="none" fo:border-bottom="0.05pt solid #000000"/>
    </style:style>
    <style:style style:name="Tableau2.A44" style:family="table-cell">
      <style:table-cell-properties fo:padding="0.097cm" fo:border-left="0.05pt solid #000000" fo:border-right="none" fo:border-top="none" fo:border-bottom="0.05pt solid #000000"/>
    </style:style>
    <style:style style:name="Tableau2.C44" style:family="table-cell">
      <style:table-cell-properties fo:padding="0.097cm" fo:border-left="0.05pt solid #000000" fo:border-right="none" fo:border-top="none" fo:border-bottom="0.05pt solid #000000"/>
    </style:style>
    <style:style style:name="Tableau2.D44" style:family="table-cell">
      <style:table-cell-properties fo:padding="0.097cm" fo:border-left="0.05pt solid #000000" fo:border-right="0.05pt solid #000000" fo:border-top="none" fo:border-bottom="0.05pt solid #000000"/>
    </style:style>
    <style:style style:name="Tableau2.A45" style:family="table-cell">
      <style:table-cell-properties fo:padding="0.097cm" fo:border-left="0.05pt solid #000000" fo:border-right="none" fo:border-top="none" fo:border-bottom="0.05pt solid #000000"/>
    </style:style>
    <style:style style:name="Tableau2.C45" style:family="table-cell">
      <style:table-cell-properties fo:padding="0.097cm" fo:border-left="0.05pt solid #000000" fo:border-right="none" fo:border-top="none" fo:border-bottom="0.05pt solid #000000"/>
    </style:style>
    <style:style style:name="Tableau2.D45" style:family="table-cell">
      <style:table-cell-properties fo:padding="0.097cm" fo:border-left="0.05pt solid #000000" fo:border-right="0.05pt solid #000000" fo:border-top="none" fo:border-bottom="0.05pt solid #000000"/>
    </style:style>
    <style:style style:name="Tableau2.A46" style:family="table-cell">
      <style:table-cell-properties fo:padding="0.097cm" fo:border-left="0.05pt solid #000000" fo:border-right="none" fo:border-top="none" fo:border-bottom="0.05pt solid #000000"/>
    </style:style>
    <style:style style:name="Tableau2.C46" style:family="table-cell">
      <style:table-cell-properties fo:padding="0.097cm" fo:border-left="0.05pt solid #000000" fo:border-right="none" fo:border-top="none" fo:border-bottom="0.05pt solid #000000"/>
    </style:style>
    <style:style style:name="Tableau2.D46" style:family="table-cell">
      <style:table-cell-properties fo:padding="0.097cm" fo:border-left="0.05pt solid #000000" fo:border-right="0.05pt solid #000000" fo:border-top="none" fo:border-bottom="0.05pt solid #000000"/>
    </style:style>
    <style:style style:name="Tableau12" style:family="table">
      <style:table-properties style:width="17.667cm" fo:margin-left="0cm" fo:margin-right="0.032cm" fo:break-before="auto" fo:break-after="auto" table:align="margins"/>
    </style:style>
    <style:style style:name="Tableau12.A" style:family="table-column">
      <style:table-column-properties style:column-width="3.182cm" style:rel-column-width="11801*"/>
    </style:style>
    <style:style style:name="Tableau12.B" style:family="table-column">
      <style:table-column-properties style:column-width="2.514cm" style:rel-column-width="9327*"/>
    </style:style>
    <style:style style:name="Tableau12.C" style:family="table-column">
      <style:table-column-properties style:column-width="9.511cm" style:rel-column-width="35281*"/>
    </style:style>
    <style:style style:name="Tableau12.D" style:family="table-column">
      <style:table-column-properties style:column-width="2.461cm" style:rel-column-width="9126*"/>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style:vertical-align="top"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style:vertical-align="top"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3" style:family="table">
      <style:table-properties style:width="17.648cm" fo:margin-left="0cm" fo:margin-right="0.051cm" fo:break-before="auto" fo:break-after="auto" table:align="margins"/>
    </style:style>
    <style:style style:name="Tableau3.A" style:family="table-column">
      <style:table-column-properties style:column-width="3.18cm" style:rel-column-width="11813*"/>
    </style:style>
    <style:style style:name="Tableau3.B" style:family="table-column">
      <style:table-column-properties style:column-width="2.514cm" style:rel-column-width="9336*"/>
    </style:style>
    <style:style style:name="Tableau3.C" style:family="table-column">
      <style:table-column-properties style:column-width="9.511cm" style:rel-column-width="35316*"/>
    </style:style>
    <style:style style:name="Tableau3.D" style:family="table-column">
      <style:table-column-properties style:column-width="2.443cm" style:rel-column-width="907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elle1" style:family="table">
      <style:table-properties style:width="17.648cm" fo:margin-left="0cm" fo:margin-right="0.051cm" fo:break-before="auto" fo:break-after="auto" table:align="margins"/>
    </style:style>
    <style:style style:name="Tabelle1.A" style:family="table-column">
      <style:table-column-properties style:column-width="3.18cm" style:rel-column-width="11813*"/>
    </style:style>
    <style:style style:name="Tabelle1.B" style:family="table-column">
      <style:table-column-properties style:column-width="2.514cm" style:rel-column-width="9336*"/>
    </style:style>
    <style:style style:name="Tabelle1.C" style:family="table-column">
      <style:table-column-properties style:column-width="9.511cm" style:rel-column-width="35316*"/>
    </style:style>
    <style:style style:name="Tabelle1.D" style:family="table-column">
      <style:table-column-properties style:column-width="2.443cm" style:rel-column-width="9070*"/>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leau13" style:family="table">
      <style:table-properties style:width="17.648cm" fo:margin-left="0cm" fo:margin-right="0.051cm" fo:break-before="auto" fo:break-after="auto" table:align="margins"/>
    </style:style>
    <style:style style:name="Tableau13.A" style:family="table-column">
      <style:table-column-properties style:column-width="3.18cm" style:rel-column-width="11812*"/>
    </style:style>
    <style:style style:name="Tableau13.B" style:family="table-column">
      <style:table-column-properties style:column-width="2.514cm" style:rel-column-width="9335*"/>
    </style:style>
    <style:style style:name="Tableau13.C" style:family="table-column">
      <style:table-column-properties style:column-width="9.511cm" style:rel-column-width="35319*"/>
    </style:style>
    <style:style style:name="Tableau13.D" style:family="table-column">
      <style:table-column-properties style:column-width="2.443cm" style:rel-column-width="9069*"/>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style:vertical-align="top"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style:vertical-align="top"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9" style:family="table">
      <style:table-properties style:width="17.648cm" fo:margin-left="0cm" fo:margin-right="0.051cm" fo:break-before="auto" fo:break-after="auto" table:align="margins"/>
    </style:style>
    <style:style style:name="Tableau19.A" style:family="table-column">
      <style:table-column-properties style:column-width="3.18cm" style:rel-column-width="11812*"/>
    </style:style>
    <style:style style:name="Tableau19.B" style:family="table-column">
      <style:table-column-properties style:column-width="2.514cm" style:rel-column-width="9335*"/>
    </style:style>
    <style:style style:name="Tableau19.C" style:family="table-column">
      <style:table-column-properties style:column-width="9.511cm" style:rel-column-width="35319*"/>
    </style:style>
    <style:style style:name="Tableau19.D" style:family="table-column">
      <style:table-column-properties style:column-width="2.443cm" style:rel-column-width="9069*"/>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style:vertical-align="top"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style:vertical-align="top"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5" style:family="table">
      <style:table-properties style:width="17.648cm" fo:margin-left="0cm" fo:margin-right="0.051cm" fo:break-before="auto" fo:break-after="auto" table:align="margins"/>
    </style:style>
    <style:style style:name="Tableau15.A" style:family="table-column">
      <style:table-column-properties style:column-width="3.18cm" style:rel-column-width="11812*"/>
    </style:style>
    <style:style style:name="Tableau15.B" style:family="table-column">
      <style:table-column-properties style:column-width="2.514cm" style:rel-column-width="9335*"/>
    </style:style>
    <style:style style:name="Tableau15.C" style:family="table-column">
      <style:table-column-properties style:column-width="9.511cm" style:rel-column-width="35319*"/>
    </style:style>
    <style:style style:name="Tableau15.D" style:family="table-column">
      <style:table-column-properties style:column-width="2.443cm" style:rel-column-width="9069*"/>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top"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top"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0.05pt solid #000000" fo:border-top="none" fo:border-bottom="0.05pt solid #000000"/>
    </style:style>
    <style:style style:name="Tableau18" style:family="table">
      <style:table-properties style:width="17.648cm" fo:margin-left="0cm" fo:margin-right="0.051cm" fo:break-before="auto" fo:break-after="auto" table:align="margins"/>
    </style:style>
    <style:style style:name="Tableau18.A" style:family="table-column">
      <style:table-column-properties style:column-width="3.18cm" style:rel-column-width="11812*"/>
    </style:style>
    <style:style style:name="Tableau18.B" style:family="table-column">
      <style:table-column-properties style:column-width="2.514cm" style:rel-column-width="9335*"/>
    </style:style>
    <style:style style:name="Tableau18.C" style:family="table-column">
      <style:table-column-properties style:column-width="9.511cm" style:rel-column-width="35319*"/>
    </style:style>
    <style:style style:name="Tableau18.D" style:family="table-column">
      <style:table-column-properties style:column-width="2.443cm" style:rel-column-width="9069*"/>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style:vertical-align="top"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style:vertical-align="top"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none" fo:border-top="none" fo:border-bottom="0.05pt solid #000000"/>
    </style:style>
    <style:style style:name="Tableau18.D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C4" style:family="table-cell">
      <style:table-cell-properties fo:padding="0.097cm" fo:border-left="0.05pt solid #000000" fo:border-right="none" fo:border-top="none" fo:border-bottom="0.05pt solid #000000"/>
    </style:style>
    <style:style style:name="Tableau18.D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C5" style:family="table-cell">
      <style:table-cell-properties fo:padding="0.097cm" fo:border-left="0.05pt solid #000000" fo:border-right="none" fo:border-top="none" fo:border-bottom="0.05pt solid #000000"/>
    </style:style>
    <style:style style:name="Tableau18.D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C6" style:family="table-cell">
      <style:table-cell-properties fo:padding="0.097cm" fo:border-left="0.05pt solid #000000" fo:border-right="none" fo:border-top="none" fo:border-bottom="0.05pt solid #000000"/>
    </style:style>
    <style:style style:name="Tableau18.D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C7" style:family="table-cell">
      <style:table-cell-properties fo:padding="0.097cm" fo:border-left="0.05pt solid #000000" fo:border-right="none" fo:border-top="none" fo:border-bottom="0.05pt solid #000000"/>
    </style:style>
    <style:style style:name="Tableau18.D7" style:family="table-cell">
      <style:table-cell-properties fo:padding="0.097cm" fo:border-left="0.05pt solid #000000" fo:border-right="0.05pt solid #000000" fo:border-top="none" fo:border-bottom="0.05pt solid #000000"/>
    </style:style>
    <style:style style:name="Table3" style:family="table">
      <style:table-properties style:width="17.648cm" fo:margin-left="0cm" fo:margin-right="0.051cm" fo:break-before="auto" fo:break-after="auto" table:align="margins"/>
    </style:style>
    <style:style style:name="Table3.A" style:family="table-column">
      <style:table-column-properties style:column-width="3.182cm" style:rel-column-width="11815*"/>
    </style:style>
    <style:style style:name="Table3.B" style:family="table-column">
      <style:table-column-properties style:column-width="2.515cm" style:rel-column-width="9338*"/>
    </style:style>
    <style:style style:name="Table3.C" style:family="table-column">
      <style:table-column-properties style:column-width="9.509cm" style:rel-column-width="35310*"/>
    </style:style>
    <style:style style:name="Table3.D" style:family="table-column">
      <style:table-column-properties style:column-width="2.443cm" style:rel-column-width="907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able_20_Contents">
      <style:text-properties fo:font-style="normal" style:font-style-asian="normal" style:font-style-complex="normal"/>
    </style:style>
    <style:style style:name="P3" style:family="paragraph" style:parent-style-name="Table_20_Heading">
      <style:text-properties fo:font-style="normal" style:font-style-asian="normal" style:font-style-complex="normal"/>
    </style:style>
    <style:style style:name="P4" style:family="paragraph" style:parent-style-name="Table_20_Contents_2f_PRE">
      <style:text-properties fo:font-style="normal" style:font-style-asian="normal" style:font-style-complex="normal"/>
    </style:style>
    <style:style style:name="P5" style:family="paragraph" style:parent-style-name="Table_20_Contents">
      <style:text-properties fo:font-style="normal"/>
    </style:style>
    <style:style style:name="P6" style:family="paragraph" style:parent-style-name="Table_20_Contents">
      <style:text-properties fo:font-style="normal" style:text-underline-style="none" style:font-style-asian="normal" style:font-style-complex="normal"/>
    </style:style>
    <style:style style:name="P7" style:family="paragraph" style:parent-style-name="Table_20_Contents">
      <style:paragraph-properties fo:margin-left="-0.009cm" fo:margin-right="0.062cm" fo:text-indent="0cm" style:auto-text-indent="false"/>
      <style:text-properties fo:font-style="normal" style:text-underline-style="none" style:font-style-asian="normal" style:font-style-complex="normal"/>
    </style:style>
    <style:style style:name="P8" style:family="paragraph" style:parent-style-name="Table_20_Contents">
      <style:text-properties fo:font-style="normal" fo:font-weight="normal"/>
    </style:style>
    <style:style style:name="P9" style:family="paragraph" style:parent-style-name="Table_20_Contents">
      <style:text-properties fo:font-style="normal" fo:font-weight="normal" style:font-style-asian="normal" style:font-style-complex="normal"/>
    </style:style>
    <style:style style:name="P10" style:family="paragraph" style:parent-style-name="Table_20_Contents_2f_PRE">
      <style:text-properties fo:font-style="normal" fo:font-weight="normal" style:font-style-asian="normal" style:font-style-complex="normal"/>
    </style:style>
    <style:style style:name="P11" style:family="paragraph" style:parent-style-name="Table_20_Contents">
      <style:text-properties fo:font-style="normal" fo:font-weight="normal" style:font-style-asian="normal" style:font-weight-asian="normal" style:font-style-complex="normal" style:font-weight-complex="normal"/>
    </style:style>
    <style:style style:name="P12" style:family="paragraph" style:parent-style-name="Table_20_Contents_2f_PRE">
      <style:text-properties fo:font-style="normal" fo:font-weight="normal"/>
    </style:style>
    <style:style style:name="P13" style:family="paragraph" style:parent-style-name="Table_20_Contents_2f_PRE">
      <style:text-properties fo:font-style="normal" fo:font-weight="normal" style:font-weight-asian="normal" style:font-weight-complex="normal"/>
    </style:style>
    <style:style style:name="P14" style:family="paragraph" style:parent-style-name="Footer">
      <style:paragraph-properties fo:text-align="end" style:justify-single-word="false"/>
      <style:text-properties fo:font-size="9pt" style:font-size-asian="9pt" style:font-size-complex="9pt"/>
    </style:style>
    <style:style style:name="P15" style:family="paragraph" style:parent-style-name="Standard">
      <style:paragraph-properties fo:text-align="start" style:justify-single-word="false"/>
    </style:style>
    <style:style style:name="P16" style:family="paragraph" style:parent-style-name="Text_20_body">
      <style:paragraph-properties fo:margin-top="0.499cm" fo:margin-bottom="0cm" style:contextual-spacing="false" fo:text-align="start" style:justify-single-word="false" fo:keep-with-next="always"/>
    </style:style>
    <style:style style:name="P17" style:family="paragraph" style:parent-style-name="Table_20_Contents">
      <style:paragraph-properties fo:text-align="start" style:justify-single-word="false"/>
    </style:style>
    <style:style style:name="P18" style:family="paragraph" style:parent-style-name="Standard">
      <style:text-properties fo:font-size="8pt" fo:font-weight="bold" style:font-size-asian="7pt" style:font-size-complex="8pt"/>
    </style:style>
    <style:style style:name="P19" style:family="paragraph" style:parent-style-name="Table_20_Contents">
      <style:text-properties fo:font-size="8pt" style:font-size-asian="8pt" style:font-size-complex="8pt"/>
    </style:style>
    <style:style style:name="P20" style:family="paragraph" style:parent-style-name="Table_20_Contents">
      <style:text-properties fo:font-size="8pt" fo:font-weight="normal" style:font-size-asian="8pt" style:font-weight-asian="normal" style:font-size-complex="8pt" style:font-weight-complex="normal"/>
    </style:style>
    <style:style style:name="P21" style:family="paragraph" style:parent-style-name="Standard">
      <style:text-properties fo:font-weight="bold"/>
    </style:style>
    <style:style style:name="P22" style:family="paragraph" style:parent-style-name="Text_20_body">
      <style:text-properties fo:font-weight="bold"/>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weight="bold"/>
    </style:style>
    <style:style style:name="P27" style:family="paragraph" style:parent-style-name="Table_20_Contents">
      <style:paragraph-properties fo:text-align="justify" style:justify-single-word="false"/>
      <style:text-properties fo:font-weight="bold"/>
    </style:style>
    <style:style style:name="P28" style:family="paragraph" style:parent-style-name="Table_20_Contents">
      <style:text-properties fo:font-weight="bold" style:font-weight-asian="normal" style:font-weight-complex="normal"/>
    </style:style>
    <style:style style:name="P29" style:family="paragraph" style:parent-style-name="Text_20_body">
      <style:text-properties style:font-name="Verdana" fo:font-size="8pt" fo:font-style="normal"/>
    </style:style>
    <style:style style:name="P30" style:family="paragraph" style:parent-style-name="Text_20_body">
      <style:paragraph-properties fo:text-align="justify" style:justify-single-word="false"/>
    </style:style>
    <style:style style:name="P31" style:family="paragraph" style:parent-style-name="Table_20_Contents">
      <style:paragraph-properties fo:text-align="justify" style:justify-single-word="false"/>
    </style:style>
    <style:style style:name="P32" style:family="paragraph" style:parent-style-name="Text_20_body">
      <style:text-properties style:use-window-font-color="true" loext:opacity="0%"/>
    </style:style>
    <style:style style:name="P33" style:family="paragraph" style:parent-style-name="Text_20_body">
      <style:text-properties style:use-window-font-color="true" loext:opacity="0%" style:text-line-through-style="none" style:text-line-through-type="none"/>
    </style:style>
    <style:style style:name="P34" style:family="paragraph" style:parent-style-name="Text_20_body">
      <style:text-properties style:use-window-font-color="true" loext:opacity="0%" fo:font-style="normal" style:font-style-asian="normal" style:font-style-complex="normal"/>
    </style:style>
    <style:style style:name="P35" style:family="paragraph" style:parent-style-name="Table_20_Contents">
      <style:text-properties style:use-window-font-color="true" loext:opacity="0%" fo:font-style="normal" style:font-style-asian="normal" style:font-style-complex="normal"/>
    </style:style>
    <style:style style:name="P36" style:family="paragraph" style:parent-style-name="Text_20_body">
      <style:paragraph-properties fo:margin-top="0cm" fo:margin-bottom="0.199cm" style:contextual-spacing="false"/>
      <style:text-properties style:use-window-font-color="true" loext:opacity="0%"/>
    </style:style>
    <style:style style:name="P37" style:family="paragraph" style:parent-style-name="Text_20_body">
      <style:text-properties fo:color="#ff0000" loext:opacity="100%"/>
    </style:style>
    <style:style style:name="P38" style:family="paragraph" style:parent-style-name="Text_20_body">
      <style:text-properties style:text-underline-style="solid" style:text-underline-type="double" style:text-underline-width="auto" style:text-underline-color="font-color"/>
    </style:style>
    <style:style style:name="P39" style:family="paragraph" style:parent-style-name="Text_20_body">
      <style:text-properties fo:font-weight="normal" style:font-weight-asian="normal" style:font-weight-complex="normal"/>
    </style:style>
    <style:style style:name="P40" style:family="paragraph" style:parent-style-name="Table_20_Contents">
      <style:text-properties fo:font-weight="normal" style:font-weight-asian="normal" style:font-weight-complex="normal"/>
    </style:style>
    <style:style style:name="P41" style:family="paragraph" style:parent-style-name="Table_20_Contents_2f_PRE">
      <style:text-properties fo:font-weight="normal" style:font-weight-asian="normal" style:font-weight-complex="normal"/>
    </style:style>
    <style:style style:name="P42" style:family="paragraph" style:parent-style-name="Table_20_Contents">
      <style:text-properties fo:font-weight="normal"/>
    </style:style>
    <style:style style:name="P43" style:family="paragraph" style:parent-style-name="Table_20_Contents_2f_PRE">
      <style:text-properties fo:font-weight="normal"/>
    </style:style>
    <style:style style:name="P44" style:family="paragraph" style:parent-style-name="Text_20_body">
      <style:paragraph-properties fo:margin-left="0cm" fo:margin-right="0cm" fo:text-indent="0cm" style:auto-text-indent="false"/>
    </style:style>
    <style:style style:name="P45" style:family="paragraph" style:parent-style-name="Table_20_Contents">
      <style:paragraph-properties fo:margin-left="0cm" fo:margin-right="0cm" fo:text-align="start" style:justify-single-word="false" fo:text-indent="0cm" style:auto-text-indent="false" style:text-autospace="none"/>
      <style:text-properties style:font-name="Arial" fo:font-size="8pt" style:font-name-asian="Monospace" style:font-size-asian="8pt" style:font-name-complex="Monospace" style:font-size-complex="8pt"/>
    </style:style>
    <style:style style:name="P46" style:family="paragraph" style:parent-style-name="Table_20_Contents">
      <style:text-properties style:font-name="Arial" fo:font-size="8pt" style:font-name-asian="Monospace" style:font-size-asian="8pt" style:font-name-complex="Monospace" style:font-size-complex="8pt"/>
    </style:style>
    <style:style style:name="P47" style:family="paragraph" style:parent-style-name="Table_20_Contents">
      <style:paragraph-properties style:text-autospace="none"/>
      <style:text-properties style:font-name="Arial" fo:font-size="8pt" style:font-name-asian="Monospace" style:font-size-asian="8pt" style:font-name-complex="Monospace" style:font-size-complex="8pt"/>
    </style:style>
    <style:style style:name="P48" style:family="paragraph" style:parent-style-name="Table_20_Contents">
      <style:text-properties style:font-name="Arial" fo:font-size="8pt" style:font-size-asian="8pt" style:font-size-complex="8pt"/>
    </style:style>
    <style:style style:name="P49" style:family="paragraph" style:parent-style-name="Table_20_Contents">
      <style:text-properties style:font-name="Arial"/>
    </style:style>
    <style:style style:name="P50" style:family="paragraph" style:parent-style-name="Table_20_Contents">
      <style:paragraph-properties fo:margin-left="0cm" fo:margin-right="0cm" fo:text-align="start" style:justify-single-word="false" fo:text-indent="0cm" style:auto-text-indent="false" style:text-autospace="none"/>
      <style:text-properties style:font-name="Tahoma" fo:font-size="8pt" style:font-name-asian="Monospace" style:font-size-asian="8pt" style:font-name-complex="Monospace" style:font-size-complex="8pt"/>
    </style:style>
    <style:style style:name="P51" style:family="paragraph" style:parent-style-name="Table_20_Contents">
      <style:text-properties style:text-underline-style="none"/>
    </style:style>
    <style:style style:name="P52" style:family="paragraph" style:parent-style-name="Table_20_Contents">
      <style:paragraph-properties fo:margin-left="-0.009cm" fo:margin-right="0.062cm" fo:text-indent="0cm" style:auto-text-indent="false"/>
      <style:text-properties style:text-underline-style="none"/>
    </style:style>
    <style:style style:name="P53" style:family="paragraph" style:parent-style-name="Table_20_Contents">
      <style:text-properties fo:font-style="italic"/>
    </style:style>
    <style:style style:name="P54" style:family="paragraph" style:parent-style-name="Table_20_Contents">
      <style:text-properties fo:font-style="italic" style:font-style-asian="italic" style:font-style-complex="italic"/>
    </style:style>
    <style:style style:name="P55" style:family="paragraph" style:parent-style-name="Table_20_Contents">
      <style:text-properties fo:font-style="italic" style:font-style-asian="normal" style:font-style-complex="normal"/>
    </style:style>
    <style:style style:name="P56" style:family="paragraph" style:parent-style-name="Table_20_Contents">
      <style:text-properties fo:font-style="italic" fo:font-weight="normal"/>
    </style:style>
    <style:style style:name="P57" style:family="paragraph" style:parent-style-name="Table_20_Contents">
      <style:text-properties fo:font-style="italic" fo:font-weight="normal" style:font-style-asian="italic" style:font-style-complex="italic"/>
    </style:style>
    <style:style style:name="P58" style:family="paragraph" style:parent-style-name="Table_20_Contents">
      <style:text-properties style:text-line-through-style="solid" style:text-line-through-type="single"/>
    </style:style>
    <style:style style:name="P59" style:family="paragraph" style:parent-style-name="Table_20_Contents">
      <style:text-properties style:text-line-through-style="solid" style:text-line-through-type="single" fo:font-style="normal" style:font-style-asian="normal" style:font-style-complex="normal"/>
    </style:style>
    <style:style style:name="P60" style:family="paragraph" style:parent-style-name="Table_20_Contents">
      <style:text-properties style:text-line-through-style="none" style:text-line-through-type="none"/>
    </style:style>
    <style:style style:name="P61" style:family="paragraph" style:parent-style-name="Table_20_Contents">
      <style:text-properties style:text-line-through-style="none" style:text-line-through-type="none" fo:font-style="normal" style:font-style-asian="normal" style:font-style-complex="normal"/>
    </style:style>
    <style:style style:name="P62" style:family="paragraph" style:parent-style-name="Table_20_Contents">
      <style:text-properties style:text-line-through-style="none" style:text-line-through-type="none" fo:font-weight="normal"/>
    </style:style>
    <style:style style:name="P63" style:family="paragraph" style:parent-style-name="Table_20_Contents">
      <style:paragraph-properties fo:text-align="end" style:justify-single-word="false"/>
    </style:style>
    <style:style style:name="P64" style:family="paragraph" style:parent-style-name="Table_20_Contents_2f_PRE">
      <style:text-properties style:font-name="Cumberland" fo:font-size="8pt" style:font-size-asian="8pt" style:font-size-complex="8pt"/>
    </style:style>
    <style:style style:name="P65" style:family="paragraph" style:parent-style-name="Table_20_Contents_2f_PRE">
      <style:text-properties style:font-name="monospace"/>
    </style:style>
    <style:style style:name="P66" style:family="paragraph" style:parent-style-name="Contents_20_2">
      <style:paragraph-properties>
        <style:tab-stops>
          <style:tab-stop style:position="17.2cm" style:type="right" style:leader-style="dotted" style:leader-text="."/>
        </style:tab-stops>
      </style:paragraph-properties>
    </style:style>
    <style:style style:name="P67" style:family="paragraph" style:parent-style-name="Contents_20_1">
      <style:paragraph-properties>
        <style:tab-stops>
          <style:tab-stop style:position="17.699cm" style:type="right" style:leader-style="dotted" style:leader-text="."/>
        </style:tab-stops>
      </style:paragraph-properties>
    </style:style>
    <style:style style:name="P68" style:family="paragraph" style:parent-style-name="Contents_20_3">
      <style:paragraph-properties>
        <style:tab-stops>
          <style:tab-stop style:position="16.701cm" style:type="right" style:leader-style="dotted" style:leader-text="."/>
        </style:tab-stops>
      </style:paragraph-properties>
    </style:style>
    <style:style style:name="P69" style:family="paragraph" style:parent-style-name="Heading_20_1" style:master-page-name="">
      <style:paragraph-properties fo:text-align="start" style:justify-single-word="false" style:page-number="auto" fo:break-before="auto" fo:break-after="auto"/>
    </style:style>
    <style:style style:name="P70" style:family="paragraph" style:parent-style-name="Heading_20_3">
      <style:text-properties style:text-underline-style="none"/>
    </style:style>
    <style:style style:name="P71" style:family="paragraph" style:parent-style-name="Heading_20_3">
      <style:text-properties fo:font-weight="bold" style:font-weight-asian="bold" style:font-weight-complex="bold"/>
    </style:style>
    <style:style style:name="P72" style:family="paragraph" style:parent-style-name="Preformatted_20_Text">
      <style:paragraph-properties fo:text-align="justify" style:justify-single-word="false"/>
      <style:text-properties fo:font-weight="bold" style:font-weight-asian="bold" style:font-weight-complex="bold"/>
    </style:style>
    <style:style style:name="P73" style:family="paragraph" style:parent-style-name="Preformatted_20_Text">
      <style:paragraph-properties fo:margin-left="2.501cm" fo:margin-right="0cm" fo:text-indent="0cm" style:auto-text-indent="false"/>
    </style:style>
    <style:style style:name="P74" style:family="paragraph" style:parent-style-name="Preformatted_20_Text">
      <style:paragraph-properties fo:margin-left="0cm" fo:margin-right="0cm" fo:text-indent="0cm" style:auto-text-indent="false"/>
    </style:style>
    <style:style style:name="P75" style:family="paragraph" style:parent-style-name="Preformatted_20_Text">
      <style:paragraph-properties fo:margin-top="0cm" fo:margin-bottom="0.499cm" style:contextual-spacing="false"/>
    </style:style>
    <style:style style:name="P76" style:family="paragraph" style:parent-style-name="Preformatted_20_Text" style:list-style-name="L16"/>
    <style:style style:name="P77" style:family="paragraph" style:parent-style-name="Preformatted_20_Text">
      <style:paragraph-properties fo:margin-top="0cm" fo:margin-bottom="0.499cm" style:contextual-spacing="false" fo:text-align="start" style:justify-single-word="false"/>
    </style:style>
    <style:style style:name="P78" style:family="paragraph" style:parent-style-name="Preformatted_20_Text" style:list-style-name="L19"/>
    <style:style style:name="P79" style:family="paragraph" style:parent-style-name="Preformatted_20_Text">
      <style:text-properties fo:font-style="normal"/>
    </style:style>
    <style:style style:name="P80" style:family="paragraph" style:parent-style-name="Standard" style:list-style-name="L16"/>
    <style:style style:name="P81" style:family="paragraph" style:parent-style-name="Standard" style:list-style-name="L19"/>
    <style:style style:name="P82" style:family="paragraph" style:parent-style-name="Standard" style:list-style-name="L22"/>
    <style:style style:name="P83" style:family="paragraph" style:parent-style-name="Table_20_Contents" style:list-style-name="L1"/>
    <style:style style:name="P84" style:family="paragraph" style:parent-style-name="Table_20_Contents" style:list-style-name="L1">
      <style:paragraph-properties fo:margin-left="0cm" fo:margin-right="0cm" fo:text-indent="0cm" style:auto-text-indent="false"/>
    </style:style>
    <style:style style:name="P85" style:family="paragraph" style:parent-style-name="Table_20_Contents" style:list-style-name="L2"/>
    <style:style style:name="P86" style:family="paragraph" style:parent-style-name="Table_20_Contents" style:list-style-name="L3"/>
    <style:style style:name="P87" style:family="paragraph" style:parent-style-name="Table_20_Contents" style:list-style-name="L4"/>
    <style:style style:name="P88" style:family="paragraph" style:parent-style-name="Table_20_Contents" style:list-style-name="L5"/>
    <style:style style:name="P89" style:family="paragraph" style:parent-style-name="Table_20_Contents" style:list-style-name="L6"/>
    <style:style style:name="P90" style:family="paragraph" style:parent-style-name="Table_20_Contents" style:list-style-name="L7"/>
    <style:style style:name="P91" style:family="paragraph" style:parent-style-name="Table_20_Contents" style:list-style-name="L8"/>
    <style:style style:name="P92" style:family="paragraph" style:parent-style-name="Table_20_Contents" style:list-style-name="L9"/>
    <style:style style:name="P93" style:family="paragraph" style:parent-style-name="Table_20_Contents">
      <style:text-properties fo:font-style="normal" style:font-style-asian="normal" style:font-style-complex="normal"/>
    </style:style>
    <style:style style:name="P94" style:family="paragraph" style:parent-style-name="Table_20_Contents">
      <style:text-properties fo:font-style="italic"/>
    </style:style>
    <style:style style:name="P95" style:family="paragraph" style:parent-style-name="Text_20_body" style:list-style-name="L10">
      <style:paragraph-properties fo:margin-top="0cm" fo:margin-bottom="0.199cm" style:contextual-spacing="false"/>
    </style:style>
    <style:style style:name="P96" style:family="paragraph" style:parent-style-name="Text_20_body" style:list-style-name="L10">
      <style:paragraph-properties fo:margin-top="0cm" fo:margin-bottom="0.199cm" style:contextual-spacing="false"/>
      <style:text-properties style:use-window-font-color="true" loext:opacity="0%"/>
    </style:style>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5">
      <style:text-properties style:font-name="Tahoma"/>
    </style:style>
    <style:style style:name="P103" style:family="paragraph" style:parent-style-name="Text_20_body" style:list-style-name="L22">
      <style:text-properties style:font-name="Tahoma" fo:font-weight="normal" style:font-weight-asian="normal" style:font-weight-complex="normal"/>
    </style:style>
    <style:style style:name="P104" style:family="paragraph" style:parent-style-name="Text_20_body" style:list-style-name="">
      <style:text-properties style:text-underline-style="none"/>
    </style:style>
    <style:style style:name="P105" style:family="paragraph" style:parent-style-name="Text_20_body" style:list-style-name=""/>
    <style:style style:name="P106" style:family="paragraph" style:parent-style-name="Text_20_body" style:list-style-name=""/>
    <style:style style:name="P107" style:family="paragraph" style:parent-style-name="Text_20_body" style:list-style-name="L16">
      <style:paragraph-properties fo:margin-left="0cm" fo:margin-right="0cm" fo:text-indent="0cm" style:auto-text-indent="false"/>
    </style:style>
    <style:style style:name="P108" style:family="paragraph" style:parent-style-name="Text_20_body" style:list-style-name="L17">
      <style:paragraph-properties fo:margin-left="0cm" fo:margin-right="0cm" fo:text-indent="0cm" style:auto-text-indent="false"/>
    </style:style>
    <style:style style:name="P109" style:family="paragraph" style:parent-style-name="Text_20_body" style:list-style-name="L18">
      <style:paragraph-properties fo:margin-left="1.251cm" fo:margin-right="0cm" fo:text-indent="0cm" style:auto-text-indent="false"/>
    </style:style>
    <style:style style:name="P110" style:family="paragraph" style:parent-style-name="Text_20_body" style:list-style-name="L20">
      <style:text-properties fo:font-weight="normal" style:font-weight-asian="normal" style:font-weight-complex="normal"/>
    </style:style>
    <style:style style:name="P111" style:family="paragraph" style:parent-style-name="Text_20_body" style:list-style-name="L22">
      <style:text-properties fo:font-weight="normal" style:font-weight-asian="normal" style:font-weight-complex="normal"/>
    </style:style>
    <style:style style:name="P112" style:family="paragraph" style:parent-style-name="Text_20_body" style:list-style-name="L21"/>
    <style:style style:name="P113" style:family="paragraph" style:parent-style-name="Text_20_body" style:list-style-name="L23"/>
    <style:style style:name="P114" style:family="paragraph" style:parent-style-name="Text_20_body" style:list-style-name="L24"/>
    <style:style style:name="P115" style:family="paragraph">
      <style:paragraph-properties fo:text-align="center"/>
    </style:style>
    <style:style style:name="T1" style:family="text">
      <style:text-properties fo:font-style="normal" fo:font-weight="normal"/>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line-through-style="none" style:text-line-through-type="none"/>
    </style:style>
    <style:style style:name="T7" style:family="text">
      <style:text-properties style:use-window-font-color="true" loext:opacity="0%"/>
    </style:style>
    <style:style style:name="T8" style:family="text">
      <style:text-properties style:use-window-font-color="true" loext:opacity="0%" style:font-name="Tahoma" fo:font-size="9pt" fo:font-style="normal" fo:font-weight="normal" style:font-name-asian="TimesNewRomanPS-BoldItalicMT" style:font-size-asian="9pt" style:font-style-asian="normal" style:font-weight-asian="normal" style:font-name-complex="TimesNewRomanPS-BoldItalicMT" style:font-size-complex="9pt" style:font-style-complex="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font-style-asian="normal" style:font-style-complex="normal"/>
    </style:style>
    <style:style style:name="T12" style:family="text">
      <style:text-properties fo:color="#000000" loext:opacity="100%" style:font-name-asian="Monospace" style:font-name-complex="Monospace"/>
    </style:style>
    <style:style style:name="T13" style:family="text">
      <style:text-properties style:text-underline-style="solid" style:text-underline-width="auto" style:text-underline-color="font-color"/>
    </style:style>
    <style:style style:name="T14" style:family="text">
      <style:text-properties style:font-name="Cumberland"/>
    </style:style>
    <style:style style:name="T15" style:family="text">
      <style:text-properties style:font-name="Cumberland" fo:font-size="8pt" style:font-name-asian="Monospace" style:font-size-asian="8pt" style:font-name-complex="Monospace" style:font-size-complex="8pt"/>
    </style:style>
    <style:style style:name="T16" style:family="text">
      <style:text-properties style:font-name="Cumberland" officeooo:rsid="0036adc7"/>
    </style:style>
    <style:style style:name="T17" style:family="text">
      <style:text-properties style:font-name="Cumberland" officeooo:rsid="003081c9"/>
    </style:style>
    <style:style style:name="T18" style:family="text">
      <style:text-properties style:font-name="Cumberland" officeooo:rsid="0034dfcf"/>
    </style:style>
    <style:style style:name="T19" style:family="text">
      <style:text-properties style:font-name="Cumberland" officeooo:rsid="0034f4f3"/>
    </style:style>
    <style:style style:name="T20" style:family="text">
      <style:text-properties style:font-name-asian="Monospace" style:font-name-complex="Monospace"/>
    </style:style>
    <style:style style:name="T21" style:family="text">
      <style:text-properties style:font-name="Arial"/>
    </style:style>
    <style:style style:name="T22" style:family="text">
      <style:text-properties style:font-name="Arial" officeooo:rsid="001dc519"/>
    </style:style>
    <style:style style:name="T23" style:family="text">
      <style:text-properties style:font-name="Arial" officeooo:rsid="001f42c8"/>
    </style:style>
    <style:style style:name="T24" style:family="text">
      <style:text-properties style:font-name="Arial" officeooo:rsid="003bb7b5"/>
    </style:style>
    <style:style style:name="T25" style:family="text">
      <style:text-properties style:font-name="Arial" officeooo:rsid="00209456"/>
    </style:style>
    <style:style style:name="T26" style:family="text">
      <style:text-properties style:font-name="Tahoma"/>
    </style:style>
    <style:style style:name="T27" style:family="text">
      <style:text-properties style:font-name="Tahoma" fo:font-size="9pt" style:font-size-asian="9pt" style:font-size-complex="9pt"/>
    </style:style>
    <style:style style:name="T28" style:family="text">
      <style:text-properties style:font-name="Tahoma" fo:font-size="9pt" style:font-name-asian="Arial1" style:font-size-asian="9pt" style:font-name-complex="Arial1" style:font-size-complex="9pt"/>
    </style:style>
    <style:style style:name="T29" style:family="text">
      <style:text-properties style:font-name="monospace"/>
    </style:style>
    <style:style style:name="T30" style:family="text">
      <style:text-properties style:font-name="monospace" fo:font-style="normal" style:font-style-asian="normal" style:font-style-complex="normal"/>
    </style:style>
    <style:style style:name="T31" style:family="text">
      <style:text-properties style:text-underline-style="none"/>
    </style:style>
    <style:style style:name="T32" style:family="text">
      <style:text-properties fo:font-size="8pt" fo:font-weight="normal" style:font-size-asian="8pt" style:font-weight-asian="normal" style:font-size-complex="8pt" style:font-weight-complex="normal"/>
    </style:style>
    <style:style style:name="T33" style:family="text">
      <style:text-properties fo:font-size="8pt" style:font-size-asian="8pt" style:font-size-complex="8pt"/>
    </style:style>
    <style:style style:name="T34" style:family="text">
      <style:text-properties officeooo:rsid="0005e91e"/>
    </style:style>
    <style:style style:name="T35" style:family="text">
      <style:text-properties officeooo:rsid="00090183"/>
    </style:style>
    <style:style style:name="T36" style:family="text">
      <style:text-properties officeooo:rsid="0009cf66"/>
    </style:style>
    <style:style style:name="T37" style:family="text">
      <style:text-properties officeooo:rsid="00279eab"/>
    </style:style>
    <style:style style:name="T38" style:family="text">
      <style:text-properties officeooo:rsid="00153cad"/>
    </style:style>
    <style:style style:name="T39" style:family="text">
      <style:text-properties officeooo:rsid="00286212"/>
    </style:style>
    <style:style style:name="T40" style:family="text">
      <style:text-properties officeooo:rsid="00285486"/>
    </style:style>
    <style:style style:name="T41" style:family="text">
      <style:text-properties officeooo:rsid="0017f7a2"/>
    </style:style>
    <style:style style:name="T42" style:family="text">
      <style:text-properties officeooo:rsid="003081c9"/>
    </style:style>
    <style:style style:name="T43" style:family="text">
      <style:text-properties officeooo:rsid="001c90da"/>
    </style:style>
    <style:style style:name="T44" style:family="text">
      <style:text-properties officeooo:rsid="001dc519"/>
    </style:style>
    <style:style style:name="T45" style:family="text">
      <style:text-properties officeooo:rsid="0021ea44"/>
    </style:style>
    <style:style style:name="T46" style:family="text">
      <style:text-properties officeooo:rsid="00238be8"/>
    </style:style>
    <style:style style:name="T47" style:family="text">
      <style:text-properties officeooo:rsid="0023e14e"/>
    </style:style>
    <style:style style:name="T48" style:family="text">
      <style:text-properties officeooo:rsid="00262170"/>
    </style:style>
    <style:style style:name="T49" style:family="text">
      <style:text-properties officeooo:rsid="00289fe6"/>
    </style:style>
    <style:style style:name="T50" style:family="text">
      <style:text-properties officeooo:rsid="002a3802"/>
    </style:style>
    <style:style style:name="T51" style:family="text">
      <style:text-properties officeooo:rsid="002c55a6"/>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1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13">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14">
      <text:list-level-style-number text:level="1" text:style-name="Numbering_20_Symbols" loext:num-list-format="%1%." style:num-suffix="." style:num-format="1">
        <style:list-level-properties text:min-label-width="0.499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L15">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6">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min-label-width="0.635cm"/>
        <style:text-properties style:font-name="StarSymbol1"/>
      </text:list-level-style-bullet>
      <text:list-level-style-bullet text:level="2" text:style-name="Bullet_20_Symbols" loext:num-list-format="%2%" text:bullet-char="–">
        <style:list-level-properties text:space-before="0.635cm" text:min-label-width="0.635cm"/>
        <style:text-properties style:font-name="StarSymbol1"/>
      </text:list-level-style-bullet>
      <text:list-level-style-bullet text:level="3" text:style-name="Bullet_20_Symbols" loext:num-list-format="%3%" text:bullet-char="–">
        <style:list-level-properties text:space-before="1.27cm" text:min-label-width="0.635cm"/>
        <style:text-properties style:font-name="StarSymbol1"/>
      </text:list-level-style-bullet>
      <text:list-level-style-bullet text:level="4" text:style-name="Bullet_20_Symbols" loext:num-list-format="%4%" text:bullet-char="–">
        <style:list-level-properties text:space-before="1.905cm" text:min-label-width="0.635cm"/>
        <style:text-properties style:font-name="StarSymbol1"/>
      </text:list-level-style-bullet>
      <text:list-level-style-bullet text:level="5" text:style-name="Bullet_20_Symbols" loext:num-list-format="%5%" text:bullet-char="–">
        <style:list-level-properties text:space-before="2.54cm" text:min-label-width="0.635cm"/>
        <style:text-properties style:font-name="StarSymbol1"/>
      </text:list-level-style-bullet>
      <text:list-level-style-bullet text:level="6" text:style-name="Bullet_20_Symbols" loext:num-list-format="%6%" text:bullet-char="–">
        <style:list-level-properties text:space-before="3.175cm" text:min-label-width="0.635cm"/>
        <style:text-properties style:font-name="StarSymbol1"/>
      </text:list-level-style-bullet>
      <text:list-level-style-bullet text:level="7" text:style-name="Bullet_20_Symbols" loext:num-list-format="%7%" text:bullet-char="–">
        <style:list-level-properties text:space-before="3.81cm" text:min-label-width="0.635cm"/>
        <style:text-properties style:font-name="StarSymbol1"/>
      </text:list-level-style-bullet>
      <text:list-level-style-bullet text:level="8" text:style-name="Bullet_20_Symbols" loext:num-list-format="%8%" text:bullet-char="–">
        <style:list-level-properties text:space-before="4.445cm" text:min-label-width="0.635cm"/>
        <style:text-properties style:font-name="StarSymbol1"/>
      </text:list-level-style-bullet>
      <text:list-level-style-bullet text:level="9" text:style-name="Bullet_20_Symbols" loext:num-list-format="%9%" text:bullet-char="–">
        <style:list-level-properties text:space-before="5.08cm" text:min-label-width="0.635cm"/>
        <style:text-properties style:font-name="StarSymbol1"/>
      </text:list-level-style-bullet>
      <text:list-level-style-bullet text:level="10" text:style-name="Bullet_20_Symbols" loext:num-list-format="%10%" text:bullet-char="–">
        <style:list-level-properties text:space-before="5.715cm" text:min-label-width="0.635cm"/>
        <style:text-properties style:font-name="StarSymbol1"/>
      </text:list-level-style-bullet>
    </text:list-style>
    <text:list-style style:name="L2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2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3">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h text:style-name="P69" text:outline-level="1"><text:bookmark-start text:name="__RefHeading__17537_1782085564"/><text:title>EXT: Shop System</text:title><text:bookmark-end text:name="__RefHeading__17537_1782085564"/></text:h>
      <text:p text:style-name="P15">Extension Key: <text:subject>tt_products</text:subject></text:p>
      <text:p text:style-name="P15">Language: <text:user-defined style:data-style-name="N0" text:name="language (en, de, fr, nl, dk, es, ... )">de</text:user-defined></text:p>
      <text:p text:style-name="P15">Keywords: <text:keywords>forAdmins, forIntermediates</text:keywords></text:p>
      <text:p text:style-name="P15">Copyright 201<text:span text:style-name="T51">5</text:span>, <text:user-defined style:data-style-name="N0" text:name="Author">Franz Holzinger</text:user-defined>, &lt;<text:user-defined style:data-style-name="N0" text:name="Email">franz@ttproducts.de</text:user-defined>&gt;</text:p>
      <text:p text:style-name="P15"/>
      <text:p text:style-name="P15">This document is published under the Open Content License</text:p>
      <text:p text:style-name="P15">available from http://www.opencontent.org/opl.shtml</text:p>
      <text:p text:style-name="P15"/>
      <text:p text:style-name="P15">The content of this document is related to TYPO3 </text:p>
      <text:p text:style-name="P15">-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7"><text:a xlink:type="simple" xlink:href="#__RefHeading__17537_1782085564" text:style-name="Internet_20_link" text:visited-style-name="Internet_20_link">EXT: Shop System<text:tab/>1</text:a></text:p>
          <text:p text:style-name="P66"><text:a xlink:type="simple" xlink:href="#__RefHeading__17539_1782085564" text:style-name="Internet_20_link" text:visited-style-name="Internet_20_link">Einleitung<text:tab/>3</text:a></text:p>
          <text:p text:style-name="P68"><text:a xlink:type="simple" xlink:href="#__RefHeading__17541_1782085564" text:style-name="Internet_20_link" text:visited-style-name="Internet_20_link">Version<text:tab/>3</text:a></text:p>
          <text:p text:style-name="P68"><text:a xlink:type="simple" xlink:href="#__RefHeading__17543_1782085564" text:style-name="Internet_20_link" text:visited-style-name="Internet_20_link">Abmahngefahr<text:tab/>3</text:a></text:p>
          <text:p text:style-name="P68"><text:a xlink:type="simple" xlink:href="#__RefHeading__17545_1782085564" text:style-name="Internet_20_link" text:visited-style-name="Internet_20_link">Übersetzungen<text:tab/>3</text:a></text:p>
          <text:p text:style-name="P68"><text:a xlink:type="simple" xlink:href="#__RefHeading__17547_1782085564" text:style-name="Internet_20_link" text:visited-style-name="Internet_20_link">Upgrade<text:tab/>3</text:a></text:p>
          <text:p text:style-name="P68"><text:a xlink:type="simple" xlink:href="#__RefHeading__17549_1782085564" text:style-name="Internet_20_link" text:visited-style-name="Internet_20_link">Wofür ist das gut?<text:tab/>3</text:a></text:p>
          <text:p text:style-name="P68"><text:a xlink:type="simple" xlink:href="#__RefHeading__17551_1782085564" text:style-name="Internet_20_link" text:visited-style-name="Internet_20_link">Entwickler<text:tab/>4</text:a></text:p>
          <text:p text:style-name="P68"><text:a xlink:type="simple" xlink:href="#__RefHeading__17553_1782085564" text:style-name="Internet_20_link" text:visited-style-name="Internet_20_link">Sponsoren<text:tab/>4</text:a></text:p>
          <text:p text:style-name="P68"><text:a xlink:type="simple" xlink:href="#__RefHeading__17555_1782085564" text:style-name="Internet_20_link" text:visited-style-name="Internet_20_link">Support<text:tab/>4</text:a></text:p>
          <text:p text:style-name="P66"><text:a xlink:type="simple" xlink:href="#__RefHeading__17557_1782085564" text:style-name="Internet_20_link" text:visited-style-name="Internet_20_link">Benutzerhandbuch<text:tab/>5</text:a></text:p>
          <text:p text:style-name="P68"><text:a xlink:type="simple" xlink:href="#__RefHeading__17559_1782085564" text:style-name="Internet_20_link" text:visited-style-name="Internet_20_link">Hinweis:<text:tab/>5</text:a></text:p>
          <text:p text:style-name="P68"><text:a xlink:type="simple" xlink:href="#__RefHeading__17561_1782085564" text:style-name="Internet_20_link" text:visited-style-name="Internet_20_link">Mini-Warenkorb:<text:tab/>5</text:a></text:p>
          <text:p text:style-name="P68"><text:a xlink:type="simple" xlink:href="#__RefHeading__17563_1782085564" text:style-name="Internet_20_link" text:visited-style-name="Internet_20_link">Berechnungsskript:<text:tab/>5</text:a></text:p>
          <text:p text:style-name="P68"><text:a xlink:type="simple" xlink:href="#__RefHeading__17565_1782085564" text:style-name="Internet_20_link" text:visited-style-name="Internet_20_link">Rabatt:<text:tab/>6</text:a></text:p>
          <text:p text:style-name="P68"><text:a xlink:type="simple" xlink:href="#__RefHeading__17567_1782085564" text:style-name="Internet_20_link" text:visited-style-name="Internet_20_link">Link für Produkte der letzten X Tage<text:tab/>6</text:a></text:p>
          <text:p text:style-name="P68"><text:a xlink:type="simple" xlink:href="#__RefHeading__17569_1782085564" text:style-name="Internet_20_link" text:visited-style-name="Internet_20_link">Angebote und Highlights<text:tab/>6</text:a></text:p>
          <text:p text:style-name="P68"><text:a xlink:type="simple" xlink:href="#__RefHeading__17571_1782085564" text:style-name="Internet_20_link" text:visited-style-name="Internet_20_link">AGB Allgemeine Geschäftsbedingungen<text:tab/>6</text:a></text:p>
          <text:p text:style-name="P68"><text:a xlink:type="simple" xlink:href="#__RefHeading__17573_1782085564" text:style-name="Internet_20_link" text:visited-style-name="Internet_20_link">Widerrufsbelehrung<text:tab/>6</text:a></text:p>
          <text:p text:style-name="P68"><text:a xlink:type="simple" xlink:href="#__RefHeading__17575_1782085564" text:style-name="Internet_20_link" text:visited-style-name="Internet_20_link">MEMO-Vormerk Seite <text:tab/>6</text:a></text:p>
          <text:p text:style-name="P68"><text:a xlink:type="simple" xlink:href="#__RefHeading__17577_1782085564" text:style-name="Internet_20_link" text:visited-style-name="Internet_20_link">Freundschaftswerbung<text:tab/>6</text:a></text:p>
          <text:p text:style-name="P68"><text:a xlink:type="simple" xlink:href="#__RefHeading__17579_1782085564" text:style-name="Internet_20_link" text:visited-style-name="Internet_20_link">Gutscheinpunkte System<text:tab/>7</text:a></text:p>
          <text:p text:style-name="P68"><text:a xlink:type="simple" xlink:href="#__RefHeading__17581_1782085564" text:style-name="Internet_20_link" text:visited-style-name="Internet_20_link">Geschenk Gutscheine<text:tab/>7</text:a></text:p>
          <text:p text:style-name="P68"><text:a xlink:type="simple" xlink:href="#__RefHeading__27135_2121584579" text:style-name="Internet_20_link" text:visited-style-name="Internet_20_link">Ergänzung zum Seitenmenü<text:tab/>7</text:a></text:p>
          <text:p text:style-name="P68"><text:a xlink:type="simple" xlink:href="#__RefHeading__27137_2121584579" text:style-name="Internet_20_link" text:visited-style-name="Internet_20_link">Sie können die Anzahl der in den Unterseiten gefundenen Produkte an die Anzeige des Seitentitels anhängen.<text:tab/>7</text:a></text:p>
          <text:p text:style-name="P68"><text:a xlink:type="simple" xlink:href="#__RefHeading__27139_2121584579" text:style-name="Internet_20_link" text:visited-style-name="Internet_20_link">Beispiel:<text:tab/>7</text:a></text:p>
          <text:p text:style-name="P68"><text:a xlink:type="simple" xlink:href="#__RefHeading__17585_1782085564" text:style-name="Internet_20_link" text:visited-style-name="Internet_20_link">Produkt Artikel mit eigenen Preisen<text:tab/>7</text:a></text:p>
          <text:p text:style-name="P68"><text:a xlink:type="simple" xlink:href="#__RefHeading__27141_2121584579" text:style-name="Internet_20_link" text:visited-style-name="Internet_20_link">Edit Variant<text:tab/>8</text:a></text:p>
          <text:p text:style-name="P66"><text:a xlink:type="simple" xlink:href="#__RefHeading__17587_1782085564" text:style-name="Internet_20_link" text:visited-style-name="Internet_20_link">Administration<text:tab/>10</text:a></text:p>
          <text:p text:style-name="P68"><text:a xlink:type="simple" xlink:href="#__RefHeading__17589_1782085564" text:style-name="Internet_20_link" text:visited-style-name="Internet_20_link">Installation<text:tab/>10</text:a></text:p>
          <text:p text:style-name="P68"><text:a xlink:type="simple" xlink:href="#__RefHeading__17591_1782085564" text:style-name="Internet_20_link" text:visited-style-name="Internet_20_link">Behandlung der Kategorien<text:tab/>10</text:a></text:p>
          <text:p text:style-name="P68"><text:a xlink:type="simple" xlink:href="#__RefHeading__17593_1782085564" text:style-name="Internet_20_link" text:visited-style-name="Internet_20_link">Behandlung der Bilder<text:tab/>10</text:a></text:p>
          <text:p text:style-name="P68"><text:a xlink:type="simple" xlink:href="#__RefHeading__17595_1782085564" text:style-name="Internet_20_link" text:visited-style-name="Internet_20_link">Wichtige Hinweise<text:tab/>10</text:a></text:p>
          <text:p text:style-name="P68"><text:a xlink:type="simple" xlink:href="#__RefHeading__17597_1782085564" text:style-name="Internet_20_link" text:visited-style-name="Internet_20_link">Template Marker<text:tab/>11</text:a></text:p>
          <text:p text:style-name="P68"><text:a xlink:type="simple" xlink:href="#__RefHeading__17599_1782085564" text:style-name="Internet_20_link" text:visited-style-name="Internet_20_link">Automatisches Erzeugen von Frontend Benutzern<text:tab/>14</text:a></text:p>
          <text:p text:style-name="P68"><text:a xlink:type="simple" xlink:href="#__RefHeading__17601_1782085564" text:style-name="Internet_20_link" text:visited-style-name="Internet_20_link">Produkt Eigenschaften:<text:tab/>14</text:a></text:p>
          <text:p text:style-name="P66"><text:a xlink:type="simple" xlink:href="#__RefHeading__17603_1782085564" text:style-name="Internet_20_link" text:visited-style-name="Internet_20_link">Konfiguration<text:tab/>17</text:a></text:p>
          <text:p text:style-name="P68"><text:a xlink:type="simple" xlink:href="#__RefHeading__17605_1782085564" text:style-name="Internet_20_link" text:visited-style-name="Internet_20_link">FAQ<text:tab/>17</text:a></text:p>
          <text:p text:style-name="P68"><text:a xlink:type="simple" xlink:href="#__RefHeading__17607_1782085564" text:style-name="Internet_20_link" text:visited-style-name="Internet_20_link">Dateien<text:tab/>17</text:a></text:p>
          <text:p text:style-name="P68"><text:a xlink:type="simple" xlink:href="#__RefHeading__17609_1782085564" text:style-name="Internet_20_link" text:visited-style-name="Internet_20_link">Beschreibung<text:tab/>17</text:a></text:p>
          <text:p text:style-name="P66"><text:a xlink:type="simple" xlink:href="#__RefHeading__17611_1782085564" text:style-name="Internet_20_link" text:visited-style-name="Internet_20_link">Referenz<text:tab/>18</text:a></text:p>
          <text:p text:style-name="P68"><text:a xlink:type="simple" xlink:href="#__RefHeading__17613_1782085564" text:style-name="Internet_20_link" text:visited-style-name="Internet_20_link">class.tx_ttproducts.php properties<text:tab/>18</text:a></text:p>
          <text:p text:style-name="P68"><text:a xlink:type="simple" xlink:href="#__RefHeading__17615_1782085564" text:style-name="Internet_20_link" text:visited-style-name="Internet_20_link">Anzeigetyp (CODE)<text:tab/>30</text:a></text:p>
          <text:p text:style-name="P68"><text:a xlink:type="simple" xlink:href="#__RefHeading__17617_1782085564" text:style-name="Internet_20_link" text:visited-style-name="Internet_20_link">CSS Konfiguration<text:tab/>32</text:a></text:p>
          <text:p text:style-name="P68"><text:a xlink:type="simple" xlink:href="#__RefHeading__27143_2121584579" text:style-name="Internet_20_link" text:visited-style-name="Internet_20_link">Javascript Konfiguration<text:tab/>32</text:a></text:p>
          <text:p text:style-name="P68"><text:a xlink:type="simple" xlink:href="#__RefHeading__17619_1782085564" text:style-name="Internet_20_link" text:visited-style-name="Internet_20_link">Konfiguration der Artikel, Produkte, Kategorien, Seiten, Adressen und Bilder<text:tab/>33</text:a></text:p>
          <text:p text:style-name="P68"><text:a xlink:type="simple" xlink:href="#__RefHeading__17621_1782085564" text:style-name="Internet_20_link" text:visited-style-name="Internet_20_link">Formular Eigenschaften<text:tab/>40</text:a></text:p>
          <text:p text:style-name="P68"><text:a xlink:type="simple" xlink:href="#__RefHeading__17623_1782085564" text:style-name="Internet_20_link" text:visited-style-name="Internet_20_link">Warenkorb Konfiguration<text:tab/>41</text:a></text:p>
          <text:p text:style-name="P68"><text:a xlink:type="simple" xlink:href="#__RefHeading__17625_1782085564" text:style-name="Internet_20_link" text:visited-style-name="Internet_20_link">Steuerungskonfiguration<text:tab/>42</text:a></text:p>
          <text:p text:style-name="P68"><text:a xlink:type="simple" xlink:href="#__RefHeading__17627_1782085564" text:style-name="Internet_20_link" text:visited-style-name="Internet_20_link">Konfiguration für Bezahlung, Versand und Verpackung<text:tab/>43</text:a></text:p>
          <text:p text:style-name="P68"><text:a xlink:type="simple" xlink:href="#__RefHeading__17629_1782085564" text:style-name="Internet_20_link" text:visited-style-name="Internet_20_link">Versandpreis Berechnung shippingcalc/handlingcalc<text:tab/>49</text:a></text:p>
          <text:p text:style-name="P68"><text:a xlink:type="simple" xlink:href="#__RefHeading__17631_1782085564" text:style-name="Internet_20_link" text:visited-style-name="Internet_20_link">Pricecalc, discountprice und creditpoints Konfiguration<text:tab/>50</text:a></text:p>
          <text:p text:style-name="P68"><text:a xlink:type="simple" xlink:href="#__RefHeading__17633_1782085564" text:style-name="Internet_20_link" text:visited-style-name="Internet_20_link">Freundschaftswerbung/Gutschein Konfiguration<text:tab/>52</text:a></text:p>
          <text:p text:style-name="P68"><text:a xlink:type="simple" xlink:href="#__RefHeading__17635_1782085564" text:style-name="Internet_20_link" text:visited-style-name="Internet_20_link">Bestellbestätigung Konfiguration<text:tab/>53</text:a></text:p>
          <text:p text:style-name="P68"><text:a xlink:type="simple" xlink:href="#__RefHeading__17637_1782085564" text:style-name="Internet_20_link" text:visited-style-name="Internet_20_link">Rechnung und Lieferschein Konfiguration<text:tab/>53</text:a></text:p>
          <text:p text:style-name="P68"><text:a xlink:type="simple" xlink:href="#__RefHeading__17639_1782085564" text:style-name="Internet_20_link" text:visited-style-name="Internet_20_link">Bestellung/Verwaltung Konfiguration<text:tab/>53</text:a></text:p>
          <text:p text:style-name="P68"><text:a xlink:type="simple" xlink:href="#__RefHeading__27145_2121584579" text:style-name="Internet_20_link" text:visited-style-name="Internet_20_link">Fehlerkonfiguration<text:tab/>54</text:a></text:p>
          <text:p text:style-name="P66"><text:a xlink:type="simple" xlink:href="#__RefHeading__17641_1782085564" text:style-name="Internet_20_link" text:visited-style-name="Internet_20_link">Bekannte Probleme<text:tab/>55</text:a></text:p>
          <text:p text:style-name="P68"><text:a xlink:type="simple" xlink:href="#__RefHeading__17643_1782085564" text:style-name="Internet_20_link" text:visited-style-name="Internet_20_link">Prüfliste:<text:tab/>55</text:a></text:p>
          <text:p text:style-name="P68"><text:a xlink:type="simple" xlink:href="#__RefHeading__17645_1782085564" text:style-name="Internet_20_link" text:visited-style-name="Internet_20_link">Allgemein:<text:tab/>55</text:a></text:p>
          <text:p text:style-name="P66"><text:a xlink:type="simple" xlink:href="#__RefHeading__17647_1782085564" text:style-name="Internet_20_link" text:visited-style-name="Internet_20_link">To-Do Liste<text:tab/>56</text:a></text:p>
          <text:p text:style-name="P66"><text:a xlink:type="simple" xlink:href="#__RefHeading__17649_1782085564" text:style-name="Internet_20_link" text:visited-style-name="Internet_20_link">Changelog<text:tab/>5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
      <text:p text:style-name="Text_20_body"/>
      <text:h text:style-name="Heading_20_2" text:outline-level="2"><text:bookmark-start text:name="__RefHeading__17539_1782085564"/>Einleitung<text:bookmark-end text:name="__RefHeading__17539_1782085564"/></text:h>
      <text:p text:style-name="Text_20_body"/>
      <text:p text:style-name="Text_20_body">Bevor Sie mit dem Shop beginnen, sollten Sie das <text:a xlink:type="simple" xlink:href="http://typo3.org/documentation/document-library/extension-manuals/tut_ttproducts_de/current/view/" text:style-name="Internet_20_link" text:visited-style-name="Visited_20_Internet_20_Link">deutsche Tutorial</text:a> <text:s/>oder eines der Bücher <text:a xlink:type="simple" xlink:href="http://www.fosdoc.de/downloads/OSP_typo3webshop" text:style-name="Internet_20_link" text:visited-style-name="Visited_20_Internet_20_Link">'Der TYPO3 Webshop'</text:a> und <text:a xlink:type="simple" xlink:href="https://www.opensourcepress.de/" text:style-name="Internet_20_link" text:visited-style-name="Visited_20_Internet_20_Link">'</text:a><text:a xlink:type="simple" xlink:href="https://www.packtpub.com/design-build-feature-rich-online-store-using-typo3-4-2-e-commerce/book" text:style-name="Internet_20_link" text:visited-style-name="Visited_20_Internet_20_Link">TYPO3 4.2 E-Commerce'</text:a><text:a xlink:type="simple" xlink:href="https://www.opensourcepress.de/" text:style-name="Internet_20_link" text:visited-style-name="Visited_20_Internet_20_Link"> </text:a>durchgearbeitet haben<text:a xlink:type="simple" xlink:href="http://www.youtube.com/watch?v=IQFDvgVJDXA" text:style-name="Internet_20_link" text:visited-style-name="Visited_20_Internet_20_Link">.</text:a></text:p>
      <text:p text:style-name="Text_20_body">Über die Extension addons_tt_products bekommen Sie neuere Beispiel Template Dateien.<text:line-break/>Diese TYPO3 Extension läuft nur unter PHP5.</text:p>
      <text:h text:style-name="Heading_20_3" text:outline-level="3"><text:bookmark-start text:name="__RefHeading__17541_1782085564"/>Version<text:bookmark-end text:name="__RefHeading__17541_1782085564"/></text:h>
      <text:p text:style-name="Text_20_body">Dieses Dokument gilt für tt_products Version 2.10.0. Sie erhalten die nächste Version von tt_products bereits jetzt unter <text:a xlink:type="simple" xlink:href="http://ttproducts.de/" text:style-name="Internet_20_link" text:visited-style-name="Visited_20_Internet_20_Link">http://ttproducts.de</text:a> gegen eine Beteiligung an den Entwicklungskosten.</text:p>
      <text:h text:style-name="Heading_20_3" text:outline-level="3"><text:bookmark-start text:name="__RefHeading__17543_1782085564"/>Abmahngefahr<text:bookmark-end text:name="__RefHeading__17543_1782085564"/></text:h>
      <text:p text:style-name="P30">Bitte achten Sie in den Shops und beim Verkauf über eBay sehr genau darauf, daß Sie keine Markennamen verwenden, keine nicht selbst gemachten Fotos und Textbeschreibungen verwenden und auf ein 14-tägiges Rückgaberecht hinweisen. Das Impressum auf der Homepage muss vollständig sein. Es darf keine Links auf Seiten mit Kartenausschnitten geben, und weiteres wäre zu beachten.</text:p>
      <text:p text:style-name="P24"><text:span text:style-name="T5">Viele Anwälte durchforsten in Deutschland mit ihren Helfern ständig das Internet nach fehlenden oder unzureichenden Angaben und versenden selbst bei kleinsten Verstößen massenhaft gleichlautende Abmahnungen um </text:span>einige<text:span text:style-name="T5"> </text:span>tausend Euro<text:span text:style-name="T5"> pro Fall.</text:span> Das wäre saublöd für Sie.</text:p>
      <text:h text:style-name="P72" text:outline-level="5"><text:a xlink:type="simple" xlink:href="http://www.legalershop.de/" text:style-name="Internet_20_link" text:visited-style-name="Visited_20_Internet_20_Link">http://www.legalershop.de/</text:a></text:h>
      <text:h text:style-name="P72" text:outline-level="5"><text:a xlink:type="simple" xlink:href="http://www.bvdw.org/wissenspool/recht/e-commerce.html" text:style-name="Internet_20_link" text:visited-style-name="Visited_20_Internet_20_Link">http://www.bvdw.org/wissenspool/recht/e-commerce.html</text:a></text:h>
      <text:h text:style-name="Heading_20_3" text:outline-level="3"><text:bookmark-start text:name="__RefHeading__17545_1782085564"/>Übersetzungen<text:bookmark-end text:name="__RefHeading__17545_1782085564"/></text:h>
      <text:p text:style-name="Text_20_body">Die Englische Übersetzung dieses Dokuments wird mit tt_products ausgeliefert (Pfad tt_products/doc). Eine französische Übersetzung <text:a xlink:type="simple" xlink:href="http://typo3.org/documentation/document-library/extension-manuals/doc_ttproducts_fr/current/" text:style-name="Internet_20_link" text:visited-style-name="Visited_20_Internet_20_Link">doc_ttproducts_fr</text:a> ist fertiggestellt und sucht für die Zukunft aber noch Helfer.</text:p>
      <text:h text:style-name="Heading_20_3" text:outline-level="3"><text:bookmark-start text:name="__RefHeading__17547_1782085564"/>Upgrade<text:bookmark-end text:name="__RefHeading__17547_1782085564"/></text:h>
      <text:p text:style-name="Text_20_body">Wenn Sie ein Upgrade von einer früheren Version machen wollen, dann müssen Sie unbedingt die wichtigen Hinweise unter 'Administration' befolgen.</text:p>
      <text:h text:style-name="Heading_20_3" text:outline-level="3"><text:bookmark-start text:name="__RefHeading__17549_1782085564"/>Wofür ist das gut?<text:bookmark-end text:name="__RefHeading__17549_1782085564"/></text:h>
      <text:p text:style-name="Text_20_body">Die Typo3 Shop Extension gibt Ihnen die Möglichkeit zu...</text:p>
      <text:list text:style-name="L10">
        <text:list-item>
          <text:p text:style-name="P95">Produkte mit mehreren Bildern, Details und in mehreren Sprachen aufzulisten</text:p>
        </text:list-item>
        <text:list-item>
          <text:p text:style-name="P95">Einkaufskorb</text:p>
        </text:list-item>
        <text:list-item>
          <text:p text:style-name="P96">“Bezahlen” Seite – Hier wird die Bestellung angezeigt und kann überprüft werden, bevor die Produkte endgültig bestellt werden/die Bestellung endgültig versandt wird</text:p>
        </text:list-item>
        <text:list-item>
          <text:p text:style-name="P96">für Sponsoren: Bezahlsysteme über die Payment Library – Transaction Central und Paypal</text:p>
        </text:list-item>
        <text:list-item>
          <text:p text:style-name="P95">Nachverfolgen des Zustands einer Kundenbestellung (Tracking)</text:p>
        </text:list-item>
        <text:list-item>
          <text:p text:style-name="P95">Automatische Erzeugung einer Rechnung und eines Lieferscheins</text:p>
        </text:list-item>
        <text:list-item>
          <text:p text:style-name="P95">Verschiedene Steuersätze pro Produkt, für die Zustellung und die Bezahlung</text:p>
        </text:list-item>
        <text:list-item>
          <text:p text:style-name="P95">einfache Lagerverwaltung</text:p>
        </text:list-item>
        <text:list-item>
          <text:p text:style-name="P95">Versenden einer CSV Datei für jede Bestellung an den Shop Administrator (2 auswählbare Dateiformate)</text:p>
        </text:list-item>
        <text:list-item>
          <text:p text:style-name="P95">E-Mail-Anhänge für Bestätigungs E-Mails (zum Beispiel AGB = Allgemeine Geschäftsbedingungen)</text:p>
        </text:list-item>
        <text:list-item>
          <text:p text:style-name="P95">auswählbare Produktvarianten (Farben, Größen, Staffelungen, Beschreibung, Material und Qualität)</text:p>
        </text:list-item>
        <text:list-item>
          <text:p text:style-name="P95">Zwang zum Akzeptieren der Allgemeinen Geschäftsbedingungen (AGB) durch den Kunden über eine Checkbox</text:p>
        </text:list-item>
        <text:list-item>
          <text:p text:style-name="P95">Angebote, Highlights und neu hinzugefügte Produkte</text:p>
        </text:list-item>
        <text:list-item>
          <text:p text:style-name="P95">Spezialanfertigung, Gewicht und Sperrgut (kann für die Berechnung der Versandkosten verwendet werden)</text:p>
        </text:list-item>
        <text:list-item>
          <text:p text:style-name="P95">Möglichkeit, die Zahlungsmethoden auf besondere Benutzergruppen einzuschränken</text:p>
        </text:list-item>
        <text:list-item>
          <text:p text:style-name="P95">Automatische Erzeugung eines Frontend Benutzers bei der ersten Bestellung</text:p>
        </text:list-item>
        <text:list-item>
          <text:p text:style-name="P96">Vormerkliste für Produkte – eingeloggter Benutzer kann mit der Memo-Funktion Produkt <text:soft-page-break/>vormerken/speichern </text:p>
        </text:list-item>
        <text:list-item>
          <text:p text:style-name="P96">Rabatt in Prozent pro Benutzer</text:p>
        </text:list-item>
        <text:list-item>
          <text:p text:style-name="P96">Methoden der Preisberechnung mit Rabatten für Wiederverkäufer/Gruppen</text:p>
        </text:list-item>
        <text:list-item>
          <text:p text:style-name="P96">Anzeige der Bestellungen</text:p>
        </text:list-item>
        <text:list-item>
          <text:p text:style-name="P96">Gutscheinpunkte System: Kunden können mit jeder Bestellung Gutscheinpunkte sammeln. Die gespeicherten Gutscheinpunkte kann der Kunde bei einer neuen Bestellung einlösen . Auf Ihren Wunsch können mit diesen Gutscheinen auch nur bestimmte Produkte gekauft werden. </text:p>
        </text:list-item>
        <text:list-item>
          <text:p text:style-name="P96">Freundschaftswerbung: Wenn ein Kunde bei seiner Registrierung angibt, dass er von einem anderen (bereits existierenden) Kunden angeworben wurde, <text:s/>dann erhält der Anwerber eine Gutschrift in Gutscheinpunkten. Der neue Kunde erhält bei seiner ersten Bestellung einen Rabatt.</text:p>
        </text:list-item>
        <text:list-item>
          <text:p text:style-name="P96">Geschenkgutscheine: Benutzer können Geschenkgutscheine kaufen und diese per E-Mail an ihre Geschäftspartner senden. Wenn sich dieser Geschäftspartner im Frontend anmeldet, dann kann er seinen Geschenkgutschein in Gutscheinpunkte umwandeln und bereits bei der ersten Bestellung einsetzen.</text:p>
        </text:list-item>
        <text:list-item>
          <text:p text:style-name="P96">Preisstaffeln</text:p>
        </text:list-item>
        <text:list-item>
          <text:p text:style-name="P96">Feld EAN für die Eingabe des EAN Codes</text:p>
        </text:list-item>
        <text:list-item>
          <text:p text:style-name="P96">Möglichkeit zur Einschränkung der Kategorieauswahl bei der Produkteingabe im Backend</text:p>
        </text:list-item>
        <text:list-item>
          <text:p text:style-name="P96">Wertebereichprüfung des Gewichtsfeldes bis zu Miligramm</text:p>
        </text:list-item>
        <text:list-item>
          <text:p text:style-name="P96">Prüfung der Bankleitzahl, wenn die dafür erforderliche Extension static_info_tables_banks_de installiert ist</text:p>
        </text:list-item>
        <text:list-item>
          <text:p text:style-name="P96"><text:s/>Änderung der Anzeige bei Auswahl aus einer Varianten-Select Box</text:p>
        </text:list-item>
        <text:list-item>
          <text:p text:style-name="P96">verbesserte Kategorielisten mit mehr Markern (auch für DAM)</text:p>
        </text:list-item>
        <text:list-item>
          <text:p text:style-name="P96">beliebig viele Textbeschreibungen zu jedem Produkt (IRRE)</text:p>
        </text:list-item>
        <text:list-item>
          <text:p text:style-name="P96">Unterstützung der Payment Library 0.2.x-0.3.x</text:p>
        </text:list-item>
        <text:list-item>
          <text:p text:style-name="P96">beliebige Anzahl an Produkt-Bildern im Warenkorb</text:p>
        </text:list-item>
        <text:list-item>
          <text:p text:style-name="P96">erweiterte Gutscheine in Zusammenarbeit mit der Voucher Extension</text:p>
        </text:list-item>
      </text:list>
      <text:p text:style-name="P36"/>
      <text:h text:style-name="Heading_20_3" text:outline-level="3"><text:bookmark-start text:name="__RefHeading__17551_1782085564"/>Entwickler<text:bookmark-end text:name="__RefHeading__17551_1782085564"/></text:h>
      <text:list text:style-name="L11">
        <text:list-item>
          <text:p text:style-name="P97">Kasper Skårhøj: Entwickler bis 1.2.7 / TYPO3 3.8</text:p>
        </text:list-item>
        <text:list-item>
          <text:p text:style-name="P97">René Fritz: Entwickler bis 1.2.7 / TYPO3 3.8</text:p>
        </text:list-item>
        <text:list-item>
          <text:p text:style-name="P97">Franz Holzinger (Projekt Leiter): Preisberechnung, Diskont Preis, Geschenkgutscheine, E-Mail Tabelle für Benachrichtigung, Fehlerkorrekturen, Rechnung, Lieferschein, mehrspaltige Listenansicht, Artikel Tabelle, mehrsprachige Tabellen</text:p>
        </text:list-item>
        <text:list-item>
          <text:p text:style-name="P97">Klaus Zierer (Projekt zk_products): mehrere Größen und Farben, Vormerkliste, AGB, CSV, automatische Registrierung der Frontend Benutzer, Seiten als Kategorien, ein beispielhaftes deutsches Template.</text:p>
        </text:list-item>
      </text:list>
      <text:h text:style-name="Heading_20_3" text:outline-level="3"><text:bookmark-start text:name="__RefHeading__17553_1782085564"/>Sponsoren<text:bookmark-end text:name="__RefHeading__17553_1782085564"/></text:h>
      <text:list text:style-name="L12">
        <text:list-item>
          <text:p text:style-name="P98"><text:a xlink:type="simple" xlink:href="http://www.pil.dk/" text:style-name="Internet_20_link" text:visited-style-name="Visited_20_Internet_20_Link">pil.dk - Professionelle Internet Løsninger ApS</text:a> ist ein Hauptsponsor für den Code der Payment Library Extension.</text:p>
        </text:list-item>
        <text:list-item>
          <text:p text:style-name="P98">Mehrfachkategorien je Produkt mit mehrsprachiger Listenansicht, Importskripte für XML-Dateien aus Warenwirtschaftssystem, benutzerdefinierte Shop Tabellen, erweiterte Suchmaske mit Hersteller-Select-Box, Ampelsymbole über die Lieferbarkeit von Produkten. Gesponsert von <text:a xlink:type="simple" xlink:href="http://www.Geo.net/" text:style-name="Internet_20_link" text:visited-style-name="Visited_20_Internet_20_Link">Geo.net IT GmbH</text:a>. </text:p>
        </text:list-item>
      </text:list>
      <text:list text:style-name="L13">
        <text:list-item>
          <text:p text:style-name="P99"><text:a xlink:type="simple" xlink:href="http://www.pharmaline.de/" text:style-name="Internet_20_link" text:visited-style-name="Visited_20_Internet_20_Link">Websolutions für Apotheke und Pharmazie</text:a><text:line-break/>TYPO3 FullService * Konzeptionierung * Realisierung * TYPO3 Hosting *<text:line-break/>pharmaline - Internet für die Apotheke, Apotheker Christian Platt, Kupferdreher Str 150, 45257 Essen</text:p>
        </text:list-item>
      </text:list>
      <text:h text:style-name="Heading_20_3" text:outline-level="3"><text:bookmark-start text:name="__RefHeading__17555_1782085564"/>Support<text:bookmark-end text:name="__RefHeading__17555_1782085564"/></text:h>
      <text:p text:style-name="Text_20_body">Sie können unter <text:a xlink:type="simple" xlink:href="http://www.jambage.com/kontakt/forum.html" text:style-name="Internet_20_link" text:visited-style-name="Visited_20_Internet_20_Link">http://www.jambage.com/kontakt/forum.html</text:a> und <text:a xlink:type="simple" xlink:href="http://ttproducts.de/" text:style-name="Internet_20_link" text:visited-style-name="Visited_20_Internet_20_Link">http://ttproducts.de</text:a> Support, einen Installationsservice und Erweiterungen in Form von TYPO3 Extensions dazu erhalten.</text:p>
      <text:p text:style-name="Text_20_body">Sie können alle benötigten Extensions aus dem TYPO3 TER, <text:a xlink:type="simple" xlink:href="http://typo3.org/" text:style-name="Internet_20_link" text:visited-style-name="Visited_20_Internet_20_Link">http://typo3.org</text:a> oder von <text:a xlink:type="simple" xlink:href="http://www.jambage.com/typo3-cms/shop.html" text:style-name="Internet_20_link" text:visited-style-name="Visited_20_Internet_20_Link"><text:span text:style-name="T31">http://www.jambage.com/typo3-cms/shop.html</text:span></text:a><text:span text:style-name="T31"> <text:s/></text:span>herunterladen.</text:p>
      <text:h text:style-name="Heading_20_2" text:outline-level="2"><text:bookmark-start text:name="__RefHeading__17557_1782085564"/>Benutzerhandbuch<text:bookmark-end text:name="__RefHeading__17557_1782085564"/></text:h>
      <text:h text:style-name="Heading_20_3" text:outline-level="3"><text:bookmark-start text:name="__RefHeading__17559_1782085564"/>Hinweis:<text:bookmark-end text:name="__RefHeading__17559_1782085564"/></text:h>
      <text:p text:style-name="Text_20_body">Der Pfad zu den Dateien wurde von 'pi' auf 'pi1' umbenannt, damit tt_products jetzt gleich aufgebaut ist wie andere TYPO3 Extensionen. Daher müssen Sie nun Ihre Pfade ändern, wenn Sie diese im TypoScript Setup von älteren Versionen 1.2.x von tt_products verwendet haben.</text:p>
      <text:p text:style-name="P32">Wenn Sie die Extension neu installieren oder updaten: Bitte beachten Sie die Depencies im TER (Online Repository des Extension Managers). Es muss die Table Library installiert sein.</text:p>
      <text:p text:style-name="P32">Sie müssen das Feld 'Am Lager (St.)' in den Eigenschaften des Produktes ausfüllen. Ansonsten wird bei der Ausgabe im Frontend kein Produkt angezeigt, da der Wert dann auf 0 gesetzt ist. Null Produkte sind eben nicht vorhanden.</text:p>
      <text:p text:style-name="P32">Vor der Eingabe der Produktpreise haben Sie die Möglichkeit zu entscheiden, ob die Preise mit oder ohne Steuern eingegeben werden (siehe <text:span text:style-name="T6">TAXincluded). Alle Berechnungen und Konfigurationen werden die Preisangaben verwenden, mit denen sie in der Tabelle tt_products gespeichert sind. </text:span>Sie sollten jedoch am besten die Preise inkl. Mehrwertsteuer in die Datenbank eintragen. Das erleichtert es Ihnen, die Preise gleich so eingeben zu können, wie sie auch der Kunde sehen wird. Diese Preise sollten schließlich den Konventionen der Preisgestaltung wie € 1,99 haben und nicht € 1,72 entsprechen.</text:p>
      <text:p text:style-name="P33">Wenn Sie mit Ihrem neuen Shop beginnen, dann verwenden Sie ein Beispiel-Template aus dem Verzeichnis tt_products/template, das Template example_template_bill_de.tmpl. Sie müssen nur noch die Seiten-Id in den Links (hinter 'id=...') anpassen, damit hier die Seiten-Id des Warenkorbs ihrer Seite steht.</text:p>
      <text:p text:style-name="P33">Der Marker ###DOMAIN### erspart Ihnen die Eingabe Ihrer URL. Das ist sinnvoll, wenn z. B. ein neuer Host verwendet wird. Im Setup des Shoptemplates muss die Domaineinstellung vorgenommen werden: plugin.domain = meinedomain.de</text:p>
      <text:p text:style-name="P33">Wenn Sie Einträge in die Variant-Felder (Größe, Farbe ...) vornehmen, müssen Sie u. U. die selectSize und selectColor entsprechend auf 0, 1, <text:span text:style-name="T51">2 oder 3</text:span> setzen. Ansonsten werden in der Produktliste die Anzahlen der Produkte falsch eingetragen.</text:p>
      <text:p text:style-name="P33">Viele Anpassungen können über den Constant-Editor vorgenommen werden. Das meiste sollte besser direkt in die Felder Setup und Constants der Templates für die Shop-Seite eingetragen werden.</text:p>
      <text:p text:style-name="P33">tt_products basiert auf den Extensionen Table Library (table) und Static Methods for Extensions since 2007 (div2007). Wenn Sie also ein Update von tt_products durchführen, dann müssen Sie auch gleichzeitig ein Update dieser beiden Extensionen durchführen.</text:p>
      <text:p text:style-name="P33"/>
      <text:h text:style-name="Heading_20_3" text:outline-level="3"><text:bookmark-start text:name="__RefHeading__17561_1782085564"/>Mini-Warenkorb:<text:bookmark-end text:name="__RefHeading__17561_1782085564"/></text:h>
      <text:p text:style-name="P32">Neben dem “normalen” Warenkorb, der eine komplette Liste der eingegebenen Produkte in einer gewissen Sortierreihenfolge anzeigt, gibt es auch einen "Mini-Warenkorb", der nur die Anzahl der Produkte im Warenkorb und den Gesamtpreis anzeigt.</text:p>
      <text:p text:style-name="P32">Dieser zeigt Ihnen während der Verweildauer im Shop ständig aktualisiert den Inhalt Ihres Warenkorbes oberhalb der normalen Ansicht (oder wo Sie wünschen) an. Die Stelle, an der der “Mini-Warenkorb” angezeigt werden soll, kann über Typoscript gesteuert werden. Um diesen Mini-Warenkorb verwenden zu können, fügen Sie ein neues Seiteninhaltselement "Plugin: Produkte" ein und tragen in das CODE-Feld OVERVIEW ein. Verwenden Sie die folgenden Markierungen in Ihrem tt_products Template um den Mini-Warenkorb zu aktivieren und anzupassen:</text:p>
      <text:p text:style-name="Text_20_body"><text:span text:style-name="Strong_20_Emphasis">Code Listing:</text:span></text:p>
      <text:h text:style-name="Preformatted_20_Text" text:outline-level="5">&lt;!-- ###BASKET_OVERVIEW_TEMPLATE### begin --&gt;</text:h>
      <text:h text:style-name="Preformatted_20_Text" text:outline-level="5"><text:s text:c="2"/>&lt;div class="shop_minibasket"&gt;</text:h>
      <text:h text:style-name="Preformatted_20_Text" text:outline-level="5"><text:s text:c="5"/>&lt;div class="shop_minibasket_image"&gt;&lt;!--###LINK_BASKET###--&gt;###IMAGE_BASKET###&lt;!--###LINK_BASKET###--&gt;&lt;/div&gt;</text:h>
      <text:h text:style-name="Preformatted_20_Text" text:outline-level="5"><text:s text:c="4"/>&lt;p&gt;###NUMBER_GOODSTOTAL### Produkte (EUR ###PRICE_GOODSTOTAL_TAX###.-)&lt;/p&gt;</text:h>
      <text:h text:style-name="Preformatted_20_Text" text:outline-level="5">&lt;!-- ###BASKET_OVERVIEW_TEMPLATE### end --&gt;</text:h>
      <text:h text:style-name="Preformatted_20_Text" text:outline-level="5"/>
      <text:h text:style-name="Preformatted_20_Text" text:outline-level="5"/>
      <text:h text:style-name="Preformatted_20_Text" text:outline-level="5">&lt;!-- ###BASKET_OVERVIEW_EMPTY### begin --&gt;</text:h>
      <text:h text:style-name="Preformatted_20_Text" text:outline-level="5"><text:s text:c="2"/>&lt;p&gt;Keine Produkte im Warenkorb.&lt;/p&gt;</text:h>
      <text:h text:style-name="Preformatted_20_Text" text:outline-level="5">&lt;!-- ###BASKET_OVERVIEW_EMPTY### end --&gt;</text:h>
      <text:h text:style-name="Preformatted_20_Text" text:outline-level="5"><text:s text:c="3"/>&lt;/div&gt;</text:h>
      <text:h text:style-name="Heading_20_3" text:outline-level="3"><text:bookmark-start text:name="__RefHeading__17563_1782085564"/>Berechnungsskript:<text:bookmark-end text:name="__RefHeading__17563_1782085564"/></text:h>
      <text:p text:style-name="Text_20_body">Wenn Sie Ihr eigenes Berechnungsskript schreiben und verwenden wollen, dann sollten Sie immer die Preise <text:soft-page-break/>inkl. Mehrwertsteuer eingeben. Die priceTax und priceNoTax Variablen sind Ende August 2008 gelöscht worden, weil sie aus der price Variable und den Konstanten TAXincluded und TAXpercentage berechnet werden können. Sie können die global PHP-Variablen $this-&gt;calculatedArray und $this-&gt;itemArray verwenden, um Ihre eigenen Preisberechnungen durchzuführen.</text:p>
      <text:h text:style-name="Heading_20_3" text:outline-level="3"><text:bookmark-start text:name="__RefHeading__17565_1782085564"/>Rabatt:<text:bookmark-end text:name="__RefHeading__17565_1782085564"/></text:h>
      <text:p text:style-name="Text_20_body">Es gibt mehrere Methoden um einen Rabatt zu erhalten.</text:p>
      <text:list text:style-name="L14">
        <text:list-item>
          <text:p text:style-name="P100">Verwenden des Rabatt Feldes eines Frontend Benutzers und Eingabe der Prozente für den Discount</text:p>
        </text:list-item>
        <text:list-item>
          <text:p text:style-name="P100">Verwenden des Feldes price2 für besondere FE-User Gruppen und andere Dinge. Sie können das in TypoScript über das IF-Statement setzen.</text:p>
        </text:list-item>
        <text:list-item>
          <text:p text:style-name="P100">Verwenden der Discountprice Berechnung. Der Rabatt hängt von der Gesamtanzahl der Produkte mit einem besonderen Preis ab. Dieser Rabatt wird für die Frontend-Benutzer der Gruppe '<text:span text:style-name="T2">discountGroupName' gewährt.</text:span></text:p>
        </text:list-item>
      </text:list>
      <text:h text:style-name="Heading_20_3" text:outline-level="3"><text:bookmark-start text:name="__RefHeading__17567_1782085564"/>Link für Produkte der letzten X Tage<text:bookmark-end text:name="__RefHeading__17567_1782085564"/></text:h>
      <text:p text:style-name="Text_20_body">Das ist praktisch für Seiten “Was ist neu?”. Erzeugen Sie einfach einen Link zur SEARCH Seite und geben Sie "newitemdays" als Parameter an. <text:a xlink:type="simple" xlink:href="http://www.big-typo3-shop.com/index.php?id=8&amp;newitemdays=10" text:style-name="Internet_20_link" text:visited-style-name="Visited_20_Internet_20_Link">http://www.big-typo3-shop.com/index.php?id=8&amp;newitemdays=10</text:a> Die Suche wird alle Produkte der letzten 7 Tage liefern. Sie müssen den Plugin Code LISTNEWITEMS eintragen. Sie können stattdessen auch die Konstante "newItemDays" setzen.</text:p>
      <text:h text:style-name="Heading_20_3" text:outline-level="3"><text:bookmark-start text:name="__RefHeading__17569_1782085564"/>Angebote und Highlights<text:bookmark-end text:name="__RefHeading__17569_1782085564"/></text:h>
      <text:p text:style-name="Text_20_body">Sie müssen den Plugin Code LISTOFFERS zur<text:span text:style-name="T7"> Anzeige der als 'Angebot' markierten Produkte verwenden. Und mit LISTHIGHLIGHTS erhalten Sie eine Liste besonderer Produkte (Highlights). </text:span></text:p>
      <text:h text:style-name="Heading_20_3" text:outline-level="3"><text:bookmark-start text:name="__RefHeading__17571_1782085564"/>AGB Allgemeine Geschäftsbedingungen<text:bookmark-end text:name="__RefHeading__17571_1782085564"/></text:h>
      <text:p text:style-name="Text_20_body">Sie müssen die Allgemeinen Geschäftsbedingungen akzeptieren bevor Sie eine Bestellung machen und mit dem Bestellvorgang fortfahren können. Zu diesem Zweck kann eine Seite als "PIDagb" definiert werden. Die AGBs müssen hier angezeigt werden. Sie können das auch als das Ziel eines Links über "agbtarget" setzen.</text:p>
      <text:p text:style-name="Text_20_body">Ein Dokument (z.B. eine PDF Datei) auf dem Server, welche die AGB enthält, kann über "AGBattachment" gesetzt werden. Diese wird als Anhang an eine E-Mail mit der Bestellbestätigung an den Kunden geschickt. Die Shop Administration wird diese Datei nicht erhalten. (Sie kann stattdessen eine CSV Datei mit den Bestelldaten erhalten, falls gewünscht). </text:p>
      <text:h text:style-name="Heading_20_3" text:outline-level="3"><text:bookmark-start text:name="__RefHeading__17573_1782085564"/>Widerrufsbelehrung<text:bookmark-end text:name="__RefHeading__17573_1782085564"/></text:h>
      <text:p text:style-name="Text_20_body">In Deutschland müssen Sie im Warenkorb eine Widerrufsbelehrung anzeigen. Zu diesem Zweck kann eine Seite als "PIDrevocation" definiert werden. Die Widerrufsbelehrung muss hier angezeigt werden.</text:p>
      <text:p text:style-name="Text_20_body"/>
      <text:h text:style-name="Heading_20_3" text:outline-level="3"><text:bookmark-start text:name="__RefHeading__17575_1782085564"/>MEMO-Vormerk Seite <text:bookmark-end text:name="__RefHeading__17575_1782085564"/></text:h>
      <text:p text:style-name="Text_20_body"><text:span text:style-name="T7">Ein eingeloggter Benutzer kann, ebenso wie ein nicht eingeloggter, Produkte zu einer Vormerk-Seite hinzufügen. Diese Memo Seite wird in der fe_user Tabelle oder in der FE Sitzung gespeichert. </text:span>Erzeugen Sie einfach einen neue Seite mit dem Shop Plugin als Inhalt und geben Sie den Code "MEMO" ein. Sie müssen auch den Anfangspunkt setzen, wie auf den SEARCH Seiten. </text:p>
      <text:p text:style-name="Text_20_body"/>
      <text:h text:style-name="Heading_20_3" text:outline-level="3"><text:bookmark-start text:name="__RefHeading__17577_1782085564"/>Freundschaftswerbung<text:bookmark-end text:name="__RefHeading__17577_1782085564"/></text:h>
      <text:p text:style-name="Text_20_body">Ein interessierter Kunde erhält per E-Mail eine Einladung ein Shop zu besuchen und dort Waren einzukaufen. Dieser Einladung ist ein einmaliger Code beigelegt, der einer gewissen Anzahl von Gutscheinpunkten entspricht (Gutschrift). Wenn sie einen Kauf tätigen, können Sie diese Gutschrift einlösen, indem diese durch Gutscheinpunkte für den Frontend Benutzer ersetzt werden.</text:p>
      <text:p text:style-name="Text_20_body">Wenn ein Kunde bei seiner Registrierung angibt, daß er von einem anderen Kunden angeworben worden ist, dann erhält jener Kunde Gutscheinpunkte. Der neue Kunde erhält bei seiner ersten Bestellung einen Rabatt.</text:p>
      <text:p text:style-name="Text_20_body">Jemand (sagen wir Benutzer 1) kann einen Gutschrift Code eingeben, wenn er eine Bestellung tätigt. Dann wird Benutzer 1 5 Euro Rabatt erhalten. Dieser Gutschrift Code besteht aus dem Benutzernamen von jemand anderem (welche die E-Mail-Adresse ist), sagen wir Benutzer 2. So erhält Benutzer 2 insgesamt 5 Gutscheinpunkte. Jeder Benutzer kann nur einmal einen Gutschrift Code aus einer Freundschaftswerbung verwenden. In der fe_users Tabelle gibt es dafür ein Feld "tt_products_vouchercode", das den verwendeten <text:soft-page-break/>Gutschrift Code (E-Mail von Benutzer 2) enthält.</text:p>
      <text:p text:style-name="Text_20_body"/>
      <text:h text:style-name="Heading_20_3" text:outline-level="3"><text:bookmark-start text:name="__RefHeading__17579_1782085564"/>Gutscheinpunkte System<text:bookmark-end text:name="__RefHeading__17579_1782085564"/></text:h>
      <text:p text:style-name="Text_20_body">Wenn ein Kunde eine gewisse Anzahl an Waren gekauft hat, dann gewinnt er dadurch Gutscheinpunkte, die auf seinem Benutzerkonto gespeichert werden. Zu einem späteren Zeitpunkt, wenn er weitere Waren kauft, kann er diese Gutscheinpunkte in Waren einlösen und beim Kauf einen besonderen Rabatt kalkulieren. Die Kunden können bei jedem Kauf Gutscheinpunkte sammeln.</text:p>
      <text:h text:style-name="Preformatted_20_Text" text:outline-level="5">creditpoints { <text:line-break/> pricefactor = 0.5</text:h>
      <text:h text:style-name="Preformatted_20_Text" text:outline-level="5"><text:s/>10.type = price <text:line-break/> 10.prod.1 <text:s text:c="2"/>= 0.02 <text:line-break/> 10.prod.101 = 0.04 <text:line-break/> 10.prod.501 = 0.06 <text:line-break/>} </text:h>
      <text:h text:style-name="Heading_20_3" text:outline-level="3"><text:bookmark-start text:name="__RefHeading__17581_1782085564"/>Geschenk Gutscheine<text:bookmark-end text:name="__RefHeading__17581_1782085564"/></text:h>
      <text:p text:style-name="Text_20_body">Ein Shop Betreiber kann z.B. Gutscheine für Weinflaschen als “elektronisches Geschenk” verkaufen. Ich bestelle einen Gutschein, der z.B. 50 Gutscheinpunkten entspricht (=25 Euros), sende ihn Ihnen zu. Wenn Sie diesen Geschenkgutschein einlösen wollen, dann müssen Sie sich als Kunde des Shop registrieren und den Code auf diesem Gutschein angeben. Danach erhalten Sie die 50 Gutscheinpunkte Ihrem Konto gutgeschrieben. Mit diesen Gutscheinpunkten können Sie bestimmte Produkte einkaufen. Jemand kann z.B.: 3 Gutscheine zu 25 Gutscheinpunkten 5 Gutscheine zu 50 Gutscheinpunkten 8 Gutscheine zu 75 Gutscheinpunkten ...alle mit derselben Bestellung kaufen. </text:p>
      <text:p text:style-name="Text_20_body">Jeder kann zum Beispiel</text:p>
      <text:list text:style-name="L15">
        <text:list-item>
          <text:p text:style-name="P102">3 Gutscheine à 25 Gutscheinpunkte</text:p>
        </text:list-item>
        <text:list-item>
          <text:p text:style-name="P102">5 Gutscheine à 50 Gutscheinpunkte</text:p>
        </text:list-item>
        <text:list-item>
          <text:p text:style-name="P101"><text:span text:style-name="T8">8 Gutscheine à 75 Gutscheinpunkte</text:span><text:span text:style-name="T26"><text:line-break/> <text:line-break/>...</text:span>alles mit einer einzigen Bestellung kaufen.</text:p>
        </text:list-item>
      </text:list>
      <text:h text:style-name="P70" text:outline-level="3"><text:bookmark-start text:name="__RefHeading__27135_2121584579"/>Ergänzung zum Seitenmenü<text:bookmark-end text:name="__RefHeading__27135_2121584579"/></text:h>
      <text:h text:style-name="P104" text:outline-level="3"><text:bookmark-start text:name="__RefHeading__27137_2121584579"/>Sie können die Anzahl der in den Unterseiten gefundenen Produkte an die Anzeige des Seitentitels anhängen.<text:bookmark-end text:name="__RefHeading__27137_2121584579"/></text:h>
      <text:h text:style-name="P105" text:outline-level="3"><text:bookmark-start text:name="__RefHeading__27139_2121584579"/><text:span text:style-name="Strong_20_Emphasis"><text:span text:style-name="T31">Beispiel:</text:span></text:span><text:bookmark-end text:name="__RefHeading__27139_2121584579"/></text:h>
      <text:h text:style-name="Preformatted_20_Text" text:outline-level="5">includeLibs.tt_products_ts = EXT:tt_products/api/class.tx_ttproducts_ts.php</text:h>
      <text:h text:style-name="Preformatted_20_Text" text:outline-level="5"/>
      <text:h text:style-name="Preformatted_20_Text" text:outline-level="5">lib.menu_top.2 = TMENU</text:h>
      <text:h text:style-name="Preformatted_20_Text" text:outline-level="5">lib.menu_top.2.IProcFunc = tx_ttproducts_ts-&gt;pageProductCount_IProcFunc</text:h>
      <text:h text:style-name="P70" text:outline-level="3"><text:bookmark-start text:name="__RefHeading__17585_1782085564"/>Produkt Artikel mit eigenen Preisen<text:bookmark-end text:name="__RefHeading__17585_1782085564"/></text:h>
      <text:p text:style-name="P44">Hier wird beschrieben, wie verschiedene Größen eines Produktes zu verschiedenen Preisen verkauft werden können. Das selbe Verfahren können Sie auch mit Farben und den anderen Varianten anwenden. Achten Sie darauf, dass '<text:line-break/>Zweite Optionspalette anzeigen' abgehakt worden ist, sonst werden einige der Felder nicht angezeigt.</text:p>
      <text:p text:style-name="P44">Varianten:</text:p>
      <text:p text:style-name="P44">Beschreibung (Variante 3)</text:p>
      <text:p text:style-name="P44">Farbe (Variante 1)</text:p>
      <text:p text:style-name="P44">2. Farbe (Variante 6)</text:p>
      <text:p text:style-name="P44">3. Farbe (Variante 7)</text:p>
      <text:p text:style-name="P44">Größe Länge (Variante 2)</text:p>
      <text:p text:style-name="P44">2. Größe Breite (Variante 8)</text:p>
      <text:p text:style-name="P44">Größe Höhe (Variante 9)</text:p>
      <text:p text:style-name="P44">Staffelungen (Variante 4)</text:p>
      <text:p text:style-name="P44">Material (Variante 10)</text:p>
      <text:p text:style-name="P44">Qualität (Variante 11)</text:p>
      <text:p text:style-name="P44"><text:soft-page-break/>Zusätzliches (spezielle Variante 5)</text:p>
      <text:p text:style-name="P44"/>
      <text:list xml:id="list2397583571" text:style-name="L16">
        <text:list-item>
          <text:p text:style-name="P80">Im TSSetup für das Template geben Sie ein</text:p>
          <text:h text:style-name="P76" text:outline-level="5">plugin.tt_products.useArticles = 1 </text:h>
          <text:p text:style-name="P107">Wenn sie Spalten für die Listenanzeige der Produkte verwenden, wie im Bananaguard Beispiel, dann benötigen Sie auch</text:p>
          <text:h text:style-name="P76" text:outline-level="5">plugin.tt_products.conf.tt_products.LIST.displayColumns = 1</text:h>
          <text:p text:style-name="P107">Alles das teilt dem Shop mit, dass die Daten aus der Produkte Artikel Tabelle gelesen werden und daß eine Auswahlbox dargestellt wird, wenn Varianten verwendet werden.</text:p>
        </text:list-item>
        <text:list-item>
          <text:p text:style-name="P107">Geben Sie das Vaterprodukt an. <text:line-break/>Das ist die erste Information, die in der <text:s/>Frontend Liste und in Einzelansichten angezeigt wird, z.B. in der Beschreibung und über die Bilder. Erzeugen Sie einen neuen Eintrag im Web &gt; Liste Modul. Wählen Sie das Produkt aus.. <text:line-break/>Sie müssen folgende Felder ausfüllen. </text:p>
        </text:list-item>
      </text:list>
      <text:list text:style-name="L17">
        <text:list-item>
          <text:list>
            <text:list-item>
              <text:p text:style-name="P108">Titel</text:p>
            </text:list-item>
            <text:list-item>
              <text:p text:style-name="P108">auf Lager (muss mindestens 1 betragen, damit es im Frontend angezeigt wird) </text:p>
            </text:list-item>
            <text:list-item>
              <text:p text:style-name="P108">Kategorie (falls benötigt)</text:p>
            </text:list-item>
            <text:list-item>
              <text:p text:style-name="P108">Preis (das sollte der niedrigste Preis für die billigste Größe sein – das entspricht dem billigsten Produkt Artikel, den wir als nächstes eingeben werden)</text:p>
            </text:list-item>
            <text:list-item>
              <text:p text:style-name="P108">Größe (dasselbe gilt für Farbe/Beschreibung/Staffelung falls benötigt) <text:line-break/>Es ist unbedingt notwendig, um im Frontend die Möglichkeit zu haben, eine Produktvariante auswählen zu können, dass alle Größenvarianten in eine durch Strichpunkt getrennten Liste eingegeben werden, z.B.: S;M;X;XL . Diese Artikel wollen wir als nächste eingeben.</text:p>
            </text:list-item>
            <text:list-item>
              <text:p text:style-name="P108">Bemerkung</text:p>
            </text:list-item>
            <text:list-item>
              <text:p text:style-name="P108">Bild</text:p>
            </text:list-item>
            <text:list-item>
              <text:p text:style-name="P108">Datenblatt (falls benötigt).</text:p>
            </text:list-item>
          </text:list>
        </text:list-item>
      </text:list>
      <text:list text:continue-list="list2397583571" text:style-name="L16">
        <text:list-item text:start-value="1">
          <text:p text:style-name="P107">Anpassungen im HTML Template<text:line-break/>Das ist als letztes zu machen. <text:line-break/></text:p>
        </text:list-item>
      </text:list>
      <text:list text:style-name="L18">
        <text:list-item>
          <text:p text:style-name="P109">Sie müssen neue Felder in die ###ITEM_LIST_TEMPLATE### und ###ITEM_SINGLE_DISPLAY### Bereiche einfügen</text:p>
        </text:list-item>
        <text:list-item>
          <text:p text:style-name="P109">Der folgende HTML Code muss für die Anzeige der Auswahlbox der Varianten eingefügt werden, und zwar innerhalb der Form-Tags. Außerdem wird jede Information innerhalb von ###display_variant1### oder ###display_variant2### Kommentaren nicht angezeigt, wenn diese Variante nicht verwendet wird. Das ist sehr nützlich, wenn das Wort 'Ab' vor dem ###PRICE_TAX### Wert innerhalb der ###display_variant2### Kommentare eingefügt wird. So wird z.B. 'Ab $200' wenn die billigste Größe €200 kosten soll (deshalb wird der niedrigste Preis im Vaterprodukt eingetragen. - standardmäßig wird der Preis des Vaterprodukts in der Listen- und Einzelansicht angezeigt. Der Preis der Variante wird erst im Warenkorb sichtbar, wenn eine bestimmt Größe (oder Farbe etc.) ausgewählt worden ist. Wenn keine Varianten zur Auswahl stehen, dann wird das Wort 'Ab' auch nicht angezeigt.<text:line-break/><text:line-break/><text:span text:style-name="Strong_20_Emphasis">Code Beispiel:</text:span></text:p>
        </text:list-item>
      </text:list>
      <text:h text:style-name="P73" text:outline-level="5">&lt;!-- ###display_variant1### --&gt; </text:h>
      <text:h text:style-name="P73" text:outline-level="5">Farbe:&gt;&lt;select name="###FIELD_COLOR_NAME###" rows="1"&gt;###PRODUCT_COLOR###&lt;/select&gt;</text:h>
      <text:h text:style-name="P73" text:outline-level="5">&lt;!-- ###display_variant1### --&gt;&lt;!-- ###display_variant2### --&gt; </text:h>
      <text:h text:style-name="P73" text:outline-level="5">Gr&amp;ouml;e:&gt;&lt; select name="###FIELD_SIZE_NAME###" rows="1"&gt;###PRODUCT_SIZE###&lt;/select&gt;</text:h>
      <text:h text:style-name="P73" text:outline-level="5">&lt;!-- ###display_variant2### --&gt;</text:h>
      <text:p text:style-name="P44"/>
      <text:h text:style-name="Heading_20_3" text:outline-level="3"><text:bookmark-start text:name="__RefHeading__27141_2121584579"/>Edit Variant<text:bookmark-end text:name="__RefHeading__27141_2121584579"/></text:h>
      <text:p text:style-name="Text_20_body"><text:span text:style-name="T34">Sie können auf der Produkt Ebene Eingabefelder als frei definierbare Texte hinzufügen</text:span>. <text:span text:style-name="T34">Sie können einen Text oder einen Zahlwert eingeben, der im Warenkorb einzeln als Produkt Variante aufgelistet wird.</text:span> <text:span text:style-name="T34">Sie können die Anzahl einer Produkt Variante so wie jene der normalen Varianten einzeln verändern.</text:span></text:p>
      <text:p text:style-name="Text_20_body"/>
      <text:p text:style-name="P23"><text:span text:style-name="T34">Beispiel</text:span>:</text:p>
      <text:p text:style-name="P39"><text:span text:style-name="T34">Das Produkt mit der </text:span>uid 52 <text:span text:style-name="T34">wird ein Eingabefeld einer Web Domäne erhalten. Die Web Domäne wird auf </text:span><text:soft-page-break/><text:span text:style-name="T34">Gültigkeit überprüft.</text:span></text:p>
      <text:h text:style-name="Heading_20_4" text:outline-level="4">Setup:</text:h>
      <text:h text:style-name="Preformatted_20_Text" text:outline-level="5">plugin.tt_products {</text:h>
      <text:h text:style-name="Preformatted_20_Text" text:outline-level="5"><text:tab/>### DOMAIN</text:h>
      <text:h text:style-name="Preformatted_20_Text" text:outline-level="5"/>
      <text:h text:style-name="Preformatted_20_Text" text:outline-level="5"><text:tab/>marks {</text:h>
      <text:h text:style-name="Preformatted_20_Text" text:outline-level="5"><text:tab/><text:tab/>p_domain = Domäne</text:h>
      <text:h text:style-name="Preformatted_20_Text" text:outline-level="5"><text:tab/>}</text:h>
      <text:h text:style-name="Preformatted_20_Text" text:outline-level="5"/>
      <text:h text:style-name="Preformatted_20_Text" text:outline-level="5"><text:tab/>editVariant {</text:h>
      <text:h text:style-name="Preformatted_20_Text" text:outline-level="5"><text:tab/><text:tab/>10 {</text:h>
      <text:h text:style-name="Preformatted_20_Text" text:outline-level="5"><text:tab/><text:tab/><text:tab/>sql.where = uid = 52</text:h>
      <text:h text:style-name="Preformatted_20_Text" text:outline-level="5"><text:tab/><text:tab/><text:tab/>suffix = domain</text:h>
      <text:h text:style-name="Preformatted_20_Text" text:outline-level="5"><text:tab/><text:tab/><text:tab/>evalValues {</text:h>
      <text:h text:style-name="Preformatted_20_Text" text:outline-level="5"><text:tab/><text:tab/><text:tab/><text:tab/>1 = required, wwwURL</text:h>
      <text:h text:style-name="Preformatted_20_Text" text:outline-level="5"><text:tab/><text:tab/><text:tab/>}</text:h>
      <text:h text:style-name="Preformatted_20_Text" text:outline-level="5"><text:tab/><text:tab/><text:tab/>error = &lt;div class="fehlerbox"&gt;&lt;div style="font-size:16px;"&gt; Hint:&lt;/div&gt; <text:span text:style-name="T35">Sie müssen eine </text:span>Internet &lt;span style="color:red;"&gt;Dom<text:span text:style-name="T35">äne</text:span>&lt;/span&gt; <text:span text:style-name="T35">angeben</text:span>.&lt;/div&gt;&lt;/div&gt;</text:h>
      <text:h text:style-name="Preformatted_20_Text" text:outline-level="5"><text:tab/><text:tab/>}</text:h>
      <text:h text:style-name="Preformatted_20_Text" text:outline-level="5"><text:tab/>}</text:h>
      <text:h text:style-name="Preformatted_20_Text" text:outline-level="5">}</text:h>
      <text:p text:style-name="Text_20_body"/>
      <text:h text:style-name="Heading_20_4" text:outline-level="4">HTML:</text:h>
      <text:h text:style-name="P105" text:outline-level="5">S<text:span text:style-name="T36">iehe Beispiel </text:span>HTML <text:span text:style-name="T36">T</text:span>emplate EXT:tt_products/template/example_locallang_xml.html .</text:h>
      <text:h text:style-name="P105" text:outline-level="5"><text:span text:style-name="T36">Sie müssen folgende S</text:span>ubpart <text:span text:style-name="T36">M</text:span>arkers <text:span text:style-name="T36">u</text:span>nd <text:span text:style-name="T36">Text Marker einfügen</text:span>.</text:h>
      <text:h text:style-name="P105" text:outline-level="5"><text:bookmark-start text:name="__RefHeading__17538_2121584579"/>Einzel/Listenansicht des Produktes:<text:bookmark-end text:name="__RefHeading__17538_2121584579"/></text:h>
      <text:h text:style-name="Preformatted_20_Text" text:outline-level="5"><text:bookmark-start text:name="__RefHeading__17670_2121584579"/>&lt;!-- ###edit_variant_domain### begin --&gt;<text:line-break/>&lt;b&gt;###P_DOMAIN###&lt;/b&gt; ###EDIT_VARIANT###<text:line-break/>&lt;br /&gt;<text:line-break/>&lt;!-- ###edit_variant_domain### end --&gt;<text:bookmark-end text:name="__RefHeading__17670_2121584579"/></text:h>
      <text:h text:style-name="P105" text:outline-level="5"><text:bookmark-start text:name="__RefHeading__17672_2121584579"/><text:line-break/>Warenkorb Ansicht des Produktes:<text:bookmark-end text:name="__RefHeading__17672_2121584579"/></text:h>
      <text:h text:style-name="Preformatted_20_Text" text:outline-level="5"><text:bookmark-start text:name="__RefHeading__17674_2121584579"/>&lt;!-- ###edit_variant_domain### begin --&gt;<text:line-break/>###P_DOMAIN###<text:line-break/>###EDIT_VARIANT###&lt;br /&gt;<text:line-break/>&lt;!-- ###edit_variant_domain### end --&gt;<text:line-break/><text:bookmark-end text:name="__RefHeading__17674_2121584579"/></text:h>
      <text:h text:style-name="P105" text:outline-level="5"><text:bookmark-start text:name="__RefHeading__17676_2121584579"/>Payment Ansicht des Produktes:<text:bookmark-end text:name="__RefHeading__17676_2121584579"/></text:h>
      <text:h text:style-name="Preformatted_20_Text" text:outline-level="5"><text:bookmark-start text:name="__RefHeading__17678_2121584579"/>&lt;td valign=top colspan=3&gt;&lt;b&gt;###PRODUCT_TITLE### &lt;!-- ###edit_variant_domain### begin --&gt;| ###EDIT_VARIANT###&lt;!-- ###edit_variant_domain### end --&gt;&lt;/b&gt;<text:line-break/><text:bookmark-end text:name="__RefHeading__17678_2121584579"/></text:h>
      <text:h text:style-name="P105" text:outline-level="5"><text:bookmark-start text:name="__RefHeading__17680_2121584579"/>Bestell Bestätigung für ein Produkt:<text:bookmark-end text:name="__RefHeading__17680_2121584579"/></text:h>
      <text:h text:style-name="P74" text:outline-level="5">&lt;td valign=top&gt;&lt;b&gt;###PRODUCT_TITLE### &lt;!-- ###edit_variant_domain### begin --&gt;| ###EDIT_VARIANT###&lt;!-- ###edit_variant_domain### end --&gt;&lt;/b&gt;<text:line-break/></text:h>
      <text:h text:style-name="Heading_20_2" text:outline-level="2"><text:bookmark-start text:name="__RefHeading__17587_1782085564"/>Administration<text:bookmark-end text:name="__RefHeading__17587_1782085564"/></text:h>
      <text:p text:style-name="Text_20_body">Im Normalfall werden die Kategorien über die Kategorietabelle und ihre Erweiterungen angezeigt. Um das zu nutzen, muß</text:p>
      <text:p text:style-name="Text_20_body">$TYPO3_CONF_VARS['EXTCONF']['tt_products']['pageAsCategory'] = 0</text:p>
      <text:p text:style-name="Text_20_body">eingestellt sein. Andernfalls bestimmen die Seite die Kategorie und die Kategorie ist die Unterkategorie (=1) oder die Kategorie wird nicht benutzt sondern komplett durch die Seite ersetzt (=2).</text:p>
      <text:p text:style-name="Text_20_body">Aktivieren Sie schon jetzt die Flexforms im Backup. Dabei wird die Eingabe des Codes in das CODE Feld ersetzt durch eine graphische Oberfläche. Allerdings müssen Sie alle Codes neu eingeben.</text:p>
      <text:p text:style-name="Text_20_body">$TYPO3_CONF_VARS['EXTCONF']['tt_products']['useFlexforms'] = 1</text:p>
      <text:h text:style-name="Heading_20_3" text:outline-level="3"><text:bookmark-start text:name="__RefHeading__17589_1782085564"/>Installation<text:bookmark-end text:name="__RefHeading__17589_1782085564"/></text:h>
      <text:p text:style-name="Text_20_body">Installieren Sie die Extension über den Extension Manager. Wenn Sie bereits eine ältere Version von tt_products verwenden, dann ist ist in der “global” Umgebung (typo3/ext/) installiert. Wenn Sie eine neue Version ausprobieren wollen, dann sollten Sie diese unter “lokaler” Ordner (typo3conf/ext/) installieren, damit Sie die alte Version nicht dabei löschen.</text:p>
      <text:p text:style-name="Text_20_body">Deinstallieren Sie die Extension über den Extension Manager. Danach laden Sie die eine Version Ihrer Wahl mit dem Extension Manager vom Online Repository herunter. Dann verwenden Sie im Extension Manager "Available extensions to install" und fügen das Shop System wieder hinzu. </text:p>
      <text:p text:style-name="Text_20_body">Diese Extension läuft am besten, wenn Sie zusammen mit den Extensionen static_info_tables, sr_feuser_register,<text:span text:style-name="T2"> </text:span><text:span text:style-name="Emphasis"><text:span text:style-name="T2">rtehtmlarea</text:span></text:span> und <text:span text:style-name="Emphasis"><text:span text:style-name="T2">conf_userts verwendet wird.</text:span></text:span></text:p>
      <text:h text:style-name="Heading_20_3" text:outline-level="3"><text:bookmark-start text:name="__RefHeading__17591_1782085564"/>Behandlung der Kategorien<text:bookmark-end text:name="__RefHeading__17591_1782085564"/></text:h>
      <text:p text:style-name="Text_20_body">Es gibt mehrere Möglichkeiten ein Shop aufzubauen. Der normale Weg läuft über die Erzeugung von Sysfolder für die Produkte. Für den Aufbau eines größeren Shops mit TYPO3 wäre das etwas unpraktisch.</text:p>
      <text:p text:style-name="Text_20_body">Wenn Sie größere Shops mit hierarchischen Kategorien anlegen wollen, dann sollten Sie die mbi_products_categories Extension und vielleicht auch nsb_cat2menu installieren. Sponsoren erhalten eine erweiterte Version von mbi_products_categories über eine mm-Tabelle, mit der man jedem Produkt eine beliebige Anzahl an Kategorien zuordnen kann. Die Anzeige von DAM Bildern wird nur damit möglich sein.</text:p>
      <text:p text:style-name="P22">Beispiel of tt_products/ext_localconf.php:</text:p>
      <text:h text:style-name="Preformatted_20_Text" text:outline-level="5">$TYPO3_CONF_VARS[’EXTCONF’][’tt_products’][’pageAsCategory’] = 0;</text:h>
      <text:h text:style-name="Heading_20_3" text:outline-level="3"><text:bookmark-start text:name="__RefHeading__17593_1782085564"/>Behandlung der Bilder<text:bookmark-end text:name="__RefHeading__17593_1782085564"/></text:h>
      <text:p text:style-name="Text_20_body">Es gibt Wege die Bilder zu verwenden und anzuzeigen, die mit der DAM Extension indiziert worden sind.</text:p>
      <text:h text:style-name="Heading_20_3" text:outline-level="3"><text:bookmark-start text:name="__RefHeading__17595_1782085564"/>Wichtige Hinweise<text:bookmark-end text:name="__RefHeading__17595_1782085564"/></text:h>
      <text:p text:style-name="Text_20_body">Das Shop ist nach Möglichkeit abwärts kompatibel zur früheren Version tt_products 1.2.7. Aber die Template Datei benötigt einige kleine Anpassungen. Am besten Sie vergleichen Ihr Template mit den Beispiel-Templates, die mit tt_products mitgeliefert werden. Im ###BASKET_TEMPLATE### müssen Sie die Zeilen</text:p>
      <text:h text:style-name="Preformatted_20_Text" text:outline-level="5">&lt;input type="hidden" name="mode_update" value="1"&gt;</text:h>
      <text:h text:style-name="Preformatted_20_Text" text:outline-level="5">&lt;input type="Submit" name="products_update" value="update basket"&gt;</text:h>
      <text:p text:style-name="Text_20_body">haben.</text:p>
      <text:p text:style-name="P33">Sie müssen im BASKET_TEMPLATE den Marker ###FIELD_NAME### <text:s/>in ###FIELD_NAME_BASKET### <text:s/>umbenennen.</text:p>
      <text:p text:style-name="Text_20_body">Das ist kompatibel zu zk_products 1.3.2.</text:p>
      <text:p text:style-name="Text_20_body"/>
      <text:p text:style-name="P33">Einige der TypoScript Einstellungen funktionieren nicht über das Constants Feld und müssen im Setup Feld eingetragen werden. Nur die Konfigurationen, die im Konstanteneditor oder in der Datei <text:s/>static/old_style/constants.txt vorkommen, sind gültige Konstantenwerte. Sie müssen das 'Shop System Old Style' unter 'statische Template-Datensätze' in Ihr TYPO3 Template einbinden.</text:p>
      <text:p text:style-name="P33"/>
      <text:p text:style-name="P33">Ein negativer Wert eines Produktes bei 'auf Lager' hat keine Sonderfunktion mehr. Dies wird nun durch eine Checkbox 'immer auf Lager' ersetzt.</text:p>
      <text:p text:style-name="P33">Ändern Sie die früheren Eingabefelder der Suche in</text:p>
      <text:h text:style-name="Preformatted_20_Text" text:outline-level="5">&lt;INPUT size="30" maxlength="100" type="text" name="sword" value="###SWORD###"&gt;</text:h>
      <text:p text:style-name="P33"><text:soft-page-break/></text:p>
      <text:p text:style-name="P33">Die Marker ###SWORDS### <text:s/>müssen in ###SWORD### <text:s/>geändert werden, ebenso der Name auf 'sword'.</text:p>
      <text:h text:style-name="Heading_20_4" text:outline-level="4">Template Dateien</text:h>
      <text:p text:style-name="Text_20_body">In den Template Dateien Ihres Shop müssen Sie die folgenden Korrekturen machen, damit Sie weiterhin verwendet werden können:</text:p>
      <text:h text:style-name="Preformatted_20_Text" text:outline-level="5">&lt;input type="hidden" name="mode_update" value="1"&gt;</text:h>
      <text:h text:style-name="Preformatted_20_Text" text:outline-level="5">&lt;input type="Submit" name="products_update" value="update basket"&gt;</text:h>
      <text:p text:style-name="Text_20_body">Stellen Sie diese FORM-Attributes in Ihr BASKET_TEMPLATE.</text:p>
      <text:h text:style-name="Heading_20_3" text:outline-level="3"><text:bookmark-start text:name="__RefHeading__17597_1782085564"/>Template Marker<text:bookmark-end text:name="__RefHeading__17597_1782085564"/></text:h>
      <text:p text:style-name="Text_20_body">Die folgenden Template Marker werden für die Template-Datei verwendet. Sie müssen ### vorher und danach eingeben. Es gibt noch einige andere Marker, die Sie bitte den Beispiel-Templates entnehmen.</text:p>
      <text:p text:style-name="Text_20_body">Siehe: <text:a xlink:type="simple" xlink:href="http://wiki.typo3.org/Tt_products_marker" text:style-name="Internet_20_link" text:visited-style-name="Visited_20_Internet_20_Link">http://wiki.typo3.org/Tt_products_marker</text:a></text:p>
      <text:h text:style-name="Heading_20_4" text:outline-level="4">Bereichsmarker:</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Markierung:</text:p>
            </table:table-cell>
            <table:table-cell table:style-name="Tableau6.B1" office:value-type="string">
              <text:p text:style-name="Table_20_Heading">Beschreibung:</text:p>
            </table:table-cell>
            <table:table-cell table:style-name="Tableau6.C1" office:value-type="string">
              <text:p text:style-name="Table_20_Heading">Bereich:</text:p>
            </table:table-cell>
          </table:table-row>
        </table:table-header-rows>
        <table:table-row>
          <table:table-cell table:style-name="Tableau6.A2" office:value-type="string">
            <text:p text:style-name="Table_20_Contents">BASKET_TEMPLATE</text:p>
          </table:table-cell>
          <table:table-cell table:style-name="Tableau6.B2" office:value-type="string">
            <text:p text:style-name="Table_20_Contents"/>
          </table:table-cell>
          <table:table-cell table:style-name="Tableau6.C2" office:value-type="string">
            <text:p text:style-name="Table_20_Contents">top</text:p>
          </table:table-cell>
        </table:table-row>
        <table:table-row>
          <table:table-cell table:style-name="Tableau6.A3" office:value-type="string">
            <text:p text:style-name="Table_20_Contents">BASKET_INFO_TEMPLATE</text:p>
          </table:table-cell>
          <table:table-cell table:style-name="Tableau6.B2" office:value-type="string">
            <text:p text:style-name="Table_20_Contents">Das wird normalerweise dazu verwendet, damit die Kunden ihre Adreßdaten außerhalb des Warenkorbs eingeben.</text:p>
            <text:p text:style-name="P46">Es hat dieselben Eigenschaften wie BASKET_TEMPLATE.</text:p>
          </table:table-cell>
          <table:table-cell table:style-name="Tableau6.C3" office:value-type="string">
            <text:p text:style-name="Table_20_Contents">top</text:p>
          </table:table-cell>
        </table:table-row>
        <table:table-row>
          <table:table-cell table:style-name="Tableau6.A4" office:value-type="string">
            <text:p text:style-name="Table_20_Contents">BASKET_ORDERCONFIRMATION_TEMPLATE</text:p>
          </table:table-cell>
          <table:table-cell table:style-name="Tableau6.B2" office:value-type="string">
            <text:p text:style-name="Table_20_Contents">Die letzte Seite, nachdem die Bestellung verarbeitet worden ist. Wenn PIDthanks gesetzt ist, wird das nicht für die Anzeige benutzt. Aber diese Teile werden immer für die BenachrichtigungsE-Mails verwendet, wenn HTML-E-Mails eingestellt sind (orderE-Mail_htmlmail=1).</text:p>
            <text:p text:style-name="Table_20_Contents">siehe: BASKET_ORDERTHANKS_TEMPLATE</text:p>
          </table:table-cell>
          <table:table-cell table:style-name="Tableau6.C4" office:value-type="string">
            <text:p text:style-name="Table_20_Contents"/>
          </table:table-cell>
        </table:table-row>
        <table:table-row>
          <table:table-cell table:style-name="Tableau6.A5" office:value-type="string">
            <text:p text:style-name="Table_20_Contents">BASKET_ORDERCONFIRMATION_NOSAVE_TEMPLATE</text:p>
          </table:table-cell>
          <table:table-cell table:style-name="Tableau6.B2" office:value-type="string">
            <text:p text:style-name="Table_20_Contents">Diese HTML-Daten werden angezeigt, nachdem die Bestellung in der Datenbank gespeichert worden ist.</text:p>
          </table:table-cell>
          <table:table-cell table:style-name="Tableau6.C4" office:value-type="string">
            <text:p text:style-name="Table_20_Contents"/>
          </table:table-cell>
        </table:table-row>
        <table:table-row>
          <table:table-cell table:style-name="Tableau6.A6" office:value-type="string">
            <text:p text:style-name="Table_20_Contents">BASKET_ORDERTHANKS_TEMPLATE</text:p>
          </table:table-cell>
          <table:table-cell table:style-name="Tableau6.B2" office:value-type="string">
            <text:p text:style-name="P19">Anzeige einer 'Danke schön' Seite, wenn PIDthanks gesetzt ist. Für den Versand von HTML-E-Mails wird das aber nicht verwendet.</text:p>
            <text:p text:style-name="P19">siehe BASKET_ORDERCONFIRMATION_TEMPLATE</text:p>
          </table:table-cell>
          <table:table-cell table:style-name="Tableau6.C4" office:value-type="string">
            <text:p text:style-name="Table_20_Contents"/>
          </table:table-cell>
        </table:table-row>
        <table:table-row>
          <table:table-cell table:style-name="Tableau6.A7" office:value-type="string">
            <text:p text:style-name="Table_20_Contents">BASKET_OVERVIEW_EMPTY</text:p>
          </table:table-cell>
          <table:table-cell table:style-name="Tableau6.B2" office:value-type="string">
            <text:p text:style-name="P19">Meldung 'Ihr Warenkorb ist noch leer' für OVERVIEW</text:p>
          </table:table-cell>
          <table:table-cell table:style-name="Tableau6.C4" office:value-type="string">
            <text:p text:style-name="Table_20_Contents"/>
          </table:table-cell>
        </table:table-row>
        <table:table-row>
          <table:table-cell table:style-name="Tableau6.A8" office:value-type="string">
            <text:p text:style-name="Table_20_Contents">BASKET_OVERVIEW_TEMPLATE</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9" office:value-type="string">
            <text:p text:style-name="Table_20_Contents">BASKET_PAYMENT_TEMPLATE</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10" office:value-type="string">
            <text:p text:style-name="Table_20_Contents">BASKET_REQUIRED_INFO_MISSING</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11" office:value-type="string">
            <text:p text:style-name="Table_20_Contents">BASKET_TEMPLATE_EMPTY</text:p>
          </table:table-cell>
          <table:table-cell table:style-name="Tableau6.B2" office:value-type="string">
            <text:p text:style-name="P19">Meldung 'Ihr Warenkorb ist noch leer'</text:p>
          </table:table-cell>
          <table:table-cell table:style-name="Tableau6.C4" office:value-type="string">
            <text:p text:style-name="Table_20_Contents"/>
          </table:table-cell>
        </table:table-row>
        <table:table-row>
          <table:table-cell table:style-name="Tableau6.A12" office:value-type="string">
            <text:p text:style-name="Table_20_Contents">BASKET_TEMPLATE_NOT_LOGGED_IN</text:p>
          </table:table-cell>
          <table:table-cell table:style-name="Tableau6.B2" office:value-type="string">
            <text:p text:style-name="Table_20_Contents">Fehlermeldung, daß sich der Benutzer nicht eingeloggt hat</text:p>
          </table:table-cell>
          <table:table-cell table:style-name="Tableau6.C4" office:value-type="string">
            <text:p text:style-name="Table_20_Contents"/>
          </table:table-cell>
        </table:table-row>
        <table:table-row>
          <table:table-cell table:style-name="Tableau6.A13" office:value-type="string">
            <text:p text:style-name="Table_20_Contents">BASKET_TEMPLATE_INVALID_GIFT_UNIQUE_ID</text:p>
          </table:table-cell>
          <table:table-cell table:style-name="Tableau6.B2" office:value-type="string">
            <text:p text:style-name="Table_20_Contents">Fehlermeldung, daß eine falsche Kennnummer für ein Geschenk-Zertifikat eingegeben worden ist</text:p>
          </table:table-cell>
          <table:table-cell table:style-name="Tableau6.C4" office:value-type="string">
            <text:p text:style-name="Table_20_Contents"/>
          </table:table-cell>
        </table:table-row>
        <table:table-row>
          <table:table-cell table:style-name="Tableau6.A14" office:value-type="string">
            <text:p text:style-name="Table_20_Contents">BILL_TEMPLATE</text:p>
          </table:table-cell>
          <table:table-cell table:style-name="Tableau6.B2" office:value-type="string">
            <text:p text:style-name="Table_20_Contents">zur Erzeugung der Rechnung</text:p>
          </table:table-cell>
          <table:table-cell table:style-name="Tableau6.C4" office:value-type="string">
            <text:p text:style-name="Table_20_Contents"/>
          </table:table-cell>
        </table:table-row>
        <table:table-row>
          <table:table-cell table:style-name="Tableau6.A15" office:value-type="string">
            <text:p text:style-name="Table_20_Contents">DELIVERY_TEMPLATE</text:p>
          </table:table-cell>
          <table:table-cell table:style-name="Tableau6.B2" office:value-type="string">
            <text:p text:style-name="Table_20_Contents">Erzeugung der Datei des Lieferscheins</text:p>
          </table:table-cell>
          <table:table-cell table:style-name="Tableau6.C4" office:value-type="string">
            <text:p text:style-name="Table_20_Contents"/>
          </table:table-cell>
        </table:table-row>
        <table:table-row>
          <table:table-cell table:style-name="Tableau6.A16" office:value-type="string">
            <text:p text:style-name="Table_20_Contents">E-Mail_PLAINTEXT_TEMPLATE</text:p>
          </table:table-cell>
          <table:table-cell table:style-name="Tableau6.B2" office:value-type="string">
            <text:p text:style-name="Table_20_Contents">Text für die E-Mail Benachrichtigung</text:p>
            <text:p text:style-name="Table_20_Contents">Die erste Zeile wird für das Betreff Feld verwendet.</text:p>
          </table:table-cell>
          <table:table-cell table:style-name="Tableau6.C4" office:value-type="string">
            <text:p text:style-name="Table_20_Contents"/>
          </table:table-cell>
        </table:table-row>
        <table:table-row>
          <table:table-cell table:style-name="Tableau6.A17" office:value-type="string">
            <text:p text:style-name="Table_20_Contents">E-Mail_NEWUSER_TEMPLATE</text:p>
          </table:table-cell>
          <table:table-cell table:style-name="Tableau6.B2" office:value-type="string">
            <text:p text:style-name="Table_20_Contents">E-Mail nach der Erzeugung eines Frontend Benutzers</text:p>
          </table:table-cell>
          <table:table-cell table:style-name="Tableau6.C4" office:value-type="string">
            <text:p text:style-name="Table_20_Contents"/>
          </table:table-cell>
        </table:table-row>
        <table:table-row>
          <table:table-cell table:style-name="Tableau6.A18" office:value-type="string">
            <text:p text:style-name="Table_20_Contents">ITEM_LIST_TEMPLATE</text:p>
          </table:table-cell>
          <table:table-cell table:style-name="Tableau6.B2" office:value-type="string">
            <text:p text:style-name="Table_20_Contents">Auflistung der Produkte auf der Startsetite LIST</text:p>
          </table:table-cell>
          <table:table-cell table:style-name="Tableau6.C4" office:value-type="string">
            <text:p text:style-name="Table_20_Contents"/>
          </table:table-cell>
        </table:table-row>
        <table:table-row>
          <table:table-cell table:style-name="Tableau6.A19" office:value-type="string">
            <text:p text:style-name="Table_20_Contents">ITEM_LIST_GIFTS_TEMPLATE</text:p>
          </table:table-cell>
          <table:table-cell table:style-name="Tableau6.B2" office:value-type="string">
            <text:p text:style-name="Table_20_Contents">Auflistung der Produkte Geschenk-Gutscheine</text:p>
          </table:table-cell>
          <table:table-cell table:style-name="Tableau6.C4" office:value-type="string">
            <text:p text:style-name="Table_20_Contents"/>
          </table:table-cell>
        </table:table-row>
        <table:table-row>
          <table:table-cell table:style-name="Tableau6.A20" office:value-type="string">
            <text:p text:style-name="Table_20_Contents">ITEM_SEARCH</text:p>
          </table:table-cell>
          <table:table-cell table:style-name="Tableau6.B2" office:value-type="string">
            <text:p text:style-name="Table_20_Contents"/>
          </table:table-cell>
          <table:table-cell table:style-name="Tableau6.C4" office:value-type="string">
            <text:p text:style-name="Table_20_Contents"/>
          </table:table-cell>
        </table:table-row>
        <text:soft-page-break/>
        <table:table-row>
          <table:table-cell table:style-name="Tableau6.A21" office:value-type="string">
            <text:p text:style-name="Table_20_Contents">ITEM_SEARCH_EMPTY</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22" office:value-type="string">
            <text:p text:style-name="Table_20_Contents">ITEM_SINGLE_DISPLAY</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23" office:value-type="string">
            <text:p text:style-name="Table_20_Contents">ITEM_SINGLE_DISPLAY_GIFT</text:p>
          </table:table-cell>
          <table:table-cell table:style-name="Tableau6.B2" office:value-type="string">
            <text:p text:style-name="Table_20_Contents">Einzelansicht für Geschenkgutscheine</text:p>
          </table:table-cell>
          <table:table-cell table:style-name="Tableau6.C4" office:value-type="string">
            <text:p text:style-name="Table_20_Contents"/>
          </table:table-cell>
        </table:table-row>
        <table:table-row>
          <table:table-cell table:style-name="Tableau6.A24" office:value-type="string">
            <text:p text:style-name="Table_20_Contents">ITEM_SINGLE_DISPLAY_NOT_IN_STOCK</text:p>
          </table:table-cell>
          <table:table-cell table:style-name="Tableau6.B2" office:value-type="string">
            <text:p text:style-name="Table_20_Contents">Einzelansicht für Produkte, die nicht auf Lager sind</text:p>
          </table:table-cell>
          <table:table-cell table:style-name="Tableau6.C4" office:value-type="string">
            <text:p text:style-name="Table_20_Contents"/>
          </table:table-cell>
        </table:table-row>
        <table:table-row>
          <table:table-cell table:style-name="Tableau6.A25" office:value-type="string">
            <text:p text:style-name="Table_20_Contents">ITEM_SINGLE_DISPLAY_RECORDINSERT</text:p>
          </table:table-cell>
          <table:table-cell table:style-name="Tableau6.B2" office:value-type="string">
            <text:p text:style-name="Table_20_Contents">siehe displayCurrentRecord: generieren des $cObj-&gt;data</text:p>
          </table:table-cell>
          <table:table-cell table:style-name="Tableau6.C4" office:value-type="string">
            <text:p text:style-name="Table_20_Contents"/>
          </table:table-cell>
        </table:table-row>
        <table:table-row>
          <table:table-cell table:style-name="Tableau6.A26" office:value-type="string">
            <text:p text:style-name="Table_20_Contents">MEMO_TEMPLATE</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27" office:value-type="string">
            <text:p text:style-name="Table_20_Contents">MEMO_NOT_LOGGED_IN</text:p>
          </table:table-cell>
          <table:table-cell table:style-name="Tableau6.B2" office:value-type="string">
            <text:p text:style-name="Table_20_Contents">Fehlermeldung, daß sich der Benutzer für MEMO nicht eingeloggt hat</text:p>
          </table:table-cell>
          <table:table-cell table:style-name="Tableau6.C4" office:value-type="string">
            <text:p text:style-name="Table_20_Contents"/>
          </table:table-cell>
        </table:table-row>
        <table:table-row>
          <table:table-cell table:style-name="Tableau6.A28" office:value-type="string">
            <text:p text:style-name="Table_20_Contents">ORDERS_LIST_TEMPLATE</text:p>
          </table:table-cell>
          <table:table-cell table:style-name="Tableau6.B2" office:value-type="string">
            <text:p text:style-name="Table_20_Contents">Anzeige der Liste der Bestellungen</text:p>
          </table:table-cell>
          <table:table-cell table:style-name="Tableau6.C4" office:value-type="string">
            <text:p text:style-name="Table_20_Contents"/>
          </table:table-cell>
        </table:table-row>
        <table:table-row>
          <table:table-cell table:style-name="Tableau6.A29" office:value-type="string">
            <text:p text:style-name="Table_20_Contents">TRACKING_E-Mail_GIFTNOTIFY_TEMPLATE</text:p>
          </table:table-cell>
          <table:table-cell table:style-name="Tableau6.B2" office:value-type="string">
            <text:p text:style-name="Table_20_Contents">Benachrichtigung an den Empfänger eines Geschenkgutscheins in der Verwaltung der Bestellungen</text:p>
          </table:table-cell>
          <table:table-cell table:style-name="Tableau6.C4" office:value-type="string">
            <text:p text:style-name="Table_20_Contents"/>
          </table:table-cell>
        </table:table-row>
        <table:table-row>
          <table:table-cell table:style-name="Tableau6.A30" office:value-type="string">
            <text:p text:style-name="Table_20_Contents">TRACKING_ENTER_NUMBER</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31" office:value-type="string">
            <text:p text:style-name="Table_20_Contents">TRACKING_WRONG_NUMBER</text:p>
          </table:table-cell>
          <table:table-cell table:style-name="Tableau6.B2" office:value-type="string">
            <text:p text:style-name="Table_20_Contents"/>
          </table:table-cell>
          <table:table-cell table:style-name="Tableau6.C4" office:value-type="string">
            <text:p text:style-name="Table_20_Contents"/>
          </table:table-cell>
        </table:table-row>
      </table:table>
      <text:h text:style-name="Heading_20_4" text:outline-level="4">Einzelmarker:</text:h>
      <text:p text:style-name="P16"/>
      <text:p text:style-name="Text_20_body"><text:span text:style-name="T4">Beispiel</text:span> für einen Wrap:</text:p>
      <text:h text:style-name="P77" text:outline-level="5">&lt;!-- ###PRODUCT_LINK_DATASHEET### begin --&gt; Datenblatt für das Produkt &lt;!-- ###PRODUCT_LINK_DATASHEET### end --&gt;</text:h>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Table_20_Heading">Marker:</text:p>
            </table:table-cell>
            <table:table-cell table:style-name="Tableau8.A1" office:value-type="string">
              <text:p text:style-name="Table_20_Heading">Typ:</text:p>
            </table:table-cell>
            <table:table-cell table:style-name="Tableau8.A1" office:value-type="string">
              <text:p text:style-name="Table_20_Heading">Beschreibung:</text:p>
            </table:table-cell>
            <table:table-cell table:style-name="Tableau8.D1" office:value-type="string">
              <text:p text:style-name="Table_20_Heading">Bereich:</text:p>
            </table:table-cell>
          </table:table-row>
        </table:table-header-rows>
        <table:table-row>
          <table:table-cell table:style-name="Tableau8.A2" office:value-type="string">
            <text:p text:style-name="Table_20_Contents">BROWSE_LINKS</text:p>
          </table:table-cell>
          <table:table-cell table:style-name="Tableau8.A2" office:value-type="string">
            <text:p text:style-name="Table_20_Contents"/>
          </table:table-cell>
          <table:table-cell table:style-name="Tableau8.A2" office:value-type="string">
            <text:p text:style-name="Table_20_Contents">Zum Durchblättern über mehrere Seiten in der Anzeige</text:p>
          </table:table-cell>
          <table:table-cell table:style-name="Tableau8.D2" office:value-type="string">
            <text:p text:style-name="Table_20_Contents"/>
          </table:table-cell>
        </table:table-row>
        <table:table-row>
          <table:table-cell table:style-name="Tableau8.A2" office:value-type="string">
            <text:p text:style-name="Table_20_Contents">DELIVERYCOSTS</text:p>
          </table:table-cell>
          <table:table-cell table:style-name="Tableau8.A2" office:value-type="string">
            <text:p text:style-name="Table_20_Contents">value</text:p>
          </table:table-cell>
          <table:table-cell table:style-name="Tableau8.A2" office:value-type="string">
            <text:p text:style-name="Table_20_Contents">Summe der Lieferkosten und Kosten für die Bezahlung</text:p>
          </table:table-cell>
          <table:table-cell table:style-name="Tableau8.D2" office:value-type="string">
            <text:p text:style-name="Table_20_Contents"/>
          </table:table-cell>
        </table:table-row>
        <table:table-row>
          <table:table-cell table:style-name="Tableau8.A2" office:value-type="string">
            <text:p text:style-name="Table_20_Contents">DELIVERY_...<text:line-break/>NOTE<text:line-break/>NOTE_DISPLAY<text:line-break/>DESIRED_DATE</text:p>
          </table:table-cell>
          <table:table-cell table:style-name="Tableau8.A2" office:value-type="string">
            <text:p text:style-name="Table_20_Contents">value</text:p>
          </table:table-cell>
          <table:table-cell table:style-name="Tableau8.A2" office:value-type="string">
            <text:p text:style-name="Table_20_Contents">Siehe auch PERSON_...</text:p>
            <text:p text:style-name="Table_20_Contents">Eingabefeld Bemerkung zur Bestellung<text:line-break/>Ausgabe Bemerkung mit &lt;br&gt; für den Zeilenumbruch<text:line-break/>gewünschtes Lieferdatum</text:p>
          </table:table-cell>
          <table:table-cell table:style-name="Tableau8.D2" office:value-type="string">
            <text:p text:style-name="Table_20_Contents">BASKET_INFO_TEMPLATE</text:p>
          </table:table-cell>
        </table:table-row>
        <table:table-row>
          <table:table-cell table:style-name="Tableau8.A2" office:value-type="string">
            <text:p text:style-name="Table_20_Contents">EXTERNAL_COBJECT</text:p>
          </table:table-cell>
          <table:table-cell table:style-name="Tableau8.A2" office:value-type="string">
            <text:p text:style-name="Table_20_Contents">value</text:p>
          </table:table-cell>
          <table:table-cell table:style-name="Tableau8.A2" office:value-type="string">
            <text:p text:style-name="Table_20_Contents">zusätzliches Cobject</text:p>
          </table:table-cell>
          <table:table-cell table:style-name="Tableau8.D2" office:value-type="string">
            <text:p text:style-name="Table_20_Contents"/>
          </table:table-cell>
        </table:table-row>
        <table:table-row>
          <table:table-cell table:style-name="Tableau8.A2" office:value-type="string">
            <text:p text:style-name="Table_20_Contents">FIELD_NAME</text:p>
          </table:table-cell>
          <table:table-cell table:style-name="Tableau8.A2" office:value-type="string">
            <text:p text:style-name="Table_20_Contents">value in form</text:p>
          </table:table-cell>
          <table:table-cell table:style-name="Tableau8.A2" office:value-type="string">
            <text:p text:style-name="Table_20_Contents">Name eines Feldes in einem HTML Formular</text:p>
          </table:table-cell>
          <table:table-cell table:style-name="Tableau8.D2" office:value-type="string">
            <text:p text:style-name="Table_20_Contents"/>
          </table:table-cell>
        </table:table-row>
        <table:table-row>
          <table:table-cell table:style-name="Tableau8.A2" office:value-type="string">
            <text:p text:style-name="Table_20_Contents">FIELD_NAME_BASKET</text:p>
          </table:table-cell>
          <table:table-cell table:style-name="Tableau8.A2" office:value-type="string">
            <text:p text:style-name="Table_20_Contents">value in form</text:p>
          </table:table-cell>
          <table:table-cell table:style-name="Tableau8.A2" office:value-type="string">
            <text:p text:style-name="Table_20_Contents">Die Daten des Warenkorbs in verschlüsselter Form.</text:p>
          </table:table-cell>
          <table:table-cell table:style-name="Tableau8.D2" office:value-type="string">
            <text:p text:style-name="Table_20_Contents"/>
          </table:table-cell>
        </table:table-row>
        <table:table-row>
          <table:table-cell table:style-name="Tableau8.A2" office:value-type="string">
            <text:p text:style-name="P47">GC1, GC2, GC3</text:p>
          </table:table-cell>
          <table:table-cell table:style-name="Tableau8.A2" office:value-type="string">
            <text:p text:style-name="Table_20_Contents">value</text:p>
          </table:table-cell>
          <table:table-cell table:style-name="Tableau8.A2" office:value-type="string">
            <text:p text:style-name="Table_20_Contents">globale Farben</text:p>
          </table:table-cell>
          <table:table-cell table:style-name="Tableau8.D2" office:value-type="string">
            <text:p text:style-name="Table_20_Contents">all</text:p>
          </table:table-cell>
        </table:table-row>
        <table:table-row>
          <table:table-cell table:style-name="Tableau8.A2" office:value-type="string">
            <text:p text:style-name="P47">GW1B, GW2B, GW1E, GW2E</text:p>
          </table:table-cell>
          <table:table-cell table:style-name="Tableau8.A2" office:value-type="string">
            <text:p text:style-name="Table_20_Contents">wrap</text:p>
          </table:table-cell>
          <table:table-cell table:style-name="Tableau8.A2" office:value-type="string">
            <text:p text:style-name="Table_20_Contents">globale Wraps (HTML-Umrandungen)</text:p>
          </table:table-cell>
          <table:table-cell table:style-name="Tableau8.D2" office:value-type="string">
            <text:p text:style-name="Table_20_Contents">all</text:p>
          </table:table-cell>
        </table:table-row>
        <table:table-row>
          <table:table-cell table:style-name="Tableau8.A2" office:value-type="string">
            <text:p text:style-name="P47">PRICE_TAX</text:p>
            <text:p text:style-name="P47">PRICE_NO_TAX</text:p>
            <text:p text:style-name="P47">PRICE_ONLY_TAX</text:p>
            <text:p text:style-name="P47">PRICE2_TAX</text:p>
            <text:p text:style-name="P47">PRICE2_NO_TAX</text:p>
            <text:p text:style-name="P47">PRICE2_ONLY_TAX</text:p>
          </table:table-cell>
          <table:table-cell table:style-name="Tableau8.A2" office:value-type="string">
            <text:p text:style-name="Table_20_Contents">value</text:p>
          </table:table-cell>
          <table:table-cell table:style-name="Tableau8.A2" office:value-type="string">
            <text:p text:style-name="Table_20_Contents">price/price2 des Produkts, mit oder ohne oder nur Steuer</text:p>
          </table:table-cell>
          <table:table-cell table:style-name="Tableau8.D2" office:value-type="string">
            <text:p text:style-name="Table_20_Contents">ITEM_SINGLE</text:p>
          </table:table-cell>
        </table:table-row>
        <table:table-row>
          <table:table-cell table:style-name="Tableau8.A2" office:value-type="string">
            <text:p text:style-name="P47">PRICE_TOTAL_TAX</text:p>
            <text:p text:style-name="P47">PRICE_TOTAL_NO_TAX</text:p>
            <text:p text:style-name="P47">PRICE_TOTAL_ONLY_TAX</text:p>
          </table:table-cell>
          <table:table-cell table:style-name="Tableau8.A2" office:value-type="string">
            <text:p text:style-name="Table_20_Contents">value</text:p>
          </table:table-cell>
          <table:table-cell table:style-name="Tableau8.A2" office:value-type="string">
            <text:p text:style-name="Table_20_Contents">Gesamtbetrag aller Produkte inkl. Kosten für Bezahlsystem und Versand</text:p>
          </table:table-cell>
          <table:table-cell table:style-name="Tableau8.D2" office:value-type="string">
            <text:p text:style-name="Table_20_Contents">all</text:p>
          </table:table-cell>
        </table:table-row>
        <text:soft-page-break/>
        <table:table-row>
          <table:table-cell table:style-name="Tableau8.A2" office:value-type="string">
            <text:p text:style-name="P47">PRICE_GOODSTOTAL_TAX</text:p>
            <text:p text:style-name="P47">PRICE_GOODSTOTAL_NO_TAX</text:p>
            <text:p text:style-name="P47">PRICE2_GOODSTOTAL_TAX</text:p>
            <text:p text:style-name="P47">PRICE2_GOODSTOTAL_NO_TAX</text:p>
          </table:table-cell>
          <table:table-cell table:style-name="Tableau8.A2" office:value-type="string">
            <text:p text:style-name="Table_20_Contents">value</text:p>
          </table:table-cell>
          <table:table-cell table:style-name="Tableau8.A2" office:value-type="string">
            <text:p text:style-name="Table_20_Contents">total sum of all items for price or price2</text:p>
          </table:table-cell>
          <table:table-cell table:style-name="Tableau8.D2" office:value-type="string">
            <text:p text:style-name="Table_20_Contents">all</text:p>
          </table:table-cell>
        </table:table-row>
        <table:table-row>
          <table:table-cell table:style-name="Tableau8.A2" office:value-type="string">
            <text:p text:style-name="Table_20_Contents">PRODUCT_LINK_DATASHEET</text:p>
          </table:table-cell>
          <table:table-cell table:style-name="Tableau8.A2" office:value-type="string">
            <text:p text:style-name="Table_20_Contents">wrap</text:p>
          </table:table-cell>
          <table:table-cell table:style-name="Tableau8.A2" office:value-type="string">
            <text:p text:style-name="Table_20_Contents">Link auf die Datenblatt Datei, die in der Konstante file.datasheetIcon gesetzt worden ist.</text:p>
            <text:p text:style-name="Table_20_Contents"/>
            <text:p text:style-name="P25">Beispiel:</text:p>
            <text:p text:style-name="Table_20_Contents">&lt;!-- ###PRODUCT_LINK_DATASHEET1### begin --&gt;</text:p>
            <text:p text:style-name="Table_20_Contents"><text:tab/><text:tab/>###GW1B######P_DATASHEET### 1: ###GW1E### &lt;font size="1"&gt;&lt;b&gt;&lt;i&gt;###PRODUCT_DATASHEET1###&lt;/i&gt;&lt;/b&gt;&lt;/font&gt;###ICON_DATASHEET###&lt;/p&gt;</text:p>
            <text:p text:style-name="Table_20_Contents">&lt;!-- ###PRODUCT_LINK_DATASHEET1### end --&gt;</text:p>
            <text:p text:style-name="Table_20_Contents"/>
            <text:p text:style-name="Table_20_Contents"/>
            <text:p text:style-name="Table_20_Contents">&lt;!-- ###PRODUCT_LINK_DATASHEET2### begin --&gt;</text:p>
            <text:p text:style-name="Table_20_Contents">###GW1B######P_DATASHEET### 2: ###GW1E### &lt;font size="1"&gt;&lt;b&gt;&lt;i&gt;###PRODUCT_DATASHEET2###&lt;/i&gt;&lt;/b&gt;&lt;/font&gt;###ICON_DATASHEET###&lt;/p&gt;</text:p>
            <text:p text:style-name="Table_20_Contents">&lt;!-- ###PRODUCT_LINK_DATASHEET2### end --&gt;</text:p>
          </table:table-cell>
          <table:table-cell table:style-name="Tableau8.D2" office:value-type="string">
            <text:p text:style-name="Table_20_Contents"/>
          </table:table-cell>
        </table:table-row>
        <table:table-row>
          <table:table-cell table:style-name="Tableau8.A2" office:value-type="string">
            <text:p text:style-name="Table_20_Contents">ORDER_STATUS_TIME, </text:p>
            <text:p text:style-name="Table_20_Contents">ORDER_STATUS, ORDER_STATUS_INFO, ORDER_STATUS_COMMENT</text:p>
          </table:table-cell>
          <table:table-cell table:style-name="Tableau8.A2" office:value-type="string">
            <text:p text:style-name="Table_20_Contents">value</text:p>
          </table:table-cell>
          <table:table-cell table:style-name="Tableau8.A2" office:value-type="string">
            <text:p text:style-name="Table_20_Contents">Daten zur Bestellung</text:p>
          </table:table-cell>
          <table:table-cell table:style-name="Tableau8.D2" office:value-type="string">
            <text:p text:style-name="Table_20_Contents">TRACKING_DISPLAY_INFO</text:p>
          </table:table-cell>
        </table:table-row>
        <table:table-row>
          <table:table-cell table:style-name="Tableau8.A2" office:value-type="string">
            <text:p text:style-name="Table_20_Contents">PERSON_...<text:line-break/>NAME,<text:line-break/>ADDRESS,<text:line-break/>TELEPHONE,</text:p>
            <text:p text:style-name="Table_20_Contents">FAX,<text:line-break/>E-Mail,</text:p>
            <text:p text:style-name="Table_20_Contents">COMPANY,</text:p>
            <text:p text:style-name="Table_20_Contents">CITY,</text:p>
            <text:p text:style-name="Table_20_Contents">ZIP,</text:p>
            <text:p text:style-name="Table_20_Contents">STATE,</text:p>
            <text:p text:style-name="Table_20_Contents">COUNTRY</text:p>
          </table:table-cell>
          <table:table-cell table:style-name="Tableau8.A2" office:value-type="string">
            <text:p text:style-name="Table_20_Contents">value</text:p>
          </table:table-cell>
          <table:table-cell table:style-name="Tableau8.A2" office:value-type="string">
            <text:p text:style-name="Table_20_Contents">Felder für die Adreßinformation<text:line-break/>ein Präfix muß vorangestellt sein<text:line-break/>PERSON_... <text:s/>der Kunde der Bestellung</text:p>
            <text:p text:style-name="Table_20_Contents">DELIVERY_... der Empfänger der Bestellung</text:p>
          </table:table-cell>
          <table:table-cell table:style-name="Tableau8.D2" office:value-type="string">
            <text:p text:style-name="Table_20_Contents"/>
          </table:table-cell>
        </table:table-row>
        <table:table-row>
          <table:table-cell table:style-name="Tableau8.A2" office:value-type="string">
            <text:p text:style-name="Table_20_Contents">PID_TRACKING</text:p>
          </table:table-cell>
          <table:table-cell table:style-name="Tableau8.A2" office:value-type="string">
            <text:p text:style-name="Table_20_Contents">value</text:p>
          </table:table-cell>
          <table:table-cell table:style-name="Tableau8.A2" office:value-type="string">
            <text:p text:style-name="Table_20_Contents">Die Seitennummer für den Rückverfolgung über den Status der Bestellung</text:p>
          </table:table-cell>
          <table:table-cell table:style-name="Tableau8.D2" office:value-type="string">
            <text:p text:style-name="Table_20_Contents"/>
          </table:table-cell>
        </table:table-row>
        <table:table-row>
          <table:table-cell table:style-name="Tableau8.A2" office:value-type="string">
            <text:p text:style-name="Table_20_Contents">STATUS_CODE_60 </text:p>
          </table:table-cell>
          <table:table-cell table:style-name="Tableau8.A2" office:value-type="string">
            <text:p text:style-name="Table_20_Contents">wrap</text:p>
          </table:table-cell>
          <table:table-cell table:style-name="Tableau8.A2" office:value-type="string">
            <text:p text:style-name="Table_20_Contents">wird verwendet, damit das Zusenden von E-Mails an den Empfänger eines Geschenkgutscheins erst nach der Bezahlung erscheint</text:p>
          </table:table-cell>
          <table:table-cell table:style-name="Tableau8.D2" office:value-type="string">
            <text:p text:style-name="Table_20_Contents">TRACKING_DISPLAY_INFO</text:p>
          </table:table-cell>
        </table:table-row>
        <table:table-row>
          <table:table-cell table:style-name="Tableau8.A2" office:value-type="string">
            <text:p text:style-name="Table_20_Contents">STATUS_OPTIONS</text:p>
          </table:table-cell>
          <table:table-cell table:style-name="Tableau8.A2" office:value-type="string">
            <text:p text:style-name="Table_20_Contents">value</text:p>
          </table:table-cell>
          <table:table-cell table:style-name="Tableau8.A2" office:value-type="string">
            <text:p text:style-name="Table_20_Contents">Auswahlmenü für Zustände in der Bestellungsverwaltung</text:p>
          </table:table-cell>
          <table:table-cell table:style-name="Tableau8.D2" office:value-type="string">
            <text:p text:style-name="P35">ADMIN_CONTROL inside TRACKING_DISPLAY_INFO</text:p>
          </table:table-cell>
        </table:table-row>
        <table:table-row>
          <table:table-cell table:style-name="Tableau8.A2" office:value-type="string">
            <text:p text:style-name="Table_20_Contents">SHOPADMIN_E-Mail</text:p>
          </table:table-cell>
          <table:table-cell table:style-name="Tableau8.A2" office:value-type="string">
            <text:p text:style-name="Table_20_Contents">value</text:p>
          </table:table-cell>
          <table:table-cell table:style-name="Tableau8.A2" office:value-type="string">
            <text:p text:style-name="Table_20_Contents">E-Mail-Adresse des Shop-Adminstrators</text:p>
          </table:table-cell>
          <table:table-cell table:style-name="Tableau8.D2" office:value-type="string">
            <text:p text:style-name="P35">all</text:p>
          </table:table-cell>
        </table:table-row>
      </table:table>
      <text:h text:style-name="Heading_20_4" text:outline-level="4">globale Marker</text:h>
      <text:p text:style-name="Text_20_body">nur Setup</text:p>
      <text:p text:style-name="Text_20_body">Die globalen Marker sind für alle Subparts erlaubt. Es können neue Marker definiert werden.</text:p>
      <text:p text:style-name="P26">Example:</text:p>
      <text:h text:style-name="Preformatted_20_Text" text:outline-level="5">plugin.tt_products.marks {</text:h>
      <text:p text:style-name="P4"><text:s text:c="3"/>mein_marker = Kaufen Sie bald wieder bei uns ein!</text:p>
      <text:p text:style-name="Table_20_Contents_2f_PRE">}</text:p>
      <text:p text:style-name="Table_20_Contents_2f_PRE"/>
      <text:p text:style-name="Table_20_Contents_2f_PRE">###MEIN_MARKER###</text:p>
      <text:p text:style-name="Table_20_Contents_2f_PRE"/>
      <table:table table:name="Tableau16" table:style-name="Tableau16">
        <table:table-column table:style-name="Tableau16.A"/>
        <table:table-column table:style-name="Tableau16.B"/>
        <table:table-column table:style-name="Tableau16.C"/>
        <table:table-column table:style-name="Tableau16.D"/>
        <table:table-header-rows>
          <table:table-row>
            <table:table-cell table:style-name="Tableau16.A1" office:value-type="string">
              <text:p text:style-name="Table_20_Heading">Property:</text:p>
            </table:table-cell>
            <table:table-cell table:style-name="Tableau16.B1" office:value-type="string">
              <text:p text:style-name="Table_20_Heading">Data type:</text:p>
            </table:table-cell>
            <table:table-cell table:style-name="Tableau16.A1" office:value-type="string">
              <text:p text:style-name="Table_20_Heading">Description:</text:p>
            </table:table-cell>
            <table:table-cell table:style-name="Tableau16.D1" office:value-type="string">
              <text:p text:style-name="Table_20_Heading">Default:</text:p>
            </table:table-cell>
          </table:table-row>
        </table:table-header-rows>
        <table:table-row>
          <table:table-cell table:style-name="Tableau16.A2" office:value-type="string">
            <text:p text:style-name="P2">marks</text:p>
          </table:table-cell>
          <table:table-cell table:style-name="Tableau16.B2" office:value-type="string">
            <text:p text:style-name="Table_20_Contents">array</text:p>
          </table:table-cell>
          <table:table-cell table:style-name="Tableau16.C2" office:value-type="string">
            <text:p text:style-name="Table_20_Contents">selbst definierte Marker</text:p>
          </table:table-cell>
          <table:table-cell table:style-name="Tableau16.D2" office:value-type="string">
            <text:p text:style-name="Table_20_Contents"/>
          </table:table-cell>
        </table:table-row>
        <text:soft-page-break/>
        <table:table-row>
          <table:table-cell table:style-name="Tableau16.A3" office:value-type="string">
            <text:p text:style-name="Table_20_Contents">markerFile<text:line-break/><text:span text:style-name="T10">Constants:</text:span><text:line-break/>file.markerFile</text:p>
          </table:table-cell>
          <table:table-cell table:style-name="Tableau16.B2" office:value-type="string">
            <text:p text:style-name="Table_20_Contents">resource / <text:span text:style-name="T10">array of string</text:span></text:p>
          </table:table-cell>
          <table:table-cell table:style-name="Tableau16.C3" office:value-type="string">
            <text:p text:style-name="Table_20_Contents">Die Marker Datei mit den Übersetzungen. </text:p>
            <text:p text:style-name="Table_20_Contents"/>
            <text:p text:style-name="P27">Beispiel: <text:span text:style-name="T41">(Setup)</text:span></text:p>
            <text:p text:style-name="Table_20_Contents_2f_PRE">plugin.tt_products.markerFile = EXT:tt_products/marker/de.locallang.xml</text:p>
          </table:table-cell>
          <table:table-cell table:style-name="Tableau16.D2" office:value-type="string">
            <text:p text:style-name="Table_20_Contents"/>
          </table:table-cell>
        </table:table-row>
      </table:table>
      <text:p text:style-name="Table_20_Contents"/>
      <text:h text:style-name="Heading_20_3" text:outline-level="3"><text:bookmark-start text:name="__RefHeading__17599_1782085564"/>Automatisches Erzeugen von Frontend Benutzern<text:bookmark-end text:name="__RefHeading__17599_1782085564"/></text:h>
      <text:p text:style-name="Text_20_body">Es ist möglich nach jeder Bestellung automatisch Frontend Benutzer anzulegen. Sie müssen "createUsers" auf "1" setzen, die PID des Sysfolder als PIDuserFolder im Setup Feld eintragen. Dann müssen Sie die memberOfGroup auf die ID <text:s/>Ihrer Frontend Benutzergruppe setzen. Nach der ersten Bestellung erhält der Kunde eine E-Mail mit seinen Zugangsdaten. Diese E-Mail wird den Namen des Accounts enthalten, welcher ident mit der E-Mail Adresse ist, und sein automatisch erzeugtes Paßwort.</text:p>
      <text:p text:style-name="Text_20_body">Wenn Sie kein einzelnes Textfeld für die Adresse haben wollen, sondern eine für die Straßenbezeichnung und Hausnummer, und zusätzliche Felder für PLZ, Stadt und Land, dann müssen Sie die Template-Datei entsprechend anpassen. Wenn Sie static_info_tables installieren und “useStaticInfoCountry=1” setzen, dann wird das kleine Feld <text:s/>static_info_country der fe_users Tabelle anstelle des country Feldes verwendet. Das ist notwendig, wenn Sie eine Select Box zur Auswahl des Landes machen.</text:p>
      <text:p text:style-name="Text_20_body"/>
      <text:h text:style-name="Heading_20_3" text:outline-level="3"><text:bookmark-start text:name="__RefHeading__17601_1782085564"/>Produkt Eigenschaften:<text:bookmark-end text:name="__RefHeading__17601_1782085564"/></text:h>
      <text:p text:style-name="P32">Die Produkteigenschaften werden im Systemfolder für die jeweiligen Produkt im Backend eingegeben.</text:p>
      <text:p text:style-name="P32"><draw:frame draw:style-name="fr1" draw:name="Image1" text:anchor-type="paragraph" svg:x="0.171cm" svg:y="0.123cm" svg:width="11.628cm" svg:height="12.591cm" draw:z-index="58"><draw:image xlink:href="Pictures/1000000000000269000002F3004F8429.jpg" xlink:type="simple" xlink:show="embed" xlink:actuate="onLoad" draw:mime-type="image/jpeg"/></draw:frame>-</text:p>
      <text:h text:style-name="Heading_20_4" text:outline-level="4">Farbe, Größe, Zusätzliches und Staffelung</text:h>
      <text:p text:style-name="Text_20_body">Damit Sie Variationen von Produkten eingeben können, müssen Sie die Werte durch Strichpunkt getrennt eingeben. So müssen Sie für T-Shirts mit verschiedenen Farben und Größen "rot;grün;blau" als Variante 1 und "S;X;XL;XXL" als Variante 2 eingeben. Farbe (Variante 1) und Größe (Variante 2): geben Sie hier Werte mit den Titeln ein, die durch Strichpunkte 'colon ';' getrennt werden wie z.B.</text:p>
      <text:h text:style-name="Preformatted_20_Text" text:outline-level="5"><text:soft-page-break/>M;L;XL;XXL</text:h>
      <text:p text:style-name="Text_20_body"><text:s/>Ändern Sie das Template, damit das unterstützt wird:</text:p>
      <text:h text:style-name="Preformatted_20_Text" text:outline-level="5"><text:s text:c="2"/>&lt;!-- ###display_variant1### --&gt;</text:h>
      <text:h text:style-name="Preformatted_20_Text" text:outline-level="5"><text:s text:c="2"/>###GW2B### Color: ###GW2E### &lt;select style="font-size: 10px"</text:h>
      <text:h text:style-name="Preformatted_20_Text" text:outline-level="5"><text:s text:c="2"/>name="###FIELD_COLOR_NAME###" rows="1"&gt;###PRODUCT_COLOR###&lt;/select&gt;&lt;br&gt;</text:h>
      <text:h text:style-name="Preformatted_20_Text" text:outline-level="5"><text:s text:c="2"/>&lt;!-- ###display_variant1### --&gt;</text:h>
      <text:h text:style-name="Preformatted_20_Text" text:outline-level="5"><text:s text:c="2"/>&lt;!-- ###display_variant2### --&gt;</text:h>
      <text:h text:style-name="Preformatted_20_Text" text:outline-level="5"><text:s text:c="2"/>###GW2B### Size: ###GW2E### &lt; select style="font-size: 10px"</text:h>
      <text:h text:style-name="Preformatted_20_Text" text:outline-level="5"><text:s text:c="2"/>name="###FIELD_SIZE_NAME###" rows="1"&gt;###PRODUCT_SIZE###&lt;/select&gt;&lt;br&gt; &lt;!-- ###display_variant2### --&gt; </text:h>
      <text:p text:style-name="P32">Wenn Sie die Farben und Größen nicht auswählbar machen wollen, dann müssen Sie im Template Setup selectColor oder selectSize auf 0 setzen und im Template selbst die entsprechende <text:s/>###display_variant### <text:s/>entfernen. <text:s/>Sie können diese Marker jedoch zur Darstellung der Farben verwenden, auch wenn keine unterschiedlichen Farben gewählt werden können. (dann nur die Markierungen ###PRODUCT_COLOR### und ###PRODUCT_SIZE### verwenden). Denn im Setup wurden ja Farben und Größen auf 0 gesetzt.</text:p>
      <text:p text:style-name="P33">Der Feldname aller Felder in der Listenansicht und der Warenkorbansicht wird mit dem Marker ###FIELD_NAME### angesprochen. Dieser Marker wird intern im Shop durch einen Feldnamen ersetzt, damit das Fels ausgelesen und richtig zugeordnet werden kann.</text:p>
      <text:p text:style-name="P32"><text:span text:style-name="T6">Wenn Sie Produkte mit verschiedenen Farben, Größen und Staffelungen nach Mengen haben, dann müssen Sie im Bereich BASKET_TEMPLATE den Marker </text:span>###FIELD_NAME### durch den Marker<text:span text:style-name="T6"> ###FIELD_NAME_BASKET### ersetzen.</text:span></text:p>
      <text:p text:style-name="P32"/>
      <text:p text:style-name="P32">In der Listenansicht des Webmoduls können Sie nun die bereits vorhandenen Produkte um die Varianten, z.B. Farbe, ergänzen. Sie wählen dazu die Tabelle Produkt Artikel aus.</text:p>
      <text:p text:style-name="P37"/>
      <text:p text:style-name="P37"><draw:frame draw:style-name="fr1" draw:name="Image2" text:anchor-type="paragraph" svg:x="0.012cm" svg:y="0cm" svg:width="8.818cm" svg:height="13.711cm" draw:z-index="57"><draw:image xlink:href="Pictures/10000001000001C4000002D57327A2C9.png" xlink:type="simple" xlink:show="embed" xlink:actuate="onLoad" draw:mime-type="image/png"/></draw:frame></text:p>
      <text:p text:style-name="P37"/>
      <text:p text:style-name="P32">Sie müssen im Template Setup <text:span text:style-name="T2">useArticles=1 setzen, um die Artikeleigenschaften zu verwenden.</text:span></text:p>
      <text:p text:style-name="P34">Wenn Sie bereits Produkte angelegt haben, diesen bereits in Produkteigenschaften verschiedene Farben <text:soft-page-break/>zugeordnet haben, verfügen <text:s/>Sie jedoch nur über eine Artikelnummer und einen Preis etc. zu diesem Produkt. Sie benötigen jedoch für Produkte z. B. unterschiedlicher Farbe auch unterschiedliche Artikelnummern und vielleicht Preise etc. Diese Zurodnungen erfolgen in den Artikeleigenschaften (Webmodul, Liste, Produkte Artikel – Tabelle). Der Vorteil ist, dass Sie die “neuen” Produkte nicht <text:s/>neu anlegen müssen, sondern die Eigenschaften vererbt werden. Sie geben also nur noch die Farbe, neue Artikelnummer und evtl. neuen Preis ein. Alle anderen Angaben zum Produkt werden übernommen. <text:s/>Lassen Sie ein Feld leer, so wird der <text:s/>Feldinhalt aus den Produkte Eigenschaften übernommen. </text:p>
      <text:p text:style-name="P34">Es macht einen Unterschied, ob ein Produkt mit verschiedenen Farben oder Größen in der Produktliste oder im Warenkorb angezeigt wird. Normalerweise wird die Farbe und Größe eine Produktes über eine Auswahlbox ausgewählt. In der Produktliste wird die Anzahl für die erste Farbe/Größe angezeigt. Im Warenkorb jedoch werden die Produkte in allen Varianten einzeln aufgelistet. Die Listes der Produkte im Warenkorb und in der Auswahlseite sind also beinahe gleich, aber sie werden anders gehandhabt. Sie müssen selectSize und selectColor deaktivieren, wenn Sie keine Auswahlboxen in der Produktliste haben wollen.</text:p>
      <text:h text:style-name="Heading_20_4" text:outline-level="4">Gewicht, Sperrgut und Spezialanfertigung</text:h>
      <text:p text:style-name="P32">Jedes Produkt kann ein Gewicht haben und als Sperrgut deklariert werden (Ja/Nein). Das Gesamtgewicht der bestellten Artikel wird berechnet und kann in der Preisberechnung für die Versandkosten berücksichtigt werden.</text:p>
      <text:p text:style-name="Text_20_body">Wenn ein Produkt als Sperrgut markiert worden ist, dann wird bei dessen Anzeige eine Warnung als 'Sperrgut' angezeigt. ('bulkilyWarning' im Setup). Durch das Setzen von 'bulkilyAddition' im Setup können Sie zusätzliche Versandkosten für dieses Sperrgut dazuaddieren. Ein Spezialanfertigung beinhaltet keine weitere Funktionalität. Es wird nur eine Markierung (ähnlich wie bei BulkilyWarning) geschrieben. Sie können hier einen Link auf die E-Mail Seite setzen.</text:p>
      <text:p text:style-name="Text_20_body"><text:s/><text:span text:style-name="T4">Beispiel: </text:span></text:p>
      <text:h text:style-name="Preformatted_20_Text" text:outline-level="5">specialPreparation = special preparation is possible! &lt;A HREF="?id=999&amp;tt_products=###PRODUCT_ID###"&gt;Order here&lt;/A&gt;. </text:h>
      <text:h text:style-name="Heading_20_4" text:outline-level="4">Einfache Lagerverwaltung</text:h>
      <text:p text:style-name="Text_20_body"><text:s/>Das Feld inStock kann für eine Lagerverwaltung verwendet werden. Wenn "in stock" auf "0" gesetzt ist, wird der Artikel für die Benutzer nicht mehr sichtbar sein. Nach jeder Bestellung wird die Anzahl der bestellten Artikel von "in stock" abgezogen. </text:p>
      <text:p text:style-name="P32">Wenn ein neuer Artikel angelegt wird, wird dessen Wert standardmäßig auf '1' gesetzt. Wenn Sie 'alwaysInStock=1' gesetzt haben, dann werden diese Artikel immer verfügbar und sichtbar sein. Ansonsten wird die Anzahl der Artikel bei jeder Bestellung reduziert, auch auf negative Werte. Ein negativer Wert bedeutet, daß ein Produkt nun schleunigst beim Lieferanten bestellt werden muß.</text:p>
      <text:p text:style-name="P32">Sie können, um einzelne Artikel immer auf Lager zu halten, die entsprechende Checkbox ankreuzen. Dies gilt aber nur für den jeweiligen Artikel. Sie können die Einheiten der Waren auf dem Lager über "inStockPieces" setzen, wie z.B. "Stück". <text:s/>oder Bundle. Diese Mengeneinheit kann jedoch nur einmal gesetzt werden und gilt dann für alle Produkte.</text:p>
      <text:h text:style-name="Heading_20_4" text:outline-level="4">Mehrere Steuersätze</text:h>
      <text:p text:style-name="Text_20_body">Zu jedem Produkt können Sie den Steuersatz eingeben.</text:p>
      <text:p text:style-name="Text_20_body"/>
      <text:h text:style-name="Heading_20_4" text:outline-level="4">Löschen des Warenkorbes</text:h>
      <text:p text:style-name="Text_20_body">Um ein Löschfeld für ein Produkt anzugeben, muß folgendes im Template eingetragen werden:</text:p>
      <text:h text:style-name="Preformatted_20_Text" text:outline-level="5">&lt;input type="submit" value="löschen" onclick="this.form.###FIELD_NAME_BASKET###.value='0'"&gt;</text:h>
      <text:h text:style-name="Preformatted_20_Text" text:outline-level="5"/>
      <text:h text:style-name="Preformatted_20_Text" text:outline-level="5"/>
      <text:h text:style-name="Heading_20_2" text:outline-level="2"><text:bookmark-start text:name="__RefHeading__17603_1782085564"/>Konfiguration<text:bookmark-end text:name="__RefHeading__17603_1782085564"/></text:h>
      <text:h text:style-name="Heading_20_3" text:outline-level="3"><text:bookmark-start text:name="__RefHeading__17605_1782085564"/>FAQ<text:bookmark-end text:name="__RefHeading__17605_1782085564"/></text:h>
      <text:list text:style-name="L19">
        <text:list-item>
          <text:p text:style-name="P81">Wenn Sie nicht über den Constants Editor arbeiten, beachten Sie die korrekte Form, die Sie in den Constants eintragen müssen:</text:p>
          <text:h text:style-name="P78" text:outline-level="5">plugin.tt_products { <text:line-break/> <text:s text:c="4"/>property = value <text:line-break/>}</text:h>
        </text:list-item>
      </text:list>
      <text:h text:style-name="Heading_20_3" text:outline-level="3"><text:bookmark-start text:name="__RefHeading__17607_1782085564"/>Dateien<text:bookmark-end text:name="__RefHeading__17607_1782085564"/></text:h>
      <table:table table:name="Tableau1" table:style-name="Tableau1">
        <table:table-column table:style-name="Tableau1.A"/>
        <table:table-column table:style-name="Tableau1.B"/>
        <table:table-header-rows>
          <table:table-row>
            <table:table-cell table:style-name="Tableau1.A1" office:value-type="string">
              <text:p text:style-name="Table_20_Heading">Datei:</text:p>
            </table:table-cell>
            <table:table-cell table:style-name="Tableau1.B1" office:value-type="string">
              <text:p text:style-name="Table_20_Heading">Beschreibung:</text:p>
            </table:table-cell>
          </table:table-row>
        </table:table-header-rows>
        <table:table-row>
          <table:table-cell table:style-name="Tableau1.A2" office:value-type="string">
            <text:p text:style-name="Table_20_Contents">class.tx_ttproducts.php</text:p>
          </table:table-cell>
          <table:table-cell table:style-name="Tableau1.B2" office:value-type="string">
            <text:p text:style-name="Table_20_Contents">Haupklasse zur Darstellung der Produktliste oder des Warenkorbs.</text:p>
            <text:p text:style-name="Table_20_Contents">Rufen Sie es von einem USER cObject über 'userFunc = user_products-&gt;main_products' auf.</text:p>
          </table:table-cell>
        </table:table-row>
        <table:table-row>
          <table:table-cell table:style-name="Tableau1.A2" office:value-type="string">
            <text:p text:style-name="Table_20_Contents">products_comp_calcScript.inc</text:p>
          </table:table-cell>
          <table:table-cell table:style-name="Tableau1.B2" office:value-type="string">
            <text:p text:style-name="Table_20_Contents">Beispiel Berechnungsskript</text:p>
          </table:table-cell>
        </table:table-row>
        <table:table-row>
          <table:table-cell table:style-name="Tableau1.A2" office:value-type="string">
            <text:p text:style-name="Table_20_Contents">products_template.tmpl</text:p>
            <text:p text:style-name="Table_20_Contents">products_template_htmlmail.tmpl</text:p>
          </table:table-cell>
          <table:table-cell table:style-name="Tableau1.B2" office:value-type="string">
            <text:p text:style-name="Table_20_Contents">Beispiel Templates auf Englisch.</text:p>
            <text:p text:style-name="Table_20_Contents">'.._htmlmail.tmpl' ist ein HTML-wrap für the versendeten HTML-E-Mails</text:p>
          </table:table-cell>
        </table:table-row>
        <table:table-row>
          <table:table-cell table:style-name="Tableau1.A2" office:value-type="string">
            <text:p text:style-name="Table_20_Contents">example_template_bill_de.tmpl</text:p>
          </table:table-cell>
          <table:table-cell table:style-name="Tableau1.B2" office:value-type="string">
            <text:p text:style-name="Table_20_Contents">bananaguard.de Template mit Beispielen für Rechnung und Lieferschein auf Deutsch</text:p>
          </table:table-cell>
        </table:table-row>
        <table:table-row>
          <table:table-cell table:style-name="Tableau1.A2" office:value-type="string">
            <text:p text:style-name="Table_20_Contents">product_detail.tmpl<text:line-break/>product_proefpakketten.tmpl<text:line-break/>shop-a-box.tmpl<text:line-break/>producten.tmpl</text:p>
          </table:table-cell>
          <table:table-cell table:style-name="Tableau1.B2" office:value-type="string">
            <text:p text:style-name="Table_20_Contents">Beispiel Templates für Gutscheinpunkte-System und Freundschaftswerbung auf Holländisch</text:p>
          </table:table-cell>
        </table:table-row>
        <table:table-row>
          <table:table-cell table:style-name="Tableau1.A2" office:value-type="string">
            <text:p text:style-name="Table_20_Contents">products_css_en.html</text:p>
          </table:table-cell>
          <table:table-cell table:style-name="Tableau1.B2" office:value-type="string">
            <text:p text:style-name="Table_20_Contents">CSS basierte Template. Verwenden Sie das, wenn Sie ein barrierefreies Shop erstellen wollen.</text:p>
          </table:table-cell>
        </table:table-row>
      </table:table>
      <text:p text:style-name="Text_20_body">[tsref:(cObject).TEST]</text:p>
      <text:h text:style-name="Heading_20_3" text:outline-level="3"><text:bookmark-start text:name="__RefHeading__17609_1782085564"/>Beschreibung<text:bookmark-end text:name="__RefHeading__17609_1782085564"/></text:h>
      <text:p text:style-name="Text_20_body">Eingebauter Warenkorb und Produktanzeige unter TYPO3. Es beinhaltet eine freie Schnittstelle, mit der Sie Zugriff auf Ihre eigene Implementierung eines Bezahlsystems haben können. </text:p>
      <text:p text:style-name="Text_20_body">Im Moment gibt es eine Implementierung für DIBS in Dänemark, unter <text:a xlink:type="simple" xlink:href="http://www.architrade.dk/" text:style-name="Internet_20_link" text:visited-style-name="Visited_20_Internet_20_Link">www.architrade.dk</text:a>.</text:p>
      <text:h text:style-name="Heading_20_2" text:outline-level="2"><text:bookmark-start text:name="__RefHeading__17611_1782085564"/>Referenz<text:bookmark-end text:name="__RefHeading__17611_1782085564"/></text:h>
      <text:h text:style-name="Heading_20_3" text:outline-level="3"><text:bookmark-start text:name="__RefHeading__17613_1782085564"/>class.tx_ttproducts.php properties<text:bookmark-end text:name="__RefHeading__17613_1782085564"/></text:h>
      <table:table table:name="Code" table:style-name="Code">
        <table:table-column table:style-name="Code.A"/>
        <table:table-column table:style-name="Code.B"/>
        <table:table-column table:style-name="Code.C"/>
        <table:table-column table:style-name="Code.D"/>
        <table:table-header-rows>
          <table:table-row>
            <table:table-cell table:style-name="Code.A1" office:value-type="string">
              <text:p text:style-name="Table_20_Heading">Eigenschaft:</text:p>
            </table:table-cell>
            <table:table-cell table:style-name="Code.B1" office:value-type="string">
              <text:p text:style-name="Table_20_Heading">Datentyp:</text:p>
            </table:table-cell>
            <table:table-cell table:style-name="Code.A1" office:value-type="string">
              <text:p text:style-name="Table_20_Heading">Beschreibung:</text:p>
            </table:table-cell>
            <table:table-cell table:style-name="Code.D1" office:value-type="string">
              <text:p text:style-name="Table_20_Heading">Voreinstellung:</text:p>
            </table:table-cell>
          </table:table-row>
        </table:table-header-rows>
        <table:table-row>
          <table:table-cell table:style-name="Code.A2" office:value-type="string">
            <text:p text:style-name="Table_20_Contents">templateFile<text:line-break/><text:span text:style-name="T10">Constants:</text:span><text:line-break/>file.templateFile</text:p>
          </table:table-cell>
          <table:table-cell table:style-name="Code.B2" office:value-type="string">
            <text:p text:style-name="Table_20_Contents">resource / <text:span text:style-name="T10">array of string</text:span></text:p>
          </table:table-cell>
          <table:table-cell table:style-name="Code.C2" office:value-type="string">
            <text:p text:style-name="Table_20_Contents">Die Template Datei. </text:p>
            <text:p text:style-name="Table_20_Contents">Siehe Beispiel in 'tt_products/template/products_template.tmpl'<text:line-break/>Es kann auch ein CODE Feld mit angegeben werden oder ERROR im Fehlerfall.</text:p>
            <text:p text:style-name="Table_20_Contents">(siehe Anzeigetyp)</text:p>
            <text:p text:style-name="P27">Beispiel:</text:p>
            <text:p text:style-name="Table_20_Contents_2f_PRE">plugin.tt_products.templateFile = EXT:tt_products/template/example_template_bill_de.tmpl</text:p>
            <text:p text:style-name="Table_20_Contents_2f_PRE">plugin.tt_products.templateFile.LIST = EXT:tt_products/template/products_template_dk.tmpl</text:p>
          </table:table-cell>
          <table:table-cell table:style-name="Code.D2" office:value-type="string">
            <text:p text:style-name="Table_20_Contents"/>
          </table:table-cell>
        </table:table-row>
        <table:table-row>
          <table:table-cell table:style-name="Code.A3" office:value-type="string">
            <text:p text:style-name="Table_20_Contents">templateSuffix - <text:span text:style-name="T10">Setup</text:span></text:p>
          </table:table-cell>
          <table:table-cell table:style-name="Code.B2" office:value-type="string">
            <text:p text:style-name="Table_20_Contents">string</text:p>
          </table:table-cell>
          <table:table-cell table:style-name="Code.C3" office:value-type="string">
            <text:p text:style-name="Table_20_Contents">Dieses Suffix wird an alle übergeordneten Template Subparts angehängt.</text:p>
          </table:table-cell>
          <table:table-cell table:style-name="Code.D2" office:value-type="string">
            <text:p text:style-name="Table_20_Contents"/>
          </table:table-cell>
        </table:table-row>
        <table:table-row>
          <table:table-cell table:style-name="Code.A4" office:value-type="string">
            <text:p text:style-name="Table_20_Contents">fe</text:p>
          </table:table-cell>
          <table:table-cell table:style-name="Code.B2" office:value-type="string">
            <text:p text:style-name="Table_20_Contents">boolean</text:p>
          </table:table-cell>
          <table:table-cell table:style-name="Code.C4" office:value-type="string">
            <text:p text:style-name="Table_20_Contents">Schalter, ob FE Ausgabe vewendet wird. Die FE Ausgabe kann abgeschalten werden. Das ist für aufgerufene Skripte sinnvoll <text:s/>(siehe CODE SCRIPT). In diesem Fall wird keine Template Datei benötigt.</text:p>
          </table:table-cell>
          <table:table-cell table:style-name="Code.D4" office:value-type="string">
            <text:p text:style-name="Table_20_Contents">TRUE</text:p>
          </table:table-cell>
        </table:table-row>
        <table:table-row>
          <table:table-cell table:style-name="Code.A5" office:value-type="string">
            <text:p text:style-name="Table_20_Contents">pid_list</text:p>
          </table:table-cell>
          <table:table-cell table:style-name="Code.B2" office:value-type="string">
            <text:p text:style-name="Table_20_Contents">string /stdWrap</text:p>
          </table:table-cell>
          <table:table-cell table:style-name="Code.C5" office:value-type="string">
            <text:p text:style-name="Table_20_Contents">Die pids, aus welchen die Kategorien, Produkte und so weiter gelesen werden. Standard ist die aktuelle Seite. Hier können mehrere pids durch Beistrich getrennt eingegeben werden.</text:p>
          </table:table-cell>
          <table:table-cell table:style-name="Code.D2" office:value-type="string">
            <text:p text:style-name="Table_20_Contents"/>
          </table:table-cell>
        </table:table-row>
        <table:table-row>
          <table:table-cell table:style-name="Code.A6" office:value-type="string">
            <text:p text:style-name="Table_20_Contents">defaultCode</text:p>
          </table:table-cell>
          <table:table-cell table:style-name="Code.B2" office:value-type="string">
            <text:p text:style-name="Table_20_Contents">string</text:p>
          </table:table-cell>
          <table:table-cell table:style-name="Code.C6" office:value-type="string">
            <text:p text:style-name="P31">Der Standard Code, wenn keiner für das Plugn eingetragen ist (siehe unten). Normalerweise wird das nicht gesetzt und ein Hilfe-Bildschirm wird angezeigt.</text:p>
            <text:p text:style-name="P31"/>
            <text:p text:style-name="P27">Beispiel:</text:p>
            <text:p text:style-name="Table_20_Contents_2f_PRE">plugin.tt_products.defaultCode = HELP</text:p>
          </table:table-cell>
          <table:table-cell table:style-name="Code.D2" office:value-type="string">
            <text:p text:style-name="Table_20_Contents"/>
          </table:table-cell>
        </table:table-row>
        <table:table-row>
          <table:table-cell table:style-name="Code.A7" office:value-type="string">
            <text:p text:style-name="Table_20_Contents">code</text:p>
          </table:table-cell>
          <table:table-cell table:style-name="Code.B2" office:value-type="string">
            <text:p text:style-name="Table_20_Contents">string /stdWrap</text:p>
          </table:table-cell>
          <table:table-cell table:style-name="Code.C7" office:value-type="string">
            <text:p text:style-name="P51">siehe Kapitel Anzeigetyp</text:p>
          </table:table-cell>
          <table:table-cell table:style-name="Code.D7" office:value-type="string">
            <text:p text:style-name="Table_20_Contents">HELP</text:p>
          </table:table-cell>
        </table:table-row>
        <table:table-row>
          <table:table-cell table:style-name="Code.A8" office:value-type="string">
            <text:p text:style-name="Table_20_Contents">defaultArticleID</text:p>
          </table:table-cell>
          <table:table-cell table:style-name="Code.B2" office:value-type="string">
            <text:p text:style-name="Table_20_Contents">int+</text:p>
          </table:table-cell>
          <table:table-cell table:style-name="Code.C8" office:value-type="string">
            <text:p text:style-name="P48">Die standardmäßige Artikel Id für die Einzelansicht wird angezeigt, wenn der Link auf das Skript keinen Parameter 'tt_products[article]' gehabt hat.</text:p>
          </table:table-cell>
          <table:table-cell table:style-name="Code.D2" office:value-type="string">
            <text:p text:style-name="Table_20_Contents"/>
          </table:table-cell>
        </table:table-row>
        <table:table-row>
          <table:table-cell table:style-name="Code.A9" office:value-type="string">
            <text:p text:style-name="Table_20_Contents">defaultProductID</text:p>
          </table:table-cell>
          <table:table-cell table:style-name="Code.B2" office:value-type="string">
            <text:p text:style-name="Table_20_Contents">int+</text:p>
          </table:table-cell>
          <table:table-cell table:style-name="Code.C9" office:value-type="string">
            <text:p text:style-name="P48">Die standardmäßige Produkt Id für die Einzelansicht wird angezeigt, wenn der Link auf das Skript keinen Parameter 'tt_products[product]' gehabt hat.</text:p>
            <text:p text:style-name="P48">Setzen Sie diesen Standard-Wert, wenn Sie eine Fehlermeldung wie <text:line-break/>“<text:span text:style-name="T12">Falscher Parameter, GET/POST var 'tt_products[product]' wurde nicht angegeben</text:span>” erhalten.</text:p>
          </table:table-cell>
          <table:table-cell table:style-name="Code.D2" office:value-type="string">
            <text:p text:style-name="Table_20_Contents"/>
          </table:table-cell>
        </table:table-row>
        <table:table-row>
          <table:table-cell table:style-name="Code.A10" office:value-type="string">
            <text:p text:style-name="Table_20_Contents">defaultCategoryID</text:p>
          </table:table-cell>
          <table:table-cell table:style-name="Code.B2" office:value-type="string">
            <text:p text:style-name="Table_20_Contents">int+</text:p>
          </table:table-cell>
          <table:table-cell table:style-name="Code.C10" office:value-type="string">
            <text:p text:style-name="P31">Die standardmäßige Kategorie Id für die Listenansicht wird verwendet, wenn der Link auf das Skript keinen Parameter 'tt_products[cat]' gehabt hat. Verwenden Sie das, wenn Sie standardmäßig nur Produkte dieser Kategorie in der Listenansicht angezeigt haben wollen.</text:p>
          </table:table-cell>
          <table:table-cell table:style-name="Code.D2" office:value-type="string">
            <text:p text:style-name="Table_20_Contents"/>
          </table:table-cell>
        </table:table-row>
        <table:table-row>
          <table:table-cell table:style-name="Code.A11" office:value-type="string">
            <text:p text:style-name="Table_20_Contents">defaultPageID</text:p>
          </table:table-cell>
          <table:table-cell table:style-name="Code.B2" office:value-type="string">
            <text:p text:style-name="Table_20_Contents">int+</text:p>
          </table:table-cell>
          <table:table-cell table:style-name="Code.C11" office:value-type="string">
            <text:p text:style-name="P31">Die standardmäßige Kategorie Id für die Listenansicht wird verwendet, wenn der Link auf das Skript keinen Parameter 'tt_products[pid]' gehabt hat. Verwenden Sie das, wenn Sie bei Seiten als Kategorien standardmäßig nur Produkte dieser Kategorie in der Listenansicht angezeigt haben wollen.</text:p>
          </table:table-cell>
          <table:table-cell table:style-name="Code.D2" office:value-type="string">
            <text:p text:style-name="Table_20_Contents"/>
          </table:table-cell>
        </table:table-row>
        <table:table-row>
          <table:table-cell table:style-name="Code.A12" office:value-type="string">
            <text:p text:style-name="Table_20_Contents">defaultDAMCategoryID</text:p>
          </table:table-cell>
          <table:table-cell table:style-name="Code.B2" office:value-type="string">
            <text:p text:style-name="Table_20_Contents">int+</text:p>
          </table:table-cell>
          <table:table-cell table:style-name="Code.C12" office:value-type="string">
            <text:p text:style-name="P17">Siehe defaultCategoryID, aber für DAM Kategorien und den 'tt_products[damcat]' Parameter.</text:p>
          </table:table-cell>
          <table:table-cell table:style-name="Code.D2" office:value-type="string">
            <text:p text:style-name="Table_20_Contents"/>
          </table:table-cell>
        </table:table-row>
        <table:table-row>
          <table:table-cell table:style-name="Code.A13" office:value-type="string">
            <text:p text:style-name="Table_20_Contents">productDAMCategoryID</text:p>
          </table:table-cell>
          <table:table-cell table:style-name="Code.B2" office:value-type="string">
            <text:p text:style-name="Table_20_Contents">int+</text:p>
          </table:table-cell>
          <table:table-cell table:style-name="Code.C13" office:value-type="string">
            <text:p text:style-name="P31">DAM category of products to be used in DAM lists.</text:p>
          </table:table-cell>
          <table:table-cell table:style-name="Code.D2" office:value-type="string">
            <text:p text:style-name="Table_20_Contents"/>
          </table:table-cell>
        </table:table-row>
        <table:table-row>
          <table:table-cell table:style-name="Code.A14" office:value-type="string">
            <text:p text:style-name="Table_20_Contents">rootAddressID</text:p>
          </table:table-cell>
          <table:table-cell table:style-name="Code.B2" office:value-type="string">
            <text:p text:style-name="Table_20_Contents">int+</text:p>
          </table:table-cell>
          <table:table-cell table:style-name="Code.C14" office:value-type="string">
            <text:p text:style-name="P31">Die oberste Adressen ID, die in einer Adressenliste angezeigt wird.</text:p>
          </table:table-cell>
          <table:table-cell table:style-name="Code.D2" office:value-type="string">
            <text:p text:style-name="Table_20_Contents"/>
          </table:table-cell>
        </table:table-row>
        <table:table-row>
          <table:table-cell table:style-name="Code.A15" office:value-type="string">
            <text:p text:style-name="Table_20_Contents">rootCategoryID</text:p>
          </table:table-cell>
          <table:table-cell table:style-name="Code.B2" office:value-type="string">
            <text:p text:style-name="Table_20_Contents">int+</text:p>
          </table:table-cell>
          <table:table-cell table:style-name="Code.C15" office:value-type="string">
            <text:p text:style-name="P31">Die oberste Kategorie ID, die in einer Kategorieliste angezeigt wird.</text:p>
          </table:table-cell>
          <table:table-cell table:style-name="Code.D2" office:value-type="string">
            <text:p text:style-name="Table_20_Contents"/>
          </table:table-cell>
        </table:table-row>
        <table:table-row>
          <table:table-cell table:style-name="Code.A16" office:value-type="string">
            <text:p text:style-name="Table_20_Contents">rootDAMCategoryID</text:p>
          </table:table-cell>
          <table:table-cell table:style-name="Code.B2" office:value-type="string">
            <text:p text:style-name="Table_20_Contents">int+</text:p>
          </table:table-cell>
          <table:table-cell table:style-name="Code.C16" office:value-type="string">
            <text:p text:style-name="P31">Die oberste DAM Kategorie ID, die in einer DAM Kategorieliste angezeigt wird.</text:p>
          </table:table-cell>
          <table:table-cell table:style-name="Code.D2" office:value-type="string">
            <text:p text:style-name="Table_20_Contents"/>
          </table:table-cell>
        </table:table-row>
        <table:table-row>
          <table:table-cell table:style-name="Code.A17" office:value-type="string">
            <text:p text:style-name="Table_20_Contents">rootPageID</text:p>
          </table:table-cell>
          <table:table-cell table:style-name="Code.B2" office:value-type="string">
            <text:p text:style-name="Table_20_Contents">int+</text:p>
          </table:table-cell>
          <table:table-cell table:style-name="Code.C17" office:value-type="string">
            <text:p text:style-name="P31">Die oberste Seiten ID von welcher diese als Kategorien gelistet werden.</text:p>
          </table:table-cell>
          <table:table-cell table:style-name="Code.D2" office:value-type="string">
            <text:p text:style-name="Table_20_Contents"/>
          </table:table-cell>
        </table:table-row>
        <table:table-row>
          <table:table-cell table:style-name="Code.A18" office:value-type="string">
            <text:p text:style-name="Table_20_Contents">recursive</text:p>
          </table:table-cell>
          <table:table-cell table:style-name="Code.B2" office:value-type="string">
            <text:p text:style-name="Table_20_Contents">int+</text:p>
          </table:table-cell>
          <table:table-cell table:style-name="Code.C18" office:value-type="string">
            <text:p text:style-name="P31">Anzahl der rekursiven Ebenen für die Listenanzeige von Produkten</text:p>
          </table:table-cell>
          <table:table-cell table:style-name="Code.D2" office:value-type="string">
            <text:p text:style-name="Table_20_Contents"/>
          </table:table-cell>
        </table:table-row>
        <text:soft-page-break/>
        <table:table-row>
          <table:table-cell table:style-name="Code.A19" office:value-type="string">
            <text:p text:style-name="Table_20_Contents">domain</text:p>
          </table:table-cell>
          <table:table-cell table:style-name="Code.B2" office:value-type="string">
            <text:p text:style-name="Table_20_Contents">string</text:p>
          </table:table-cell>
          <table:table-cell table:style-name="Code.C19" office:value-type="string">
            <text:p text:style-name="Table_20_Contents">Die Url des Geschäfts. Wenn sie nicht gesetzt ist, wird sie automatisch erkannt. Damit werden die ###DOMAIN### Markierungen ersetzt.</text:p>
          </table:table-cell>
          <table:table-cell table:style-name="Code.D2" office:value-type="string">
            <text:p text:style-name="Table_20_Contents"/>
          </table:table-cell>
        </table:table-row>
        <table:table-row>
          <table:table-cell table:style-name="Code.A20" office:value-type="string">
            <text:p text:style-name="Table_20_Contents">altMainMarkers</text:p>
          </table:table-cell>
          <table:table-cell table:style-name="Code.B2" office:value-type="string">
            <text:p text:style-name="P53">(array von strings)</text:p>
          </table:table-cell>
          <table:table-cell table:style-name="Code.C20" office:value-type="string">
            <text:p text:style-name="Table_20_Contents">Spezifizierung von alternativen Unter-Markierungen. Für die verschiedenen Haupt Template Designs des Shop Systems.</text:p>
            <text:p text:style-name="P31">Diese Liste an Unter-Markierungen können Sie überschreiben:<text:line-break/></text:p>
            <text:p text:style-name="Table_20_Contents_2f_PRE">TRACKING_WRONG_NUMBER</text:p>
            <text:p text:style-name="Table_20_Contents_2f_PRE">TRACKING_ENTER_NUMBER</text:p>
            <text:p text:style-name="Table_20_Contents_2f_PRE">BASKET_REQUIRED_INFO_MISSING</text:p>
            <text:p text:style-name="Table_20_Contents_2f_PRE">BASKET_TEMP</text:p>
            <text:p text:style-name="Table_20_Contents_2f_PRE">ITEM_SINGLE_DISPLAY_RECORDINSERT</text:p>
            <text:p text:style-name="Table_20_Contents_2f_PRE">ITEM_SINGLE_DISPLAY</text:p>
            <text:p text:style-name="Table_20_Contents_2f_PRE">ITEM_SEARCH</text:p>
            <text:p text:style-name="Table_20_Contents_2f_PRE">ITEM_LIST_TEMPLATE</text:p>
            <text:p text:style-name="Table_20_Contents_2f_PRE">ITEM_LIST_GIFTS_TEMPLATE</text:p>
            <text:p text:style-name="Table_20_Contents_2f_PRE">ITEM_SEARCH_EMPTY</text:p>
            <text:p text:style-name="Table_20_Contents_2f_PRE">BASKET_TEMPLATE</text:p>
            <text:p text:style-name="Table_20_Contents_2f_PRE">BASKET_INFO_TEMPLATE</text:p>
            <text:p text:style-name="Table_20_Contents_2f_PRE">BASKET_PAYMENT_TEMPLATE</text:p>
            <text:p text:style-name="Table_20_Contents_2f_PRE">BASKET_ORDERCONFIRMATION_TEMPLATE</text:p>
            <text:p text:style-name="Table_20_Contents_2f_PRE">E-Mail_PLAINTEXT_TEMPLATE</text:p>
            <text:p text:style-name="Table_20_Contents_2f_PRE">BILL_TEMPLATE</text:p>
            <text:p text:style-name="Table_20_Contents_2f_PRE">DELIVERY_TEMPLATE</text:p>
            <text:p text:style-name="Table_20_Contents_2f_PRE"/>
            <text:p text:style-name="P27">Beispiel:</text:p>
            <text:p text:style-name="Table_20_Contents_2f_PRE">altMainMarkers.BASKET_TEMPLATE = <text:s/>BASKET_DESIGN2</text:p>
            <text:p text:style-name="Table_20_Contents_2f_PRE">altMainMarkers.BASKET_TEMPLATE.wrap = ### | ###</text:p>
            <text:p text:style-name="Table_20_Contents_2f_PRE"/>
            <text:p text:style-name="Table_20_Contents">Dieses Beispiel ändert die Haupt Markierungen der regulären Warenkorb Anzeige vom standardmäßigen ###BASKET_TEMPLATE### in das benutzerdefinierte Design ###BASKET_DESIGN2### (in derselben HTML-Template Datei)</text:p>
          </table:table-cell>
          <table:table-cell table:style-name="Code.D2" office:value-type="string">
            <text:p text:style-name="Table_20_Contents"/>
          </table:table-cell>
        </table:table-row>
        <table:table-row>
          <table:table-cell table:style-name="Code.A21" office:value-type="string">
            <text:p text:style-name="Table_20_Contents">stdSearchFieldExt</text:p>
          </table:table-cell>
          <table:table-cell table:style-name="Code.B2" office:value-type="string">
            <text:p text:style-name="P53">list of fields</text:p>
          </table:table-cell>
          <table:table-cell table:style-name="Code.C21" office:value-type="string">
            <text:p text:style-name="Table_20_Contents">Standard Suchfelder</text:p>
            <text:p text:style-name="Table_20_Contents">Die standardmäßige interne Liste ist title,subtitle,note. Hier können Sie Ihre eigenen Suchfelder angeben.</text:p>
          </table:table-cell>
          <table:table-cell table:style-name="Code.D2" office:value-type="string">
            <text:p text:style-name="Table_20_Contents"/>
          </table:table-cell>
        </table:table-row>
        <table:table-row>
          <table:table-cell table:style-name="Code.A22" office:value-type="string">
            <text:p text:style-name="Table_20_Contents">limit</text:p>
          </table:table-cell>
          <table:table-cell table:style-name="Code.B2" office:value-type="string">
            <text:p text:style-name="P2">int+</text:p>
          </table:table-cell>
          <table:table-cell table:style-name="Code.C22" office:value-type="string">
            <text:p text:style-name="Table_20_Contents">Max. Anzahl an angezeigten Produkten. Nicht mehr Produkte werden pro Seite angezeigt.</text:p>
          </table:table-cell>
          <table:table-cell table:style-name="Code.D22" office:value-type="string">
            <text:p text:style-name="Table_20_Contents">50</text:p>
          </table:table-cell>
        </table:table-row>
        <table:table-row>
          <table:table-cell table:style-name="Code.A23" office:value-type="string">
            <text:p text:style-name="P58">limitImage</text:p>
          </table:table-cell>
          <table:table-cell table:style-name="Code.B2" office:value-type="string">
            <text:p text:style-name="P2">int+</text:p>
          </table:table-cell>
          <table:table-cell table:style-name="Code.C23" office:value-type="string">
            <text:p text:style-name="Table_20_Contents">Max. Anzahl an Bildern. Die maximale Anzahl an Bildern die für ein Produkt in der Listenansicht angezeigt wird.</text:p>
            <text:p text:style-name="Table_20_Contents"><text:span text:style-name="T4">Veraltet. </text:span>Siehe Konfiguration der Artikel/Produkte</text:p>
            <text:p text:style-name="Table_20_Contents">Verwenden Sie stattdessen:</text:p>
            <text:h text:style-name="Preformatted_20_Text" text:outline-level="5">plugin.tt_products.conf.tt_products.ALL.limitImage = 1</text:h>
          </table:table-cell>
          <table:table-cell table:style-name="Code.D23" office:value-type="string">
            <text:p text:style-name="Table_20_Contents">3</text:p>
          </table:table-cell>
        </table:table-row>
        <table:table-row>
          <table:table-cell table:style-name="Code.A24" office:value-type="string">
            <text:p text:style-name="P58">limitImageSingle</text:p>
          </table:table-cell>
          <table:table-cell table:style-name="Code.B2" office:value-type="string">
            <text:p text:style-name="P2">int+</text:p>
          </table:table-cell>
          <table:table-cell table:style-name="Code.C24" office:value-type="string">
            <text:p text:style-name="Table_20_Contents">Die maximale Anzahl an Bildern die für ein Produkt in der Einzelansicht angezeigt wird.</text:p>
            <text:p text:style-name="Table_20_Contents"><text:span text:style-name="T4">Veraltet. </text:span>Siehe Konfiguration der Artikel/Produkte</text:p>
            <text:p text:style-name="Table_20_Contents">Verwenden Sie stattdessen:</text:p>
            <text:h text:style-name="Preformatted_20_Text" text:outline-level="5">plugin.tt_products.conf.tt_products.SINGLE.limitImage = 1</text:h>
          </table:table-cell>
          <table:table-cell table:style-name="Code.D24" office:value-type="string">
            <text:p text:style-name="Table_20_Contents">10</text:p>
          </table:table-cell>
        </table:table-row>
        <table:table-row>
          <table:table-cell table:style-name="Code.A25" office:value-type="string">
            <text:p text:style-name="P58">usePageContentImage</text:p>
          </table:table-cell>
          <table:table-cell table:style-name="Code.B2" office:value-type="string">
            <text:p text:style-name="P59">boolean</text:p>
          </table:table-cell>
          <table:table-cell table:style-name="Code.C25" office:value-type="string">
            <text:p text:style-name="Table_20_Contents"><text:span text:style-name="T4">Veraltet.</text:span> Siehe Konfiguration der Artikel/Produkte</text:p>
            <text:p text:style-name="Table_20_Contents">Verwenden Sie stattdessen:</text:p>
            <text:h text:style-name="Preformatted_20_Text" text:outline-level="5">plugin.tt_products.conf.tt_products.ALL.fetchImage {</text:h>
            <text:p text:style-name="Table_20_Contents_2f_PRE"><text:s text:c="4"/>type = foreigntable</text:p>
            <text:p text:style-name="Table_20_Contents_2f_PRE"><text:s text:c="4"/>table = tt_content</text:p>
            <text:p text:style-name="Table_20_Contents_2f_PRE">}</text:p>
          </table:table-cell>
          <table:table-cell table:style-name="Code.D2" office:value-type="string">
            <text:p text:style-name="Table_20_Contents"/>
          </table:table-cell>
        </table:table-row>
        <table:table-row>
          <table:table-cell table:style-name="Code.A26" office:value-type="string">
            <text:p text:style-name="Table_20_Contents">separateImage</text:p>
          </table:table-cell>
          <table:table-cell table:style-name="Code.B2" office:value-type="string">
            <text:p text:style-name="P2">boolean</text:p>
          </table:table-cell>
          <table:table-cell table:style-name="Code.C26" office:value-type="string">
            <text:p text:style-name="Table_20_Contents">Normalerweise werden alle Bilder zusammen angezeigt. Mit separateImage=on kann eine Markierung ###PRODUCT_IMAGE3### für jedes einzelne Bild angegeben werden. Die Zählung beginnt bei 1.</text:p>
          </table:table-cell>
          <table:table-cell table:style-name="Code.D2" office:value-type="string">
            <text:p text:style-name="Table_20_Contents"/>
          </table:table-cell>
        </table:table-row>
        <table:table-row>
          <table:table-cell table:style-name="Code.A27" office:value-type="string">
            <text:p text:style-name="Table_20_Contents">image</text:p>
          </table:table-cell>
          <table:table-cell table:style-name="Code.B2" office:value-type="string">
            <text:p text:style-name="Table_20_Contents">IMAGE cObject</text:p>
          </table:table-cell>
          <table:table-cell table:style-name="Code.C27" office:value-type="string">
            <text:p text:style-name="Table_20_Contents">Die Bild Konfiguration für die Einzelansicht</text:p>
          </table:table-cell>
          <table:table-cell table:style-name="Code.D2" office:value-type="string">
            <text:p text:style-name="Table_20_Contents"/>
          </table:table-cell>
        </table:table-row>
        <text:soft-page-break/>
        <table:table-row>
          <table:table-cell table:style-name="Code.A28" office:value-type="string">
            <text:p text:style-name="Table_20_Contents">listImage</text:p>
          </table:table-cell>
          <table:table-cell table:style-name="Code.B2" office:value-type="string">
            <text:p text:style-name="P2">IMAGE cObject</text:p>
          </table:table-cell>
          <table:table-cell table:style-name="Code.C28" office:value-type="string">
            <text:p text:style-name="Table_20_Contents">Die Bild Konfiguration für die Listenansicht</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Auf diese Art werden die Bilder nicht in das Verzeichnis <text:span text:style-name="T9">/typo3temp/</text:span> kopiert und von dort angezeigt. (Das bereitet Schwierigkeiten mit transparenten Hintergründen), sondern direkt von /uploads/pics/.</text:p>
            <text:p text:style-name="Table_20_Contents">Die Zeile mit 'altText' bewirkt, dass der Titel als alternativer Text angezeigt wird.</text:p>
          </table:table-cell>
          <table:table-cell table:style-name="Code.D2" office:value-type="string">
            <text:p text:style-name="Table_20_Contents"/>
          </table:table-cell>
        </table:table-row>
        <table:table-row>
          <table:table-cell table:style-name="Code.A29" office:value-type="string">
            <text:p text:style-name="Table_20_Contents">listImageHasChilds</text:p>
          </table:table-cell>
          <table:table-cell table:style-name="Code.B2" office:value-type="string">
            <text:p text:style-name="P2">IMAGE cObject</text:p>
          </table:table-cell>
          <table:table-cell table:style-name="Code.C29" office:value-type="string">
            <text:p text:style-name="Table_20_Contents">nur DAM:</text:p>
            <text:p text:style-name="Table_20_Contents">Die Bild Konfiguration für die Listenansicht, falls die Seite einen Filter für eine Kategorie hat, die wieder Kinder-Kategorien hat.</text:p>
            <text:p text:style-name="Table_20_Contents_2f_PRE">listImageHasChilds &gt;<text:line-break/>listImageHasChilds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siehe listImage</text:p>
          </table:table-cell>
          <table:table-cell table:style-name="Code.D29" office:value-type="string">
            <text:p text:style-name="Table_20_Contents"/>
            <text:p text:style-name="Table_20_Contents"/>
          </table:table-cell>
        </table:table-row>
        <table:table-row>
          <table:table-cell table:style-name="Code.A30" office:value-type="string">
            <text:p text:style-name="Table_20_Contents">basketImage</text:p>
          </table:table-cell>
          <table:table-cell table:style-name="Code.B2" office:value-type="string">
            <text:p text:style-name="P2">IMAGE cObject</text:p>
          </table:table-cell>
          <table:table-cell table:style-name="Code.C30" office:value-type="string">
            <text:p text:style-name="Table_20_Contents">Die Bild Konfiguration für den Warenkorb</text:p>
          </table:table-cell>
          <table:table-cell table:style-name="Code.D2" office:value-type="string">
            <text:p text:style-name="Table_20_Contents"/>
          </table:table-cell>
        </table:table-row>
        <table:table-row>
          <table:table-cell table:style-name="Code.A31" office:value-type="string">
            <text:p text:style-name="Table_20_Contents">datasheetIcon</text:p>
          </table:table-cell>
          <table:table-cell table:style-name="Code.B2" office:value-type="string">
            <text:p text:style-name="P2">IMAGE cObject</text:p>
          </table:table-cell>
          <table:table-cell table:style-name="Code.C31" office:value-type="string">
            <text:p text:style-name="Table_20_Contents">Das Symbolbild für das Datenblatt. <text:s/>###ICON_DATASHEET### wird dadurch ersetzt.</text:p>
          </table:table-cell>
          <table:table-cell table:style-name="Code.D2" office:value-type="string">
            <text:p text:style-name="Table_20_Contents"/>
          </table:table-cell>
        </table:table-row>
        <table:table-row>
          <table:table-cell table:style-name="Code.A32" office:value-type="string">
            <text:p text:style-name="Table_20_Contents">datasheetIcon</text:p>
          </table:table-cell>
          <table:table-cell table:style-name="Code.B2" office:value-type="string">
            <text:p text:style-name="P2">IMAGE cObject / <text:span text:style-name="T9">Array of integers (only setup)</text:span></text:p>
          </table:table-cell>
          <table:table-cell table:style-name="Code.C32" office:value-type="string">
            <text:p text:style-name="Table_20_Contents">Das Symbolbild für das Datenblatt. <text:s/>###ICON_DATASHEET### wird dadurch ersetzt.</text:p>
            <text:p text:style-name="Table_20_Contents"/>
            <text:p text:style-name="Table_20_Contents">Wenn es ein Array ist, dann besteht es aus einer Datei Extension und einem Dateinamen.</text:p>
            <text:p text:style-name="Table_20_Contents"/>
            <text:p text:style-name="Table_20_Contents"><text:span text:style-name="T4">Example</text:span>:</text:p>
            <text:p text:style-name="Table_20_Contents_2f_PRE">plugin.tt_products.datasheetIcon {</text:p>
            <text:p text:style-name="Table_20_Contents_2f_PRE"><text:s text:c="7"/>10.fileext = pdf</text:p>
            <text:p text:style-name="Table_20_Contents_2f_PRE"><text:s text:c="7"/>10.file = fileadmin/img/pdf-icon.png</text:p>
            <text:p text:style-name="Table_20_Contents_2f_PRE"><text:s text:c="7"/>20.fileext = doc</text:p>
            <text:p text:style-name="Table_20_Contents_2f_PRE"><text:s text:c="7"/>20.file = fileadmin/img/msword-icon.png</text:p>
            <text:p text:style-name="Table_20_Contents_2f_PRE">}</text:p>
          </table:table-cell>
          <table:table-cell table:style-name="Code.D32" office:value-type="string">
            <text:p text:style-name="Table_20_Contents"/>
          </table:table-cell>
        </table:table-row>
        <table:table-row>
          <table:table-cell table:style-name="Code.A33" office:value-type="string">
            <text:p text:style-name="Table_20_Contents">basketPic</text:p>
          </table:table-cell>
          <table:table-cell table:style-name="Code.B2" office:value-type="string">
            <text:p text:style-name="P2">string</text:p>
          </table:table-cell>
          <table:table-cell table:style-name="Code.C33" office:value-type="string">
            <text:p text:style-name="Table_20_Contents">URL Link auf das Warenkorb Bild</text:p>
          </table:table-cell>
          <table:table-cell table:style-name="Code.D2" office:value-type="string">
            <text:p text:style-name="Table_20_Contents"/>
          </table:table-cell>
        </table:table-row>
        <table:table-row>
          <table:table-cell table:style-name="Code.A34" office:value-type="string">
            <text:p text:style-name="Table_20_Contents">clickIntoBasket</text:p>
          </table:table-cell>
          <table:table-cell table:style-name="Code.B2" office:value-type="string">
            <text:p text:style-name="P2">boolean</text:p>
          </table:table-cell>
          <table:table-cell table:style-name="Code.C34" office:value-type="string">
            <text:p text:style-name="Table_20_Contents">Falls gesetzt, wird sofort in die Warenkorbansicht gewechselt, sobald ein Produkt in den Warenkorb gegeben worden ist. Das funktioniert nur, wenn PIDbasket gesetzt worden ist.</text:p>
          </table:table-cell>
          <table:table-cell table:style-name="Code.D2" office:value-type="string">
            <text:p text:style-name="Table_20_Contents"/>
          </table:table-cell>
        </table:table-row>
        <table:table-row>
          <table:table-cell table:style-name="Code.A35" office:value-type="string">
            <text:p text:style-name="Table_20_Contents">clickIntoList</text:p>
          </table:table-cell>
          <table:table-cell table:style-name="Code.B2" office:value-type="string">
            <text:p text:style-name="P2">boolean</text:p>
          </table:table-cell>
          <table:table-cell table:style-name="Code.C35" office:value-type="string">
            <text:p text:style-name="Table_20_Contents">Falls gesetzt, wird von der Einzelansicht sofort in die Listenansicht gewechselt, sobald ein Produkt in den Warenkorb gegeben worden ist. Das funktioniert nur, wenn PIDlistDisplay gesetzt worden ist.</text:p>
          </table:table-cell>
          <table:table-cell table:style-name="Code.D2" office:value-type="string">
            <text:p text:style-name="Table_20_Contents"/>
          </table:table-cell>
        </table:table-row>
        <table:table-row>
          <table:table-cell table:style-name="Code.A36" office:value-type="string">
            <text:p text:style-name="P58">clickIntoSubmenu</text:p>
          </table:table-cell>
          <table:table-cell table:style-name="Code.B2" office:value-type="string">
            <text:p text:style-name="P2">boolean</text:p>
          </table:table-cell>
          <table:table-cell table:style-name="Code.C36" office:value-type="string">
            <text:p text:style-name="Table_20_Contents"><text:span text:style-name="T4">Veraltet.</text:span> Siehe onlyChildsOfCurrent und rootChildsOfCurrent in der Konfiguration der Kategorien</text:p>
            <text:p text:style-name="P58">Falls gesetzt, werden die Untermenüeinträge der LISTCAT Kategorieliste nur für die aktuelle Kategorie angezeigt.</text:p>
          </table:table-cell>
          <table:table-cell table:style-name="Code.D2" office:value-type="string">
            <text:p text:style-name="Table_20_Contents"/>
          </table:table-cell>
        </table:table-row>
        <table:table-row>
          <table:table-cell table:style-name="Code.A37" office:value-type="string">
            <text:p text:style-name="P51">basketMaxQuantity</text:p>
          </table:table-cell>
          <table:table-cell table:style-name="Code.B2" office:value-type="string">
            <text:p text:style-name="P2">int+ / string</text:p>
          </table:table-cell>
          <table:table-cell table:style-name="Code.C37" office:value-type="string">
            <text:p text:style-name="Table_20_Contents">Die maximale mögliche Anzahl eines Produkts, die in den Warenkorb gelegt werden kann.</text:p>
            <text:p text:style-name="Table_20_Contents">'inStock': Nur maximal soviele Produkte können in den Warenkorb gelegt werden als sich momentan auf Lager befinden.</text:p>
            <text:p text:style-name="Table_20_Contents">'creditpoint': Nur wenn der eingeloggte FE Benutzer noch ausreichend Kreditpunkte auf seinem Konto hat, darf er ein Produkt in den Warenkorb legen.</text:p>
          </table:table-cell>
          <table:table-cell table:style-name="Code.D37" office:value-type="string">
            <text:p text:style-name="Table_20_Contents">100000</text:p>
          </table:table-cell>
        </table:table-row>
        <table:table-row>
          <table:table-cell table:style-name="Code.A38" office:value-type="string">
            <text:p text:style-name="P51">quantityIsFloat</text:p>
          </table:table-cell>
          <table:table-cell table:style-name="Code.B2" office:value-type="string">
            <text:p text:style-name="P2">boolean</text:p>
          </table:table-cell>
          <table:table-cell table:style-name="Code.C38" office:value-type="string">
            <text:p text:style-name="Table_20_Contents">Wenn gesetzt, ist die Anzahl eine Fließkommazahl.</text:p>
          </table:table-cell>
          <table:table-cell table:style-name="Code.D2" office:value-type="string">
            <text:p text:style-name="Table_20_Contents"/>
          </table:table-cell>
        </table:table-row>
        <table:table-row>
          <table:table-cell table:style-name="Code.A39" office:value-type="string">
            <text:p text:style-name="Table_20_Contents">noImageAvailable </text:p>
          </table:table-cell>
          <table:table-cell table:style-name="Code.B2" office:value-type="string">
            <text:p text:style-name="P2">resource</text:p>
          </table:table-cell>
          <table:table-cell table:style-name="Code.C39" office:value-type="string">
            <text:p text:style-name="Table_20_Contents">Die Bilddatei, die angezeigt wird, wenn ein Produkt kein Bild hat. Dieses Bild wird über das IMAGE cObject generiert, das im aktuellen Bild des Produktes angezeigt wird. Es ist eines der oberen IMAGE cObject.</text:p>
          </table:table-cell>
          <table:table-cell table:style-name="Code.D2" office:value-type="string">
            <text:p text:style-name="Table_20_Contents"/>
          </table:table-cell>
        </table:table-row>
        <text:soft-page-break/>
        <table:table-row>
          <table:table-cell table:style-name="Code.A40" office:value-type="string">
            <text:p text:style-name="Table_20_Contents">displayListCatHeader</text:p>
          </table:table-cell>
          <table:table-cell table:style-name="Code.B2" office:value-type="string">
            <text:p text:style-name="P2">boolean</text:p>
          </table:table-cell>
          <table:table-cell table:style-name="Code.C40" office:value-type="string">
            <text:p text:style-name="Table_20_Contents">Anzeige der Kategorie Überschrift in Listen</text:p>
            <text:p text:style-name="Table_20_Contents">Wenn diese Option gesetzt ist, dann werden die Kategorie Überschriften (Seitentitel) automatisch in den Produktlisten angezeigt. Das ist manchmal nicht erwünscht, wenn Sie die Überschriften selber in den Inhaltselementen von "list" ausgeben.</text:p>
          </table:table-cell>
          <table:table-cell table:style-name="Code.D40" office:value-type="string">
            <text:p text:style-name="Table_20_Contents">1</text:p>
          </table:table-cell>
        </table:table-row>
        <table:table-row>
          <table:table-cell table:style-name="Code.A41" office:value-type="string">
            <text:p text:style-name="Table_20_Contents">displayBasketCatHeader</text:p>
          </table:table-cell>
          <table:table-cell table:style-name="Code.B2" office:value-type="string">
            <text:p text:style-name="P2">boolean</text:p>
          </table:table-cell>
          <table:table-cell table:style-name="Code.C41" office:value-type="string">
            <text:p text:style-name="Table_20_Contents">Anzeige der Kategorieüberschrift im Warenkorb</text:p>
            <text:p text:style-name="Table_20_Contents">Wenn diese Option gesetzt ist, dann werden die Kategorieüberschriften (Seitentitel) automatisch in den Listen im Warenkorb angezeigt.</text:p>
          </table:table-cell>
          <table:table-cell table:style-name="Code.D41" office:value-type="string">
            <text:p text:style-name="Table_20_Contents">0</text:p>
          </table:table-cell>
        </table:table-row>
        <table:table-row>
          <table:table-cell table:style-name="Code.A42" office:value-type="string">
            <text:p text:style-name="P60">displayCatListType</text:p>
          </table:table-cell>
          <table:table-cell table:style-name="Code.B2" office:value-type="string">
            <text:p text:style-name="P2">string</text:p>
          </table:table-cell>
          <table:table-cell table:style-name="Code.C42" office:value-type="string">
            <text:p text:style-name="P60">Bestimmt welches HTML Tag für die Anzeige der Kategorien in der Liste verwendet wird.</text:p>
            <text:p text:style-name="P60">Verwenden Sie das neue Plugin 'Kategorien: Menü' anstelle von displayCatListType = ul.</text:p>
          </table:table-cell>
          <table:table-cell table:style-name="Code.D42" office:value-type="string">
            <text:p text:style-name="Table_20_Contents">ul</text:p>
          </table:table-cell>
        </table:table-row>
        <table:table-row>
          <table:table-cell table:style-name="Code.A43" office:value-type="string">
            <text:p text:style-name="P60">substitutePagetitle</text:p>
          </table:table-cell>
          <table:table-cell table:style-name="Code.B2" office:value-type="string">
            <text:p text:style-name="P2">int+</text:p>
          </table:table-cell>
          <table:table-cell table:style-name="Code.C43" office:value-type="string">
            <text:p text:style-name="P60">Setzen des Seitentitels in der Einzelansicht</text:p>
            <text:p text:style-name="P60">1 <text:s text:c="3"/>… Produkt TItel</text:p>
            <text:p text:style-name="P60">2 <text:s text:c="3"/>… Produkt Untertitel</text:p>
            <text:p text:style-name="P60">12 … Produkt TItel und Untertitel</text:p>
            <text:p text:style-name="P60">21 … Produkt Untertitel und TItel</text:p>
            <text:p text:style-name="P60">3 <text:s text:c="3"/>… Bread Crumb</text:p>
          </table:table-cell>
          <table:table-cell table:style-name="Code.D2" office:value-type="string">
            <text:p text:style-name="Table_20_Contents"/>
          </table:table-cell>
        </table:table-row>
        <table:table-row>
          <table:table-cell table:style-name="Code.A44" office:value-type="string">
            <text:p text:style-name="P58">displayBasketColumns</text:p>
          </table:table-cell>
          <table:table-cell table:style-name="Code.B2" office:value-type="string">
            <text:p text:style-name="P2">int+</text:p>
          </table:table-cell>
          <table:table-cell table:style-name="Code.C44" office:value-type="string">
            <text:p text:style-name="Table_20_Contents"><text:span text:style-name="T4">Veraltet.</text:span> Siehe Konfiguration der Tabellen -&gt; displayColumns</text:p>
          </table:table-cell>
          <table:table-cell table:style-name="Code.D2" office:value-type="string">
            <text:p text:style-name="Table_20_Contents"/>
          </table:table-cell>
        </table:table-row>
        <table:table-row>
          <table:table-cell table:style-name="Code.A45" office:value-type="string">
            <text:p text:style-name="Table_20_Contents">CSS</text:p>
          </table:table-cell>
          <table:table-cell table:style-name="Code.B2" office:value-type="string">
            <text:p text:style-name="P54">siehe unten</text:p>
          </table:table-cell>
          <table:table-cell table:style-name="Code.C45" office:value-type="string">
            <text:p text:style-name="Table_20_Contents">CSS Einstellungen</text:p>
          </table:table-cell>
          <table:table-cell table:style-name="Code.D2" office:value-type="string">
            <text:p text:style-name="Table_20_Contents"/>
          </table:table-cell>
        </table:table-row>
        <table:table-row>
          <table:table-cell table:style-name="Code.A46" office:value-type="string">
            <text:p text:style-name="Table_20_Contents">js</text:p>
          </table:table-cell>
          <table:table-cell table:style-name="Code.B2" office:value-type="string">
            <text:p text:style-name="P54">siehe unten</text:p>
          </table:table-cell>
          <table:table-cell table:style-name="Code.C46" office:value-type="string">
            <text:p text:style-name="Table_20_Contents">JavaScript Einstellungen</text:p>
          </table:table-cell>
          <table:table-cell table:style-name="Code.D2" office:value-type="string">
            <text:p text:style-name="Table_20_Contents"/>
          </table:table-cell>
        </table:table-row>
        <table:table-row>
          <table:table-cell table:style-name="Code.A47" office:value-type="string">
            <text:p text:style-name="Table_20_Contents">conf</text:p>
          </table:table-cell>
          <table:table-cell table:style-name="Code.B2" office:value-type="string">
            <text:p text:style-name="P54">siehe unten</text:p>
          </table:table-cell>
          <table:table-cell table:style-name="Code.C47" office:value-type="string">
            <text:p text:style-name="Table_20_Contents">Konfiguration der Tabellen</text:p>
          </table:table-cell>
          <table:table-cell table:style-name="Code.D2" office:value-type="string">
            <text:p text:style-name="Table_20_Contents"/>
          </table:table-cell>
        </table:table-row>
        <table:table-row>
          <table:table-cell table:style-name="Code.A48" office:value-type="string">
            <text:p text:style-name="Table_20_Contents">NoSingleViewOnList</text:p>
          </table:table-cell>
          <table:table-cell table:style-name="Code.B2" office:value-type="string">
            <text:p text:style-name="P2">boolean</text:p>
          </table:table-cell>
          <table:table-cell table:style-name="Code.C48" office:value-type="string">
            <text:p text:style-name="Table_20_Contents">Normalerweise wird der Link auf die Einzelansicht in der Seite mit dem LIST Code generiert. Wenn Sie aber Ihre eigenen Seiten für die Einzelansicht mit dem SINGLE Code erzeugen wollen, dann müssen Sie das auf 1 setzen.</text:p>
          </table:table-cell>
          <table:table-cell table:style-name="Code.D2" office:value-type="string">
            <text:p text:style-name="Table_20_Contents"/>
          </table:table-cell>
        </table:table-row>
        <table:table-row>
          <table:table-cell table:style-name="Code.A49" office:value-type="string">
            <text:p text:style-name="Table_20_Contents">itemMarkerArrayFunc</text:p>
          </table:table-cell>
          <table:table-cell table:style-name="Code.B2" office:value-type="string">
            <text:p text:style-name="Table_20_Contents">function-name</text:p>
          </table:table-cell>
          <table:table-cell table:style-name="Code.C49" office:value-type="string">
            <text:p text:style-name="Table_20_Contents">Jedes Mal, wenn ein Produkt angezeigt wird, sei es im Warenkorb oder in der Einzelansicht, wird die Methode getItemMarkerArray() in user_products aufgerufen. Diese Funktion füllt ein Array aus und gibt es zurück, das sogenannte markerArray(), mit Schlüsseln/Werten für die Template Ersetzung.</text:p>
            <text:p text:style-name="Table_20_Contents">Wenn Sie hier einen gültigen Funktionsnamen eingeben (siehe Datentyp 'function-name' für Details), dann wird dieses Array anschließend als zweiter Parameter an diese Funktion übergeben. Der erste Parameter für die itemMarkerArrayFunc ist die TypoScript Eigenschaft.</text:p>
            <text:p text:style-name="Table_20_Contents"/>
            <text:p text:style-name="P26">Parent PHP-Object Referenz:</text:p>
            <text:p text:style-name="Table_20_Contents">.parentObj property ist eine <text:span text:style-name="T13">hardcodierte</text:span> Referenz zum aufrufenden user_products Objekt (PHP). </text:p>
            <text:p text:style-name="Table_20_Contents"/>
            <text:p text:style-name="P26">Beispiel:</text:p>
            <text:p text:style-name="Table_20_Contents">(vorausgesetzt, daß eine Funktione oder Klasse inkludiert ist!)</text:p>
            <text:p text:style-name="Table_20_Contents"/>
            <text:p text:style-name="Table_20_Contents_2f_PRE">itemMarkerArrayFunc = user_addFieldsMarkerArr</text:p>
            <text:p text:style-name="Table_20_Contents_2f_PRE">itemMarkerArrayFunc.simpleOption = 1</text:p>
          </table:table-cell>
          <table:table-cell table:style-name="Code.D2" office:value-type="string">
            <text:p text:style-name="Table_20_Contents"/>
          </table:table-cell>
        </table:table-row>
        <text:soft-page-break/>
        <table:table-row>
          <table:table-cell table:style-name="Code.A50" office:value-type="string">
            <text:p text:style-name="Table_20_Contents">PIDitemDisplay </text:p>
          </table:table-cell>
          <table:table-cell table:style-name="Code.B2" office:value-type="string">
            <text:p text:style-name="Table_20_Contents">int+/<text:span text:style-name="T9">Array of integers</text:span></text:p>
          </table:table-cell>
          <table:table-cell table:style-name="Code.C50" office:value-type="string">
            <text:p text:style-name="Table_20_Contents">PID für die Einzelansicht.</text:p>
            <text:p text:style-name="Table_20_Contents">Wenn Sie wollen, daß eine eigene Seite für die Einzelansicht von Produkten zuständig sein soll, dann geben Sie hier die PID (page-uid) an. Sie können hier Bedingungen in mehreren Zeilen angeben. Der where String kann AND Verknüpfungen enthalten. Die pid der ersten erfüllten Bedingung wird zurückgegeben.</text:p>
            <text:p text:style-name="Table_20_Contents_2f_PRE"><text:line-break/>PIDitemDisplay {</text:p>
            <text:p text:style-name="Table_20_Contents_2f_PRE"><text:s/>10.type = sql <text:line-break/> 10.where = color=red<text:line-break/> 10.pid = 142 <text:line-break/> 20.type = sql <text:line-break/> 20.where = color=white <text:line-break/> 20.pid = 143 <text:line-break/>}<text:line-break/></text:p>
            <text:p text:style-name="Table_20_Contents">Wenn Sie den Typ auf pid setzen, dann wird die pid des Produkt Datensatzes verwendet.</text:p>
            <text:p text:style-name="Table_20_Contents_2f_PRE">PIDitemDisplay {</text:p>
            <text:p text:style-name="Table_20_Contents_2f_PRE"><text:s/>10.type = pid</text:p>
            <text:p text:style-name="Table_20_Contents_2f_PRE">}</text:p>
          </table:table-cell>
          <table:table-cell table:style-name="Code.D2" office:value-type="string">
            <text:p text:style-name="Table_20_Contents"/>
          </table:table-cell>
        </table:table-row>
        <table:table-row>
          <table:table-cell table:style-name="Code.A51" office:value-type="string">
            <text:p text:style-name="Table_20_Contents">PIDlistDisplay</text:p>
          </table:table-cell>
          <table:table-cell table:style-name="Code.B2" office:value-type="string">
            <text:p text:style-name="Table_20_Contents">int+/<text:span text:style-name="T9">Array of integers</text:span></text:p>
          </table:table-cell>
          <table:table-cell table:style-name="Code.C51" office:value-type="string">
            <text:p text:style-name="Table_20_Contents">PID für die Listenanzeige der Produkte</text:p>
            <text:p text:style-name="Table_20_Contents">Ähnlich zu PIDitemDisplay, aber hier wird die Kategorietabelle verwendet.</text:p>
          </table:table-cell>
          <table:table-cell table:style-name="Code.D2" office:value-type="string">
            <text:p text:style-name="Table_20_Contents"/>
          </table:table-cell>
        </table:table-row>
        <table:table-row>
          <table:table-cell table:style-name="Code.A52" office:value-type="string">
            <text:p text:style-name="Table_20_Contents">PIDsearch</text:p>
          </table:table-cell>
          <table:table-cell table:style-name="Code.B2" office:value-type="string">
            <text:p text:style-name="Table_20_Contents">int+</text:p>
          </table:table-cell>
          <table:table-cell table:style-name="Code.C52" office:value-type="string">
            <text:p text:style-name="Table_20_Contents">PID für die Suchenseite</text:p>
            <text:p text:style-name="Table_20_Contents">Wenn Sie möchten, daß alle Produktsuchen auf eine spezielle Seite gelangen, dann tragen Sie hier die PID ein! ACHTUNG: Wenn Sie diese <text:s/>PID setzen, müssen alle Seiten mit Suchabfragen ein Plugin mit dem Anzeigetyp “Produkte: Suche" haben.</text:p>
          </table:table-cell>
          <table:table-cell table:style-name="Code.D2" office:value-type="string">
            <text:p text:style-name="Table_20_Contents"/>
          </table:table-cell>
        </table:table-row>
        <table:table-row>
          <table:table-cell table:style-name="Code.A53" office:value-type="string">
            <text:p text:style-name="Table_20_Contents">PIDbasket </text:p>
          </table:table-cell>
          <table:table-cell table:style-name="Code.B2" office:value-type="string">
            <text:p text:style-name="P2">int+</text:p>
          </table:table-cell>
          <table:table-cell table:style-name="Code.C53" office:value-type="string">
            <text:p text:style-name="Table_20_Contents">PID für die Warenkorb Seite.</text:p>
            <text:p text:style-name="Table_20_Contents">Wenn Sie wollen, daß nach der Änderung der Anzahl zu einem Produkt eine Seite aufgerufen wird, dann geben Sie das hier an.</text:p>
          </table:table-cell>
          <table:table-cell table:style-name="Code.D2" office:value-type="string">
            <text:p text:style-name="Table_20_Contents"/>
          </table:table-cell>
        </table:table-row>
        <table:table-row>
          <table:table-cell table:style-name="Code.A54" office:value-type="string">
            <text:p text:style-name="Table_20_Contents">PIDstoreRoot </text:p>
          </table:table-cell>
          <table:table-cell table:style-name="Code.B2" office:value-type="string">
            <text:p text:style-name="Table_20_Contents">int+</text:p>
          </table:table-cell>
          <table:table-cell table:style-name="Code.C54" office:value-type="string">
            <text:p text:style-name="Table_20_Contents">PID für die Wurzel des Shops.</text:p>
            <text:p text:style-name="Table_20_Contents">Das ist die PID der rootPage des Shops. Wenn diese nicht gesetzt ist, wird das Shop über alle Seiten ausgehend von der Root der Homepage arbeiten. Aus Performance-Gründen sollte das gesetzt sein, wenn mit Seiten als Kategorien gearbeitet wird.</text:p>
            <text:p text:style-name="Table_20_Contents">Verwenden Sie stattdessen besser pid_list.</text:p>
          </table:table-cell>
          <table:table-cell table:style-name="Code.D2" office:value-type="string">
            <text:p text:style-name="Table_20_Contents"/>
          </table:table-cell>
        </table:table-row>
        <table:table-row>
          <table:table-cell table:style-name="Code.A55" office:value-type="string">
            <text:p text:style-name="Table_20_Contents">PID_sys_products_orders</text:p>
          </table:table-cell>
          <table:table-cell table:style-name="Code.B2" office:value-type="string">
            <text:p text:style-name="Table_20_Contents">int+</text:p>
          </table:table-cell>
          <table:table-cell table:style-name="Code.C55" office:value-type="string">
            <text:p text:style-name="Table_20_Contents">PID für die Datensätze in sys_products_orders. Standardmäßig erhalten sie die pid der payment (finalize) Seite.</text:p>
          </table:table-cell>
          <table:table-cell table:style-name="Code.D2" office:value-type="string">
            <text:p text:style-name="Table_20_Contents"/>
          </table:table-cell>
        </table:table-row>
        <table:table-row>
          <table:table-cell table:style-name="Code.A56" office:value-type="string">
            <text:p text:style-name="Table_20_Contents">PIDGiftsTable</text:p>
          </table:table-cell>
          <table:table-cell table:style-name="Code.B2" office:value-type="string">
            <text:p text:style-name="Table_20_Contents">int+</text:p>
          </table:table-cell>
          <table:table-cell table:style-name="Code.C56" office:value-type="string">
            <text:p text:style-name="Table_20_Contents">PID für die tt_products_gifts Tabelle. Die Geschenk Bestellungen werden hier gespeichert.</text:p>
          </table:table-cell>
          <table:table-cell table:style-name="Code.D2" office:value-type="string">
            <text:p text:style-name="Table_20_Contents"/>
          </table:table-cell>
        </table:table-row>
        <table:table-row>
          <table:table-cell table:style-name="Code.A57" office:value-type="string">
            <text:p text:style-name="Table_20_Contents">PIDinfo</text:p>
          </table:table-cell>
          <table:table-cell table:style-name="Code.B2" office:value-type="string">
            <text:p text:style-name="Table_20_Contents">int+</text:p>
          </table:table-cell>
          <table:table-cell table:style-name="Code.C57" office:value-type="string">
            <text:p text:style-name="Table_20_Contents">PID für die info Seite, bei welcher Name und Adresse eingegeben werden</text:p>
          </table:table-cell>
          <table:table-cell table:style-name="Code.D2" office:value-type="string">
            <text:p text:style-name="Table_20_Contents"/>
          </table:table-cell>
        </table:table-row>
        <table:table-row>
          <table:table-cell table:style-name="Code.A58" office:value-type="string">
            <text:p text:style-name="Table_20_Contents">PIDpayment</text:p>
          </table:table-cell>
          <table:table-cell table:style-name="Code.B2" office:value-type="string">
            <text:p text:style-name="Table_20_Contents">int+</text:p>
          </table:table-cell>
          <table:table-cell table:style-name="Code.C58" office:value-type="string">
            <text:p text:style-name="Table_20_Contents">PID für die Bezahl Seite, bei welcher Name und Adresse überprüft werden und die Bestellung ein letztes Mal vom Kunden bestätigt werden muss. Von hier aus könnte auch auf einen Bezahl Gateway gewechselt werden.</text:p>
          </table:table-cell>
          <table:table-cell table:style-name="Code.D2" office:value-type="string">
            <text:p text:style-name="Table_20_Contents"/>
          </table:table-cell>
        </table:table-row>
        <table:table-row>
          <table:table-cell table:style-name="Code.A59" office:value-type="string">
            <text:p text:style-name="Table_20_Contents">PIDfinalize</text:p>
          </table:table-cell>
          <table:table-cell table:style-name="Code.B2" office:value-type="string">
            <text:p text:style-name="Table_20_Contents">int+</text:p>
          </table:table-cell>
          <table:table-cell table:style-name="Code.C59" office:value-type="string">
            <text:p text:style-name="Table_20_Contents">PID für die Seite nach der Bestätigungsseite, wo der Benutzer seine Daten überprüft und den AGB zugestimmt hat</text:p>
          </table:table-cell>
          <table:table-cell table:style-name="Code.D2" office:value-type="string">
            <text:p text:style-name="Table_20_Contents"/>
          </table:table-cell>
        </table:table-row>
        <table:table-row>
          <table:table-cell table:style-name="Code.A60" office:value-type="string">
            <text:p text:style-name="Table_20_Contents">PIDthanks</text:p>
          </table:table-cell>
          <table:table-cell table:style-name="Code.B2" office:value-type="string">
            <text:p text:style-name="Table_20_Contents">int+</text:p>
          </table:table-cell>
          <table:table-cell table:style-name="Code.C60" office:value-type="string">
            <text:p text:style-name="Table_20_Contents">PID für die Dankesseite. BASKET_ORDERTHANKS_TEMPLATE wird hier verwendet. Sonst ist es ident zu PIDfinalize. Daher darf PIDfinalize nicht gleichzeitig gesetzt sein!</text:p>
          </table:table-cell>
          <table:table-cell table:style-name="Code.D2" office:value-type="string">
            <text:p text:style-name="Table_20_Contents"/>
          </table:table-cell>
        </table:table-row>
        <table:table-row>
          <table:table-cell table:style-name="Code.A61" office:value-type="string">
            <text:p text:style-name="Table_20_Contents">PIDtracking</text:p>
          </table:table-cell>
          <table:table-cell table:style-name="Code.B2" office:value-type="string">
            <text:p text:style-name="Table_20_Contents">int+</text:p>
          </table:table-cell>
          <table:table-cell table:style-name="Code.C61" office:value-type="string">
            <text:p text:style-name="Table_20_Contents">PID für die Nachverfolgung einer Bestellung</text:p>
          </table:table-cell>
          <table:table-cell table:style-name="Code.D2" office:value-type="string">
            <text:p text:style-name="Table_20_Contents"/>
          </table:table-cell>
        </table:table-row>
        <table:table-row>
          <table:table-cell table:style-name="Code.A62" office:value-type="string">
            <text:p text:style-name="Table_20_Contents">PIDbilling</text:p>
          </table:table-cell>
          <table:table-cell table:style-name="Code.B2" office:value-type="string">
            <text:p text:style-name="Table_20_Contents">int+</text:p>
          </table:table-cell>
          <table:table-cell table:style-name="Code.C62" office:value-type="string">
            <text:p text:style-name="Table_20_Contents">PID für die Erzeugung der Rechnung</text:p>
          </table:table-cell>
          <table:table-cell table:style-name="Code.D2" office:value-type="string">
            <text:p text:style-name="Table_20_Contents"/>
          </table:table-cell>
        </table:table-row>
        <table:table-row>
          <table:table-cell table:style-name="Code.A63" office:value-type="string">
            <text:p text:style-name="Table_20_Contents">PIDdelivery</text:p>
          </table:table-cell>
          <table:table-cell table:style-name="Code.B2" office:value-type="string">
            <text:p text:style-name="Table_20_Contents">int+</text:p>
          </table:table-cell>
          <table:table-cell table:style-name="Code.C63" office:value-type="string">
            <text:p text:style-name="Table_20_Contents">PID für die Erzeugung des Lieferscheins</text:p>
          </table:table-cell>
          <table:table-cell table:style-name="Code.D2" office:value-type="string">
            <text:p text:style-name="Table_20_Contents"/>
          </table:table-cell>
        </table:table-row>
        <table:table-row>
          <table:table-cell table:style-name="Code.A64" office:value-type="string">
            <text:p text:style-name="Table_20_Contents">PIDmemo</text:p>
          </table:table-cell>
          <table:table-cell table:style-name="Code.B64" office:value-type="string">
            <text:p text:style-name="Table_20_Contents">int+</text:p>
          </table:table-cell>
          <table:table-cell table:style-name="Code.C64" office:value-type="string">
            <text:p text:style-name="Table_20_Contents">Die ID der Memo Seite</text:p>
          </table:table-cell>
          <table:table-cell table:style-name="Code.D64">
            <text:p text:style-name="P63"/>
          </table:table-cell>
        </table:table-row>
        <table:table-row>
          <table:table-cell table:style-name="Code.A64" office:value-type="string">
            <text:p text:style-name="Table_20_Contents">PIDagb</text:p>
          </table:table-cell>
          <table:table-cell table:style-name="Code.B64" office:value-type="string">
            <text:p text:style-name="Table_20_Contents">int+</text:p>
          </table:table-cell>
          <table:table-cell table:style-name="Code.C64" office:value-type="string">
            <text:p text:style-name="Table_20_Contents">Die PID einer Seite mit den Allgemeinen Geschäftsbedingungen (“AGB”)</text:p>
            <text:p text:style-name="Table_20_Contents">Nur wenn hier eine Seiten-Id eingetragen ist, wird geprüft, ob die <text:s/>AGB vom Benutzer durch das Setzen eines Häkchen vor 'Akzeptieren der AGB' akzeptiert worden sind.</text:p>
          </table:table-cell>
          <table:table-cell table:style-name="Code.D64" office:value-type="float" office:value="0">
            <text:p text:style-name="P63">0</text:p>
          </table:table-cell>
        </table:table-row>
        <table:table-row>
          <table:table-cell table:style-name="Code.A64" office:value-type="string">
            <text:p text:style-name="Table_20_Contents">PIDrevocation</text:p>
          </table:table-cell>
          <table:table-cell table:style-name="Code.B64" office:value-type="string">
            <text:p text:style-name="Table_20_Contents">int+</text:p>
          </table:table-cell>
          <table:table-cell table:style-name="Code.C64" office:value-type="string">
            <text:p text:style-name="Table_20_Contents">Die PID einer Seite mit der Widerrufsbelehrung.</text:p>
          </table:table-cell>
          <table:table-cell table:style-name="Code.D64">
            <text:p text:style-name="P63"/>
          </table:table-cell>
        </table:table-row>
        <text:soft-page-break/>
        <table:table-row>
          <table:table-cell table:style-name="Code.A64" office:value-type="string">
            <text:p text:style-name="Table_20_Contents">PIDuserFolder</text:p>
          </table:table-cell>
          <table:table-cell table:style-name="Code.B64" office:value-type="string">
            <text:p text:style-name="Table_20_Contents">int+</text:p>
          </table:table-cell>
          <table:table-cell table:style-name="Code.C64" office:value-type="string">
            <text:p text:style-name="Table_20_Contents">Der sysfolder, wo neue Benutzer abgespeichert werden sollen.</text:p>
          </table:table-cell>
          <table:table-cell table:style-name="Code.D64" office:value-type="float" office:value="116">
            <text:p text:style-name="P63">116</text:p>
          </table:table-cell>
        </table:table-row>
        <table:table-row>
          <table:table-cell table:style-name="Code.A64" office:value-type="string">
            <text:p text:style-name="Table_20_Contents">pidsRelatedProducts</text:p>
          </table:table-cell>
          <table:table-cell table:style-name="Code.B64" office:value-type="string">
            <text:p text:style-name="Table_20_Contents">int+</text:p>
          </table:table-cell>
          <table:table-cell table:style-name="Code.C64" office:value-type="string">
            <text:p text:style-name="Table_20_Contents">Erlaubte Seiten für verwandte Produkte</text:p>
          </table:table-cell>
          <table:table-cell table:style-name="Code.D64">
            <text:p text:style-name="P63"/>
          </table:table-cell>
        </table:table-row>
        <table:table-row>
          <table:table-cell table:style-name="Code.A64" office:value-type="string">
            <text:p text:style-name="Table_20_Contents">pidsAddresses</text:p>
          </table:table-cell>
          <table:table-cell table:style-name="Code.B64" office:value-type="string">
            <text:p text:style-name="Table_20_Contents">int+</text:p>
          </table:table-cell>
          <table:table-cell table:style-name="Code.C64" office:value-type="string">
            <text:p text:style-name="Table_20_Contents">Erlaubte Seiten für Adressen</text:p>
          </table:table-cell>
          <table:table-cell table:style-name="Code.D64">
            <text:p text:style-name="P63"/>
          </table:table-cell>
        </table:table-row>
        <table:table-row>
          <table:table-cell table:style-name="Code.A64" office:value-type="string">
            <text:p text:style-name="Table_20_Contents">UIDstore</text:p>
          </table:table-cell>
          <table:table-cell table:style-name="Code.B64" office:value-type="string">
            <text:p text:style-name="Table_20_Contents">int+</text:p>
          </table:table-cell>
          <table:table-cell table:style-name="Code.C64" office:value-type="string">
            <text:p text:style-name="Table_20_Contents">durch Komma getrennte Liste der UIDs der Adressentabelle tx_party_addresses (oder fe_users) mit den Daten des Shops.</text:p>
          </table:table-cell>
          <table:table-cell table:style-name="Code.D64">
            <text:p text:style-name="P63"/>
          </table:table-cell>
        </table:table-row>
        <table:table-row>
          <table:table-cell table:style-name="Code.A71" office:value-type="string">
            <text:p text:style-name="Table_20_Contents">paymentActivity</text:p>
          </table:table-cell>
          <table:table-cell table:style-name="Code.B2" office:value-type="string">
            <text:p text:style-name="Table_20_Contents">string</text:p>
          </table:table-cell>
          <table:table-cell table:style-name="Code.C71" office:value-type="string">
            <text:p text:style-name="Table_20_Contents">Zeitpunkt im Shop, wann die Bezahlung über ein eigenes Bezahlskript durchgeführt werden soll.<text:line-break/>Mögliche Werte: <text:s/>payment, finalize, verify</text:p>
          </table:table-cell>
          <table:table-cell table:style-name="Code.D71" office:value-type="string">
            <text:p text:style-name="Table_20_Contents">finalize</text:p>
          </table:table-cell>
        </table:table-row>
        <table:table-row>
          <table:table-cell table:style-name="Code.A72" office:value-type="string">
            <text:p text:style-name="Table_20_Contents">advanceOrderNumberWithInteger </text:p>
          </table:table-cell>
          <table:table-cell table:style-name="Code.B2" office:value-type="string">
            <text:p text:style-name="Table_20_Contents">int+ , int+</text:p>
          </table:table-cell>
          <table:table-cell table:style-name="Code.C72" office:value-type="string">
            <text:p text:style-name="Table_20_Contents">Wenn dieser Wert gesetzt ist, dann wird beim Erzeugen einer jeden Bestellung der Zähler der Bestellungen um eine Zufallszahl zwischen [erste-Integer] und [zweite Integer] erhöht, um etwas zu mogeln.</text:p>
            <text:p text:style-name="Table_20_Contents"/>
            <text:p text:style-name="P27">Beispiel:</text:p>
            <text:h text:style-name="Preformatted_20_Text" text:outline-level="5">1,10 <text:s text:c="2"/>(Das wird den Zähler um einen Zufallswert zwischen 1 und 10 erhöhen)</text:h>
            <text:p text:style-name="Table_20_Contents_2f_PRE">5,5 <text:s text:c="3"/>(Das wird den Zähler jedes Mal um 5 erhöhen)</text:p>
          </table:table-cell>
          <table:table-cell table:style-name="Code.D2" office:value-type="string">
            <text:p text:style-name="Table_20_Contents"/>
          </table:table-cell>
        </table:table-row>
        <table:table-row>
          <table:table-cell table:style-name="Code.A73" office:value-type="string">
            <text:p text:style-name="Table_20_Contents">alwaysAdvanceOrderNumber</text:p>
          </table:table-cell>
          <table:table-cell table:style-name="Code.B2" office:value-type="string">
            <text:p text:style-name="Table_20_Contents">boolean</text:p>
          </table:table-cell>
          <table:table-cell table:style-name="Code.C73" office:value-type="string">
            <text:p text:style-name="Table_20_Contents">Wenn das gesetzt ist, wird die Bestellnummer immer erhöht, und die leeren Bestellnummern werden nicht mehr wiederverwendet. Sie müssen das verwenden, wenn Sie ein Bezahlungsskript verwenden, das keine doppelten Bestellnummern akzeptiert.</text:p>
          </table:table-cell>
          <table:table-cell table:style-name="Code.D2" office:value-type="string">
            <text:p text:style-name="Table_20_Contents"/>
          </table:table-cell>
        </table:table-row>
        <table:table-row>
          <table:table-cell table:style-name="Code.A74" office:value-type="string">
            <text:p text:style-name="Table_20_Contents">alwaysUpdateOrderAmount</text:p>
          </table:table-cell>
          <table:table-cell table:style-name="Code.B2" office:value-type="string">
            <text:p text:style-name="Table_20_Contents">boolean</text:p>
          </table:table-cell>
          <table:table-cell table:style-name="Code.C74" office:value-type="string">
            <text:p text:style-name="Table_20_Contents">Wenn das gesetzt ist, wird die bei der Eingabe angegebene Anzahl eines Produktes als neue Gesamtanzahl verwendet. Die Alternative wäre das Hinaufzählen der Anzahl um den eingegebenen Wert.</text:p>
          </table:table-cell>
          <table:table-cell table:style-name="Code.D74" office:value-type="string">
            <text:p text:style-name="Table_20_Contents">1</text:p>
          </table:table-cell>
        </table:table-row>
        <table:table-row>
          <table:table-cell table:style-name="Code.A75" office:value-type="string">
            <text:p text:style-name="Table_20_Contents">parseFunc</text:p>
          </table:table-cell>
          <table:table-cell table:style-name="Code.B2" office:value-type="string">
            <text:p text:style-name="Table_20_Contents">-&gt;parseFunc</text:p>
            <text:p text:style-name="Table_20_Contents"/>
            <text:p text:style-name="Table_20_Contents">mit </text:p>
            <text:p text:style-name="Table_20_Contents">'CSS styled content'</text:p>
            <text:p text:style-name="Table_20_Contents">nicht verwendet </text:p>
          </table:table-cell>
          <table:table-cell table:style-name="Code.C75" office:value-type="string">
            <text:p text:style-name="Table_20_Contents">Wenn die Extension 'CSS styled content' installiert ist, dann müssen Sie die Einstellung in lib.parseFunc_RTE machen statt hier.</text:p>
            <text:p text:style-name="Table_20_Contents">Die Produktbeschreibungen werden mit dieser Funktion überprüft. Wenn Sie es z.B. zulassen wollen, daß im Feld 'Bemerkung' auch HTML-Tags zur Erzeugung einer Tabelle vorkommen dürfen, dann müssen Sie die parseFunc.allowTags oder auch die denyTags entsprechend setzen.<text:line-break/>Damit die unter RTE eingegebenen HTML-Anweisungen richtig angezeigt werden, müssen Sie Folgendes im Root Template eingeben.<text:line-break/><text:line-break/><text:span text:style-name="T3">Beispiel:</text:span></text:p>
            <text:p text:style-name="Table_20_Contents_2f_PRE">keepNonMatchedTags = 1 <text:line-break/>RTE.default.proc.preserveTables = 1 </text:p>
            <text:h text:style-name="Preformatted_20_Text" text:outline-level="5"/>
            <text:p text:style-name="P27">Beispiel:</text:p>
            <text:h text:style-name="Preformatted_20_Text" text:outline-level="5">parseFunc.allowTags = table,tr,td,b,i,u,a,img,br,div,center,pre,font,hr,sub,sup,p,strong,em,li,ul,ol,blockquote,strike,span,h1,h2,h3,h4,h5,h6</text:h>
            <text:h text:style-name="Preformatted_20_Text" text:outline-level="5">parseFunc.denyTags = * </text:h>
          </table:table-cell>
          <table:table-cell table:style-name="Code.D75" office:value-type="string">
            <text:p text:style-name="Table_20_Contents">styles.content.parseFunc</text:p>
          </table:table-cell>
        </table:table-row>
        <table:table-row>
          <table:table-cell table:style-name="Code.A76" office:value-type="string">
            <text:p text:style-name="Table_20_Contents">categoryHeader </text:p>
          </table:table-cell>
          <table:table-cell table:style-name="Code.B2" office:value-type="string">
            <text:p text:style-name="Table_20_Contents">cObject</text:p>
          </table:table-cell>
          <table:table-cell table:style-name="Code.C76" office:value-type="string">
            <text:p text:style-name="Table_20_Contents">Erzeugt die Überschrift zu den Kategorien.</text:p>
            <text:p text:style-name="Table_20_Contents"/>
            <text:p text:style-name="P27">Beispiel:</text:p>
            <text:p text:style-name="P26"/>
            <text:p text:style-name="Table_20_Contents_2f_PRE">categoryHeader = TEXT</text:p>
            <text:p text:style-name="Table_20_Contents_2f_PRE">categoryHeader.current = 1</text:p>
          </table:table-cell>
          <table:table-cell table:style-name="Code.D2" office:value-type="string">
            <text:p text:style-name="Table_20_Contents"/>
          </table:table-cell>
        </table:table-row>
        <table:table-row>
          <table:table-cell table:style-name="Code.A77" office:value-type="string">
            <text:p text:style-name="Table_20_Contents">TAXpercentage</text:p>
          </table:table-cell>
          <table:table-cell table:style-name="Code.B2" office:value-type="string">
            <text:p text:style-name="Table_20_Contents">double</text:p>
          </table:table-cell>
          <table:table-cell table:style-name="Code.C77" office:value-type="string">
            <text:p text:style-name="Table_20_Contents">Prozente des Steuersatzes.</text:p>
            <text:p text:style-name="Table_20_Contents">Double Wert (!) (das bedeutet, Sie müssen den Punkt '.' statt dem Komma verwenden)</text:p>
            <text:p text:style-name="Table_20_Contents"/>
            <text:p text:style-name="P26">Beispiel:</text:p>
            <text:p text:style-name="Table_20_Contents_2f_PRE"># Der deutsche Steuersatz beträgt TAX 16%:</text:p>
            <text:p text:style-name="Table_20_Contents_2f_PRE">TAXpercentage = 16.00</text:p>
          </table:table-cell>
          <table:table-cell table:style-name="Code.D2" office:value-type="string">
            <text:p text:style-name="Table_20_Contents"/>
          </table:table-cell>
        </table:table-row>
        <table:table-row>
          <table:table-cell table:style-name="Code.A78" office:value-type="string">
            <text:p text:style-name="P60">TAXincluded</text:p>
          </table:table-cell>
          <table:table-cell table:style-name="Code.B2" office:value-type="string">
            <text:p text:style-name="Table_20_Contents">boolean</text:p>
          </table:table-cell>
          <table:table-cell table:style-name="Code.C78" office:value-type="string">
            <text:p text:style-name="Table_20_Contents">Setzen Sie das, wenn die Steuer in den Preisen in der Datenbank miteingerechnet ist! ( ... und natürlich: Löschen Sie das, wenn die Steuer nicht in den Preisen in der Datenbank enthalten ist, sondern bei der Anzeige der Preise noch dazugerechnet werden muß.)</text:p>
            <text:p text:style-name="Table_20_Contents">Alle Abläufe im Shop berücksichtigen diese Einstellung bei den Preisberechnungen.</text:p>
          </table:table-cell>
          <table:table-cell table:style-name="Code.D78" office:value-type="string">
            <text:p text:style-name="Table_20_Contents">1</text:p>
          </table:table-cell>
        </table:table-row>
        <text:soft-page-break/>
        <table:table-row>
          <table:table-cell table:style-name="Code.A79" office:value-type="string">
            <text:p text:style-name="P60">TAXrates</text:p>
          </table:table-cell>
          <table:table-cell table:style-name="Code.B2" office:value-type="string">
            <text:p text:style-name="Table_20_Contents">string</text:p>
          </table:table-cell>
          <table:table-cell table:style-name="Code.C79" office:value-type="string">
            <text:p text:style-name="Table_20_Contents">Durch Strichpunkt/Komma getrennte List von Steuerraten. Die erste wird als Steuersatz A, nächste als Steuersatz B usw. verwendet.</text:p>
          </table:table-cell>
          <table:table-cell table:style-name="Code.D2" office:value-type="string">
            <text:p text:style-name="Table_20_Contents"/>
          </table:table-cell>
        </table:table-row>
        <table:table-row>
          <table:table-cell table:style-name="Code.A80" office:value-type="string">
            <text:p text:style-name="P60">TAXmode</text:p>
          </table:table-cell>
          <table:table-cell table:style-name="Code.B2" office:value-type="string">
            <text:p text:style-name="Table_20_Contents">int+</text:p>
          </table:table-cell>
          <table:table-cell table:style-name="Code.C80" office:value-type="string">
            <text:p text:style-name="Table_20_Contents">Steuermodus</text:p>
            <text:p text:style-name="Table_20_Contents">1: Die Nettosummen werden zuerst aufaddiert und erst dann wird die Steuer draufgeschlagen.</text:p>
            <text:p text:style-name="Table_20_Contents">2: Die Steuer wird auf jedes Einzelprodukt draufgeschlagen. Danach werden die Bruttopreise aufaddiert.</text:p>
          </table:table-cell>
          <table:table-cell table:style-name="Code.D80" office:value-type="string">
            <text:p text:style-name="Table_20_Contents">1</text:p>
          </table:table-cell>
        </table:table-row>
        <table:table-row>
          <table:table-cell table:style-name="Code.A81" office:value-type="string">
            <text:p text:style-name="Table_20_Contents">priceDec</text:p>
          </table:table-cell>
          <table:table-cell table:style-name="Code.B2" office:value-type="string">
            <text:p text:style-name="Table_20_Contents">int+</text:p>
          </table:table-cell>
          <table:table-cell table:style-name="Code.C81" office:value-type="string">
            <text:p text:style-name="Table_20_Contents">Anzahl der Nachkommastellen im Preis</text:p>
          </table:table-cell>
          <table:table-cell table:style-name="Code.D2" office:value-type="string">
            <text:p text:style-name="Table_20_Contents"/>
          </table:table-cell>
        </table:table-row>
        <table:table-row>
          <table:table-cell table:style-name="Code.A82" office:value-type="string">
            <text:p text:style-name="Table_20_Contents">priceDecPoint</text:p>
          </table:table-cell>
          <table:table-cell table:style-name="Code.B2" office:value-type="string">
            <text:p text:style-name="Table_20_Contents">string</text:p>
          </table:table-cell>
          <table:table-cell table:style-name="Code.C82" office:value-type="string">
            <text:p text:style-name="Table_20_Contents">Dezimalpunkt im Preis</text:p>
          </table:table-cell>
          <table:table-cell table:style-name="Code.D2" office:value-type="string">
            <text:p text:style-name="Table_20_Contents"/>
          </table:table-cell>
        </table:table-row>
        <table:table-row>
          <table:table-cell table:style-name="Code.A83" office:value-type="string">
            <text:p text:style-name="Table_20_Contents">priceThousandPoint</text:p>
          </table:table-cell>
          <table:table-cell table:style-name="Code.B2" office:value-type="string">
            <text:p text:style-name="Table_20_Contents">string</text:p>
          </table:table-cell>
          <table:table-cell table:style-name="Code.C83" office:value-type="string">
            <text:p text:style-name="Table_20_Contents">Trennzeichen für die Tausender, falls gewünscht</text:p>
          </table:table-cell>
          <table:table-cell table:style-name="Code.D2" office:value-type="string">
            <text:p text:style-name="Table_20_Contents"/>
          </table:table-cell>
        </table:table-row>
        <table:table-row>
          <table:table-cell table:style-name="Code.A84" office:value-type="string">
            <text:p text:style-name="Table_20_Contents">noZeroDecimalPoint</text:p>
          </table:table-cell>
          <table:table-cell table:style-name="Code.B2" office:value-type="string">
            <text:p text:style-name="Table_20_Contents">boolean</text:p>
          </table:table-cell>
          <table:table-cell table:style-name="Code.C84" office:value-type="string">
            <text:p text:style-name="Table_20_Contents">Wenn gesetzt, dann wird bei Ganzzahlen keine Nachkommastelle angezeigt. Statt '4.00' erscheint '4'.</text:p>
          </table:table-cell>
          <table:table-cell table:style-name="Code.D2" office:value-type="string">
            <text:p text:style-name="Table_20_Contents"/>
          </table:table-cell>
        </table:table-row>
        <table:table-row>
          <table:table-cell table:style-name="Code.A85" office:value-type="string">
            <text:p text:style-name="Table_20_Contents">percentDec</text:p>
          </table:table-cell>
          <table:table-cell table:style-name="Code.B2" office:value-type="string">
            <text:p text:style-name="Table_20_Contents">int+</text:p>
          </table:table-cell>
          <table:table-cell table:style-name="Code.C85" office:value-type="string">
            <text:p text:style-name="Table_20_Contents">Anzahl der angezeigten Nachkommestellen bei Prozentzahlen</text:p>
          </table:table-cell>
          <table:table-cell table:style-name="Code.D2" office:value-type="string">
            <text:p text:style-name="Table_20_Contents"/>
          </table:table-cell>
        </table:table-row>
        <table:table-row>
          <table:table-cell table:style-name="Code.A86" office:value-type="string">
            <text:p text:style-name="Table_20_Contents">p<text:span text:style-name="T45">ercent</text:span>DecPoint</text:p>
          </table:table-cell>
          <table:table-cell table:style-name="Code.B2" office:value-type="string">
            <text:p text:style-name="Table_20_Contents">string</text:p>
          </table:table-cell>
          <table:table-cell table:style-name="Code.C86" office:value-type="string">
            <text:p text:style-name="Table_20_Contents">Dezimalpunkt im <text:span text:style-name="T45">Prozentwert</text:span></text:p>
          </table:table-cell>
          <table:table-cell table:style-name="Code.D2" office:value-type="string">
            <text:p text:style-name="Table_20_Contents"/>
          </table:table-cell>
        </table:table-row>
        <table:table-row>
          <table:table-cell table:style-name="Code.A87" office:value-type="string">
            <text:p text:style-name="Table_20_Contents">p<text:span text:style-name="T45">ercent</text:span>ThousandPoint</text:p>
          </table:table-cell>
          <table:table-cell table:style-name="Code.B2" office:value-type="string">
            <text:p text:style-name="Table_20_Contents">string</text:p>
          </table:table-cell>
          <table:table-cell table:style-name="Code.C87" office:value-type="string">
            <text:p text:style-name="Table_20_Contents"><text:span text:style-name="T45">Prozentzahl: </text:span>Trennzeichen für die Tausender, falls gewünscht</text:p>
          </table:table-cell>
          <table:table-cell table:style-name="Code.D2" office:value-type="string">
            <text:p text:style-name="Table_20_Contents"/>
          </table:table-cell>
        </table:table-row>
        <table:table-row>
          <table:table-cell table:style-name="Code.A88" office:value-type="string">
            <text:p text:style-name="Table_20_Contents"><text:span text:style-name="T45">percentN</text:span>oZeroDecimalPoint</text:p>
          </table:table-cell>
          <table:table-cell table:style-name="Code.B2" office:value-type="string">
            <text:p text:style-name="Table_20_Contents">boolean</text:p>
          </table:table-cell>
          <table:table-cell table:style-name="Code.C88" office:value-type="string">
            <text:p text:style-name="Table_20_Contents"><text:span text:style-name="T45">Prozentzahl: </text:span>Wenn gesetzt, dann wird bei Ganzzahlen keine Nachkommastelle angezeigt. Statt '4.00' erscheint '4'.</text:p>
          </table:table-cell>
          <table:table-cell table:style-name="Code.D2" office:value-type="string">
            <text:p text:style-name="Table_20_Contents"/>
          </table:table-cell>
        </table:table-row>
        <table:table-row>
          <table:table-cell table:style-name="Code.A89" office:value-type="string">
            <text:p text:style-name="P2">priceNoReseller</text:p>
          </table:table-cell>
          <table:table-cell table:style-name="Code.B2" office:value-type="string">
            <text:p text:style-name="Table_20_Contents">int+</text:p>
            <text:p text:style-name="P54">S</text:p>
          </table:table-cell>
          <table:table-cell table:style-name="Code.C89" office:value-type="string">
            <text:p text:style-name="Table_20_Contents">Preis Nummer für Wiederverkäufer. Im Moment kann hier nur 2 eingegeben werden. price2 wird aber nur dann verwendet, wenn der Wert größer als 0 ist.</text:p>
            <text:p text:style-name="Table_20_Contents"/>
            <text:p text:style-name="P26">Beispiel:</text:p>
            <text:p text:style-name="Table_20_Contents_2f_PRE">[usergroup = 1] </text:p>
            <text:p text:style-name="Table_20_Contents_2f_PRE">priceNoReseller = 2</text:p>
            <text:p text:style-name="Table_20_Contents_2f_PRE">[global]</text:p>
            <text:p text:style-name="Table_20_Contents_2f_PRE">...</text:p>
          </table:table-cell>
          <table:table-cell table:style-name="Code.D2" office:value-type="string">
            <text:p text:style-name="Table_20_Contents"/>
          </table:table-cell>
        </table:table-row>
        <table:table-row>
          <table:table-cell table:style-name="Code.A90" office:value-type="string">
            <text:p text:style-name="Table_20_Contents">currencySymbol</text:p>
          </table:table-cell>
          <table:table-cell table:style-name="Code.B2" office:value-type="string">
            <text:p text:style-name="Table_20_Contents">string</text:p>
          </table:table-cell>
          <table:table-cell table:style-name="Code.C90" office:value-type="string">
            <text:p text:style-name="Table_20_Contents">Währungseinheit. Es wird in der Administration verwendet.</text:p>
            <text:p text:style-name="Table_20_Contents"/>
            <text:p text:style-name="P26">Beispiel:</text:p>
            <text:p text:style-name="Table_20_Contents_2f_PRE">EUR</text:p>
            <text:p text:style-name="Table_20_Contents_2f_PRE">DKR</text:p>
            <text:p text:style-name="Table_20_Contents_2f_PRE">USD</text:p>
            <text:p text:style-name="Table_20_Contents_2f_PRE">$</text:p>
          </table:table-cell>
          <table:table-cell table:style-name="Code.D2" office:value-type="string">
            <text:p text:style-name="Table_20_Contents"/>
          </table:table-cell>
        </table:table-row>
        <table:table-row>
          <table:table-cell table:style-name="Code.A91" office:value-type="string">
            <text:p text:style-name="Table_20_Contents">lockLoginUserInfo</text:p>
          </table:table-cell>
          <table:table-cell table:style-name="Code.B2" office:value-type="string">
            <text:p text:style-name="Table_20_Contents">boolean</text:p>
          </table:table-cell>
          <table:table-cell table:style-name="Code.C91" office:value-type="string">
            <text:p text:style-name="Table_20_Contents">Wenn das gesetzt ist, und ein Benutzer sich eingeloggt hat, dann wird die Adreßinformation des Benutzers für die Rechnungsanschrift verwendet.</text:p>
          </table:table-cell>
          <table:table-cell table:style-name="Code.D91" office:value-type="string">
            <text:p text:style-name="Table_20_Contents">1</text:p>
          </table:table-cell>
        </table:table-row>
        <table:table-row>
          <table:table-cell table:style-name="Code.A92" office:value-type="string">
            <text:p text:style-name="Table_20_Contents">editLockedLoginInfo</text:p>
          </table:table-cell>
          <table:table-cell table:style-name="Code.B2" office:value-type="string">
            <text:p text:style-name="P2">boolean</text:p>
          </table:table-cell>
          <table:table-cell table:style-name="Code.C92" office:value-type="string">
            <text:p text:style-name="Table_20_Contents">Falls das und lockLoginUserInfo gesetzt sind, dann bleiben die ausgefüllten Daten für die Bestellung editierbar. Sie müssen auch die HTML Tags entsprechend als INPUTs zur Verfügung stellen.</text:p>
          </table:table-cell>
          <table:table-cell table:style-name="Code.D2" office:value-type="string">
            <text:p text:style-name="Table_20_Contents"/>
          </table:table-cell>
        </table:table-row>
        <table:table-row>
          <table:table-cell table:style-name="Code.A93" office:value-type="string">
            <text:p text:style-name="Table_20_Contents">loginUserInfoAddress</text:p>
          </table:table-cell>
          <table:table-cell table:style-name="Code.B2" office:value-type="string">
            <text:p text:style-name="Table_20_Contents">boolean</text:p>
          </table:table-cell>
          <table:table-cell table:style-name="Code.C93" office:value-type="string">
            <text:p text:style-name="Table_20_Contents">Wenn lockLoginUserInfo gesetzt ist, <text:s/>dann bewirkt dieser Schalter, dass das Adressfeld aus den Feldern address, country, zip und city aus fe_users genommen wird</text:p>
          </table:table-cell>
          <table:table-cell table:style-name="Code.D2" office:value-type="string">
            <text:p text:style-name="Table_20_Contents"/>
          </table:table-cell>
        </table:table-row>
        <table:table-row>
          <table:table-cell table:style-name="Code.A94" office:value-type="string">
            <text:p text:style-name="Table_20_Contents">requiredInfoFields</text:p>
            <text:p text:style-name="P54">setup</text:p>
          </table:table-cell>
          <table:table-cell table:style-name="Code.B2" office:value-type="string">
            <text:p text:style-name="P53">list or array of string</text:p>
          </table:table-cell>
          <table:table-cell table:style-name="Code.C94" office:value-type="string">
            <text:p text:style-name="Table_20_Contents">Liste der Felder, die für die Adreßinformation benötigt werden. Dieses Beispiel beschreibt alle Möglichkeiten.</text:p>
            <text:p text:style-name="Table_20_Contents"><text:line-break/><text:span text:style-name="T3">Beispiel:</text:span></text:p>
            <text:p text:style-name="Table_20_Contents_2f_PRE">requiredInfoFields = name,address,telephone,fax,E-Mail,company,city,zip,state,country</text:p>
            <text:p text:style-name="Table_20_Contents_2f_PRE"/>
            <text:p text:style-name="Table_20_Contents">Es sind weitere Unterpunkte 'billing' und 'delivery' möglich.</text:p>
            <text:p text:style-name="Table_20_Contents"/>
            <text:p text:style-name="P18">Beispiel:</text:p>
            <text:p text:style-name="Table_20_Contents_2f_PRE">requiredInfoFields.delivery = name,address</text:p>
          </table:table-cell>
          <table:table-cell table:style-name="Code.D2" office:value-type="string">
            <text:p text:style-name="Table_20_Contents"/>
          </table:table-cell>
        </table:table-row>
        <table:table-row>
          <table:table-cell table:style-name="Code.A95" office:value-type="string">
            <text:p text:style-name="P58">orderBy</text:p>
          </table:table-cell>
          <table:table-cell table:style-name="Code.B2" office:value-type="string">
            <text:p text:style-name="P59">string</text:p>
          </table:table-cell>
          <table:table-cell table:style-name="Code.C95" office:value-type="string">
            <text:p text:style-name="Table_20_Contents">siehe Artikel/Produkt Konfiguration</text:p>
            <text:p text:style-name="Table_20_Contents"><text:span text:style-name="T4">Veraltet.</text:span> Verwenden Sie stattdessen</text:p>
            <text:h text:style-name="Preformatted_20_Text" text:outline-level="5">plugin.tt_products.conf.tt_products.ALL.orderBy = title</text:h>
          </table:table-cell>
          <table:table-cell table:style-name="Code.D2" office:value-type="string">
            <text:p text:style-name="Table_20_Contents"/>
          </table:table-cell>
        </table:table-row>
        <table:table-row>
          <table:table-cell table:style-name="Code.A96" office:value-type="string">
            <text:p text:style-name="P58">orderByCategoryTitle</text:p>
          </table:table-cell>
          <table:table-cell table:style-name="Code.B2" office:value-type="string">
            <text:p text:style-name="P2"/>
          </table:table-cell>
          <table:table-cell table:style-name="Code.C96" office:value-type="string">
            <text:p text:style-name="Table_20_Contents"><text:span text:style-name="T4">Veraltet.</text:span> Verwenden Sie stattdessen</text:p>
            <text:h text:style-name="Preformatted_20_Text" text:outline-level="5">plugin.tt_products.conf.tt_products_cat.ALL.orderBy = title</text:h>
          </table:table-cell>
          <table:table-cell table:style-name="Code.D2" office:value-type="string">
            <text:p text:style-name="Table_20_Contents"/>
          </table:table-cell>
        </table:table-row>
        <text:soft-page-break/>
        <table:table-row>
          <table:table-cell table:style-name="Code.A97" office:value-type="string">
            <text:p text:style-name="P58">orderByItemNumberSg</text:p>
          </table:table-cell>
          <table:table-cell table:style-name="Code.B2" office:value-type="string">
            <text:p text:style-name="P59">boolean</text:p>
          </table:table-cell>
          <table:table-cell table:style-name="Code.C97" office:value-type="string">
            <text:p text:style-name="Table_20_Contents"><text:span text:style-name="T4">Veraltet.</text:span> Verwenden Sie stattdessen</text:p>
            <text:h text:style-name="Preformatted_20_Text" text:outline-level="5">plugin.tt_products.conf.tt_products.SINGLE.orderBy = itemnumber</text:h>
          </table:table-cell>
          <table:table-cell table:style-name="Code.D2" office:value-type="string">
            <text:p text:style-name="Table_20_Contents"/>
          </table:table-cell>
        </table:table-row>
        <table:table-row>
          <table:table-cell table:style-name="Code.A98" office:value-type="string">
            <text:p text:style-name="Table_20_Contents">orderNumberPrefix</text:p>
          </table:table-cell>
          <table:table-cell table:style-name="Code.B2" office:value-type="string">
            <text:p text:style-name="Table_20_Contents">string</text:p>
          </table:table-cell>
          <table:table-cell table:style-name="Code.C98" office:value-type="string">
            <text:p text:style-name="Table_20_Contents">Präfix für die Bestellnummern. Max 10 Zeichen. Wenn dieser Text mit '%' beginnt, dann wird der Rest im PHP Datumsformat angegeben, um ein Zeit/Datum zu ergeben.</text:p>
          </table:table-cell>
          <table:table-cell table:style-name="Code.D2" office:value-type="string">
            <text:p text:style-name="Table_20_Contents"/>
          </table:table-cell>
        </table:table-row>
        <table:table-row>
          <table:table-cell table:style-name="Code.A99" office:value-type="string">
            <text:p text:style-name="Table_20_Contents">orderEmail</text:p>
          </table:table-cell>
          <table:table-cell table:style-name="Code.B2" office:value-type="string">
            <text:p text:style-name="P53">array</text:p>
          </table:table-cell>
          <table:table-cell table:style-name="Code.C99" office:value-type="string">
            <text:p text:style-name="Table_20_Contents">Festlegung für weitere Bestätigungsemails, die über Template Suffixe, Sender und Empfänger Email Adressen beschrieben werden.</text:p>
            <text:p text:style-name="Table_20_Contents">Für 'shop' wird die orderEmail_from eingesetzt, für 'customer' die Email Adresse des Käufers.</text:p>
            <text:p text:style-name="P20"/>
            <text:p text:style-name="Standard"><text:span text:style-name="T32">from ... Für 'shop' wird die orderEmail_from eingesetzt, für 'customer' die Email Adresse des Käufers.<text:line-break/></text:span><text:span text:style-name="T33">to ... Email des Empfängers<text:line-break/>suffix ... Suffix des Subpart '###EMAIL_PLAINTEXT_TEMPLATE_###' .</text:span></text:p>
            <text:p text:style-name="Table_20_Contents">returnPath ... Email Adresse an welche im Fehlerfall die Nachrichten versendet werden</text:p>
            <text:p text:style-name="Table_20_Contents"/>
            <text:p text:style-name="Table_20_Contents"><text:span text:style-name="T4">Beispiel</text:span>:</text:p>
            <text:p text:style-name="Table_20_Contents_2f_PRE">plugin.tt_products.orderEmail {</text:p>
            <text:p text:style-name="Table_20_Contents_2f_PRE"><text:s text:c="7"/>10.suffix = factory</text:p>
            <text:p text:style-name="Table_20_Contents_2f_PRE"><text:s text:c="7"/>10.from = shop</text:p>
            <text:p text:style-name="Table_20_Contents_2f_PRE"><text:s text:c="7"/>10.to = <text:a xlink:type="simple" xlink:href="mailto:seller1@webshop-typo3.com" text:style-name="Internet_20_link" text:visited-style-name="Visited_20_Internet_20_Link">seller1@webshop-typo3.com</text:a></text:p>
            <text:p text:style-name="Table_20_Contents_2f_PRE"><text:s text:c="7"/>10.attachment = bill</text:p>
            <text:p text:style-name="Table_20_Contents_2f_PRE"><text:s text:c="7"/>20.suffix = logistic</text:p>
            <text:p text:style-name="Table_20_Contents_2f_PRE"><text:s text:c="7"/>20.from = customer</text:p>
            <text:p text:style-name="Table_20_Contents_2f_PRE"><text:s text:c="7"/>20.to = <text:a xlink:type="simple" xlink:href="mailto:seller2@webshop-typo3.com" text:style-name="Internet_20_link" text:visited-style-name="Visited_20_Internet_20_Link">seller2@webshop-typo3.com</text:a></text:p>
            <text:p text:style-name="Table_20_Contents_2f_PRE"><text:s text:c="7"/>20.attachment = bill</text:p>
            <text:p text:style-name="Table_20_Contents_2f_PRE">}</text:p>
            <text:p text:style-name="Table_20_Contents_2f_PRE"/>
            <text:p text:style-name="Table_20_Contents">Es ist auch möglich, die Bestellbestätigungen an eine Email Adresse zu senden, die in einer Fremdtabelle abgespeichert ist, und die über einen Fremdschlüssel bestimmt werden kann. Das muss aber ein Benutzer eingeloggt sein, weil das nur über die Tabelle fe_users möglich ist.</text:p>
            <text:p text:style-name="Table_20_Contents"/>
            <text:p text:style-name="Table_20_Contents"><text:span text:style-name="T4">Beispiel</text:span>:</text:p>
            <text:p text:style-name="Table_20_Contents_2f_PRE">plugin.tt_products.orderEmail {</text:p>
            <text:p text:style-name="Table_20_Contents_2f_PRE"><text:s text:c="7"/>10000.suffix = shop</text:p>
            <text:p text:style-name="Table_20_Contents_2f_PRE"><text:s text:c="7"/>10000.from = customer</text:p>
            <text:p text:style-name="Table_20_Contents_2f_PRE"><text:s text:c="7"/>10000.to {</text:p>
            <text:p text:style-name="Table_20_Contents_2f_PRE"><text:s text:c="10"/>table = fe_users</text:p>
            <text:p text:style-name="Table_20_Contents_2f_PRE"><text:s text:c="10"/>field = key_field</text:p>
            <text:p text:style-name="Table_20_Contents_2f_PRE"><text:s text:c="10"/>foreign_table = my_table</text:p>
            <text:p text:style-name="Table_20_Contents_2f_PRE"><text:s text:c="10"/>foreign_field = my_table_key_field</text:p>
            <text:p text:style-name="Table_20_Contents_2f_PRE"><text:s text:c="10"/>foreign_email_field = my_table_email</text:p>
            <text:p text:style-name="Table_20_Contents_2f_PRE"><text:s text:c="7"/>}</text:p>
            <text:p text:style-name="Table_20_Contents_2f_PRE">}</text:p>
            <text:p text:style-name="Table_20_Contents_2f_PRE"/>
            <text:p text:style-name="Table_20_Contents">Über diese SQL Anweisung wird die Email Adresse ermittelt:</text:p>
            <text:p text:style-name="Table_20_Contents_2f_PRE">SELECT my_table_key_field FROM my_table WHERE my_table_key_field = $content_of_fe_users_key_field;</text:p>
            <text:p text:style-name="Table_20_Contents_2f_PRE"/>
          </table:table-cell>
          <table:table-cell table:style-name="Code.D2" office:value-type="string">
            <text:p text:style-name="Table_20_Contents"/>
          </table:table-cell>
        </table:table-row>
        <table:table-row>
          <table:table-cell table:style-name="Code.A100" office:value-type="string">
            <text:p text:style-name="Table_20_Contents">orderEmail_bcc</text:p>
          </table:table-cell>
          <table:table-cell table:style-name="Code.B2" office:value-type="string">
            <text:p text:style-name="Table_20_Contents">string</text:p>
          </table:table-cell>
          <table:table-cell table:style-name="Code.C100" office:value-type="string">
            <text:p text:style-name="Table_20_Contents">BCC für die Bestätigung des Shop Betreibers</text:p>
          </table:table-cell>
          <table:table-cell table:style-name="Code.D2" office:value-type="string">
            <text:p text:style-name="Table_20_Contents"/>
          </table:table-cell>
        </table:table-row>
        <table:table-row>
          <table:table-cell table:style-name="Code.A101" office:value-type="string">
            <text:p text:style-name="Table_20_Contents">orderEmail_from</text:p>
          </table:table-cell>
          <table:table-cell table:style-name="Code.B2" office:value-type="string">
            <text:p text:style-name="Table_20_Contents">string</text:p>
          </table:table-cell>
          <table:table-cell table:style-name="Code.C101" office:value-type="string">
            <text:p text:style-name="Table_20_Contents">Absender E-Mail Adresse für Bestätigung E-Mail an den Kunden</text:p>
          </table:table-cell>
          <table:table-cell table:style-name="Code.D2" office:value-type="string">
            <text:p text:style-name="Table_20_Contents"/>
          </table:table-cell>
        </table:table-row>
        <table:table-row>
          <table:table-cell table:style-name="Code.A102" office:value-type="string">
            <text:p text:style-name="Table_20_Contents">orderEmail_fromName</text:p>
          </table:table-cell>
          <table:table-cell table:style-name="Code.B2" office:value-type="string">
            <text:p text:style-name="Table_20_Contents">string</text:p>
          </table:table-cell>
          <table:table-cell table:style-name="Code.C102" office:value-type="string">
            <text:p text:style-name="Table_20_Contents">Absender Name für Bestätigung E-Mail an den Kunden</text:p>
          </table:table-cell>
          <table:table-cell table:style-name="Code.D2" office:value-type="string">
            <text:p text:style-name="Table_20_Contents"/>
          </table:table-cell>
        </table:table-row>
        <table:table-row>
          <table:table-cell table:style-name="Code.A103" office:value-type="string">
            <text:p text:style-name="Table_20_Contents">orderEmail_to</text:p>
          </table:table-cell>
          <table:table-cell table:style-name="Code.B2" office:value-type="string">
            <text:p text:style-name="P53">list of E-Mail-addresses</text:p>
          </table:table-cell>
          <table:table-cell table:style-name="Code.C103" office:value-type="string">
            <text:p text:style-name="Table_20_Contents">Eine durch Beistrich getrennte Liste der Empfänger der Bestellung E-Mail Shop und Administrator/Supervisor E-Mail Adressen müssen hier eingetragen werden!</text:p>
          </table:table-cell>
          <table:table-cell table:style-name="Code.D2" office:value-type="string">
            <text:p text:style-name="Table_20_Contents"/>
          </table:table-cell>
        </table:table-row>
        <table:table-row>
          <table:table-cell table:style-name="Code.A104" office:value-type="string">
            <text:p text:style-name="Table_20_Contents">orderEmail_toAddress</text:p>
          </table:table-cell>
          <table:table-cell table:style-name="Code.B2" office:value-type="string">
            <text:p text:style-name="P2">boolean</text:p>
          </table:table-cell>
          <table:table-cell table:style-name="Code.C104" office:value-type="string">
            <text:p text:style-name="Table_20_Contents">Falls gesetzt, dann wird die Bestell Email an alle Adressen versendet, die zu einem der Produkte im Warenkorb zugewiesen sind.</text:p>
          </table:table-cell>
          <table:table-cell table:style-name="Code.D2" office:value-type="string">
            <text:p text:style-name="Table_20_Contents"/>
          </table:table-cell>
        </table:table-row>
        <text:soft-page-break/>
        <table:table-row>
          <table:table-cell table:style-name="Code.A105" office:value-type="string">
            <text:p text:style-name="Table_20_Contents">orderEmail_radio</text:p>
          </table:table-cell>
          <table:table-cell table:style-name="Code.B2" office:value-type="string">
            <text:p text:style-name="P53">Feld von Radio-Button Nummer und E-Mail-Addressen</text:p>
          </table:table-cell>
          <table:table-cell table:style-name="Code.C105" office:value-type="string">
            <text:p text:style-name="Table_20_Contents">Eine durch Beistrich getrennte Liste der Empfänger der Bestellung E-Mail, wenn eine Radio Button-Auswahl vorgenommen worden ist. Die erste Nummer ist die Radio Box und die zweite Nummer ist der ausgewählte Wert.</text:p>
            <text:p text:style-name="Table_20_Contents"/>
            <text:p text:style-name="P26">Beispiel:</text:p>
            <text:p text:style-name="Table_20_Contents_2f_PRE">orderEmail_radio {</text:p>
            <text:p text:style-name="Table_20_Contents_2f_PRE"><text:s text:c="3"/>1.2 = inform@mytypo3site.de</text:p>
            <text:p text:style-name="Table_20_Contents_2f_PRE">}</text:p>
          </table:table-cell>
          <table:table-cell table:style-name="Code.D2" office:value-type="string">
            <text:p text:style-name="Table_20_Contents"/>
          </table:table-cell>
        </table:table-row>
        <table:table-row>
          <table:table-cell table:style-name="Code.A106" office:value-type="string">
            <text:p text:style-name="Table_20_Contents">orderEmaill_toDelivery</text:p>
          </table:table-cell>
          <table:table-cell table:style-name="Code.B2" office:value-type="string">
            <text:p text:style-name="P2">boolean</text:p>
          </table:table-cell>
          <table:table-cell table:style-name="Code.C106" office:value-type="string">
            <text:p text:style-name="Table_20_Contents">Falls gesetzt, wird die Bestätigung E-Mail an die Zustellung E-Mail-Adresse und nicht an die Rechnung E-Mail-Adresse gesendet.</text:p>
          </table:table-cell>
          <table:table-cell table:style-name="Code.D2" office:value-type="string">
            <text:p text:style-name="Table_20_Contents"/>
          </table:table-cell>
        </table:table-row>
        <table:table-row>
          <table:table-cell table:style-name="Code.A107" office:value-type="string">
            <text:p text:style-name="Table_20_Contents">orderEmail_subject</text:p>
          </table:table-cell>
          <table:table-cell table:style-name="Code.B2" office:value-type="string">
            <text:p text:style-name="P2">string</text:p>
          </table:table-cell>
          <table:table-cell table:style-name="Code.C107" office:value-type="string">
            <text:p text:style-name="Table_20_Contents">Inhalt der Betreff-Zeile, falls die erste Zeile in ###E-Mail_PLAINTEXT_TEMPLATE### leer ist.</text:p>
          </table:table-cell>
          <table:table-cell table:style-name="Code.D2" office:value-type="string">
            <text:p text:style-name="Table_20_Contents"/>
          </table:table-cell>
        </table:table-row>
        <table:table-row>
          <table:table-cell table:style-name="Code.A108" office:value-type="string">
            <text:p text:style-name="Table_20_Contents">orderEmail_returnPath</text:p>
          </table:table-cell>
          <table:table-cell table:style-name="Code.B2" office:value-type="string">
            <text:p text:style-name="P2">string</text:p>
          </table:table-cell>
          <table:table-cell table:style-name="Code.C108" office:value-type="string">
            <text:p text:style-name="Table_20_Contents">Damit wird der 'Return-Path' des Email Header befüllt. Wenn die Email Adresse des Empfängers ungültig ist, dann wird die Email an die hier eingetragene Adresse verschickt.</text:p>
          </table:table-cell>
          <table:table-cell table:style-name="Code.D108" office:value-type="string">
            <text:p text:style-name="Table_20_Contents"/>
          </table:table-cell>
        </table:table-row>
        <table:table-row>
          <table:table-cell table:style-name="Code.A109" office:value-type="string">
            <text:p text:style-name="Table_20_Contents">orderEmail_htmlmail</text:p>
          </table:table-cell>
          <table:table-cell table:style-name="Code.B2" office:value-type="string">
            <text:p text:style-name="Table_20_Contents">boolean / string</text:p>
          </table:table-cell>
          <table:table-cell table:style-name="Code.C109" office:value-type="string">
            <text:p text:style-name="Table_20_Contents">Falls gesetzt, wird die Bestellung E-Mail im HTML Format gesendet.<text:line-break/>Wenn orderEmail_htmlmail.removeImagesWithPrefix gesetzt ist, dann werden die Bilder samt ihren HTML Tags nicht in der E-Mail gesendet.</text:p>
          </table:table-cell>
          <table:table-cell table:style-name="Code.D2" office:value-type="string">
            <text:p text:style-name="Table_20_Contents"/>
          </table:table-cell>
        </table:table-row>
        <table:table-row>
          <table:table-cell table:style-name="Code.A110" office:value-type="string">
            <text:p text:style-name="Table_20_Contents">orderEmail_apostrophe</text:p>
          </table:table-cell>
          <table:table-cell table:style-name="Code.B2" office:value-type="string">
            <text:p text:style-name="Table_20_Contents">string</text:p>
          </table:table-cell>
          <table:table-cell table:style-name="Code.C110" office:value-type="string">
            <text:p text:style-name="Table_20_Contents">Der Titel einer Bestellung E-Mail wird damit in Hochkomma gesetzt.</text:p>
          </table:table-cell>
          <table:table-cell table:style-name="Code.D2" office:value-type="string">
            <text:p text:style-name="Table_20_Contents"/>
          </table:table-cell>
        </table:table-row>
        <table:table-row>
          <table:table-cell table:style-name="Code.A111" office:value-type="string">
            <text:p text:style-name="Table_20_Contents">email_notify_default</text:p>
          </table:table-cell>
          <table:table-cell table:style-name="Code.B2" office:value-type="string">
            <text:p text:style-name="Table_20_Contents">boolean</text:p>
          </table:table-cell>
          <table:table-cell table:style-name="Code.C111" office:value-type="string">
            <text:p text:style-name="Table_20_Contents">Die Benachrichtigung E-Mail an den Kunden ist standardmäßig aktiviert. Er kann das selber später im Modul Bestellungsverwaltung ändern.</text:p>
          </table:table-cell>
          <table:table-cell table:style-name="Code.D2" office:value-type="string">
            <text:p text:style-name="Table_20_Contents"/>
          </table:table-cell>
        </table:table-row>
        <table:table-row>
          <table:table-cell table:style-name="Code.A112" office:value-type="string">
            <text:p text:style-name="Table_20_Contents">statusCodes</text:p>
          </table:table-cell>
          <table:table-cell table:style-name="Code.B2" office:value-type="string">
            <text:p text:style-name="P53">array of integers</text:p>
          </table:table-cell>
          <table:table-cell table:style-name="Code.C112" office:value-type="string">
            <text:p text:style-name="Table_20_Contents">Zustandscodes für das Modul Bestellungsverwaltung.</text:p>
            <text:p text:style-name="Table_20_Contents">Nummern über 100 löschen eine Bestellung aus der Bestellungsverwaltung.</text:p>
            <text:p text:style-name="Table_20_Contents">Nummer 0 ist der Zustand einer nicht abgeschlossenen Bestellung (und nicht abgeschlossene Bestellungen in der Datenbank können später als Müll angesehen werden...)</text:p>
            <text:p text:style-name="Table_20_Contents">Nummern zwischen 50-59 sind zur Auswahl für den Kunden.</text:p>
            <text:p text:style-name="Table_20_Contents">Nummern zwischen 60-69 sind Spezialfunktionen wie Geschenke für den Kunden.</text:p>
            <text:p text:style-name="Table_20_Contents">Nummer 1 wird dafür verwendet, wenn eine Bestellung bestägit worden ist, und deshalb von 0 auf 1 wechselt. Nummer 1 kann vom Shop Admin nicht ausgewählt werden.<text:line-break/>Das wird in die Markierungen ###STATUS_OPTIONS### geschrieben.</text:p>
            <text:p text:style-name="Table_20_Contents"/>
            <text:p text:style-name="P26">Beispiel:</text:p>
            <text:p text:style-name="Table_20_Contents_2f_PRE">statusCodes {</text:p>
            <text:p text:style-name="Table_20_Contents_2f_PRE"><text:s text:c="4"/>1 = Bestellung vom Kunden bestätigt</text:p>
            <text:p text:style-name="Table_20_Contents_2f_PRE"><text:s text:c="4"/>2 = Bestellung ist vom Shop erhalten und akzeptiert worden</text:p>
            <text:p text:style-name="Table_20_Contents_2f_PRE"><text:s text:c="4"/>10 = Das Shop wartet auf Waren von einem Lieferanten</text:p>
            <text:p text:style-name="Table_20_Contents_2f_PRE"><text:s text:c="4"/>11 = Das Shop wartet auf die Bezahlung durch den Kunden</text:p>
            <text:p text:style-name="Table_20_Contents_2f_PRE"><text:s text:c="4"/>12 = Das Shop wartet auf Waren vom Kunden</text:p>
            <text:p text:style-name="Table_20_Contents_2f_PRE"><text:s text:c="4"/>13 = Die Bestellung wurde bezahlt</text:p>
            <text:p text:style-name="Table_20_Contents_2f_PRE"><text:s text:c="4"/>20 = Die Waren wurden an den Kunden versendet</text:p>
            <text:p text:style-name="Table_20_Contents_2f_PRE"><text:s text:c="4"/>21 = Geschenk Gutscheine wurden an den Kunden gesendet</text:p>
            <text:p text:style-name="Table_20_Contents_2f_PRE"><text:s text:c="4"/>30 = Andere Nachricht vom Shop</text:p>
            <text:p text:style-name="Table_20_Contents_2f_PRE"><text:s text:c="4"/>50 = Der Kunde bittet um die Löschung der Bestellung</text:p>
            <text:p text:style-name="Table_20_Contents_2f_PRE"><text:s text:c="4"/>51 = Meldung vom Kunden an das Shop</text:p>
            <text:p text:style-name="Table_20_Contents_2f_PRE"><text:s text:c="4"/>60 = Senden der Geschenkgutscheine an die Empfänger </text:p>
            <text:p text:style-name="Table_20_Contents_2f_PRE"><text:s text:c="4"/>100 = Bestellung versendet und geschlossen</text:p>
            <text:p text:style-name="Table_20_Contents_2f_PRE"><text:s text:c="4"/>101 = Bestellung geschlossen</text:p>
            <text:p text:style-name="Table_20_Contents_2f_PRE"><text:s text:c="4"/>200 = Bestellung gelöscht</text:p>
            <text:p text:style-name="Table_20_Contents_2f_PRE">}</text:p>
          </table:table-cell>
          <table:table-cell table:style-name="Code.D2" office:value-type="string">
            <text:p text:style-name="Table_20_Contents"/>
          </table:table-cell>
        </table:table-row>
        <text:soft-page-break/>
        <table:table-row>
          <table:table-cell table:style-name="Code.A113" office:value-type="string">
            <text:p text:style-name="Table_20_Contents">update_code</text:p>
          </table:table-cell>
          <table:table-cell table:style-name="Code.B2" office:value-type="string">
            <text:p text:style-name="Table_20_Contents">string</text:p>
          </table:table-cell>
          <table:table-cell table:style-name="Code.C113" office:value-type="string">
            <text:p text:style-name="Table_20_Contents">Das 'Paßwort', das vom Shop Administrator verwendet wird, um in die Bestellungsverwaltung des Shops im Frontend zu gelangen.</text:p>
            <text:p text:style-name="Table_20_Contents">Das Paßwort Formularfeld wird angezeigt, wenn ein Backend-Benutzer eingeloggt ist. Trotzdem wird hierfür nochmals ein Paßwort verlangt.</text:p>
          </table:table-cell>
          <table:table-cell table:style-name="Code.D113" office:value-type="string">
            <text:p text:style-name="Table_20_Contents">password</text:p>
          </table:table-cell>
        </table:table-row>
        <table:table-row>
          <table:table-cell table:style-name="Code.A114" office:value-type="string">
            <text:p text:style-name="Table_20_Contents">statusDate_stdWrap</text:p>
          </table:table-cell>
          <table:table-cell table:style-name="Code.B2" office:value-type="string">
            <text:p text:style-name="Table_20_Contents">-&gt;stdWrap </text:p>
          </table:table-cell>
          <table:table-cell table:style-name="Code.C114" office:value-type="string">
            <text:p text:style-name="Table_20_Contents">stdWrap für das Datum des Zustands</text:p>
            <text:p text:style-name="Table_20_Contents"/>
            <text:p text:style-name="P26">Beispiel:</text:p>
            <text:p text:style-name="Table_20_Contents_2f_PRE"><text:span text:style-name="T15">statusDate_stdWrap.strftime = </text:span>%d-%m-%y %H:%M</text:p>
          </table:table-cell>
          <table:table-cell table:style-name="Code.D2" office:value-type="string">
            <text:p text:style-name="Table_20_Contents"/>
          </table:table-cell>
        </table:table-row>
        <table:table-row>
          <table:table-cell table:style-name="Code.A115" office:value-type="string">
            <text:p text:style-name="Table_20_Contents">orderDate_stdWrap</text:p>
          </table:table-cell>
          <table:table-cell table:style-name="Code.B2" office:value-type="string">
            <text:p text:style-name="Table_20_Contents">-&gt;stdWrap </text:p>
          </table:table-cell>
          <table:table-cell table:style-name="Code.C115" office:value-type="string">
            <text:p text:style-name="Table_20_Contents">stdWrap das Datum der Bestellung</text:p>
            <text:p text:style-name="Table_20_Contents"/>
            <text:p text:style-name="P26">Beispiel:</text:p>
            <text:p text:style-name="P64"><text:span text:style-name="T20">orderDate_stdWrap.strftime = </text:span>%d-%m-%y</text:p>
          </table:table-cell>
          <table:table-cell table:style-name="Code.D2" office:value-type="string">
            <text:p text:style-name="Table_20_Contents"/>
          </table:table-cell>
        </table:table-row>
        <table:table-row>
          <table:table-cell table:style-name="Code.A116" office:value-type="string">
            <text:p text:style-name="Table_20_Contents">usebyDate_stdWrap</text:p>
          </table:table-cell>
          <table:table-cell table:style-name="Code.B2" office:value-type="string">
            <text:p text:style-name="Table_20_Contents">-&gt;stdWrap </text:p>
          </table:table-cell>
          <table:table-cell table:style-name="Code.C116" office:value-type="string">
            <text:p text:style-name="Table_20_Contents">stdWrap des Haltbarkeitsdatums</text:p>
          </table:table-cell>
          <table:table-cell table:style-name="Code.D2" office:value-type="string">
            <text:p text:style-name="Table_20_Contents"/>
          </table:table-cell>
        </table:table-row>
        <table:table-row>
          <table:table-cell table:style-name="Code.A117" office:value-type="string">
            <text:p text:style-name="Table_20_Contents">cardEndDate_stdWrap</text:p>
          </table:table-cell>
          <table:table-cell table:style-name="Code.B2" office:value-type="string">
            <text:p text:style-name="Table_20_Contents">-&gt;stdWrap </text:p>
          </table:table-cell>
          <table:table-cell table:style-name="Code.C117" office:value-type="string">
            <text:p text:style-name="Table_20_Contents">stdWrap für das Ende des Gültigkeitszeitraums einer Kreditkarte</text:p>
          </table:table-cell>
          <table:table-cell table:style-name="Code.D2" office:value-type="string">
            <text:p text:style-name="Table_20_Contents"/>
          </table:table-cell>
        </table:table-row>
        <table:table-row>
          <table:table-cell table:style-name="Code.A118" office:value-type="string">
            <text:p text:style-name="Table_20_Contents">displayCurrentRecord</text:p>
          </table:table-cell>
          <table:table-cell table:style-name="Code.B2" office:value-type="string">
            <text:p text:style-name="Table_20_Contents">boolean</text:p>
          </table:table-cell>
          <table:table-cell table:style-name="Code.C118" office:value-type="string">
            <text:p text:style-name="Table_20_Contents">Wenn das gesetzt ist, werden verschiedene Einstellungen in der <text:s/>Anzeige der Bestellung verändert. Die Anzeige wird aus einem $cObj-&gt;data erzeugt.</text:p>
            <text:p text:style-name="Table_20_Contents">Wenn das gesetzt ist, wird die Untermarkierung ###ITEM_SINGLE_DISPLAY_RECORDINSERT### anstelle der gewähnlichen <text:s/>###ITEM_SINGLE_DISPLAY### verwendet.</text:p>
          </table:table-cell>
          <table:table-cell table:style-name="Code.D2" office:value-type="string">
            <text:p text:style-name="Table_20_Contents"/>
          </table:table-cell>
        </table:table-row>
        <table:table-row>
          <table:table-cell table:style-name="Code.A119" office:value-type="string">
            <text:p text:style-name="Table_20_Contents">externalProcessing</text:p>
          </table:table-cell>
          <table:table-cell table:style-name="Code.B2" office:value-type="string">
            <text:p text:style-name="Table_20_Contents">cObject</text:p>
          </table:table-cell>
          <table:table-cell table:style-name="Code.C119" office:value-type="string">
            <text:p text:style-name="Table_20_Contents">Dieses cObject kann zum Aufruf einer Funktion verwendet werden, <text:s/>die den Warenkorb verändert. Diese Verarbeitung kann in Abhängigkeit von den Einstellungen in einem anderen externen Shop-System erfolgen. Die Ausgabe wird in an den Anfang der Ausgabe der Warenkorbseite angehängt.</text:p>
            <text:p text:style-name="Table_20_Contents">Dieses cObject führt jedes mal die Methode main_products method in der Klasse user_products in class.tx_ttproducts.php aus. Sie wird immer vor jeder anderen Verarbeitung im Shop aufgerufen. Siehe Klassenbeschreibung im Code.</text:p>
          </table:table-cell>
          <table:table-cell table:style-name="Code.D2" office:value-type="string">
            <text:p text:style-name="Table_20_Contents"/>
          </table:table-cell>
        </table:table-row>
        <table:table-row>
          <table:table-cell table:style-name="Code.A120" office:value-type="string">
            <text:p text:style-name="P2">externalProcessing_final</text:p>
          </table:table-cell>
          <table:table-cell table:style-name="Code.B2" office:value-type="string">
            <text:p text:style-name="P2">cObject</text:p>
          </table:table-cell>
          <table:table-cell table:style-name="Code.C120" office:value-type="string">
            <text:p text:style-name="P42">cObject für das Template der Bestellbestätigung</text:p>
          </table:table-cell>
          <table:table-cell table:style-name="Code.D2" office:value-type="string">
            <text:p text:style-name="Table_20_Contents"/>
          </table:table-cell>
        </table:table-row>
        <table:table-row>
          <table:table-cell table:style-name="Code.A121" office:value-type="string">
            <text:p text:style-name="Table_20_Contents">externalFinalizing</text:p>
          </table:table-cell>
          <table:table-cell table:style-name="Code.B2" office:value-type="string">
            <text:p text:style-name="Table_20_Contents">cObject</text:p>
          </table:table-cell>
          <table:table-cell table:style-name="Code.C121" office:value-type="string">
            <text:p text:style-name="Table_20_Contents">Dieses cObject kann zum Aufruf einer Funktion verwendet werden, die Einstellungen in einem externen Bestellsystem vornimmt. Dies ist eine Schwester der oben angegebenen Funktionen. Sie sollten irgendwie gemeinsam verwendet werden. Diese Funktion wird unmittelbar nach dem Aufruf der finalize-Funktion aufgerufen. </text:p>
            <text:p text:style-name="Table_20_Contents">Diese Funktion ist zum Beispeil dafür geeignet, um jeden externen Warenkob, der über das <text:s/>.externalProcessing cObject möglich ist, löschen zu können.</text:p>
            <text:p text:style-name="Table_20_Contents"><text:span text:style-name="T3">Achtung:</text:span> Die Ausgabe wird nirgends angezeigt.</text:p>
          </table:table-cell>
          <table:table-cell table:style-name="Code.D2" office:value-type="string">
            <text:p text:style-name="Table_20_Contents"/>
          </table:table-cell>
        </table:table-row>
        <table:table-row>
          <table:table-cell table:style-name="Code.A122" office:value-type="string">
            <text:p text:style-name="Table_20_Contents">wrap1</text:p>
          </table:table-cell>
          <table:table-cell table:style-name="Code.B2" office:value-type="string">
            <text:p text:style-name="P5">-&gt; stdWrap</text:p>
          </table:table-cell>
          <table:table-cell table:style-name="Code.C122" office:value-type="string">
            <text:p text:style-name="Table_20_Contents">Globaler Wrap 1. Das wird auf die Markierungen ###GW1B### und ###GW1E### verteilt. Geben Sie hier keinen normalen Wert ein, sondern verwenden Sie den Trennstrich zur Kennzeichnung der beiden Teile.</text:p>
            <text:p text:style-name="Table_20_Contents"/>
            <text:p text:style-name="P26">Beispiel:</text:p>
            <text:p text:style-name="Table_20_Contents_2f_PRE">wrap1.wrap = &lt;B&gt; |&lt;/B&gt;</text:p>
          </table:table-cell>
          <table:table-cell table:style-name="Code.D2" office:value-type="string">
            <text:p text:style-name="Table_20_Contents"/>
          </table:table-cell>
        </table:table-row>
        <table:table-row>
          <table:table-cell table:style-name="Code.A123" office:value-type="string">
            <text:p text:style-name="Table_20_Contents">wrap2</text:p>
          </table:table-cell>
          <table:table-cell table:style-name="Code.B2" office:value-type="string">
            <text:p text:style-name="Table_20_Contents">-&gt; stdWrap</text:p>
          </table:table-cell>
          <table:table-cell table:style-name="Code.C123" office:value-type="string">
            <text:p text:style-name="Table_20_Contents">Globaler Wrap 2 (siehe oben) Markierungen ###GW2B### und ###GW2E###</text:p>
          </table:table-cell>
          <table:table-cell table:style-name="Code.D2" office:value-type="string">
            <text:p text:style-name="Table_20_Contents"/>
          </table:table-cell>
        </table:table-row>
        <table:table-row>
          <table:table-cell table:style-name="Code.A124" office:value-type="string">
            <text:p text:style-name="Table_20_Contents">wrapInBaseClass</text:p>
          </table:table-cell>
          <table:table-cell table:style-name="Code.B2" office:value-type="string">
            <text:p text:style-name="Table_20_Contents">boolean</text:p>
            <text:p text:style-name="P54">S</text:p>
          </table:table-cell>
          <table:table-cell table:style-name="Code.C124" office:value-type="string">
            <text:p text:style-name="Table_20_Contents">Wenn gesetzt, dann wird die Ausgabe mit &lt;div class="tx-ttproducts-pi1"&gt; | &lt;/div&gt; umrahmt.</text:p>
          </table:table-cell>
          <table:table-cell table:style-name="Code.D124" office:value-type="string">
            <text:p text:style-name="Table_20_Contents">1</text:p>
          </table:table-cell>
        </table:table-row>
        <table:table-row>
          <table:table-cell table:style-name="Code.A125" office:value-type="string">
            <text:p text:style-name="Table_20_Contents">wrapInCode</text:p>
          </table:table-cell>
          <table:table-cell table:style-name="Code.B2" office:value-type="string">
            <text:p text:style-name="Table_20_Contents">boolean</text:p>
            <text:p text:style-name="P54">S</text:p>
          </table:table-cell>
          <table:table-cell table:style-name="Code.C125" office:value-type="string">
            <text:p text:style-name="Table_20_Contents">Wenn gesetzt, dann wird die Ausgabe mit </text:p>
            <text:p text:style-name="Table_20_Contents_2f_PRE">&lt;!-- START: tt-products-code-uid --&gt;&lt;div id="tt-products-code-uid"&gt;</text:p>
            <text:p text:style-name="Table_20_Contents_2f_PRE"><text:s/>|<text:bookmark text:name="line764"/>&lt;/div&gt;&lt;!-- END: tt-products-code-uid --&gt;</text:p>
            <text:p text:style-name="Table_20_Contents">umrahmt. 'code' wird durch den Code des Plugins ersetzt, und uid durch das Feld 'uid' aus tt_products.</text:p>
          </table:table-cell>
          <table:table-cell table:style-name="Code.D125" office:value-type="string">
            <text:p text:style-name="Table_20_Contents">1</text:p>
          </table:table-cell>
        </table:table-row>
        <table:table-row>
          <table:table-cell table:style-name="Code.A126" office:value-type="string">
            <text:p text:style-name="Table_20_Contents">selectColor</text:p>
          </table:table-cell>
          <table:table-cell table:style-name="Code.B2" office:value-type="string">
            <text:p text:style-name="Table_20_Contents">integer</text:p>
          </table:table-cell>
          <table:table-cell table:style-name="Code.C126" office:value-type="string">
            <text:p text:style-name="Table_20_Contents">Wenn gesetzt, dann ist die Farbe eines Produkt über eine Auswahlbox wählbar.</text:p>
          </table:table-cell>
          <table:table-cell table:style-name="Code.D126" office:value-type="string">
            <text:p text:style-name="Table_20_Contents">1</text:p>
          </table:table-cell>
        </table:table-row>
        <table:table-row>
          <table:table-cell table:style-name="Code.A127" office:value-type="string">
            <text:p text:style-name="Table_20_Contents">selectColor2</text:p>
          </table:table-cell>
          <table:table-cell table:style-name="Code.B2" office:value-type="string">
            <text:p text:style-name="Table_20_Contents">integer</text:p>
          </table:table-cell>
          <table:table-cell table:style-name="Code.C127" office:value-type="string">
            <text:p text:style-name="Table_20_Contents">Wenn gesetzt, dann ist die 2. Farbe eines Produkt über eine Auswahlbox wählbar.</text:p>
          </table:table-cell>
          <table:table-cell table:style-name="Code.D127" office:value-type="string">
            <text:p text:style-name="Table_20_Contents">1</text:p>
          </table:table-cell>
        </table:table-row>
        <text:soft-page-break/>
        <table:table-row>
          <table:table-cell table:style-name="Code.A128" office:value-type="string">
            <text:p text:style-name="Table_20_Contents">selectColor3</text:p>
          </table:table-cell>
          <table:table-cell table:style-name="Code.B2" office:value-type="string">
            <text:p text:style-name="Table_20_Contents">integer</text:p>
          </table:table-cell>
          <table:table-cell table:style-name="Code.C128" office:value-type="string">
            <text:p text:style-name="Table_20_Contents">Wenn gesetzt, dann ist die 3. Farbe eines Produkt über eine Auswahlbox wählbar.</text:p>
          </table:table-cell>
          <table:table-cell table:style-name="Code.D128" office:value-type="string">
            <text:p text:style-name="Table_20_Contents">1</text:p>
          </table:table-cell>
        </table:table-row>
        <table:table-row>
          <table:table-cell table:style-name="Code.A129" office:value-type="string">
            <text:p text:style-name="Table_20_Contents">selectSize</text:p>
          </table:table-cell>
          <table:table-cell table:style-name="Code.B2" office:value-type="string">
            <text:p text:style-name="Table_20_Contents">integer</text:p>
          </table:table-cell>
          <table:table-cell table:style-name="Code.C129" office:value-type="string">
            <text:p text:style-name="Table_20_Contents">Wenn gesetzt, dann ist die Größe eines Produkt über eine Auswahlbox wählbar.</text:p>
          </table:table-cell>
          <table:table-cell table:style-name="Code.D129" office:value-type="string">
            <text:p text:style-name="Table_20_Contents">1</text:p>
          </table:table-cell>
        </table:table-row>
        <table:table-row>
          <table:table-cell table:style-name="Code.A130" office:value-type="string">
            <text:p text:style-name="Table_20_Contents">selectSize2</text:p>
          </table:table-cell>
          <table:table-cell table:style-name="Code.B2" office:value-type="string">
            <text:p text:style-name="Table_20_Contents">integer</text:p>
          </table:table-cell>
          <table:table-cell table:style-name="Code.C130" office:value-type="string">
            <text:p text:style-name="Table_20_Contents">Wenn gesetzt, dann ist die 2. Größe eines Produkt über eine Auswahlbox wählbar.</text:p>
          </table:table-cell>
          <table:table-cell table:style-name="Code.D130" office:value-type="string">
            <text:p text:style-name="Table_20_Contents">1</text:p>
          </table:table-cell>
        </table:table-row>
        <table:table-row>
          <table:table-cell table:style-name="Code.A131" office:value-type="string">
            <text:p text:style-name="Table_20_Contents">selectSize3</text:p>
          </table:table-cell>
          <table:table-cell table:style-name="Code.B2" office:value-type="string">
            <text:p text:style-name="Table_20_Contents">integer</text:p>
          </table:table-cell>
          <table:table-cell table:style-name="Code.C131" office:value-type="string">
            <text:p text:style-name="Table_20_Contents">Wenn gesetzt, dann ist die 3. Größe eines Produkt über eine Auswahlbox wählbar.</text:p>
          </table:table-cell>
          <table:table-cell table:style-name="Code.D131" office:value-type="string">
            <text:p text:style-name="Table_20_Contents">1</text:p>
          </table:table-cell>
        </table:table-row>
        <table:table-row>
          <table:table-cell table:style-name="Code.A132" office:value-type="string">
            <text:p text:style-name="Table_20_Contents">selectDescription</text:p>
          </table:table-cell>
          <table:table-cell table:style-name="Code.B2" office:value-type="string">
            <text:p text:style-name="Table_20_Contents">integer</text:p>
          </table:table-cell>
          <table:table-cell table:style-name="Code.C132" office:value-type="string">
            <text:p text:style-name="Table_20_Contents">Wenn gesetzt, dann ist die Beschreibung eines Produkt über eine Auswahlbox wählbar.</text:p>
          </table:table-cell>
          <table:table-cell table:style-name="Code.D132" office:value-type="string">
            <text:p text:style-name="Table_20_Contents">1</text:p>
          </table:table-cell>
        </table:table-row>
        <table:table-row>
          <table:table-cell table:style-name="Code.A133" office:value-type="string">
            <text:p text:style-name="Table_20_Contents">selectGradings</text:p>
          </table:table-cell>
          <table:table-cell table:style-name="Code.B2" office:value-type="string">
            <text:p text:style-name="Table_20_Contents">integer</text:p>
          </table:table-cell>
          <table:table-cell table:style-name="Code.C133" office:value-type="string">
            <text:p text:style-name="Table_20_Contents">Wenn gesetzt, dann ist die Staffelung eines Produkt über eine Auswahlbox wählbar.</text:p>
          </table:table-cell>
          <table:table-cell table:style-name="Code.D133" office:value-type="string">
            <text:p text:style-name="Table_20_Contents">1</text:p>
          </table:table-cell>
        </table:table-row>
        <table:table-row>
          <table:table-cell table:style-name="Code.A134" office:value-type="string">
            <text:p text:style-name="Table_20_Contents">selectMaterial</text:p>
          </table:table-cell>
          <table:table-cell table:style-name="Code.B2" office:value-type="string">
            <text:p text:style-name="Table_20_Contents">integer</text:p>
          </table:table-cell>
          <table:table-cell table:style-name="Code.C134" office:value-type="string">
            <text:p text:style-name="Table_20_Contents">Wenn gesetzt, dann ist das Material eines Produkt über eine Auswahlbox wählbar.</text:p>
          </table:table-cell>
          <table:table-cell table:style-name="Code.D134" office:value-type="string">
            <text:p text:style-name="Table_20_Contents">1</text:p>
          </table:table-cell>
        </table:table-row>
        <table:table-row>
          <table:table-cell table:style-name="Code.A135" office:value-type="string">
            <text:p text:style-name="Table_20_Contents">selectQuality</text:p>
          </table:table-cell>
          <table:table-cell table:style-name="Code.B2" office:value-type="string">
            <text:p text:style-name="Table_20_Contents">integer</text:p>
          </table:table-cell>
          <table:table-cell table:style-name="Code.C135" office:value-type="string">
            <text:p text:style-name="Table_20_Contents">Wenn gesetzt, dann ist die Qualität eines Produkt über eine Auswahlbox wählbar.</text:p>
          </table:table-cell>
          <table:table-cell table:style-name="Code.D135" office:value-type="string">
            <text:p text:style-name="Table_20_Contents">1</text:p>
          </table:table-cell>
        </table:table-row>
        <table:table-row>
          <table:table-cell table:style-name="Code.A136" office:value-type="string">
            <text:p text:style-name="Table_20_Contents">color1</text:p>
          </table:table-cell>
          <table:table-cell table:style-name="Code.B2" office:value-type="string">
            <text:p text:style-name="Table_20_Contents">string /stdWrap</text:p>
          </table:table-cell>
          <table:table-cell table:style-name="Code.C136" office:value-type="string">
            <text:p text:style-name="Table_20_Contents">Wert für ###GC1### Markierungen (Globale Farbe 1)</text:p>
          </table:table-cell>
          <table:table-cell table:style-name="Code.D2" office:value-type="string">
            <text:p text:style-name="Table_20_Contents"/>
          </table:table-cell>
        </table:table-row>
        <table:table-row>
          <table:table-cell table:style-name="Code.A137" office:value-type="string">
            <text:p text:style-name="Table_20_Contents">color2</text:p>
          </table:table-cell>
          <table:table-cell table:style-name="Code.B2" office:value-type="string">
            <text:p text:style-name="Table_20_Contents">string /stdWrap</text:p>
          </table:table-cell>
          <table:table-cell table:style-name="Code.C137" office:value-type="string">
            <text:p text:style-name="Table_20_Contents">Wert für ###GC2### Markierungen (Globale Farbe 2)</text:p>
          </table:table-cell>
          <table:table-cell table:style-name="Code.D2" office:value-type="string">
            <text:p text:style-name="Table_20_Contents"/>
          </table:table-cell>
        </table:table-row>
        <table:table-row>
          <table:table-cell table:style-name="Code.A138" office:value-type="string">
            <text:p text:style-name="Table_20_Contents">color3</text:p>
          </table:table-cell>
          <table:table-cell table:style-name="Code.B2" office:value-type="string">
            <text:p text:style-name="Table_20_Contents">string / stdWrap</text:p>
          </table:table-cell>
          <table:table-cell table:style-name="Code.C138" office:value-type="string">
            <text:p text:style-name="Table_20_Contents">Wert für ###GC3### Markierungen (Globale Farbe 3)</text:p>
          </table:table-cell>
          <table:table-cell table:style-name="Code.D2" office:value-type="string">
            <text:p text:style-name="Table_20_Contents"/>
          </table:table-cell>
        </table:table-row>
        <table:table-row>
          <table:table-cell table:style-name="Code.A139" office:value-type="string">
            <text:p text:style-name="P61">nl2brNote</text:p>
          </table:table-cell>
          <table:table-cell table:style-name="Code.B2" office:value-type="string">
            <text:p text:style-name="P61">boolean</text:p>
          </table:table-cell>
          <table:table-cell table:style-name="Code.C139" office:value-type="string">
            <text:p text:style-name="P62">Wenn gesetzt, werden im Feld 'Bemerkung' (note) Zeilenumbrüche durch das HTML-Tag &lt;br /&gt; ersetzt.</text:p>
          </table:table-cell>
          <table:table-cell table:style-name="Code.D139" office:value-type="string">
            <text:p text:style-name="Table_20_Contents">1</text:p>
          </table:table-cell>
        </table:table-row>
        <table:table-row>
          <table:table-cell table:style-name="Code.A140" office:value-type="string">
            <text:p text:style-name="P2">useArticles</text:p>
          </table:table-cell>
          <table:table-cell table:style-name="Code.B2" office:value-type="string">
            <text:p text:style-name="P2">integer</text:p>
          </table:table-cell>
          <table:table-cell table:style-name="Code.C140" office:value-type="string">
            <text:p text:style-name="Table_20_Contents"/>
            <text:list text:style-name="L1">
              <text:list-item>
                <text:p text:style-name="P84">0: Wenn Sie keine Einträge in der Artikel Tabelle machen wollen, dann muss das auf 0 gesetzt beleiben.</text:p>
              </text:list-item>
              <text:list-item>
                <text:p text:style-name="P83">1: Wenn Sie Produkte in verschiedenen Variationen verwenden wollen und dafür eigene Preise in der Artikel Tabelle angelegt haben, dann müssen Sie das auf 1 setzen. Beim Produkt und beim Artikel müssen alle Varianten eingetragen werden. Ein Artikel wird verwendet, wenn er alle Varianten der aktuellen Auswahl über Select-Boxen abdeckt. Das Feld instock der Artikel Tabelle wird anstelle jenes der Produkt Tabelle verwendet. Die Artikel werden gemeinsam mit dem zugehörigen Produkt verkauft.</text:p>
              </text:list-item>
            </text:list>
            <text:list text:style-name="L2">
              <text:list-item>
                <text:p text:style-name="P85">2: Es gibt keine Varianten. Kein Produkt wird mit einem Artikel verbunden. Der Artikel wird ohne Produkt verkauft.</text:p>
              </text:list-item>
            </text:list>
            <text:list text:style-name="L3">
              <text:list-item>
                <text:p text:style-name="P86">3: Die Varianten eines Produkts müssen nicht mehr eingegeben werden, sondern werden von den einzeln beim Produkt zugeordneten Artikeln genommen. Einem Artikel wird kein Produkt über das Produktfeld mehr zugeordnet, sondern dem Produkt werden mehrere Artikel mit Aufpreismöglichkeit zugeordnet. Jeder Artikel kann einen Teil der Varianten für die Select-Box abdecken. Bei mehreren passenden Artikeln werden die Aufpreise addiert und die Texte aneinandergehängt.</text:p>
              </text:list-item>
            </text:list>
          </table:table-cell>
          <table:table-cell table:style-name="Code.D2" office:value-type="string">
            <text:p text:style-name="Table_20_Contents"/>
          </table:table-cell>
        </table:table-row>
        <table:table-row>
          <table:table-cell table:style-name="Code.A141" office:value-type="string">
            <text:p text:style-name="P2">keepProductData</text:p>
          </table:table-cell>
          <table:table-cell table:style-name="Code.B2" office:value-type="string">
            <text:p text:style-name="P2">boolean</text:p>
          </table:table-cell>
          <table:table-cell table:style-name="Code.C141" office:value-type="string">
            <text:p text:style-name="Table_20_Contents">Wenn gesetzt, dann bleiben die Text- und Datenfelder eines Produktes in den Artikelmarkern erhalten, wenn sie nicht leer sind und das Produkt mit einem entsprechenden Artikel verschmolzen wird, der in den Varianten übereinstimmt..</text:p>
            <text:p text:style-name="Table_20_Contents">Wird nur bei useArticles = 3 verwendet.</text:p>
          </table:table-cell>
          <table:table-cell table:style-name="Code.D141" office:value-type="string">
            <text:p text:style-name="Table_20_Contents">1</text:p>
          </table:table-cell>
        </table:table-row>
        <table:table-row>
          <table:table-cell table:style-name="Code.A142" office:value-type="string">
            <text:p text:style-name="P2">noArticleSingleView</text:p>
          </table:table-cell>
          <table:table-cell table:style-name="Code.B2" office:value-type="string">
            <text:p text:style-name="P2">boolean</text:p>
          </table:table-cell>
          <table:table-cell table:style-name="Code.C142" office:value-type="string">
            <text:p text:style-name="Table_20_Contents">Wenn gesetzt, dann wird keine Einzelansicht für Artikel verwendet. Stattdessen werden Artikel auf die Einzelansicht des Produktes verlinkt und die entsprechende Variantenauswahl wird angezeigt.</text:p>
          </table:table-cell>
          <table:table-cell table:style-name="Code.D2" office:value-type="string">
            <text:p text:style-name="Table_20_Contents"/>
          </table:table-cell>
        </table:table-row>
        <table:table-row>
          <table:table-cell table:style-name="Code.A143" office:value-type="string">
            <text:p text:style-name="P2">priceTagObj</text:p>
          </table:table-cell>
          <table:table-cell table:style-name="Code.B2" office:value-type="string">
            <text:p text:style-name="P2">IMAGE cObject</text:p>
          </table:table-cell>
          <table:table-cell table:style-name="Code.C143" office:value-type="string">
            <text:p text:style-name="P42">Bild oder cObject für die Anzeige des Preises</text:p>
          </table:table-cell>
          <table:table-cell table:style-name="Code.D2" office:value-type="string">
            <text:p text:style-name="Table_20_Contents"/>
          </table:table-cell>
        </table:table-row>
        <table:table-row>
          <table:table-cell table:style-name="Code.A144" office:value-type="string">
            <text:p text:style-name="P2">usePriceTag</text:p>
          </table:table-cell>
          <table:table-cell table:style-name="Code.B2" office:value-type="string">
            <text:p text:style-name="P2">boolean</text:p>
          </table:table-cell>
          <table:table-cell table:style-name="Code.C144" office:value-type="string">
            <text:p text:style-name="P42">Wenn gesetzt, wird das <text:span text:style-name="T2">priceTagObj verwendet. Wenn nicht, dann wird der Preis als normaler Text ausgegeben.</text:span></text:p>
          </table:table-cell>
          <table:table-cell table:style-name="Code.D144" office:value-type="string">
            <text:p text:style-name="Table_20_Contents">0</text:p>
          </table:table-cell>
        </table:table-row>
        <table:table-row>
          <table:table-cell table:style-name="Code.A145" office:value-type="string">
            <text:p text:style-name="P2">useStaticInfoCountry</text:p>
          </table:table-cell>
          <table:table-cell table:style-name="Code.B2" office:value-type="string">
            <text:p text:style-name="P2">boolean</text:p>
          </table:table-cell>
          <table:table-cell table:style-name="Code.C145" office:value-type="string">
            <text:p text:style-name="P42">Wenn gesetzt, dann wird das kurze fe_users static_info_country Feld als Land anstelle des country Feldes verwendet.</text:p>
          </table:table-cell>
          <table:table-cell table:style-name="Code.D145" office:value-type="string">
            <text:p text:style-name="Table_20_Contents">0</text:p>
          </table:table-cell>
        </table:table-row>
        <table:table-row>
          <table:table-cell table:style-name="Code.A146" office:value-type="string">
            <text:p text:style-name="P2">useStaticTaxes</text:p>
          </table:table-cell>
          <table:table-cell table:style-name="Code.B2" office:value-type="string">
            <text:p text:style-name="P2">boolean</text:p>
          </table:table-cell>
          <table:table-cell table:style-name="Code.C146" office:value-type="string">
            <text:p text:style-name="P42">Wenn gesetzt, dann wird die Steuer aus dem Land und der Region über die Extension static_info_tables_taxes bestimmt. UIDstore muss gesetzt sein.</text:p>
          </table:table-cell>
          <table:table-cell table:style-name="Code.D146" office:value-type="string">
            <text:p text:style-name="Table_20_Contents">0</text:p>
          </table:table-cell>
        </table:table-row>
        <text:soft-page-break/>
        <table:table-row>
          <table:table-cell table:style-name="Code.A147" office:value-type="string">
            <text:p text:style-name="P2">whereGift</text:p>
          </table:table-cell>
          <table:table-cell table:style-name="Code.B2" office:value-type="string">
            <text:p text:style-name="P2">string</text:p>
          </table:table-cell>
          <table:table-cell table:style-name="Code.C147" office:value-type="string">
            <text:p text:style-name="P42">Diesee SQL Where Bedingung bestimmt, welche Produkte als Geschenke (Gutscheine) anzusehen sind.</text:p>
          </table:table-cell>
          <table:table-cell table:style-name="Code.D2" office:value-type="string">
            <text:p text:style-name="Table_20_Contents"/>
          </table:table-cell>
        </table:table-row>
        <table:table-row>
          <table:table-cell table:style-name="Code.A148" office:value-type="string">
            <text:p text:style-name="P2">whereGiftService</text:p>
          </table:table-cell>
          <table:table-cell table:style-name="Code.B2" office:value-type="string">
            <text:p text:style-name="P2">string</text:p>
          </table:table-cell>
          <table:table-cell table:style-name="Code.C148" office:value-type="string">
            <text:p text:style-name="P42">Diese SQL Where Bedingung bestimmt, welche Produkte als Geschenk Services verwendet werden können.</text:p>
          </table:table-cell>
          <table:table-cell table:style-name="Code.D2" office:value-type="string">
            <text:p text:style-name="Table_20_Contents"/>
          </table:table-cell>
        </table:table-row>
        <table:table-row>
          <table:table-cell table:style-name="Code.A64" office:value-type="string">
            <text:p text:style-name="P58">max_note_length</text:p>
          </table:table-cell>
          <table:table-cell table:style-name="Code.B64" office:value-type="string">
            <text:p text:style-name="P58">int+</text:p>
          </table:table-cell>
          <table:table-cell table:style-name="Code.C64" office:value-type="string">
            <text:p text:style-name="Table_20_Contents">siehe Artikel/Produkt Konfiguration</text:p>
            <text:p text:style-name="Table_20_Contents"><text:span text:style-name="T4">Veraltet.</text:span> Verwenden Sie stattdessen</text:p>
            <text:h text:style-name="Preformatted_20_Text" text:outline-level="5">plugin.tt_products.conf.tt_products.LIST {<text:line-break/>    field {<text:line-break/>        note = TEXT<text:line-break/>        note.postUserFunc = tx_pmkhtmlcrop-&gt;htmlCrop<text:line-break/>        note.postUserFunc.htmlCrop = 9 | ... More<text:line-break/>    }<text:line-break/>  } </text:h>
            <text:p text:style-name="Table_20_Contents"/>
            <text:p text:style-name="Table_20_Contents">früher:</text:p>
            <text:p text:style-name="Table_20_Contents">Die Bemerkung zu einem Produkt wir in der Listendarstellung nach max_note_length Zeichen abgebrochen. Dahinter werden noch 3 Punkte angehängt...</text:p>
            <text:p text:style-name="Table_20_Contents">Das kann aber unschön sein, wenn Sie HTML in diesem Feld verwenden. Denn wenn ein HTML-Tag nicht abgeschlossen wird, kann die ganze Darstellung chaotisch sein.</text:p>
          </table:table-cell>
          <table:table-cell table:style-name="Code.D149" office:value-type="float" office:value="10000">
            <text:p text:style-name="P17">10000</text:p>
          </table:table-cell>
        </table:table-row>
        <table:table-row>
          <table:table-cell table:style-name="Code.A64" office:value-type="string">
            <text:p text:style-name="Table_20_Contents">specialPreparation</text:p>
          </table:table-cell>
          <table:table-cell table:style-name="Code.B64" office:value-type="string">
            <text:p text:style-name="Table_20_Contents">string</text:p>
          </table:table-cell>
          <table:table-cell table:style-name="Code.C64" office:value-type="string">
            <text:p text:style-name="Table_20_Contents">Dieser Text wird Ihre ###PRODUCT_SPECIAL_PREP### Markierungen ersetzen.</text:p>
          </table:table-cell>
          <table:table-cell table:style-name="Code.D64">
            <text:p text:style-name="P63"/>
          </table:table-cell>
        </table:table-row>
        <table:table-row>
          <table:table-cell table:style-name="Code.A64" office:value-type="string">
            <text:p text:style-name="Table_20_Contents">createUsers</text:p>
          </table:table-cell>
          <table:table-cell table:style-name="Code.B64" office:value-type="string">
            <text:p text:style-name="Table_20_Contents">Boolean</text:p>
          </table:table-cell>
          <table:table-cell table:style-name="Code.C64" office:value-type="string">
            <text:p text:style-name="Table_20_Contents">Wenn Sie das und PIDuserFolder setzen, dann wird für jeden Kunden, der nicht eingeloggt ist, und dessen E-Mail-Adresse noch nicht als Benutzer gespeichert wurde, als neuer Frontend Benutzer erzeugt.</text:p>
            <text:p text:style-name="Table_20_Contents">Eine E-Mail mit dem Benutzernamen (seine E-mail Adresse) und dem Paßwort wird ihm zugesendet. (siehe ###E-Mail_NEWUSER_TEMPLATE###)</text:p>
          </table:table-cell>
          <table:table-cell table:style-name="Code.D151" office:value-type="string">
            <text:p text:style-name="P17">0</text:p>
          </table:table-cell>
        </table:table-row>
        <table:table-row>
          <table:table-cell table:style-name="Code.A152" office:value-type="string">
            <text:p text:style-name="P31">useMd5Password</text:p>
          </table:table-cell>
          <table:table-cell table:style-name="Code.B2" office:value-type="string">
            <text:p text:style-name="Table_20_Contents">boolean</text:p>
          </table:table-cell>
          <table:table-cell table:style-name="Code.C152" office:value-type="string">
            <text:p text:style-name="P31">md5 Passwort Verschlüsselung aktivieren</text:p>
            <text:p text:style-name="P31"/>
            <text:p text:style-name="P31">Achtung: Falls gesetzt, wird das Passwort verschlüsselt. Sie müssen dann auch Extensions wie kb_md5fepw und die newloginbox installieren.</text:p>
          </table:table-cell>
          <table:table-cell table:style-name="Code.D152" office:value-type="string">
            <text:p text:style-name="P31">0</text:p>
          </table:table-cell>
        </table:table-row>
        <table:table-row>
          <table:table-cell table:style-name="Code.A64" office:value-type="string">
            <text:p text:style-name="P50">outputFolder</text:p>
          </table:table-cell>
          <table:table-cell table:style-name="Code.B64" office:value-type="string">
            <text:p text:style-name="Table_20_Contents">string</text:p>
          </table:table-cell>
          <table:table-cell table:style-name="Code.C64" office:value-type="string">
            <text:p text:style-name="Table_20_Contents">Verzeichnis, wo die Rechnung und der Lieferschein angelegt werden.</text:p>
          </table:table-cell>
          <table:table-cell table:style-name="Code.D151" office:value-type="string">
            <text:p text:style-name="P17">fileadmin/data</text:p>
          </table:table-cell>
        </table:table-row>
        <table:table-row>
          <table:table-cell table:style-name="Code.A64" office:value-type="string">
            <text:p text:style-name="Table_20_Contents">memberOfGroup</text:p>
          </table:table-cell>
          <table:table-cell table:style-name="Code.B64" office:value-type="string">
            <text:p text:style-name="Table_20_Contents">int+</text:p>
          </table:table-cell>
          <table:table-cell table:style-name="Code.C64" office:value-type="string">
            <text:p text:style-name="Table_20_Contents">Die ID der Frontend Benutzergruppe, der die neu erzeugten Frontend Benutzer angehören.</text:p>
          </table:table-cell>
          <table:table-cell table:style-name="Code.D151" office:value-type="string">
            <text:p text:style-name="P17">1</text:p>
          </table:table-cell>
        </table:table-row>
        <table:table-row>
          <table:table-cell table:style-name="Code.A155" office:value-type="string">
            <text:p text:style-name="P2">discountGroupName</text:p>
          </table:table-cell>
          <table:table-cell table:style-name="Code.B2" office:value-type="string">
            <text:p text:style-name="P5">string</text:p>
          </table:table-cell>
          <table:table-cell table:style-name="Code.C155" office:value-type="string">
            <text:p text:style-name="Table_20_Contents">Name der Frontend Gruppe für einen Discount Preis</text:p>
          </table:table-cell>
          <table:table-cell table:style-name="Code.D64">
            <text:p text:style-name="P63"/>
          </table:table-cell>
        </table:table-row>
        <table:table-row>
          <table:table-cell table:style-name="Code.A156" office:value-type="string">
            <text:p text:style-name="P2">getDiscountPrice</text:p>
          </table:table-cell>
          <table:table-cell table:style-name="Code.B2" office:value-type="string">
            <text:p text:style-name="Table_20_Contents">boolean</text:p>
          </table:table-cell>
          <table:table-cell table:style-name="Code.C156" office:value-type="string">
            <text:p text:style-name="Table_20_Contents">Wenn gesetzt, wird der Discount Preis auch für normale Kunden gewährt, ohne daß sie zu einer Frontend Benutzergruppe in einer Discount Gruppe gehören müssen.</text:p>
          </table:table-cell>
          <table:table-cell table:style-name="Code.D64">
            <text:p text:style-name="P63"/>
          </table:table-cell>
        </table:table-row>
        <table:table-row>
          <table:table-cell table:style-name="Code.A157" office:value-type="string">
            <text:p text:style-name="P2">discountPriceMode</text:p>
          </table:table-cell>
          <table:table-cell table:style-name="Code.B2" office:value-type="string">
            <text:p text:style-name="Table_20_Contents">integer</text:p>
          </table:table-cell>
          <table:table-cell table:style-name="Code.C157" office:value-type="string">
            <text:p text:style-name="Table_20_Contents">Wenn nicht gesetzt, dann wird der 1. Preis eines Produktes als Basis für die Berechnung hinter dem Preis2 Discount Marker verwendet:</text:p>
            <text:p text:style-name="Table_20_Contents"/>
            <text:p text:style-name="Table_20_Contents">discount = (price – price2) / price</text:p>
            <text:p text:style-name="Table_20_Contents">wobei price keine Rabatte enthält</text:p>
            <text:p text:style-name="Table_20_Contents">auf 1 gesetzt:</text:p>
            <text:p text:style-name="Table_20_Contents">discount = (price2 – price) / price2</text:p>
            <text:p text:style-name="Table_20_Contents">wobei price auch die Rabatte enthält</text:p>
            <text:p text:style-name="Table_20_Contents">Das wird nur für bei einer Verwendung der PRICE2 Marker benötigt.</text:p>
          </table:table-cell>
          <table:table-cell table:style-name="Code.D157" office:value-type="string">
            <text:p text:style-name="Table_20_Contents"/>
          </table:table-cell>
        </table:table-row>
        <table:table-row>
          <table:table-cell table:style-name="Code.A158" office:value-type="string">
            <text:p text:style-name="P2">discountFieldMode</text:p>
          </table:table-cell>
          <table:table-cell table:style-name="Code.B2" office:value-type="string">
            <text:p text:style-name="Table_20_Contents">integer</text:p>
          </table:table-cell>
          <table:table-cell table:style-name="Code.C158" office:value-type="string">
            <text:p text:style-name="Table_20_Contents">Wenn gesetzt, wird das Discount Feld in der Produkt- und Kategorie-Tabelle genutzt um einen Rabatt für ein Produkt zu bekommen.</text:p>
            <text:p text:style-name="Table_20_Contents"/>
            <text:p text:style-name="Table_20_Contents">Modi:</text:p>
            <text:p text:style-name="Table_20_Contents">1 ... Der höchste Rabatt aus dem Produkt, den Kategorien und Oberkategorien wird verwendet.</text:p>
            <text:p text:style-name="Table_20_Contents">2 ... Der Rabatt des Produktes wird verwendet, wenn gesetzt. Ansonsten wird der Rabatt der obersten gesetzten Kategorie verwendet.</text:p>
          </table:table-cell>
          <table:table-cell table:style-name="Code.D64">
            <text:p text:style-name="P63"/>
          </table:table-cell>
        </table:table-row>
        <table:table-row>
          <table:table-cell table:style-name="Code.A64" office:value-type="string">
            <text:p text:style-name="Table_20_Contents">AGBtarget</text:p>
          </table:table-cell>
          <table:table-cell table:style-name="Code.B64" office:value-type="string">
            <text:p text:style-name="Table_20_Contents">small</text:p>
          </table:table-cell>
          <table:table-cell table:style-name="Code.C64" office:value-type="string">
            <text:p text:style-name="Table_20_Contents">Das Target-Attribut im Link einer PIDagb</text:p>
          </table:table-cell>
          <table:table-cell table:style-name="Code.D159" office:value-type="string">
            <text:p text:style-name="Table_20_Contents">_blank</text:p>
          </table:table-cell>
        </table:table-row>
        <text:soft-page-break/>
        <table:table-row>
          <table:table-cell table:style-name="Code.A64" office:value-type="string">
            <text:p text:style-name="Table_20_Contents">AGBattachment</text:p>
          </table:table-cell>
          <table:table-cell table:style-name="Code.B64" office:value-type="string">
            <text:p text:style-name="Table_20_Contents">resource</text:p>
          </table:table-cell>
          <table:table-cell table:style-name="Code.C64" office:value-type="string">
            <text:p text:style-name="Table_20_Contents">Wenn diese Datei existiert, wird sie an die E-Mail der Bestellbestätigung an den Kunden als Anhang mitgesendet. Der Shop Administrator wird keinen AGB als Anhang per E-Mail erhalten, aber sehr wohl eine CSV Datei mit den Bestelldaten, wenn Sie das konfiguriert haben.</text:p>
          </table:table-cell>
          <table:table-cell table:style-name="Code.D159" office:value-type="string">
            <text:p text:style-name="Table_20_Contents">fileadmin/agb.pdf</text:p>
          </table:table-cell>
        </table:table-row>
        <table:table-row>
          <table:table-cell table:style-name="Code.A64" office:value-type="string">
            <text:p text:style-name="Table_20_Contents">GiftAttachment</text:p>
          </table:table-cell>
          <table:table-cell table:style-name="Code.B64" office:value-type="string">
            <text:p text:style-name="Table_20_Contents">resource</text:p>
          </table:table-cell>
          <table:table-cell table:style-name="Code.C64" office:value-type="string">
            <text:p text:style-name="Table_20_Contents">Wenn diese Datei existiert, wird sie an die E-Mail zum Versenden eines Geschenkgutscheins angehängt.</text:p>
          </table:table-cell>
          <table:table-cell table:style-name="Code.D159" office:value-type="string">
            <text:p text:style-name="Table_20_Contents"/>
          </table:table-cell>
        </table:table-row>
        <table:table-row>
          <table:table-cell table:style-name="Code.A64" office:value-type="string">
            <text:p text:style-name="Table_20_Contents">generate<text:span text:style-name="T46">XML</text:span></text:p>
          </table:table-cell>
          <table:table-cell table:style-name="Code.B64" office:value-type="string">
            <text:p text:style-name="Table_20_Contents">boolean</text:p>
          </table:table-cell>
          <table:table-cell table:style-name="Code.C64" office:value-type="string">
            <text:p text:style-name="Table_20_Contents">Erzeugt aus jeder Bestellung eine <text:span text:style-name="T46">XML</text:span>-Datei. Diese Datei wird auf dem Server abgespeichert und per E-Mail an den Shop Administrator versendet (mit einer Bestellbestätigung).</text:p>
          </table:table-cell>
          <table:table-cell table:style-name="Code.D159" office:value-type="string">
            <text:p text:style-name="P17">0</text:p>
          </table:table-cell>
        </table:table-row>
        <table:table-row>
          <table:table-cell table:style-name="Code.A64" office:value-type="string">
            <text:p text:style-name="Table_20_Contents"><text:span text:style-name="T47">XML</text:span>destination</text:p>
          </table:table-cell>
          <table:table-cell table:style-name="Code.B64" office:value-type="string">
            <text:p text:style-name="Table_20_Contents">resource</text:p>
          </table:table-cell>
          <table:table-cell table:style-name="Code.C64" office:value-type="string">
            <text:p text:style-name="Table_20_Contents">Das Verzeichnis auf dem Server, wohin die <text:span text:style-name="T47">XML</text:span> Dateien abgespeichert werden. Dieses Verzeichnis sollte nicht über Http zugänglich sein, weil sonst ein jeder die Daten Ihrer Kunden und der von ihnen gemachten Bestellungen einsehen könnte.</text:p>
            <text:p text:style-name="Table_20_Contents">Also stellen Sie dieses Verzeichnis nicht unter den Pfad von fileadmin, oder geben Sie ihm wenigstens einen schwer zu erratenden Namen.</text:p>
          </table:table-cell>
          <table:table-cell table:style-name="Code.D159" office:value-type="string">
            <text:p text:style-name="Table_20_Contents">../<text:span text:style-name="T47">xml</text:span>orders/</text:p>
          </table:table-cell>
        </table:table-row>
        <table:table-row>
          <table:table-cell table:style-name="Code.A64" office:value-type="string">
            <text:p text:style-name="Table_20_Contents">generateCSV</text:p>
          </table:table-cell>
          <table:table-cell table:style-name="Code.B64" office:value-type="string">
            <text:p text:style-name="Table_20_Contents">boolean</text:p>
          </table:table-cell>
          <table:table-cell table:style-name="Code.C64" office:value-type="string">
            <text:p text:style-name="Table_20_Contents">Erzeugt aus jeder Bestellung eine CSV-Datei. Diese Datei wird auf dem Server abgespeichert und per E-Mail an den Shop Administrator versendet (mit einer Bestellbestätigung).</text:p>
          </table:table-cell>
          <table:table-cell table:style-name="Code.D151" office:value-type="string">
            <text:p text:style-name="P17">0</text:p>
          </table:table-cell>
        </table:table-row>
        <table:table-row>
          <table:table-cell table:style-name="Code.A64" office:value-type="string">
            <text:p text:style-name="Table_20_Contents">CSVdestination</text:p>
          </table:table-cell>
          <table:table-cell table:style-name="Code.B64" office:value-type="string">
            <text:p text:style-name="Table_20_Contents">resource</text:p>
          </table:table-cell>
          <table:table-cell table:style-name="Code.C64" office:value-type="string">
            <text:p text:style-name="Table_20_Contents">Das Verzeichnis auf dem Server, wohin die CSV Dateien abgespeichert werden. Dieses Verzeichnis sollte nicht über Http zugänglich sein, weil sonst ein jeder die Daten Ihrer Kunden und der von ihnen gemachten Bestellungen einsehen könnte.</text:p>
            <text:p text:style-name="Table_20_Contents">Also stellen Sie dieses Verzeichnis nicht unter den Pfad von fileadmin, oder geben Sie ihm wenigstens einen schwer zu erratenden Namen.</text:p>
          </table:table-cell>
          <table:table-cell table:style-name="Code.D159" office:value-type="string">
            <text:p text:style-name="Table_20_Contents">../csvorders/</text:p>
          </table:table-cell>
        </table:table-row>
        <table:table-row>
          <table:table-cell table:style-name="Code.A64" office:value-type="string">
            <text:p text:style-name="Table_20_Contents">CSVfields</text:p>
          </table:table-cell>
          <table:table-cell table:style-name="Code.B64" office:value-type="string">
            <text:p text:style-name="Table_20_Contents">string</text:p>
          </table:table-cell>
          <table:table-cell table:style-name="Code.C64" office:value-type="string">
            <text:p text:style-name="Table_20_Contents">Angabe, welche Produktdaten als CSV gespeichert werden sollen. Standardmäßig werden alle Felder bis auf Bemerkung verwendet.</text:p>
          </table:table-cell>
          <table:table-cell table:style-name="Code.D159" office:value-type="string">
            <text:p text:style-name="Table_20_Contents">(Long, long list)</text:p>
          </table:table-cell>
        </table:table-row>
        <table:table-row>
          <table:table-cell table:style-name="Code.A64" office:value-type="string">
            <text:p text:style-name="Table_20_Contents">CSVinOneLine</text:p>
          </table:table-cell>
          <table:table-cell table:style-name="Code.B64" office:value-type="string">
            <text:p text:style-name="Table_20_Contents">boolean</text:p>
          </table:table-cell>
          <table:table-cell table:style-name="Code.C64" office:value-type="string">
            <text:p text:style-name="Table_20_Contents">Wenn Sie das auf 1 setzen, werden zusätzliche Informationen (Versand, Bezahlung, Adreßdaten, Mitteilung zur Lieferung) an das erste bestellte Produkt angehängt. Das vereinfacht den Import dieser Dateien.</text:p>
            <text:p text:style-name="Table_20_Contents">Wenn Sie das auf 0 gestellt lassen, wird diese Datei in Programmen wie Excel am besten angezeigt.</text:p>
          </table:table-cell>
          <table:table-cell table:style-name="Code.D151" office:value-type="string">
            <text:p text:style-name="P17">0</text:p>
          </table:table-cell>
        </table:table-row>
        <table:table-row>
          <table:table-cell table:style-name="Code.A64" office:value-type="string">
            <text:p text:style-name="Table_20_Contents">CSVnotInE-Mail</text:p>
          </table:table-cell>
          <table:table-cell table:style-name="Code.B64" office:value-type="string">
            <text:p text:style-name="Table_20_Contents">boolean</text:p>
          </table:table-cell>
          <table:table-cell table:style-name="Code.C64" office:value-type="string">
            <text:p text:style-name="Table_20_Contents">Wenn gesetzt, wird keine CSV Datei an die E-Mail angehängt.</text:p>
          </table:table-cell>
          <table:table-cell table:style-name="Code.D64">
            <text:p text:style-name="P63"/>
          </table:table-cell>
        </table:table-row>
        <table:table-row>
          <table:table-cell table:style-name="Code.A64" office:value-type="string">
            <text:p text:style-name="Table_20_Contents">alwaysInStock</text:p>
          </table:table-cell>
          <table:table-cell table:style-name="Code.B64" office:value-type="string">
            <text:p text:style-name="Table_20_Contents">boolean</text:p>
          </table:table-cell>
          <table:table-cell table:style-name="Code.C64" office:value-type="string">
            <text:p text:style-name="Table_20_Contents">Wenn gesetzt, wird die Anzahl der Produkte auf Lager nach einem Kauf nicht reduziert.</text:p>
          </table:table-cell>
          <table:table-cell table:style-name="Code.D151" office:value-type="string">
            <text:p text:style-name="P17">1</text:p>
          </table:table-cell>
        </table:table-row>
        <table:table-row>
          <table:table-cell table:style-name="Code.A64" office:value-type="string">
            <text:p text:style-name="Table_20_Contents">showNotinStock</text:p>
          </table:table-cell>
          <table:table-cell table:style-name="Code.B64" office:value-type="string">
            <text:p text:style-name="Table_20_Contents">boolean</text:p>
          </table:table-cell>
          <table:table-cell table:style-name="Code.C64" office:value-type="string">
            <text:p text:style-name="Table_20_Contents">Wenn gesetzt, dann werden die Produkte auch dann angezeigt, wenn sie nicht auf Lager sind.</text:p>
          </table:table-cell>
          <table:table-cell table:style-name="Code.D64">
            <text:p text:style-name="P63"/>
          </table:table-cell>
        </table:table-row>
        <table:table-row>
          <table:table-cell table:style-name="Code.A64" office:value-type="string">
            <text:p text:style-name="Table_20_Contents">notInStockMessage</text:p>
          </table:table-cell>
          <table:table-cell table:style-name="Code.B64" office:value-type="string">
            <text:p text:style-name="Table_20_Contents">string</text:p>
          </table:table-cell>
          <table:table-cell table:style-name="Code.C64" office:value-type="string">
            <text:p text:style-name="Table_20_Contents">Siehe oben. Das wird angezeigt, wenn keine Produkte auf Lager sind und wenn showNotinStock gesetzt ist.</text:p>
          </table:table-cell>
          <table:table-cell table:style-name="Code.D159" office:value-type="string">
            <text:p text:style-name="Table_20_Contents">Not in stock</text:p>
          </table:table-cell>
        </table:table-row>
        <table:table-row>
          <table:table-cell table:style-name="Code.A64" office:value-type="string">
            <text:p text:style-name="Table_20_Contents">warningInStockLimit</text:p>
          </table:table-cell>
          <table:table-cell table:style-name="Code.B64" office:value-type="string">
            <text:p text:style-name="Table_20_Contents">int+</text:p>
          </table:table-cell>
          <table:table-cell table:style-name="Code.C64" office:value-type="string">
            <text:p text:style-name="Table_20_Contents">Anzahl von Produkten auf Lager, ab welcher eine WarnE-Mail verschickt wird, sobald sie erreicht wird.</text:p>
          </table:table-cell>
          <table:table-cell table:style-name="Code.D159" office:value-type="string">
            <text:p text:style-name="Table_20_Contents"/>
          </table:table-cell>
        </table:table-row>
        <table:table-row>
          <table:table-cell table:style-name="Code.A64" office:value-type="string">
            <text:p text:style-name="P60">inStockPieces</text:p>
          </table:table-cell>
          <table:table-cell table:style-name="Code.B64" office:value-type="string">
            <text:p text:style-name="Table_20_Contents">string</text:p>
          </table:table-cell>
          <table:table-cell table:style-name="Code.C64" office:value-type="string">
            <text:p text:style-name="Table_20_Contents">Das ist die Einheit für Produkte auf Lager inStock. </text:p>
          </table:table-cell>
          <table:table-cell table:style-name="Code.D159" office:value-type="string">
            <text:p text:style-name="Table_20_Contents">pieces</text:p>
          </table:table-cell>
        </table:table-row>
        <table:table-row>
          <table:table-cell table:style-name="Code.A64" office:value-type="string">
            <text:p text:style-name="Table_20_Contents">newItemDays</text:p>
          </table:table-cell>
          <table:table-cell table:style-name="Code.B64" office:value-type="string">
            <text:p text:style-name="Table_20_Contents">int+</text:p>
          </table:table-cell>
          <table:table-cell table:style-name="Code.C64" office:value-type="string">
            <text:p text:style-name="Table_20_Contents">In LISTNEWITEMS werden die in den letzten n Tagen neu hinzugekommenen Produkt angezeigt.</text:p>
          </table:table-cell>
          <table:table-cell table:style-name="Code.D151" office:value-type="string">
            <text:p text:style-name="P17">7</text:p>
          </table:table-cell>
        </table:table-row>
        <table:table-row>
          <table:table-cell table:style-name="Code.A64" office:value-type="string">
            <text:p text:style-name="Table_20_Contents">bulkilyWarning</text:p>
          </table:table-cell>
          <table:table-cell table:style-name="Code.B64" office:value-type="string">
            <text:p text:style-name="Table_20_Contents">string</text:p>
          </table:table-cell>
          <table:table-cell table:style-name="Code.C64" office:value-type="string">
            <text:p text:style-name="Table_20_Contents">Text für ###BULKILY_WARNING### für sperrige Produkte</text:p>
          </table:table-cell>
          <table:table-cell table:style-name="Code.D159" office:value-type="string">
            <text:p text:style-name="Table_20_Contents"/>
          </table:table-cell>
        </table:table-row>
        <table:table-row>
          <table:table-cell table:style-name="Code.A64" office:value-type="string">
            <text:p text:style-name="P58">bulkilyAddition</text:p>
          </table:table-cell>
          <table:table-cell table:style-name="Code.B64" office:value-type="string">
            <text:p text:style-name="P58">int+</text:p>
          </table:table-cell>
          <table:table-cell table:style-name="Code.C64" office:value-type="string">
            <text:p text:style-name="P60">siehe Shipping</text:p>
            <text:p text:style-name="P58">Betrag um den die Versandkosten für ein sperriges Produkt erhöht werden.</text:p>
          </table:table-cell>
          <table:table-cell table:style-name="Code.D159" office:value-type="string">
            <text:p text:style-name="P58"/>
          </table:table-cell>
        </table:table-row>
        <table:table-row>
          <table:table-cell table:style-name="Code.A64" office:value-type="string">
            <text:p text:style-name="P58">bulkilyFeeTax</text:p>
          </table:table-cell>
          <table:table-cell table:style-name="Code.B64" office:value-type="string">
            <text:p text:style-name="P58">int+</text:p>
          </table:table-cell>
          <table:table-cell table:style-name="Code.C64" office:value-type="string">
            <text:p text:style-name="Table_20_Contents">siehe Shipping</text:p>
            <text:p text:style-name="P58">Steuerbetrag in Prozent für das Versenden eines Sperrguts</text:p>
          </table:table-cell>
          <table:table-cell table:style-name="Code.D159" office:value-type="string">
            <text:p text:style-name="Table_20_Contents"/>
          </table:table-cell>
        </table:table-row>
        <table:table-row>
          <table:table-cell table:style-name="Code.A64" office:value-type="string">
            <text:p text:style-name="Table_20_Contents">javaScript</text:p>
          </table:table-cell>
          <table:table-cell table:style-name="Code.B64" office:value-type="string">
            <text:p text:style-name="P53">array of integers</text:p>
          </table:table-cell>
          <table:table-cell table:style-name="Code.C64" office:value-type="string">
            <text:p text:style-name="Table_20_Contents">verschiedene JavaScripts, die für ###JAVASCRIPT_10### Marker eingefügt werden</text:p>
            <text:p text:style-name="Table_20_Contents"/>
            <text:p text:style-name="P26">Beispiel:</text:p>
            <text:p text:style-name="Table_20_Contents_2f_PRE">javaScript {</text:p>
            <text:p text:style-name="Table_20_Contents_2f_PRE"><text:s text:c="4"/>10.value = function addValues (a, b) { return a+b; }</text:p>
            <text:p text:style-name="Table_20_Contents_2f_PRE"><text:s text:c="4"/>20.value = function multiplyValues (a, b) { return a*b; }</text:p>
            <text:p text:style-name="Table_20_Contents_2f_PRE">}</text:p>
          </table:table-cell>
          <table:table-cell table:style-name="Code.D159" office:value-type="string">
            <text:p text:style-name="Table_20_Contents"/>
          </table:table-cell>
        </table:table-row>
        <text:soft-page-break/>
        <table:table-row>
          <table:table-cell table:style-name="Code.A179" office:value-type="string">
            <text:p text:style-name="Table_20_Contents">payment / shipping</text:p>
          </table:table-cell>
          <table:table-cell table:style-name="Code.B2" office:value-type="string">
            <text:p text:style-name="Table_20_Contents">(siehe unten)</text:p>
          </table:table-cell>
          <table:table-cell table:style-name="Code.C179" office:value-type="string">
            <text:p text:style-name="Table_20_Contents">Konfiguration der Bezahlungsarten und Liefermethoden. Hier werden die Textausgaben, die Kosten und zusätzliche Berechnungen und Einstellungen für Bezahlsysteme eingestellt.</text:p>
            <text:p text:style-name="Table_20_Contents">Siehe Beschreibung weiter unten!</text:p>
          </table:table-cell>
          <table:table-cell table:style-name="Code.D179" office:value-type="string">
            <text:p text:style-name="Table_20_Contents"/>
          </table:table-cell>
        </table:table-row>
      </table:table>
      <text:p text:style-name="P5">[tsref:(script).class.tt_products.php]</text:p>
      <text:h text:style-name="Heading_20_3" text:outline-level="3"><text:bookmark-start text:name="__RefHeading__17615_1782085564"/>Anzeigetyp (CODE)<text:bookmark-end text:name="__RefHeading__17615_1782085564"/></text:h>
      <text:p text:style-name="Text_20_body">Hier nun eine Liste der möglichen Anzeigetypen des Plugins.</text:p>
      <text:p text:style-name="Text_20_body">Code zur Bestimmung der Darstellung und Aktion, die im Shop abläuft. Anstelle dieser Codes (Großbuchstaben) werden die Einstellungen im Shop-Plugin über Flexforms durchgeführt. Verwenden Sie die CODE-Felder nur für TypoScript Setups.</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Anzeigeart:</text:p>
            </table:table-cell>
            <table:table-cell table:style-name="Tableau9.B1" office:value-type="string">
              <text:p text:style-name="Table_20_Heading">CODE:</text:p>
            </table:table-cell>
            <table:table-cell table:style-name="Tableau9.C1" office:value-type="string">
              <text:p text:style-name="Table_20_Heading">Beschreibung:</text:p>
            </table:table-cell>
          </table:table-row>
        </table:table-header-rows>
        <table:table-row>
          <table:table-cell table:style-name="Tableau9.A2" office:value-type="string">
            <text:p text:style-name="P51">Produkte: Liste</text:p>
          </table:table-cell>
          <table:table-cell table:style-name="Tableau9.B2" office:value-type="string">
            <text:p text:style-name="P7">LIST</text:p>
          </table:table-cell>
          <table:table-cell table:style-name="Tableau9.C2" office:value-type="string">
            <text:p text:style-name="P51">Auflisten der Produkte</text:p>
          </table:table-cell>
        </table:table-row>
        <table:table-row>
          <table:table-cell table:style-name="Tableau9.A3" office:value-type="string">
            <text:p text:style-name="P51">Produkte: Liste Geschenke</text:p>
          </table:table-cell>
          <table:table-cell table:style-name="Tableau9.B2" office:value-type="string">
            <text:p text:style-name="P7">LISTGIFTS</text:p>
          </table:table-cell>
          <table:table-cell table:style-name="Tableau9.C3" office:value-type="string">
            <text:p text:style-name="P52">Auflisten der Geschenke</text:p>
          </table:table-cell>
        </table:table-row>
        <table:table-row>
          <table:table-cell table:style-name="Tableau9.A4" office:value-type="string">
            <text:p text:style-name="P51">Produkte: Liste Highlights</text:p>
          </table:table-cell>
          <table:table-cell table:style-name="Tableau9.B2" office:value-type="string">
            <text:p text:style-name="P7">LISTHIGHLIGHTS</text:p>
          </table:table-cell>
          <table:table-cell table:style-name="Tableau9.C4" office:value-type="string">
            <text:p text:style-name="P51">Auflisten der Produkte, die besonders attraktiv </text:p>
            <text:p text:style-name="P51">sind</text:p>
          </table:table-cell>
        </table:table-row>
        <table:table-row>
          <table:table-cell table:style-name="Tableau9.A5" office:value-type="string">
            <text:p text:style-name="P51">Produkte: Liste Aktionen</text:p>
          </table:table-cell>
          <table:table-cell table:style-name="Tableau9.B2" office:value-type="string">
            <text:p text:style-name="P7">LISTOFFERS</text:p>
          </table:table-cell>
          <table:table-cell table:style-name="Tableau9.C5" office:value-type="string">
            <text:p text:style-name="P51">Auflisten der Produkte, die als Angebote gelten</text:p>
          </table:table-cell>
        </table:table-row>
        <table:table-row>
          <table:table-cell table:style-name="Tableau9.A6" office:value-type="string">
            <text:p text:style-name="P51">Produkte: Liste Neue Artikel</text:p>
          </table:table-cell>
          <table:table-cell table:style-name="Tableau9.B2" office:value-type="string">
            <text:p text:style-name="P7">LISTNEWITEMS</text:p>
          </table:table-cell>
          <table:table-cell table:style-name="Tableau9.C6" office:value-type="string">
            <text:p text:style-name="P52">Auflisten der zuletzt eingetragenen Produkte</text:p>
          </table:table-cell>
        </table:table-row>
        <table:table-row>
          <table:table-cell table:style-name="Tableau9.A7" office:value-type="string">
            <text:p text:style-name="P51">Produkte: Liste zuletzt besuchte</text:p>
          </table:table-cell>
          <table:table-cell table:style-name="Tableau9.B2" office:value-type="string">
            <text:p text:style-name="P7">LISTVIEWEDITEMS</text:p>
          </table:table-cell>
          <table:table-cell table:style-name="Tableau9.C7" office:value-type="string">
            <text:p text:style-name="Table_20_Contents">Listing of the recently visited products of the logged in user</text:p>
          </table:table-cell>
        </table:table-row>
        <table:table-row>
          <table:table-cell table:style-name="Tableau9.A8" office:value-type="string">
            <text:p text:style-name="P51">Produkte: Liste am meisten besuchte (Benutzer)</text:p>
          </table:table-cell>
          <table:table-cell table:style-name="Tableau9.B2" office:value-type="string">
            <text:p text:style-name="P7">LISTVIEWEDMOST</text:p>
          </table:table-cell>
          <table:table-cell table:style-name="Tableau9.C8" office:value-type="string">
            <text:p text:style-name="Table_20_Contents">Listing of the mostly visited products of the logged in user</text:p>
          </table:table-cell>
        </table:table-row>
        <table:table-row>
          <table:table-cell table:style-name="Tableau9.A9" office:value-type="string">
            <text:p text:style-name="P51">Produkte: Liste am meisten besuchte (alle)</text:p>
          </table:table-cell>
          <table:table-cell table:style-name="Tableau9.B2" office:value-type="string">
            <text:p text:style-name="P7">LISTVIEWEDMOSTOTHERS</text:p>
          </table:table-cell>
          <table:table-cell table:style-name="Tableau9.C9" office:value-type="string">
            <text:p text:style-name="Table_20_Contents">Listing of the mostly visited products of all users</text:p>
          </table:table-cell>
        </table:table-row>
        <table:table-row>
          <table:table-cell table:style-name="Tableau9.A10" office:value-type="string">
            <text:p text:style-name="P51">Produkte: Liste leistbare</text:p>
          </table:table-cell>
          <table:table-cell table:style-name="Tableau9.B2" office:value-type="string">
            <text:p text:style-name="P7">LISTAFFORDABLE</text:p>
          </table:table-cell>
          <table:table-cell table:style-name="Tableau9.C10" office:value-type="string">
            <text:p text:style-name="Table_20_Contents">Listing of the products which the logged in user can afford to pay with his creditpoints</text:p>
          </table:table-cell>
        </table:table-row>
        <table:table-row>
          <table:table-cell table:style-name="Tableau9.A11" office:value-type="string">
            <text:p text:style-name="P51">Produkte: Liste DAM</text:p>
          </table:table-cell>
          <table:table-cell table:style-name="Tableau9.B2" office:value-type="string">
            <text:p text:style-name="P7">LISTDAM</text:p>
          </table:table-cell>
          <table:table-cell table:style-name="Tableau9.C11" office:value-type="string">
            <text:p text:style-name="Table_20_Contents">Auflisten der DAM Bilder oder anderer Medien</text:p>
          </table:table-cell>
        </table:table-row>
        <table:table-row>
          <table:table-cell table:style-name="Tableau9.A12" office:value-type="string">
            <text:p text:style-name="P51">Produkte: Einzelansicht</text:p>
          </table:table-cell>
          <table:table-cell table:style-name="Tableau9.B2" office:value-type="string">
            <text:p text:style-name="P7">SINGLE</text:p>
          </table:table-cell>
          <table:table-cell table:style-name="Tableau9.C12" office:value-type="string">
            <text:p text:style-name="P51">Einzelansicht eines Produkts (auch in Liste </text:p>
            <text:p text:style-name="P51">möglich) oder GET/POST 'tt_products'</text:p>
          </table:table-cell>
        </table:table-row>
        <table:table-row>
          <table:table-cell table:style-name="Tableau9.A13" office:value-type="string">
            <text:p text:style-name="P51">Produkte: Suche</text:p>
          </table:table-cell>
          <table:table-cell table:style-name="Tableau9.B2" office:value-type="string">
            <text:p text:style-name="P7">SEARCH</text:p>
          </table:table-cell>
          <table:table-cell table:style-name="Tableau9.C13" office:value-type="string">
            <text:p text:style-name="P52">Suchdialog zur Suche von Produkten</text:p>
          </table:table-cell>
        </table:table-row>
        <table:table-row>
          <table:table-cell table:style-name="Tableau9.A14" office:value-type="string">
            <text:p text:style-name="Table_20_Contents">Produkte: Merkliste</text:p>
          </table:table-cell>
          <table:table-cell table:style-name="Tableau9.B2" office:value-type="string">
            <text:p text:style-name="P2">MEMO</text:p>
          </table:table-cell>
          <table:table-cell table:style-name="Tableau9.C14" office:value-type="string">
            <text:p text:style-name="Table_20_Contents">Erinnerung an vorgemerkte Produkte</text:p>
          </table:table-cell>
        </table:table-row>
        <table:table-row>
          <table:table-cell table:style-name="Tableau9.A15" office:value-type="string">
            <text:p text:style-name="P51">Warenkorb: Inhalt</text:p>
          </table:table-cell>
          <table:table-cell table:style-name="Tableau9.B2" office:value-type="string">
            <text:p text:style-name="P7">BASKET</text:p>
          </table:table-cell>
          <table:table-cell table:style-name="Tableau9.C15" office:value-type="string">
            <text:p text:style-name="Table_20_Contents">zeigt den Warenkorb mit den Produkten an, die gekauft werden sollen.</text:p>
            <text:p text:style-name="Table_20_Contents">Der 'BASKET' Code hat verschiedene Funktionen. Aber wenn man die spezifischen Codes INFO, PAYMENT und FINALIZE verwendet, <text:s/>dann kann diese Funktionalität auf mehrere Seiten aufgespalten werden</text:p>
          </table:table-cell>
        </table:table-row>
        <table:table-row>
          <table:table-cell table:style-name="Tableau9.A16" office:value-type="string">
            <text:p text:style-name="P51">Warenkorb: Mini</text:p>
          </table:table-cell>
          <table:table-cell table:style-name="Tableau9.B2" office:value-type="string">
            <text:p text:style-name="P7">OVERVIEW</text:p>
          </table:table-cell>
          <table:table-cell table:style-name="Tableau9.C16" office:value-type="string">
            <text:p text:style-name="Table_20_Contents">Ein Mini-Warenkorb, der nur die Anzahl der </text:p>
            <text:p text:style-name="Table_20_Contents">Produkte enthält</text:p>
          </table:table-cell>
        </table:table-row>
        <table:table-row>
          <table:table-cell table:style-name="Tableau9.A17" office:value-type="string">
            <text:p text:style-name="P51">Warenkorb: Eingabe Kundendaten</text:p>
          </table:table-cell>
          <table:table-cell table:style-name="Tableau9.B2" office:value-type="string">
            <text:p text:style-name="P7">INFO</text:p>
          </table:table-cell>
          <table:table-cell table:style-name="Tableau9.C17" office:value-type="string">
            <text:p text:style-name="Table_20_Contents">Eingabe der Adreßinformation</text:p>
          </table:table-cell>
        </table:table-row>
        <table:table-row>
          <table:table-cell table:style-name="Tableau9.A18" office:value-type="string">
            <text:p text:style-name="P51">Warenkorb: Kontrolle und Bezahlung</text:p>
          </table:table-cell>
          <table:table-cell table:style-name="Tableau9.B2" office:value-type="string">
            <text:p text:style-name="P7">PAYMENT</text:p>
          </table:table-cell>
          <table:table-cell table:style-name="Tableau9.C18" office:value-type="string">
            <text:p text:style-name="Table_20_Contents">Überprüfung der Bestelldaten, Bezahlung über Bezahlsystem</text:p>
          </table:table-cell>
        </table:table-row>
        <table:table-row>
          <table:table-cell table:style-name="Tableau9.A19" office:value-type="string">
            <text:p text:style-name="P51">Warenkorb: Bestellung abschließen</text:p>
          </table:table-cell>
          <table:table-cell table:style-name="Tableau9.B2" office:value-type="string">
            <text:p text:style-name="P2">FINALIZE</text:p>
          </table:table-cell>
          <table:table-cell table:style-name="Tableau9.C19" office:value-type="string">
            <text:p text:style-name="Table_20_Contents">schließt die Bestellung ab und versendet E-Mails Information über die Verwendung von tt_products - Seite mit Dank für die Bestellung</text:p>
          </table:table-cell>
        </table:table-row>
        <table:table-row>
          <table:table-cell table:style-name="Tableau9.A20" office:value-type="string">
            <text:p text:style-name="Table_20_Contents">Bestellung: Verwaltung</text:p>
            <text:p text:style-name="Table_20_Contents"/>
          </table:table-cell>
          <table:table-cell table:style-name="Tableau9.B2" office:value-type="string">
            <text:p text:style-name="P2">TRACKING</text:p>
          </table:table-cell>
          <table:table-cell table:style-name="Tableau9.C20" office:value-type="string">
            <text:p text:style-name="Table_20_Contents">Nachverfolgen der Bestellung, der Rechnung </text:p>
            <text:p text:style-name="Table_20_Contents">und des Lieferscheins</text:p>
          </table:table-cell>
        </table:table-row>
        <table:table-row>
          <table:table-cell table:style-name="Tableau9.A21" office:value-type="string">
            <text:p text:style-name="P51">Bestellung: Rechnung</text:p>
          </table:table-cell>
          <table:table-cell table:style-name="Tableau9.B2" office:value-type="string">
            <text:p text:style-name="P2">BILL</text:p>
          </table:table-cell>
          <table:table-cell table:style-name="Tableau9.C21" office:value-type="string">
            <text:p text:style-name="Table_20_Contents">erzeugt eine Rechnungs-Datei</text:p>
          </table:table-cell>
        </table:table-row>
        <table:table-row>
          <table:table-cell table:style-name="Tableau9.A22" office:value-type="string">
            <text:p text:style-name="P51">Bestellung: Lieferschein </text:p>
          </table:table-cell>
          <table:table-cell table:style-name="Tableau9.B2" office:value-type="string">
            <text:p text:style-name="P2">DELIVERY</text:p>
          </table:table-cell>
          <table:table-cell table:style-name="Tableau9.C22" office:value-type="string">
            <text:p text:style-name="Table_20_Contents">erzeugt eine Lieferschein-Datei</text:p>
          </table:table-cell>
        </table:table-row>
        <table:table-row>
          <table:table-cell table:style-name="Tableau9.A23" office:value-type="string">
            <text:p text:style-name="P51">Bestellung: Liste</text:p>
          </table:table-cell>
          <table:table-cell table:style-name="Tableau9.B2" office:value-type="string">
            <text:p text:style-name="P6">ORDERS</text:p>
          </table:table-cell>
          <table:table-cell table:style-name="Tableau9.C23" office:value-type="string">
            <text:p text:style-name="Table_20_Contents">Anzeige der Bestellungen für Frontend Benutzer</text:p>
          </table:table-cell>
        </table:table-row>
        <table:table-row>
          <table:table-cell table:style-name="Tableau9.A24" office:value-type="string">
            <text:p text:style-name="P51">Bestellung: Herunterladbares</text:p>
          </table:table-cell>
          <table:table-cell table:style-name="Tableau9.B2" office:value-type="string">
            <text:p text:style-name="P6">DOWNLOAD</text:p>
          </table:table-cell>
          <table:table-cell table:style-name="Tableau9.C24" office:value-type="string">
            <text:p text:style-name="Table_20_Contents">Produktliste mit Downloads, die sich aus den Bestellungen ergeben.</text:p>
          </table:table-cell>
        </table:table-row>
        <table:table-row>
          <table:table-cell table:style-name="Tableau9.A25" office:value-type="string">
            <text:p text:style-name="Table_20_Contents">Allgemein: Hilfe</text:p>
          </table:table-cell>
          <table:table-cell table:style-name="Tableau9.B2" office:value-type="string">
            <text:p text:style-name="P2">HELP</text:p>
          </table:table-cell>
          <table:table-cell table:style-name="Tableau9.C25" office:value-type="string">
            <text:p text:style-name="Table_20_Contents">Kurzanleitung</text:p>
          </table:table-cell>
        </table:table-row>
        <table:table-row>
          <table:table-cell table:style-name="Tableau9.A26" office:value-type="string">
            <text:p text:style-name="Table_20_Contents">Kategorien: Liste</text:p>
          </table:table-cell>
          <table:table-cell table:style-name="Tableau9.B2" office:value-type="string">
            <text:p text:style-name="P2">LISTCAT</text:p>
          </table:table-cell>
          <table:table-cell table:style-name="Tableau9.C26" office:value-type="string">
            <text:p text:style-name="Table_20_Contents">Liste der Kategorien</text:p>
          </table:table-cell>
        </table:table-row>
        <table:table-row>
          <table:table-cell table:style-name="Tableau9.A27" office:value-type="string">
            <text:p text:style-name="P51">Kategorien: Auswahl</text:p>
          </table:table-cell>
          <table:table-cell table:style-name="Tableau9.B2" office:value-type="string">
            <text:p text:style-name="P6">SELECTCAT</text:p>
          </table:table-cell>
          <table:table-cell table:style-name="Tableau9.C27" office:value-type="string">
            <text:p text:style-name="Table_20_Contents">Kategorien in Select Boxen</text:p>
          </table:table-cell>
        </table:table-row>
        <text:soft-page-break/>
        <table:table-row>
          <table:table-cell table:style-name="Tableau9.A28" office:value-type="string">
            <text:p text:style-name="P51">Kategorien: Menü</text:p>
          </table:table-cell>
          <table:table-cell table:style-name="Tableau9.B2" office:value-type="string">
            <text:p text:style-name="P6">MENUCAT</text:p>
          </table:table-cell>
          <table:table-cell table:style-name="Tableau9.C28" office:value-type="string">
            <text:p text:style-name="Table_20_Contents">Kategorie Menü</text:p>
          </table:table-cell>
        </table:table-row>
        <table:table-row>
          <table:table-cell table:style-name="Tableau9.A29" office:value-type="string">
            <text:p text:style-name="P51">Kategorien: Einzelansicht</text:p>
          </table:table-cell>
          <table:table-cell table:style-name="Tableau9.B2" office:value-type="string">
            <text:p text:style-name="P6">SINGLECAT</text:p>
          </table:table-cell>
          <table:table-cell table:style-name="Tableau9.C29" office:value-type="string">
            <text:p text:style-name="Table_20_Contents">Einzelansicht für Kategorien</text:p>
          </table:table-cell>
        </table:table-row>
        <table:table-row>
          <table:table-cell table:style-name="Tableau9.A30" office:value-type="string">
            <text:p text:style-name="P51">Kategorien: DAM Merkliste</text:p>
          </table:table-cell>
          <table:table-cell table:style-name="Tableau9.B2" office:value-type="string">
            <text:p text:style-name="P6">MEMODAM</text:p>
          </table:table-cell>
          <table:table-cell table:style-name="Tableau9.C30" office:value-type="string">
            <text:p text:style-name="Table_20_Contents">DAM Vormerkliste</text:p>
          </table:table-cell>
        </table:table-row>
        <table:table-row>
          <table:table-cell table:style-name="Tableau9.A31" office:value-type="string">
            <text:p text:style-name="P51">Kategorien: DAM Merkliste Miniformat</text:p>
          </table:table-cell>
          <table:table-cell table:style-name="Tableau9.B2" office:value-type="string">
            <text:p text:style-name="P6">MEMODAMOVERVIEW</text:p>
          </table:table-cell>
          <table:table-cell table:style-name="Tableau9.C31" office:value-type="string">
            <text:p text:style-name="Table_20_Contents">DAM: Vormerkliste im Kleinformat</text:p>
          </table:table-cell>
        </table:table-row>
        <table:table-row>
          <table:table-cell table:style-name="Tableau9.A32" office:value-type="string">
            <text:p text:style-name="P51">Kategorien: DAM Liste</text:p>
          </table:table-cell>
          <table:table-cell table:style-name="Tableau9.B2" office:value-type="string">
            <text:p text:style-name="P6">LISTDAMCAT</text:p>
          </table:table-cell>
          <table:table-cell table:style-name="Tableau9.C32" office:value-type="string">
            <text:p text:style-name="Table_20_Contents">Liste der DAM Kategorien</text:p>
          </table:table-cell>
        </table:table-row>
        <table:table-row>
          <table:table-cell table:style-name="Tableau9.A33" office:value-type="string">
            <text:p text:style-name="P51">Kategorien: DAM Auswahl</text:p>
          </table:table-cell>
          <table:table-cell table:style-name="Tableau9.B2" office:value-type="string">
            <text:p text:style-name="P6">SELECTDAMCAT</text:p>
          </table:table-cell>
          <table:table-cell table:style-name="Tableau9.C33" office:value-type="string">
            <text:p text:style-name="Table_20_Contents">DAM Kategorien in Select Boxen</text:p>
          </table:table-cell>
        </table:table-row>
        <table:table-row>
          <table:table-cell table:style-name="Tableau9.A34" office:value-type="string">
            <text:p text:style-name="P51">Kategorien: DAM Menü</text:p>
          </table:table-cell>
          <table:table-cell table:style-name="Tableau9.B2" office:value-type="string">
            <text:p text:style-name="P6">MENUDAMCAT</text:p>
          </table:table-cell>
          <table:table-cell table:style-name="Tableau9.C34" office:value-type="string">
            <text:p text:style-name="Table_20_Contents">DAM Kategorie Menü</text:p>
          </table:table-cell>
        </table:table-row>
        <table:table-row>
          <table:table-cell table:style-name="Tableau9.A35" office:value-type="string">
            <text:p text:style-name="P51">Kategorien: DAM Einzelansicht</text:p>
          </table:table-cell>
          <table:table-cell table:style-name="Tableau9.B2" office:value-type="string">
            <text:p text:style-name="P6">SINGLEDAMCAT</text:p>
          </table:table-cell>
          <table:table-cell table:style-name="Tableau9.C35" office:value-type="string">
            <text:p text:style-name="Table_20_Contents">DAM Kategorie Einzelansicht</text:p>
          </table:table-cell>
        </table:table-row>
        <table:table-row>
          <table:table-cell table:style-name="Tableau9.A36" office:value-type="string">
            <text:p text:style-name="Table_20_Contents">Artikel: Liste</text:p>
          </table:table-cell>
          <table:table-cell table:style-name="Tableau9.B2" office:value-type="string">
            <text:p text:style-name="P2">LISTARTICLES</text:p>
          </table:table-cell>
          <table:table-cell table:style-name="Tableau9.C36" office:value-type="string">
            <text:p text:style-name="Table_20_Contents">Liste der Artikel</text:p>
          </table:table-cell>
        </table:table-row>
        <table:table-row>
          <table:table-cell table:style-name="Tableau9.A37" office:value-type="string">
            <text:p text:style-name="P51">Adressen: Liste</text:p>
          </table:table-cell>
          <table:table-cell table:style-name="Tableau9.B2" office:value-type="string">
            <text:p text:style-name="P6">LISTAD</text:p>
          </table:table-cell>
          <table:table-cell table:style-name="Tableau9.C37" office:value-type="string">
            <text:p text:style-name="Table_20_Contents">Liste der Adressen</text:p>
          </table:table-cell>
        </table:table-row>
        <table:table-row>
          <table:table-cell table:style-name="Tableau9.A38" office:value-type="string">
            <text:p text:style-name="P51">Adressen: Auswahl</text:p>
          </table:table-cell>
          <table:table-cell table:style-name="Tableau9.B2" office:value-type="string">
            <text:p text:style-name="P6">SELECTAD</text:p>
          </table:table-cell>
          <table:table-cell table:style-name="Tableau9.C38" office:value-type="string">
            <text:p text:style-name="Table_20_Contents">Adressen in Select Boxen</text:p>
          </table:table-cell>
        </table:table-row>
        <table:table-row>
          <table:table-cell table:style-name="Tableau9.A39" office:value-type="string">
            <text:p text:style-name="P51">Adressen: Menü</text:p>
          </table:table-cell>
          <table:table-cell table:style-name="Tableau9.B2" office:value-type="string">
            <text:p text:style-name="P6">MENUAD</text:p>
          </table:table-cell>
          <table:table-cell table:style-name="Tableau9.C39" office:value-type="string">
            <text:p text:style-name="Table_20_Contents">Adressen als Menüliste</text:p>
          </table:table-cell>
        </table:table-row>
        <table:table-row>
          <table:table-cell table:style-name="Tableau9.A40" office:value-type="string">
            <text:p text:style-name="P51">Adressen: Einzelansicht</text:p>
          </table:table-cell>
          <table:table-cell table:style-name="Tableau9.B2" office:value-type="string">
            <text:p text:style-name="P6">SINGLEAD</text:p>
          </table:table-cell>
          <table:table-cell table:style-name="Tableau9.C40" office:value-type="string">
            <text:p text:style-name="Table_20_Contents">Addressen: Einzelansicht</text:p>
          </table:table-cell>
        </table:table-row>
        <table:table-row>
          <table:table-cell table:style-name="Tableau9.A41" office:value-type="string">
            <text:p text:style-name="P51"/>
          </table:table-cell>
          <table:table-cell table:style-name="Tableau9.B2" office:value-type="string">
            <text:p text:style-name="P6">SCRIPT</text:p>
          </table:table-cell>
          <table:table-cell table:style-name="Tableau9.C41" office:value-type="string">
            <text:p text:style-name="Table_20_Contents">Ausführung als PHP Skript ohne Ausgabe</text:p>
          </table:table-cell>
        </table:table-row>
      </table:table>
      <text:h text:style-name="Heading_20_3" text:outline-level="3"><text:bookmark-start text:name="__RefHeading__17617_1782085564"/>CSS Konfiguration<text:bookmark-end text:name="__RefHeading__17617_1782085564"/></text:h>
      <text:p text:style-name="Text_20_body">nur Setup</text:p>
      <text:p text:style-name="Text_20_body">Die Hauptdatei mit dem tt_products spezifischen CSS sollte im Setup der Seite eingetragen werden.</text:p>
      <text:p text:style-name="P23">Beispiel:</text:p>
      <text:h text:style-name="Preformatted_20_Text" text:outline-level="5">page {</text:h>
      <text:h text:style-name="Preformatted_20_Text" text:outline-level="5"><text:s text:c="4"/>includeCSS {</text:h>
      <text:h text:style-name="Preformatted_20_Text" text:outline-level="5"><text:s text:c="8"/>tt_products = EXT:addons_tt_products/template/tt_products_example.css</text:h>
      <text:h text:style-name="Preformatted_20_Text" text:outline-level="5"><text:s text:c="5"/>}</text:h>
      <text:h text:style-name="Preformatted_20_Text" text:outline-level="5">}</text:h>
      <text:p text:style-name="Text_20_body"/>
      <text:p text:style-name="Text_20_body">Hier können die CSS id Namen gesetzt werden. Sie müssen eine CSS Datei im Template Setup angegeben haben, die diese ids auch verwendet.</text:p>
      <text:h text:style-name="Preformatted_20_Text" text:outline-level="5"/>
      <text:p text:style-name="Text_20_body">Der vor/zweitletzte Wert enthält den Codenamen der Ansicht. Wenn hier 'ALL' steht, dann gilt es für alle Ansichten.</text:p>
      <text:p text:style-name="Text_20_body">Ansichten, die dem Code-Feld entsprechen:</text:p>
      <text:p text:style-name="Text_20_body">SINGLE, LIST, BASKET</text:p>
      <text:h text:style-name="Preformatted_20_Text" text:outline-level="5">plugin.tt_products.CSS.ALL.file = EXT:addons_tt_products/template/tt_products_example.css</text:h>
      <text:h text:style-name="Heading_20_4" text:outline-level="4">allgemein</text:h>
      <table:table table:name="Tableau14" table:style-name="Tableau14">
        <table:table-column table:style-name="Tableau14.A"/>
        <table:table-column table:style-name="Tableau14.B"/>
        <table:table-column table:style-name="Tableau14.C"/>
        <table:table-column table:style-name="Tableau14.D"/>
        <table:table-header-rows>
          <table:table-row>
            <table:table-cell table:style-name="Tableau14.A1" office:value-type="string">
              <text:p text:style-name="Table_20_Heading">Eigenschaft:</text:p>
            </table:table-cell>
            <table:table-cell table:style-name="Tableau14.B1" office:value-type="string">
              <text:p text:style-name="Table_20_Heading">Datentyp:</text:p>
            </table:table-cell>
            <table:table-cell table:style-name="Tableau14.A1" office:value-type="string">
              <text:p text:style-name="Table_20_Heading">Beschreibung:</text:p>
            </table:table-cell>
            <table:table-cell table:style-name="Tableau14.D1" office:value-type="string">
              <text:p text:style-name="Table_20_Heading">Voreinstellung:</text:p>
            </table:table-cell>
          </table:table-row>
        </table:table-header-rows>
        <table:table-row>
          <table:table-cell table:style-name="Tableau14.A2" office:value-type="string">
            <text:p text:style-name="Table_20_Contents">file</text:p>
          </table:table-cell>
          <table:table-cell table:style-name="Tableau14.B2" office:value-type="string">
            <text:p text:style-name="Table_20_Contents">resource</text:p>
          </table:table-cell>
          <table:table-cell table:style-name="Tableau14.C2" office:value-type="string">
            <text:p text:style-name="Table_20_Contents">Die CSS-Datei. </text:p>
          </table:table-cell>
          <table:table-cell table:style-name="Tableau14.D2" office:value-type="string">
            <text:p text:style-name="Table_20_Contents"/>
          </table:table-cell>
        </table:table-row>
      </table:table>
      <text:h text:style-name="Preformatted_20_Text" text:outline-level="5"/>
      <text:h text:style-name="Preformatted_20_Text" text:outline-level="5">plugin.tt_products.CSS.tt_products.LIST.row.even = 35</text:h>
      <text:h text:style-name="Heading_20_4" text:outline-level="4">Tabelle</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Eigenschaft:</text:p>
            </table:table-cell>
            <table:table-cell table:style-name="Tableau4.B1" office:value-type="string">
              <text:p text:style-name="Table_20_Heading">Datentyp:</text:p>
            </table:table-cell>
            <table:table-cell table:style-name="Tableau4.A1" office:value-type="string">
              <text:p text:style-name="Table_20_Heading">Beschreibung:</text:p>
            </table:table-cell>
            <table:table-cell table:style-name="Tableau4.D1" office:value-type="string">
              <text:p text:style-name="Table_20_Heading">Voreinstellung:</text:p>
            </table:table-cell>
          </table:table-row>
        </table:table-header-rows>
        <table:table-row>
          <table:table-cell table:style-name="Tableau4.A2" office:value-type="string">
            <text:p text:style-name="Table_20_Contents">row</text:p>
          </table:table-cell>
          <table:table-cell table:style-name="Tableau4.B2" office:value-type="string">
            <text:p text:style-name="P2"/>
          </table:table-cell>
          <table:table-cell table:style-name="Tableau4.C2" office:value-type="string">
            <text:p text:style-name="Table_20_Contents">even: Cascading Stylesheets (CSS) gerade Zeilen in der Produktliste.</text:p>
            <text:p text:style-name="Table_20_Contents">uneven: ungerade</text:p>
          </table:table-cell>
          <table:table-cell table:style-name="Tableau4.D2" office:value-type="string">
            <text:p text:style-name="Table_20_Contents"/>
          </table:table-cell>
        </table:table-row>
        <table:table-row>
          <table:table-cell table:style-name="Tableau4.A3" office:value-type="string">
            <text:p text:style-name="Table_20_Contents">default</text:p>
          </table:table-cell>
          <table:table-cell table:style-name="Tableau4.B2" office:value-type="string">
            <text:p text:style-name="P2"/>
          </table:table-cell>
          <table:table-cell table:style-name="Tableau4.C3" office:value-type="string">
            <text:p text:style-name="Table_20_Contents">CSS für Standardeinträge in der Listenansicht</text:p>
          </table:table-cell>
          <table:table-cell table:style-name="Tableau4.D2" office:value-type="string">
            <text:p text:style-name="Table_20_Contents"/>
          </table:table-cell>
        </table:table-row>
        <table:table-row>
          <table:table-cell table:style-name="Tableau4.A4" office:value-type="string">
            <text:p text:style-name="Table_20_Contents">current</text:p>
          </table:table-cell>
          <table:table-cell table:style-name="Tableau4.B2" office:value-type="string">
            <text:p text:style-name="P2"/>
          </table:table-cell>
          <table:table-cell table:style-name="Tableau4.C4" office:value-type="string">
            <text:p text:style-name="Table_20_Contents">CSS für die ausgewählten Einträge in der Listenansicht.</text:p>
          </table:table-cell>
          <table:table-cell table:style-name="Tableau4.D2" office:value-type="string">
            <text:p text:style-name="Table_20_Contents"/>
          </table:table-cell>
        </table:table-row>
        <table:table-row>
          <table:table-cell table:style-name="Tableau4.A5" office:value-type="string">
            <text:p text:style-name="P58">menu</text:p>
          </table:table-cell>
          <table:table-cell table:style-name="Tableau4.B2" office:value-type="string">
            <text:p text:style-name="P59">string</text:p>
          </table:table-cell>
          <table:table-cell table:style-name="Tableau4.C5" office:value-type="string">
            <text:p text:style-name="P58">CSS für das Menü</text:p>
          </table:table-cell>
          <table:table-cell table:style-name="Tableau4.D2" office:value-type="string">
            <text:p text:style-name="Table_20_Contents"/>
          </table:table-cell>
        </table:table-row>
        <text:soft-page-break/>
        <table:table-row>
          <table:table-cell table:style-name="Tableau4.A6" office:value-type="string">
            <text:p text:style-name="Table_20_Contents">itemSingleWrap</text:p>
          </table:table-cell>
          <table:table-cell table:style-name="Tableau4.B2" office:value-type="string">
            <text:p text:style-name="P2">wrap</text:p>
          </table:table-cell>
          <table:table-cell table:style-name="Tableau4.C6" office:value-type="string">
            <text:p text:style-name="Table_20_Contents">HTML Teil, der die Marker ###ITEM_SINGLE_PRE_HTML### und ###ITEM_SINGLE_POST_HTML### auf Produktbasis ersetzt.</text:p>
          </table:table-cell>
          <table:table-cell table:style-name="Tableau4.D6" office:value-type="string">
            <text:p text:style-name="Table_20_Contents">&lt;div&gt;|&lt;/div&gt; oder &lt;td&gt;|&lt;/td&gt;</text:p>
          </table:table-cell>
        </table:table-row>
        <table:table-row>
          <table:table-cell table:style-name="Tableau4.A7" office:value-type="string">
            <text:p text:style-name="Table_20_Contents">itemRowWrap</text:p>
          </table:table-cell>
          <table:table-cell table:style-name="Tableau4.B2" office:value-type="string">
            <text:p text:style-name="P2">wrap</text:p>
          </table:table-cell>
          <table:table-cell table:style-name="Tableau4.C7" office:value-type="string">
            <text:p text:style-name="Table_20_Contents">HTML Teil, der die Marker ###ITEM_SINGLE_PRE_HTML### und ###ITEM_SINGLE_POST_HTML### auf Produktreihebasis ersetzt.</text:p>
          </table:table-cell>
          <table:table-cell table:style-name="Tableau4.D7" office:value-type="string">
            <text:p text:style-name="Table_20_Contents">leer oder &lt;tr&gt;|&lt;/tr&gt;</text:p>
          </table:table-cell>
        </table:table-row>
      </table:table>
      <text:h text:style-name="Heading_20_3" text:outline-level="3"><text:bookmark-start text:name="__RefHeading__27143_2121584579"/>Javascript Konfiguration<text:bookmark-end text:name="__RefHeading__27143_2121584579"/></text:h>
      <text:p text:style-name="Text_20_body">nur Setup</text:p>
      <text:p text:style-name="Text_20_body">Die Hauptdatei mit dem tt_products spezifischen JavaScript sollte im Setup der Seite eingetragen werden.</text:p>
      <text:p text:style-name="P23">Beispiel:</text:p>
      <text:h text:style-name="Preformatted_20_Text" text:outline-level="5">page {</text:h>
      <text:h text:style-name="Preformatted_20_Text" text:outline-level="5"><text:s text:c="4"/>includeJS {</text:h>
      <text:h text:style-name="Preformatted_20_Text" text:outline-level="5"><text:s text:c="8"/>tt_products = EXT:addons_tt_products/scripts/tt_products_example.js</text:h>
      <text:h text:style-name="Preformatted_20_Text" text:outline-level="5"><text:s text:c="4"/>}</text:h>
      <text:h text:style-name="Preformatted_20_Text" text:outline-level="5"><text:s text:c="4"/>jsInline {</text:h>
      <text:h text:style-name="Preformatted_20_Text" text:outline-level="5"><text:s text:c="8"/>10 = TEXT</text:h>
      <text:h text:style-name="Preformatted_20_Text" text:outline-level="5"><text:s text:c="8"/>10.dataWrap = var pageId = {TSFE:id};</text:h>
      <text:h text:style-name="Preformatted_20_Text" text:outline-level="5"><text:s text:c="4"/>}</text:h>
      <text:h text:style-name="Preformatted_20_Text" text:outline-level="5"><text:s text:c="4"/>headerData {</text:h>
      <text:h text:style-name="Preformatted_20_Text" text:outline-level="5"><text:s text:c="8"/>300 = TEXT</text:h>
      <text:h text:style-name="Preformatted_20_Text" text:outline-level="5"><text:s text:c="8"/>300.value = &lt;script type="text/javascript" src="fileadmin/js/tt_products_example.js"&gt;&lt;/script&gt;</text:h>
      <text:h text:style-name="Preformatted_20_Text" text:outline-level="5"><text:s text:c="4"/>}</text:h>
      <text:h text:style-name="Preformatted_20_Text" text:outline-level="5">}</text:h>
      <text:h text:style-name="Preformatted_20_Text" text:outline-level="5"/>
      <text:p text:style-name="Text_20_body">Es genügt, eine der Methoden 'includeJS', 'jsInline' oder 'headerData' zu verwenden.</text:p>
      <text:p text:style-name="Text_20_body">Der vor/zweitletzte Wert enthält den Codenamen der Ansicht. Wenn hier 'ALL' steht, dann gilt es für alle Ansichten.</text:p>
      <text:p text:style-name="Text_20_body">Ansichten, die dem Code-Feld entsprechen:</text:p>
      <text:p text:style-name="Text_20_body">SINGLE, LIST, BASKET</text:p>
      <text:h text:style-name="Preformatted_20_Text" text:outline-level="5">plugin.tt_products.js.ALL.file = EXT:addons_tt_products/scripts/tt_products_example.js</text:h>
      <text:h text:style-name="Heading_20_4" text:outline-level="4">allgemei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Eigenschaft:</text:p>
            </table:table-cell>
            <table:table-cell table:style-name="Table1.B1" office:value-type="string">
              <text:p text:style-name="Table_20_Heading">Datentyp:</text:p>
            </table:table-cell>
            <table:table-cell table:style-name="Table1.A1" office:value-type="string">
              <text:p text:style-name="Table_20_Heading">Beschreibung:</text:p>
            </table:table-cell>
            <table:table-cell table:style-name="Table1.D1" office:value-type="string">
              <text:p text:style-name="Table_20_Heading">Voreinstellung:</text:p>
            </table:table-cell>
          </table:table-row>
        </table:table-header-rows>
        <table:table-row>
          <table:table-cell table:style-name="Table1.A2" office:value-type="string">
            <text:p text:style-name="Table_20_Contents">file</text:p>
          </table:table-cell>
          <table:table-cell table:style-name="Table1.B2" office:value-type="string">
            <text:p text:style-name="Table_20_Contents">resource</text:p>
          </table:table-cell>
          <table:table-cell table:style-name="Table1.C2" office:value-type="string">
            <text:p text:style-name="Table_20_Contents">Die Javascript-Datei. </text:p>
          </table:table-cell>
          <table:table-cell table:style-name="Table1.D2" office:value-type="string">
            <text:p text:style-name="Table_20_Contents"/>
          </table:table-cell>
        </table:table-row>
      </table:table>
      <text:h text:style-name="Preformatted_20_Text" text:outline-level="5"/>
      <text:h text:style-name="Preformatted_20_Text" text:outline-level="5"/>
      <text:h text:style-name="Heading_20_3" text:outline-level="3"><text:bookmark-start text:name="__RefHeading__17619_1782085564"/>Konfiguration der Artikel, Produkte, Kategorien, Seiten, Adressen und Bilder<text:bookmark-end text:name="__RefHeading__17619_1782085564"/></text:h>
      <text:p text:style-name="Text_20_body">nur Setup<text:line-break/>Der vor-/zweitletzte Wert enthält den Codenamen der Ansicht. Wenn hier 'ALL' steht, dann gilt es für alle Ansichten.</text:p>
      <text:p text:style-name="Text_20_body">Ansichten, die dem Code-Feld entsprechen:</text:p>
      <text:p text:style-name="Text_20_body">SINGLE, LIST, BASKET</text:p>
      <text:p text:style-name="Text_20_body">zusätzlich mögliche Werte:</text:p>
      <text:p text:style-name="Text_20_body">E-Mail, PAYMENT, <text:s/>LISTRELATED (LIST für verwandte Produkte)</text:p>
      <text:p text:style-name="P26">Beispiel:</text:p>
      <text:h text:style-name="Preformatted_20_Text" text:outline-level="5">plugin.tt_products.conf.tt_products_articles.LIST.generatePath.base = fileadmin/images</text:h>
      <text:h text:style-name="Preformatted_20_Text" text:outline-level="5">plugin.tt_products.conf.tt_products.LIST.orderBy = sorting</text:h>
      <text:h text:style-name="Preformatted_20_Text" text:outline-level="5"/>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Eigenschaft:</text:p>
            </table:table-cell>
            <table:table-cell table:style-name="Tableau5.B1" office:value-type="string">
              <text:p text:style-name="Table_20_Heading">Datentyp</text:p>
            </table:table-cell>
            <table:table-cell table:style-name="Tableau5.A1" office:value-type="string">
              <text:p text:style-name="Table_20_Heading">Beschreibung:</text:p>
            </table:table-cell>
            <table:table-cell table:style-name="Tableau5.D1" office:value-type="string">
              <text:p text:style-name="Table_20_Heading">Voreinstellung:</text:p>
            </table:table-cell>
          </table:table-row>
        </table:table-header-rows>
        <table:table-row>
          <table:table-cell table:style-name="Tableau5.A2" office:value-type="string">
            <text:p text:style-name="P45">generatePath</text:p>
          </table:table-cell>
          <table:table-cell table:style-name="Tableau5.B2" office:value-type="string">
            <text:p text:style-name="Table_20_Contents">string</text:p>
          </table:table-cell>
          <table:table-cell table:style-name="Tableau5.C2" office:value-type="string">
            <text:p text:style-name="Table_20_Contents">Pfad zu den Verzeichnissen der Bilder für <text:s/>generateImage</text:p>
            <text:p text:style-name="Table_20_Contents"/>
            <text:p text:style-name="Table_20_Contents">Paare von Feldnamen und die Anzahl der ersten Buchstaben, die zur Bildung des Namens der Bilddatei verwendet werden.</text:p>
            <text:p text:style-name="Table_20_Contents">type ... tablefields (Tabellenfelder)</text:p>
            <text:p text:style-name="P54"><text:span text:style-name="T2">field.</text:span>fieldname <text:span text:style-name="T2">... Name des Tabellenfeldes</text:span></text:p>
            <text:p text:style-name="Table_20_Contents"/>
            <text:p text:style-name="P26">Beispiel:</text:p>
            <text:p text:style-name="Table_20_Contents_2f_PRE">ALL.generatePath {</text:p>
            <text:p text:style-name="Table_20_Contents_2f_PRE"><text:s text:c="4"/>type = tablefields</text:p>
            <text:p text:style-name="Table_20_Contents_2f_PRE"><text:s text:c="4"/>base = fileadmin/images</text:p>
            <text:p text:style-name="Table_20_Contents_2f_PRE"><text:s text:c="4"/>field.itemnumber = 2</text:p>
            <text:p text:style-name="Table_20_Contents_2f_PRE">}</text:p>
          </table:table-cell>
          <table:table-cell table:style-name="Tableau5.D2" office:value-type="string">
            <text:p text:style-name="P17">fileadmin/img</text:p>
          </table:table-cell>
        </table:table-row>
        <table:table-row>
          <table:table-cell table:style-name="Tableau5.A3" office:value-type="string">
            <text:p text:style-name="Table_20_Contents">generateImage</text:p>
          </table:table-cell>
          <table:table-cell table:style-name="Tableau5.B3" office:value-type="string">
            <text:p text:style-name="P55">array of string</text:p>
          </table:table-cell>
          <table:table-cell table:style-name="Tableau5.C3" office:value-type="string">
            <text:p text:style-name="Table_20_Contents">Paare von Feldnamen und die Anzahl der ersten Buchstaben zur Bestimmung des Namens der Bilddatei.</text:p>
            <text:p text:style-name="Table_20_Contents"/>
            <text:p text:style-name="Table_20_Contents">type ... tablefields (Tabellenfelder), foreigntable (andere Tabelle, falls benötigt)</text:p>
            <text:p text:style-name="Table_20_Contents">prefix ... ein Präfix, der den Begiinn des Dateinamens des Bildes markiert</text:p>
            <text:p text:style-name="P54"><text:span text:style-name="T2">field.</text:span>fieldname <text:span text:style-name="T2">... Name des Feldes der Tabelle</text:span></text:p>
            <text:p text:style-name="P2">separator ... Trennzeichen zwischen dem gefundenen Beginn des Dateinamens und dem Rest des Dateinamens</text:p>
            <text:p text:style-name="P2">table ... andere Tabelle und deren Konfiguration um das Bild zu ermitteln</text:p>
            <text:p text:style-name="P2">uid_local ... verwende dieses lokale Feld der Tabelle</text:p>
            <text:p text:style-name="P2">uid_foreign ... verwende dieses Feld der externen Tabelle um eine Übereinstimmung zu finden</text:p>
            <text:p text:style-name="P2">parent ... verwende auch Feldnamen der Vater-Tabelle</text:p>
            <text:p text:style-name="Table_20_Contents">parent.depth ... Anzahl der Vaterebenen</text:p>
            <text:p text:style-name="Table_20_Contents"/>
            <text:p text:style-name="P2">Die Dateinamen sehen ungefähr so aus: 41000_1.jpg. Ein Produkt kann mehrere Bilder haben, wenn es mehr Dateien mit ähnlichen Dateinamen gibt, wie z.B. 41000_2.jpg.</text:p>
            <text:p text:style-name="P2"/>
            <text:p text:style-name="P26">Beispiel:</text:p>
            <text:p text:style-name="Table_20_Contents_2f_PRE">ALL.generateImage {</text:p>
            <text:p text:style-name="Table_20_Contents_2f_PRE"><text:s text:c="4"/>type = tablefields</text:p>
            <text:p text:style-name="Table_20_Contents_2f_PRE"><text:s text:c="4"/>field.itemnumber = 6</text:p>
            <text:p text:style-name="Table_20_Contents_2f_PRE"><text:s text:c="4"/>separator = _</text:p>
            <text:p text:style-name="Table_20_Contents_2f_PRE">}</text:p>
            <text:p text:style-name="Table_20_Contents_2f_PRE"/>
            <text:p text:style-name="Table_20_Contents_2f_PRE">ALL.generateImage {</text:p>
            <text:p text:style-name="Table_20_Contents_2f_PRE"><text:s text:c="4"/>type = foreigntable</text:p>
            <text:p text:style-name="Table_20_Contents_2f_PRE"><text:s text:c="4"/>table = tt_products_articles</text:p>
            <text:p text:style-name="Table_20_Contents_2f_PRE"><text:s text:c="4"/>uid_local = uid</text:p>
            <text:p text:style-name="Table_20_Contents_2f_PRE"><text:s text:c="4"/>uid_foreign = pid</text:p>
            <text:p text:style-name="Table_20_Contents_2f_PRE"><text:s text:c="4"/>field.itemnumber = 6</text:p>
            <text:p text:style-name="Table_20_Contents_2f_PRE"><text:s text:c="4"/>separator = _</text:p>
            <text:p text:style-name="Table_20_Contents_2f_PRE">}</text:p>
          </table:table-cell>
          <table:table-cell table:style-name="Tableau5.D3" office:value-type="string">
            <text:p text:style-name="Table_20_Contents"/>
          </table:table-cell>
        </table:table-row>
        <table:table-row>
          <table:table-cell table:style-name="Tableau5.A4" office:value-type="string">
            <text:p text:style-name="Table_20_Contents">imageMarker</text:p>
          </table:table-cell>
          <table:table-cell table:style-name="Tableau5.B3" office:value-type="string">
            <text:p text:style-name="P55">array of string</text:p>
          </table:table-cell>
          <table:table-cell table:style-name="Tableau5.C4" office:value-type="string">
            <text:p text:style-name="P40">Beschreibt woraus sich der Marker für das Bild zusammensetzt. Als Beispiel wird das Bild der Datei 30_P1_001.jpg verwendet. Der zweite Teil P1 und der dritte Teil 001 bilden den Marker. Als Ergebnis erhält man den Marker ###CATEGORY_IMAGE_P1_001###. Der erste Teil '30' muß in diesem Beispiel pro Datensatz verschieden sein.</text:p>
            <text:p text:style-name="P40"/>
            <text:p text:style-name="P26">Beispiel:</text:p>
            <text:p text:style-name="Table_20_Contents_2f_PRE">ALL.imageMarker {</text:p>
            <text:p text:style-name="Table_20_Contents_2f_PRE"><text:s text:c="4"/>type = imagename</text:p>
            <text:p text:style-name="Table_20_Contents_2f_PRE"><text:s text:c="4"/>parts = 2,3</text:p>
            <text:p text:style-name="Table_20_Contents_2f_PRE">}</text:p>
          </table:table-cell>
          <table:table-cell table:style-name="Tableau5.D3" office:value-type="string">
            <text:p text:style-name="Table_20_Contents"/>
          </table:table-cell>
        </table:table-row>
        <table:table-row>
          <table:table-cell table:style-name="Tableau5.A5" office:value-type="string">
            <text:p text:style-name="Table_20_Contents">limit</text:p>
          </table:table-cell>
          <table:table-cell table:style-name="Tableau5.B3" office:value-type="string">
            <text:p text:style-name="P2">int+</text:p>
          </table:table-cell>
          <table:table-cell table:style-name="Tableau5.C5" office:value-type="string">
            <text:p text:style-name="Table_20_Contents">Max. Anzahl an angezeigten Produkten. Bis zu so viele Produkte werden in einer Listenansicht angezeigt.</text:p>
          </table:table-cell>
          <table:table-cell table:style-name="Tableau5.D5" office:value-type="string">
            <text:p text:style-name="Table_20_Contents">50</text:p>
          </table:table-cell>
        </table:table-row>
        <table:table-row>
          <table:table-cell table:style-name="Tableau5.A6" office:value-type="string">
            <text:p text:style-name="Table_20_Contents">limitImage</text:p>
          </table:table-cell>
          <table:table-cell table:style-name="Tableau5.B3" office:value-type="string">
            <text:p text:style-name="P2">int+</text:p>
          </table:table-cell>
          <table:table-cell table:style-name="Tableau5.C6" office:value-type="string">
            <text:p text:style-name="Table_20_Contents">Max. Anzahl der angezeigten Bilder für ein Produkt.</text:p>
            <text:p text:style-name="P26">Beispiel:</text:p>
            <text:h text:style-name="Preformatted_20_Text" text:outline-level="5">plugin.tt_products.conf.tt_products.ALL.limitImage = 10</text:h>
          </table:table-cell>
          <table:table-cell table:style-name="Tableau5.D6" office:value-type="string">
            <text:p text:style-name="Table_20_Contents">1</text:p>
          </table:table-cell>
        </table:table-row>
        <table:table-row>
          <table:table-cell table:style-name="Tableau5.A7" office:value-type="string">
            <text:p text:style-name="Table_20_Contents">orderBy</text:p>
          </table:table-cell>
          <table:table-cell table:style-name="Tableau5.B3" office:value-type="string">
            <text:p text:style-name="P2">string</text:p>
          </table:table-cell>
          <table:table-cell table:style-name="Tableau5.C7" office:value-type="string">
            <text:p text:style-name="Table_20_Contents">Liste der Felder, nach denen die Datensätze sortiert werden.</text:p>
          </table:table-cell>
          <table:table-cell table:style-name="Tableau5.D7" office:value-type="string">
            <text:p text:style-name="Table_20_Contents">sorting</text:p>
          </table:table-cell>
        </table:table-row>
        <text:soft-page-break/>
        <table:table-row>
          <table:table-cell table:style-name="Tableau5.A8" office:value-type="string">
            <text:p text:style-name="Table_20_Contents">fetchImage</text:p>
          </table:table-cell>
          <table:table-cell table:style-name="Tableau5.B3" office:value-type="string">
            <text:p text:style-name="P2">string</text:p>
          </table:table-cell>
          <table:table-cell table:style-name="Tableau5.C8" office:value-type="string">
            <text:p text:style-name="Table_20_Contents">Die Bilder einer anderen Tabelle werden statt den Bildern dieser Tabelle verwendet.</text:p>
            <text:p text:style-name="Table_20_Contents"/>
            <text:p text:style-name="P26">Beispiel:</text:p>
            <text:h text:style-name="Preformatted_20_Text" text:outline-level="5">plugin.tt_products.conf.tt_products.ALL.fetchImage {</text:h>
            <text:p text:style-name="Table_20_Contents_2f_PRE"><text:s text:c="4"/>type = foreigntable</text:p>
            <text:p text:style-name="Table_20_Contents_2f_PRE"><text:s text:c="4"/>table = tt_content</text:p>
            <text:p text:style-name="Table_20_Contents_2f_PRE">}</text:p>
          </table:table-cell>
          <table:table-cell table:style-name="Tableau5.D3" office:value-type="string">
            <text:p text:style-name="Table_20_Contents"/>
          </table:table-cell>
        </table:table-row>
        <table:table-row>
          <table:table-cell table:style-name="Tableau5.A9" office:value-type="string">
            <text:p text:style-name="Table_20_Contents">language</text:p>
          </table:table-cell>
          <table:table-cell table:style-name="Tableau5.B3" office:value-type="string">
            <text:p text:style-name="P55">Feld von Strings</text:p>
          </table:table-cell>
          <table:table-cell table:style-name="Tableau5.C9" office:value-type="string">
            <text:p text:style-name="Table_20_Contents">Der Name der Sprachdatei mit Übersetzungen aus der Default Sprache in eine andere Sprache.</text:p>
            <text:p text:style-name="Table_20_Contents">type: </text:p>
            <text:list text:style-name="L4">
              <text:list-item>
                <text:p text:style-name="P87">csv ... Die Werte werden mit ';' und Zeilenumbrüchen getrennt </text:p>
              </text:list-item>
              <text:list-item>
                <text:p text:style-name="P87">noTranslation ... die Tabelle der alternativen Sprache soll nicht verwendet werden</text:p>
              </text:list-item>
              <text:list-item>
                <text:p text:style-name="P87">field ... Die Übersetzung befindet sich in Feldern</text:p>
              </text:list-item>
              <text:list-item>
                <text:p text:style-name="P87">table ... Die Sprachtabelle</text:p>
              </text:list-item>
            </text:list>
            <text:p text:style-name="Table_20_Contents"/>
            <text:p text:style-name="Table_20_Contents">file: Pfad und Name der Datei</text:p>
            <text:p text:style-name="Table_20_Contents">field: Name des Feldes auf der linken Seite und Wert auf der rechten Seite</text:p>
            <text:p text:style-name="Table_20_Contents">marker: Wie CSV, aber die Marker innerhalb der Datenbanktabelle werden ersetzt.</text:p>
            <text:p text:style-name="Table_20_Contents"/>
            <text:p text:style-name="P26">Beispiel:</text:p>
            <text:p text:style-name="Table_20_Contents_2f_PRE">[globalVar = GP:L = 1]</text:p>
            <text:p text:style-name="Table_20_Contents_2f_PRE">plugin.tt_products.conf.tt_products_<text:span text:style-name="T39">cat</text:span>.<text:span text:style-name="T40">ALL</text:span>.language {</text:p>
            <text:p text:style-name="Table_20_Contents_2f_PRE"><text:s text:c="4"/>type = csv</text:p>
            <text:p text:style-name="Table_20_Contents_2f_PRE"><text:s text:c="4"/>file = fileadmin/data/EnglishCategories.csv</text:p>
            <text:p text:style-name="Table_20_Contents_2f_PRE">}</text:p>
            <text:p text:style-name="Table_20_Contents_2f_PRE">[GLOBAL]</text:p>
            <text:p text:style-name="Table_20_Contents_2f_PRE"/>
            <text:p text:style-name="P26">Beispiel:</text:p>
            <text:p text:style-name="Table_20_Contents_2f_PRE">plugin.tt_products.conf.tt_products_<text:span text:style-name="T39">cat</text:span>.<text:span text:style-name="T40">ALL</text:span>.language {</text:p>
            <text:p text:style-name="Table_20_Contents_2f_PRE"><text:s text:c="4"/>type = field</text:p>
            <text:p text:style-name="Table_20_Contents_2f_PRE"><text:s text:c="4"/>field.title = subtitle</text:p>
            <text:p text:style-name="Table_20_Contents_2f_PRE">}</text:p>
          </table:table-cell>
          <table:table-cell table:style-name="Tableau5.D3" office:value-type="string">
            <text:p text:style-name="Table_20_Contents"/>
          </table:table-cell>
        </table:table-row>
        <table:table-row>
          <table:table-cell table:style-name="Tableau5.A10" office:value-type="string">
            <text:p text:style-name="Table_20_Contents">image</text:p>
          </table:table-cell>
          <table:table-cell table:style-name="Tableau5.B3" office:value-type="string">
            <text:p text:style-name="P2">IMAGE cObject</text:p>
          </table:table-cell>
          <table:table-cell table:style-name="Tableau5.C10" office:value-type="string">
            <text:p text:style-name="Table_20_Contents">Das Image Objekt kann über TypoScript in andere kopiert werden und somit für mehrere Code Felder bzw. Ansichtsarten verwendet werden.</text:p>
            <text:p text:style-name="Table_20_Contents"/>
            <text:p text:style-name="P26">Beispiel:</text:p>
            <text:h text:style-name="Preformatted_20_Text" text:outline-level="5">###PRODUCT_IMAGE1:M### </text:h>
            <text:h text:style-name="Preformatted_20_Text" text:outline-level="5"/>
            <text:h text:style-name="Preformatted_20_Text" text:outline-level="5">plugin.tt_products.conf.tt_products.ALL.image.m {</text:h>
            <text:h text:style-name="Preformatted_20_Text" text:outline-level="5"><text:s text:c="2"/>wrap = |&lt;br /&gt;</text:h>
            <text:h text:style-name="Preformatted_20_Text" text:outline-level="5"><text:s text:c="2"/>file.maxW = 320</text:h>
            <text:h text:style-name="Preformatted_20_Text" text:outline-level="5"><text:s text:c="2"/>file.maxH = 280</text:h>
            <text:h text:style-name="Preformatted_20_Text" text:outline-level="5">}</text:h>
          </table:table-cell>
          <table:table-cell table:style-name="Tableau5.D3" office:value-type="string">
            <text:p text:style-name="Table_20_Contents"/>
          </table:table-cell>
        </table:table-row>
        <table:table-row>
          <table:table-cell table:style-name="Tableau5.A11" office:value-type="string">
            <text:p text:style-name="Table_20_Contents">joinedImagesWrap</text:p>
          </table:table-cell>
          <table:table-cell table:style-name="Tableau5.B3" office:value-type="string">
            <text:p text:style-name="P5">-&gt; stdWrap</text:p>
          </table:table-cell>
          <table:table-cell table:style-name="Tableau5.C11" office:value-type="string">
            <text:p text:style-name="Table_20_Contents">Wrap um alle Bilder. separateImage muss auf 0 stehen. Dann wird um das HTML aller vereinigten Bilder eine Operation durchgeführt.</text:p>
            <text:p text:style-name="Table_20_Contents"/>
            <text:p text:style-name="P26">Example:</text:p>
            <text:p text:style-name="Table_20_Contents_2f_PRE">joinedImagesWrap.wrap = &lt;div id=”myimageid”&gt; |&lt;/div&gt;</text:p>
          </table:table-cell>
          <table:table-cell table:style-name="Tableau5.D11" office:value-type="string">
            <text:p text:style-name="Table_20_Contents"/>
          </table:table-cell>
        </table:table-row>
        <text:soft-page-break/>
        <table:table-row>
          <table:table-cell table:style-name="Tableau5.A12" office:value-type="string">
            <text:p text:style-name="Table_20_Contents">filter</text:p>
          </table:table-cell>
          <table:table-cell table:style-name="Tableau5.B3" office:value-type="string">
            <text:p text:style-name="P55">Feld von Strings</text:p>
          </table:table-cell>
          <table:table-cell table:style-name="Tableau5.C12" office:value-type="string">
            <text:p text:style-name="Table_20_Contents">Falls das eingetragen ist, werden nur die Datensätze der Tabelle verwendet, die durch diesen Filter auf Basis von Tabellenfeldern oder Parametern passen.</text:p>
            <text:p text:style-name="Table_20_Contents">type:</text:p>
            <text:p text:style-name="Table_20_Contents"/>
            <text:list xml:id="list3066472637" text:style-name="L5">
              <text:list-item>
                <text:p text:style-name="P88">param ... GET/PUT Parameter (Wert: gp) oder vordefiniert</text:p>
              </text:list-item>
              <text:list-item>
                <text:p text:style-name="P88">regexp ... Verwenden eines regulären Ausdrucks</text:p>
              </text:list-item>
            </text:list>
            <text:list text:style-name="L6">
              <text:list-item>
                <text:p text:style-name="P89">where ... Verwenden von WHERE Bedingungen</text:p>
              </text:list-item>
            </text:list>
            <text:list text:continue-list="list3066472637" text:style-name="L5">
              <text:list-header>
                <text:p text:style-name="P88"/>
              </text:list-header>
            </text:list>
            <text:p text:style-name="Table_20_Contents">field: Name des Feldes auf der linken Seite und Wert auf der rechten Seite</text:p>
            <text:p text:style-name="Table_20_Contents"/>
            <text:p text:style-name="P26">Beispiel:</text:p>
            <text:p text:style-name="Table_20_Contents_2f_PRE">filter {</text:p>
            <text:p text:style-name="Table_20_Contents_2f_PRE"><text:s text:c="4"/>regexp {</text:p>
            <text:p text:style-name="Table_20_Contents_2f_PRE"><text:s text:c="7"/>field {</text:p>
            <text:p text:style-name="Table_20_Contents_2f_PRE"><text:s text:c="10"/>title = [:alpha:]+[:blank:]+1[:blank:]+</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where {</text:p>
            <text:p text:style-name="Table_20_Contents_2f_PRE"><text:s text:c="7"/>field {</text:p>
            <text:p text:style-name="Table_20_Contents_2f_PRE"><text:s text:c="10"/>bargain = 1</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param {</text:p>
            <text:p text:style-name="Table_20_Contents_2f_PRE"><text:s text:c="7"/>cat = gp</text:p>
            <text:p text:style-name="Table_20_Contents_2f_PRE"><text:s text:c="4"/>}</text:p>
            <text:p text:style-name="Table_20_Contents_2f_PRE">}<text:line-break/></text:p>
            <text:p text:style-name="Table_20_Contents">Wird alle Datensätze ausfiltern, die im Titelfeld nur Buchstaben haben und am Ende eine Ziffer 1.</text:p>
          </table:table-cell>
          <table:table-cell table:style-name="Tableau5.D12" office:value-type="string">
            <text:p text:style-name="Table_20_Contents"/>
          </table:table-cell>
        </table:table-row>
        <table:table-row>
          <table:table-cell table:style-name="Tableau5.A13" office:value-type="string">
            <text:p text:style-name="Table_20_Contents">listProductsNoCat</text:p>
          </table:table-cell>
          <table:table-cell table:style-name="Tableau5.B3" office:value-type="string">
            <text:p text:style-name="P2">boolean</text:p>
          </table:table-cell>
          <table:table-cell table:style-name="Tableau5.C13" office:value-type="string">
            <text:p text:style-name="Table_20_Contents">Normalerweise werden keine Produkte unterhalb einer Kategorieliste angezeigt, solange noch keine Kategorie ausgewählt worden ist. Wenn dieser Wert auf '1' gesetzt wird, dann werden immer alle Produkte in der Listenansicht angezeigt, falls kein Kategorie-Parameter vorhanden ist und sich eine Kategorieliste auf derselben Seite befindet.</text:p>
          </table:table-cell>
          <table:table-cell table:style-name="Tableau5.D12" office:value-type="string">
            <text:p text:style-name="Table_20_Contents"/>
          </table:table-cell>
        </table:table-row>
        <table:table-row>
          <table:table-cell table:style-name="Tableau5.A14" office:value-type="string">
            <text:p text:style-name="Table_20_Contents">urlparams</text:p>
          </table:table-cell>
          <table:table-cell table:style-name="Tableau5.B3" office:value-type="string">
            <text:p text:style-name="P2">string</text:p>
          </table:table-cell>
          <table:table-cell table:style-name="Tableau5.C14" office:value-type="string">
            <text:p text:style-name="Table_20_Contents">Durch Beistriche/Komma getrennte Liste von tt_products URL Parametern, die einen Wert haben müssen. Andernfalls werden keine Datensätze angezeigt.</text:p>
            <text:p text:style-name="Table_20_Contents">Normalerweise sollen keine Produkte unterhalb einer Kategorieliste angezeigt, solange noch keine Kategorie ausgewählt worden ist. Wenn hier nichts eingetragen ist, dann werden immer alle Produkte in der Listenansicht angezeigt, falls kein Kategorie-Parameter vorhanden ist.</text:p>
          </table:table-cell>
          <table:table-cell table:style-name="Tableau5.D12" office:value-type="string">
            <text:p text:style-name="Table_20_Contents"/>
          </table:table-cell>
        </table:table-row>
        <text:soft-page-break/>
        <table:table-row>
          <table:table-cell table:style-name="Tableau5.A15" office:value-type="string">
            <text:p text:style-name="Table_20_Contents">displayColumns</text:p>
          </table:table-cell>
          <table:table-cell table:style-name="Tableau5.B3" office:value-type="string">
            <text:p text:style-name="P55">Feld von Strings</text:p>
          </table:table-cell>
          <table:table-cell table:style-name="Tableau5.C15" office:value-type="string">
            <text:p text:style-name="Table_20_Contents">Anzahl der Spalten bei der Anzeige</text:p>
            <text:p text:style-name="Table_20_Contents"/>
            <text:p text:style-name="Table_20_Contents">Anzahl an Spalten in den Ansichten. Es wird eine HTML Tabelle aufgebaut. Dazu müssen spezielle Template Markierungen verwendet werden. Die ITEM_SINGLE_PRE_HTML <text:s/>und ITEM_SINGLE_POST_HTML müssen vor und nach den &lt;TD&gt;-&lt;/TD&gt; Tags stehen, damit die Tabelle richtig erzeugt wird.</text:p>
            <text:p text:style-name="Table_20_Contents">Als Zahl wird zuerst die Hierarchieebene der Kategorie genannt.</text:p>
            <text:p text:style-name="Table_20_Contents"/>
            <text:p text:style-name="P27">Beispiel:</text:p>
            <text:p text:style-name="Table_20_Contents_2f_PRE">displayColumns {</text:p>
            <text:p text:style-name="Table_20_Contents_2f_PRE"><text:s text:c="4"/>1 = 3</text:p>
            <text:p text:style-name="Table_20_Contents_2f_PRE">}</text:p>
            <text:p text:style-name="Table_20_Contents_2f_PRE"/>
            <text:p text:style-name="P27">Beispiel:</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Tableau5.D12" office:value-type="string">
            <text:p text:style-name="Table_20_Contents"/>
          </table:table-cell>
        </table:table-row>
        <table:table-row>
          <table:table-cell table:style-name="Tableau5.A16" office:value-type="string">
            <text:p text:style-name="Table_20_Contents">displayHeader</text:p>
          </table:table-cell>
          <table:table-cell table:style-name="Tableau5.B3" office:value-type="string">
            <text:p text:style-name="P2">string</text:p>
          </table:table-cell>
          <table:table-cell table:style-name="Tableau5.C16" office:value-type="string">
            <text:p text:style-name="Table_20_Contents">Jede Liste von Elementen kann einen Kopfteil (Header) für die Kategorie haben. Normalerweise wird zuerst der Kopfteil und danach alle Elemente dieser Kategorie angezeigt. Aber manchmal soll der Kopfteil immer mit jedem Element zusammen wiederholt werden.</text:p>
            <text:p text:style-name="Table_20_Contents">Werte:</text:p>
            <text:list text:style-name="L7">
              <text:list-item>
                <text:p text:style-name="P90">always ... Der Block bestehend aus Kategorie und Element wird mit jedem Element wiederholt. Es werden nicht wie sonst üblich, die Elemente der gleichen Kategorie zusammengefasst.</text:p>
              </text:list-item>
              <text:list-item>
                <text:p text:style-name="P90">current ... Es wird nur die aktuelle Kategorie verwendet und nicht eine 2. Kategorie eines Elements. Damit gehören alle angezeigten Elemente zu dieser einen Kategorie, die gerade aktiv ist.</text:p>
              </text:list-item>
            </text:list>
            <text:p text:style-name="Table_20_Contents"/>
            <text:p text:style-name="P27">Example:</text:p>
            <text:p text:style-name="Table_20_Contents_2f_PRE">displayHeader {</text:p>
            <text:p text:style-name="Table_20_Contents_2f_PRE"><text:s text:c="4"/>1 = always</text:p>
            <text:p text:style-name="Table_20_Contents_2f_PRE">}</text:p>
          </table:table-cell>
          <table:table-cell table:style-name="Tableau5.D12" office:value-type="string">
            <text:p text:style-name="Table_20_Contents"/>
          </table:table-cell>
        </table:table-row>
        <table:table-row>
          <table:table-cell table:style-name="Tableau5.A17" office:value-type="string">
            <text:p text:style-name="Table_20_Contents">requiredFields</text:p>
          </table:table-cell>
          <table:table-cell table:style-name="Tableau5.B3" office:value-type="string">
            <text:p text:style-name="P2">string</text:p>
          </table:table-cell>
          <table:table-cell table:style-name="Tableau5.C17" office:value-type="string">
            <text:p text:style-name="Table_20_Contents">Felder, die aus der Datenbanktabelle gelesen werden müssen, auch wenn es keinen Marker im aktuellen Template Subpart dafür gibt.</text:p>
          </table:table-cell>
          <table:table-cell table:style-name="Tableau5.D12" office:value-type="string">
            <text:p text:style-name="Table_20_Contents"/>
          </table:table-cell>
        </table:table-row>
        <table:table-row>
          <table:table-cell table:style-name="Tableau5.A18" office:value-type="string">
            <text:p text:style-name="Table_20_Contents">special</text:p>
          </table:table-cell>
          <table:table-cell table:style-name="Tableau5.B3" office:value-type="string">
            <text:p text:style-name="P55">Feld von Strings</text:p>
          </table:table-cell>
          <table:table-cell table:style-name="Tableau5.C18" office:value-type="string">
            <text:p text:style-name="Table_20_Contents">Spezielle Behandlung für die Tabelle. Nur bei Kategorie Parametern verwendet.</text:p>
            <text:p text:style-name="Table_20_Contents"/>
            <text:list text:style-name="L8">
              <text:list-item text:start-value="1">
                <text:p text:style-name="P91">all ... Diese uid bedeutet, daß alle uids im Parameter aktiv sein sollen. 'all=all' bedeutet, dass immer alle uids aktiviert werden. Der Parameter wird also ignoriert.</text:p>
              </text:list-item>
              <text:list-item>
                <text:p text:style-name="P91">no ... Diese uid bedeutet, daß diese uid im Parameter nie aktiv sein soll.</text:p>
              </text:list-item>
            </text:list>
            <text:p text:style-name="Table_20_Contents"/>
            <text:p text:style-name="P26">Example:</text:p>
            <text:p text:style-name="Table_20_Contents_2f_PRE">special {</text:p>
            <text:p text:style-name="Table_20_Contents_2f_PRE"><text:s text:c="4"/>all = 1</text:p>
            <text:p text:style-name="Table_20_Contents_2f_PRE">}<text:line-break/></text:p>
            <text:p text:style-name="Table_20_Contents">Tabelle tt_products_cat: </text:p>
            <text:p text:style-name="Table_20_Contents">Das bewirkt, daß die Produkte aller Kategorien angezeigt werden, wenn der Parameter 'tt_products[cat] = 1' gesetzt worden ist. So werden anstelle der Produkte von Kategorie 1 nun alle Produkte aller Kategorien aufgelistet.</text:p>
          </table:table-cell>
          <table:table-cell table:style-name="Tableau5.D12" office:value-type="string">
            <text:p text:style-name="Table_20_Contents"/>
          </table:table-cell>
        </table:table-row>
        <text:soft-page-break/>
        <table:table-row>
          <table:table-cell table:style-name="Tableau5.A19" office:value-type="string">
            <text:p text:style-name="Table_20_Contents">onlyChildsOfCurrent</text:p>
          </table:table-cell>
          <table:table-cell table:style-name="Tableau5.B3" office:value-type="string">
            <text:p text:style-name="P2">boolean</text:p>
          </table:table-cell>
          <table:table-cell table:style-name="Tableau5.C19" office:value-type="string">
            <text:p text:style-name="Table_20_Contents">Wenn gesetzt, werden die Kinder Elemente (z.B. Unterkategorien) nur für ein aktuelles Element gezeigt (z.B. die aktuelle Kategorie).</text:p>
          </table:table-cell>
          <table:table-cell table:style-name="Tableau5.D12" office:value-type="string">
            <text:p text:style-name="Table_20_Contents"/>
          </table:table-cell>
        </table:table-row>
        <table:table-row>
          <table:table-cell table:style-name="Tableau5.A20" office:value-type="string">
            <text:p text:style-name="Table_20_Contents">rootChildsOfCurrent</text:p>
          </table:table-cell>
          <table:table-cell table:style-name="Tableau5.B3" office:value-type="string">
            <text:p text:style-name="P2">boolean</text:p>
          </table:table-cell>
          <table:table-cell table:style-name="Tableau5.C20" office:value-type="string">
            <text:p text:style-name="Table_20_Contents">Wenn gesetzt, werden die Kinder Elemente des aktuellen Elements auf der obersten Ebene angezeigt.</text:p>
          </table:table-cell>
          <table:table-cell table:style-name="Tableau5.D12" office:value-type="string">
            <text:p text:style-name="Table_20_Contents"/>
          </table:table-cell>
        </table:table-row>
        <table:table-row>
          <table:table-cell table:style-name="Tableau5.A21" office:value-type="string">
            <text:p text:style-name="P42">field</text:p>
          </table:table-cell>
          <table:table-cell table:style-name="Tableau5.B3" office:value-type="string">
            <text:p text:style-name="P57">Feld von cObject</text:p>
          </table:table-cell>
          <table:table-cell table:style-name="Tableau5.C21" office:value-type="string">
            <text:p text:style-name="Table_20_Contents">Verwendung von cObjects um einige Felder darzustellen. Normalerweise wird <text:s/>jedes Feld so angezeigt, wie es in der Datenbank Tabelle gespeichert worden ist. Nur die image Felder werden als IMAGE Bilder dargestellt.</text:p>
            <text:p text:style-name="Table_20_Contents">Verwenden Sie ”untouched=1” wenn der unveränderte Original Wert verwendet werden soll (manchmal beim Beschreibungsfeld benötigt).</text:p>
            <text:p text:style-name="Table_20_Contents"/>
            <text:p text:style-name="P26">Beispiel:</text:p>
            <text:p text:style-name="Table_20_Contents_2f_PRE">field {</text:p>
            <text:p text:style-name="Table_20_Contents_2f_PRE"><text:s text:c="4"/>title = COA</text:p>
            <text:p text:style-name="Table_20_Contents_2f_PRE"><text:s text:c="4"/>title {</text:p>
            <text:p text:style-name="Table_20_Contents_2f_PRE"><text:s text:c="8"/>untouched = 0</text:p>
            <text:p text:style-name="Table_20_Contents_2f_PRE"><text:s text:c="8"/>10 = TEXT</text:p>
            <text:p text:style-name="Table_20_Contents_2f_PRE"><text:s text:c="8"/>10.value = ###PRODUCT_TITLE### <text:s/>in sizes <text:s/>###PRODUCT_SIZE###</text:p>
            <text:p text:style-name="Table_20_Contents_2f_PRE"><text:s text:c="8"/>10.wrap = Title: - | - <text:s text:c="2"/></text:p>
            <text:p text:style-name="Table_20_Contents_2f_PRE"><text:s text:c="4"/>}</text:p>
            <text:p text:style-name="Table_20_Contents_2f_PRE">}</text:p>
          </table:table-cell>
          <table:table-cell table:style-name="Tableau5.D12" office:value-type="string">
            <text:p text:style-name="Table_20_Contents"/>
          </table:table-cell>
        </table:table-row>
        <table:table-row>
          <table:table-cell table:style-name="Tableau5.A22" office:value-type="string">
            <text:p text:style-name="Table_20_Contents">fieldIndex</text:p>
          </table:table-cell>
          <table:table-cell table:style-name="Tableau5.B3" office:value-type="string">
            <text:p text:style-name="Table_20_Contents">int+/<text:span text:style-name="T9">Array of integers</text:span></text:p>
          </table:table-cell>
          <table:table-cell table:style-name="Tableau5.C22" office:value-type="string">
            <text:p text:style-name="Table_20_Contents">Index für Felder mit mehrfachen Inhalten. Das wird vorerst nur verwendet, um anzugeben, welche Artikelbilder welche Bilder des Produktes überschreiben sollen. Links steht der Index des Bildes (Beginn mit 1) und rechts die Zielnummer des Bildes. Der Marker für das 1. Bild wäre dann ###&lt;TABELLENKÜRZEL&gt;_IMAGE2###.</text:p>
            <text:p text:style-name="Table_20_Contents_2f_PRE"><text:line-break/>fieldIndex {</text:p>
            <text:p text:style-name="Table_20_Contents_2f_PRE"><text:s/>image {</text:p>
            <text:p text:style-name="Table_20_Contents_2f_PRE"><text:s text:c="3"/>1 = 2</text:p>
            <text:p text:style-name="Table_20_Contents_2f_PRE"><text:s/>}</text:p>
            <text:p text:style-name="Table_20_Contents_2f_PRE">}</text:p>
          </table:table-cell>
          <table:table-cell table:style-name="Tableau5.D12" office:value-type="string">
            <text:p text:style-name="Table_20_Contents"/>
          </table:table-cell>
        </table:table-row>
        <table:table-row>
          <table:table-cell table:style-name="Tableau5.A23" office:value-type="string">
            <text:p text:style-name="P42">controlFields</text:p>
          </table:table-cell>
          <table:table-cell table:style-name="Tableau5.B3" office:value-type="string">
            <text:p text:style-name="P57">Feld von cObject</text:p>
          </table:table-cell>
          <table:table-cell table:style-name="Tableau5.C23" office:value-type="string">
            <text:p text:style-name="Table_20_Contents">Steuerfelder</text:p>
            <text:p text:style-name="Table_20_Contents"/>
            <text:p text:style-name="Table_20_Contents">newitemdays ... Name des Feldes, welches mit newItemDays verwendet wird.</text:p>
            <text:p text:style-name="Table_20_Contents"/>
            <text:p text:style-name="P26">Beispiel:</text:p>
            <text:p text:style-name="Table_20_Contents_2f_PRE">controlFields {</text:p>
            <text:p text:style-name="Table_20_Contents_2f_PRE"><text:s text:c="3"/>newItemDays = starttime</text:p>
            <text:p text:style-name="Table_20_Contents_2f_PRE">}</text:p>
          </table:table-cell>
          <table:table-cell table:style-name="Tableau5.D23" office:value-type="string">
            <text:p text:style-name="Table_20_Contents">newItemDays -&gt; starttime</text:p>
            <text:p text:style-name="Table_20_Contents"/>
            <text:p text:style-name="Table_20_Contents"/>
          </table:table-cell>
        </table:table-row>
        <table:table-row>
          <table:table-cell table:style-name="Tableau5.A24" office:value-type="string">
            <text:p text:style-name="P42">displayFields</text:p>
          </table:table-cell>
          <table:table-cell table:style-name="Tableau5.B3" office:value-type="string">
            <text:p text:style-name="P57">array of cObject</text:p>
          </table:table-cell>
          <table:table-cell table:style-name="Tableau5.C24" office:value-type="string">
            <text:p text:style-name="Table_20_Contents">Anzeigefelder</text:p>
            <text:p text:style-name="Table_20_Contents"/>
            <text:p text:style-name="Table_20_Contents">Einstellungen für die Anzeige einiger Felder</text:p>
            <text:p text:style-name="Table_20_Contents"/>
            <text:p text:style-name="P26">Beispiel:</text:p>
            <text:p text:style-name="Table_20_Contents_2f_PRE">displayFields {</text:p>
            <text:p text:style-name="Table_20_Contents_2f_PRE"><text:s text:c="3"/>note = RTEcssText</text:p>
            <text:p text:style-name="Table_20_Contents_2f_PRE">}</text:p>
          </table:table-cell>
          <table:table-cell table:style-name="Tableau5.D12" office:value-type="string">
            <text:p text:style-name="Table_20_Contents"/>
          </table:table-cell>
        </table:table-row>
        <table:table-row>
          <table:table-cell table:style-name="Tableau5.A25" office:value-type="string">
            <text:p text:style-name="Table_20_Contents">fieldLink</text:p>
          </table:table-cell>
          <table:table-cell table:style-name="Tableau5.B3" office:value-type="string">
            <text:p text:style-name="P57">array of typolink</text:p>
          </table:table-cell>
          <table:table-cell table:style-name="Tableau5.C25" office:value-type="string">
            <text:p text:style-name="Table_20_Contents">Die Definition der Links auf Feldinhalte.</text:p>
            <text:p text:style-name="Table_20_Contents"/>
            <text:p text:style-name="P26">Example:</text:p>
            <text:p text:style-name="Table_20_Contents_2f_PRE">conf.tt_products.ALL {</text:p>
            <text:p text:style-name="Table_20_Contents_2f_PRE"><text:tab/>fieldLink {</text:p>
            <text:p text:style-name="Table_20_Contents_2f_PRE"><text:tab/> <text:s text:c="3"/>datasheet.ATagParams=class="datasheetClass"</text:p>
            <text:p text:style-name="Table_20_Contents_2f_PRE"><text:tab/>}</text:p>
            <text:p text:style-name="Table_20_Contents_2f_PRE">}</text:p>
          </table:table-cell>
          <table:table-cell table:style-name="Tableau5.D12" office:value-type="string">
            <text:p text:style-name="Table_20_Contents"/>
          </table:table-cell>
        </table:table-row>
        <text:soft-page-break/>
        <table:table-row>
          <table:table-cell table:style-name="Tableau5.A26" office:value-type="string">
            <text:p text:style-name="P42">fe_users</text:p>
          </table:table-cell>
          <table:table-cell table:style-name="Tableau5.B3" office:value-type="string">
            <text:p text:style-name="P57">array of string</text:p>
          </table:table-cell>
          <table:table-cell table:style-name="Tableau5.C26" office:value-type="string">
            <text:p text:style-name="Table_20_Contents">FE Benutzer Felder für Datumsgrenzen wie Altersbeschränkungen</text:p>
            <text:p text:style-name="Table_20_Contents"/>
            <text:p text:style-name="Table_20_Contents">date_of_birth.period ... Diese Zeitdauer muss seit der Geburt des FE Benutzers vergangen sein, damit die Produkte mit uid 12 oder 24 im Warenkorb erlaubt sind.</text:p>
            <text:p text:style-name="Table_20_Contents"/>
            <text:p text:style-name="P26">Example:</text:p>
            <text:p text:style-name="Table_20_Contents_2f_PRE">fe_users {</text:p>
            <text:p text:style-name="Table_20_Contents_2f_PRE"><text:s/>date_of_birth.period.y = 12</text:p>
            <text:p text:style-name="Table_20_Contents_2f_PRE"><text:s/>where = uid IN (12, 24)</text:p>
            <text:p text:style-name="Table_20_Contents_2f_PRE">}</text:p>
          </table:table-cell>
          <table:table-cell table:style-name="Tableau5.D12" office:value-type="string">
            <text:p text:style-name="Table_20_Contents"/>
          </table:table-cell>
        </table:table-row>
        <table:table-row>
          <table:table-cell table:style-name="Tableau5.A27" office:value-type="string">
            <text:p text:style-name="P42">view</text:p>
          </table:table-cell>
          <table:table-cell table:style-name="Tableau5.B3" office:value-type="string">
            <text:p text:style-name="P57">array of string</text:p>
          </table:table-cell>
          <table:table-cell table:style-name="Tableau5.C27" office:value-type="string">
            <text:p text:style-name="P11">Konfiguration der Anzeige von CODE Inhalten</text:p>
            <text:p text:style-name="P11"/>
            <text:p text:style-name="P11">sortSelect <text:s/>... Feld von Form Elementen</text:p>
            <text:p text:style-name="P11">filterSelect … Filter Funktionen</text:p>
            <text:p text:style-name="P11"/>
            <text:p text:style-name="P26">Beispiel:</text:p>
            <text:p text:style-name="Table_20_Contents_2f_PRE">view.sortSelect {</text:p>
            <text:p text:style-name="Table_20_Contents_2f_PRE"><text:s/>1 {</text:p>
            <text:p text:style-name="Table_20_Contents_2f_PRE"><text:s text:c="4"/>label = sort by</text:p>
            <text:p text:style-name="Table_20_Contents_2f_PRE"><text:s text:c="4"/>valueArray {</text:p>
            <text:p text:style-name="Table_20_Contents_2f_PRE"><text:s text:c="6"/>10.label = title</text:p>
            <text:p text:style-name="Table_20_Contents_2f_PRE"><text:s text:c="6"/>10.value = 1</text:p>
            <text:p text:style-name="Table_20_Contents_2f_PRE"><text:s text:c="6"/>10.field = title</text:p>
            <text:p text:style-name="Table_20_Contents_2f_PRE"><text:s text:c="4"/>}</text:p>
            <text:p text:style-name="Table_20_Contents_2f_PRE"><text:s text:c="2"/>}</text:p>
            <text:p text:style-name="P41">}</text:p>
            <text:p text:style-name="P41"/>
            <text:p text:style-name="P40">browser … Konfiguration des Datensatz Browsers mit Typ div2007<text:line-break/> <text:s text:c="3"/>showFirstLast … wenn der Link für das erste und letzte Element angezeigt werden soll</text:p>
            <text:p text:style-name="P40"/>
            <text:p text:style-name="P26">Beispiel:</text:p>
            <text:p text:style-name="Table_20_Contents_2f_PRE">view.browser = div2007</text:p>
            <text:p text:style-name="Table_20_Contents_2f_PRE">view.browser {</text:p>
            <text:p text:style-name="Table_20_Contents_2f_PRE"><text:s text:c="3"/>browseLinksWrap = &lt;div class="browseLinksWrap"&gt;|&lt;/div&gt;</text:p>
            <text:p text:style-name="Table_20_Contents_2f_PRE"><text:s text:c="3"/>disabledLinkWrap = &lt;span class="disabledLinkWrap"&gt;|&lt;/span&gt;</text:p>
            <text:p text:style-name="Table_20_Contents_2f_PRE"><text:s text:c="3"/>inactiveLinkWrap = &lt;span class="inactiveLinkWrap"&gt;|&lt;/span&gt;</text:p>
            <text:p text:style-name="Table_20_Contents_2f_PRE"><text:s text:c="3"/>activeLinkWrap = &lt;span class="activeLinkWrap"&gt;|&lt;/span&gt;</text:p>
            <text:p text:style-name="Table_20_Contents_2f_PRE"><text:s text:c="3"/>disabledNextLinkWrap = &lt;span class="pagination-next"&gt;|&lt;/span&gt;</text:p>
            <text:p text:style-name="Table_20_Contents_2f_PRE"><text:s text:c="3"/>inactiveNextLinkWrap = &lt;span class="pagination-next"&gt;|&lt;/span&gt;</text:p>
            <text:p text:style-name="Table_20_Contents_2f_PRE"><text:s text:c="3"/>disabledPreviousLinkWrap = &lt;span class="pagination-previous"&gt;|&lt;/span&gt;</text:p>
            <text:p text:style-name="Table_20_Contents_2f_PRE"><text:s text:c="3"/>inactivePreviousLinkWrapn = &lt;span class="pagination-previous"&gt;|&lt;/span&gt;</text:p>
            <text:p text:style-name="P13">}</text:p>
          </table:table-cell>
          <table:table-cell table:style-name="Tableau5.D12" office:value-type="string">
            <text:p text:style-name="Table_20_Contents"/>
          </table:table-cell>
        </table:table-row>
        <table:table-row>
          <table:table-cell table:style-name="Tableau5.A28" office:value-type="string">
            <text:p text:style-name="Table_20_Contents">subpart</text:p>
          </table:table-cell>
          <table:table-cell table:style-name="Tableau5.B3" office:value-type="string">
            <text:p text:style-name="P55">array of string</text:p>
          </table:table-cell>
          <table:table-cell table:style-name="Tableau5.C28" office:value-type="string">
            <text:p text:style-name="Table_20_Contents">Damit bestimmt man das Verhalten bei der Anzeige der Subpart Marker.</text:p>
            <text:p text:style-name="Table_20_Contents"/>
            <text:p text:style-name="Table_20_Contents">show … default Wenn der Datensatz einer default Kategorie immer angezeigt werden muss, auch dann wenn keine Produkte zu dieser Kategorie gefunden werden. Das wird dann verwendet, wenn man für jede Seite eine Default Kategorie festgelegt hat und erreichen will, dass immer ein Kategorie Titel und Bild angezeigt wird.</text:p>
            <text:p text:style-name="P26"/>
            <text:p text:style-name="P26">Beispiel:</text:p>
            <text:p text:style-name="Table_20_Contents_2f_PRE">subpart.ITEM_CATEGORY {</text:p>
            <text:p text:style-name="Table_20_Contents_2f_PRE"><text:s text:c="4"/>show = default</text:p>
            <text:p text:style-name="Table_20_Contents_2f_PRE">}</text:p>
          </table:table-cell>
          <table:table-cell table:style-name="Tableau5.D28" office:value-type="string">
            <text:p text:style-name="P54"/>
          </table:table-cell>
        </table:table-row>
        <text:soft-page-break/>
        <table:table-row>
          <table:table-cell table:style-name="Tableau5.A29" office:value-type="string">
            <text:p text:style-name="P2">marks</text:p>
          </table:table-cell>
          <table:table-cell table:style-name="Tableau5.B3" office:value-type="string">
            <text:p text:style-name="P2">array</text:p>
          </table:table-cell>
          <table:table-cell table:style-name="Tableau5.C29" office:value-type="string">
            <text:p text:style-name="P42">Selbstdefinierte Marker des Datensatzes.</text:p>
            <text:p text:style-name="P42"/>
            <text:p text:style-name="P26">Beispiel:</text:p>
            <text:p text:style-name="Table_20_Contents_2f_PRE">marks {</text:p>
            <text:p text:style-name="Table_20_Contents_2f_PRE"><text:s text:c="4"/>mymarker = COA</text:p>
            <text:p text:style-name="Table_20_Contents_2f_PRE"><text:s text:c="4"/>mymarker {</text:p>
            <text:p text:style-name="Table_20_Contents_2f_PRE"><text:s text:c="8"/>10 = TEXT</text:p>
            <text:p text:style-name="Table_20_Contents_2f_PRE"><text:s text:c="8"/>10.value = ###PRODUCT_TITLE### <text:s/>in sizes <text:s/>###PRODUCT_SIZE###</text:p>
            <text:p text:style-name="Table_20_Contents_2f_PRE"><text:s text:c="8"/>10.wrap = Title: - | -</text:p>
            <text:p text:style-name="Table_20_Contents_2f_PRE"><text:s text:c="4"/>}</text:p>
            <text:p text:style-name="P43">}</text:p>
          </table:table-cell>
          <table:table-cell table:style-name="Tableau5.D29" office:value-type="string">
            <text:p text:style-name="Table_20_Contents"/>
          </table:table-cell>
        </table:table-row>
        <table:table-row>
          <table:table-cell table:style-name="Tableau5.A30" office:value-type="string">
            <text:p text:style-name="P2">tagmark</text:p>
            <text:p text:style-name="P2">(<text:span text:style-name="T48">nur</text:span> <text:span text:style-name="T48">K</text:span>ategorie<text:span text:style-name="T48">n</text:span> in LIST)</text:p>
          </table:table-cell>
          <table:table-cell table:style-name="Tableau5.B3" office:value-type="string">
            <text:p text:style-name="P2">array</text:p>
          </table:table-cell>
          <table:table-cell table:style-name="Tableau5.C30" office:value-type="string">
            <text:p text:style-name="P42">Bestimmt das Befüllen des Markers ###CATALLTAGS### mit den Bezeichnungen der Kategorien.</text:p>
            <text:p text:style-name="P42"/>
            <text:p text:style-name="P26">Beispiel:</text:p>
            <text:p text:style-name="Table_20_Contents_2f_PRE">tagmark {</text:p>
            <text:p text:style-name="Table_20_Contents_2f_PRE"><text:s text:c="4"/>parents = 1</text:p>
            <text:p text:style-name="Table_20_Contents_2f_PRE"><text:s text:c="4"/>prefix = cat</text:p>
            <text:p text:style-name="P43">}</text:p>
          </table:table-cell>
          <table:table-cell table:style-name="Tableau5.D30" office:value-type="string">
            <text:p text:style-name="Table_20_Contents"/>
          </table:table-cell>
        </table:table-row>
        <table:table-row>
          <table:table-cell table:style-name="Tableau5.A31" office:value-type="string">
            <text:p text:style-name="Table_20_Contents">hideID</text:p>
          </table:table-cell>
          <table:table-cell table:style-name="Tableau5.B3" office:value-type="string">
            <text:p text:style-name="Table_20_Contents">int+</text:p>
          </table:table-cell>
          <table:table-cell table:style-name="Tableau5.C31" office:value-type="string">
            <text:p text:style-name="P31">Die ID jenes Elements bei welchem das ganze Shop Plugin versteckt (unsichtbar) gemacht werden soll. Benutzen Sie das mit Vorsicht! Das Shop Plugin wird im FE nicht angezeigt, wenn der Url Parameter der Tabelle auf eines der Elemente der durch Beistriche (Komma) getrennten Liste von Zahlen gesetzt ist.</text:p>
          </table:table-cell>
          <table:table-cell table:style-name="Tableau5.D31" office:value-type="string">
            <text:p text:style-name="Table_20_Contents"/>
          </table:table-cell>
        </table:table-row>
        <table:table-row>
          <table:table-cell table:style-name="Tableau5.A32" office:value-type="string">
            <text:p text:style-name="Table_20_Contents">hide<text:span text:style-name="T50">Zero</text:span></text:p>
            <text:p text:style-name="P2">(<text:span text:style-name="T48">nur</text:span> <text:span text:style-name="T48">Kategorien</text:span>)</text:p>
          </table:table-cell>
          <table:table-cell table:style-name="Tableau5.B3" office:value-type="string">
            <text:p text:style-name="Table_20_Contents">boolean</text:p>
          </table:table-cell>
          <table:table-cell table:style-name="Tableau5.C32" office:value-type="string">
            <text:p text:style-name="P31"><text:span text:style-name="T48">Wenn 1, dann wird ein Plugin versteckt, falls es keinen K</text:span>ategor<text:span text:style-name="T48">ie</text:span> <text:span text:style-name="T48">P</text:span>arameter <text:span text:style-name="T49">mit einer </text:span>uid <text:span text:style-name="T49">gibt.</text:span></text:p>
          </table:table-cell>
          <table:table-cell table:style-name="Tableau5.D32" office:value-type="string">
            <text:p text:style-name="Table_20_Contents">0</text:p>
          </table:table-cell>
        </table:table-row>
        <table:table-row>
          <table:table-cell table:style-name="Tableau5.A33" office:value-type="string">
            <text:p text:style-name="Table_20_Contents">hideChildless</text:p>
            <text:p text:style-name="P2">(<text:span text:style-name="T48">nur</text:span> <text:span text:style-name="T48">Kategorien</text:span>)</text:p>
          </table:table-cell>
          <table:table-cell table:style-name="Tableau5.B3" office:value-type="string">
            <text:p text:style-name="Table_20_Contents">boolean</text:p>
          </table:table-cell>
          <table:table-cell table:style-name="Tableau5.C33" office:value-type="string">
            <text:p text:style-name="P31"><text:span text:style-name="T48">Wenn 1, dann wird ein Plugin versteckt, falls der K</text:span>ategor<text:span text:style-name="T48">ie</text:span> <text:span text:style-name="T48">P</text:span>arameter <text:span text:style-name="T48">eine </text:span>uid <text:span text:style-name="T48">enthält, die keine Kinder (Unterkategorie) hat</text:span>. <text:span text:style-name="T48">Das kann nur bei hierarchischen Kategorien verwendet werden.</text:span></text:p>
          </table:table-cell>
          <table:table-cell table:style-name="Tableau5.D33" office:value-type="string">
            <text:p text:style-name="Table_20_Contents">0</text:p>
          </table:table-cell>
        </table:table-row>
      </table:table>
      <text:h text:style-name="Heading_20_3" text:outline-level="3"><text:bookmark-start text:name="__RefHeading__17621_1782085564"/>Formular Eigenschaften<text:bookmark-end text:name="__RefHeading__17621_1782085564"/></text:h>
      <text:p text:style-name="Text_20_body">nur Setup<text:line-break/>Es gibt mehrere Formulare, die konfiguriert werden können. Geben Sie den Code nach dem 'form' an.</text:p>
      <text:p text:style-name="P26">Example:</text:p>
      <text:h text:style-name="Preformatted_20_Text" text:outline-level="5">plugin.tt_products.form.SEARCH.data.name = ShopSearchForm</text:h>
      <text:h text:style-name="Preformatted_20_Text" text:outline-level="5"/>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Eigenschaft:</text:p>
            </table:table-cell>
            <table:table-cell table:style-name="Tableau10.B1" office:value-type="string">
              <text:p text:style-name="Table_20_Heading">Datentyp</text:p>
            </table:table-cell>
            <table:table-cell table:style-name="Tableau10.A1" office:value-type="string">
              <text:p text:style-name="Table_20_Heading">Beschreibung:</text:p>
            </table:table-cell>
            <table:table-cell table:style-name="Tableau10.D1" office:value-type="string">
              <text:p text:style-name="Table_20_Heading">Voreinstellung:</text:p>
            </table:table-cell>
          </table:table-row>
        </table:table-header-rows>
        <table:table-row>
          <table:table-cell table:style-name="Tableau10.A2" office:value-type="string">
            <text:p text:style-name="Table_20_Contents">data</text:p>
          </table:table-cell>
          <table:table-cell table:style-name="Tableau10.B2" office:value-type="string">
            <text:p text:style-name="P9">string/-&gt;stdWrap</text:p>
          </table:table-cell>
          <table:table-cell table:style-name="Tableau10.C2" office:value-type="string">
            <text:p text:style-name="Table_20_Contents">Daten, aus denen das Formular zusammengesetzt wird.</text:p>
            <text:p text:style-name="Table_20_Contents">name ... Name des Formulars. Falls leer, wird der gesamte Subpart (Unterbereich) nicht gezeichnet.</text:p>
          </table:table-cell>
          <table:table-cell table:style-name="Tableau10.D2" office:value-type="string">
            <text:p text:style-name="P54">abhängig vom Codefeld</text:p>
          </table:table-cell>
        </table:table-row>
        <table:table-row>
          <table:table-cell table:style-name="Tableau10.A3" office:value-type="string">
            <text:p text:style-name="P8">dataArray</text:p>
          </table:table-cell>
          <table:table-cell table:style-name="Tableau10.B2" office:value-type="string">
            <text:p text:style-name="P56">Feld von Form Elementen</text:p>
          </table:table-cell>
          <table:table-cell table:style-name="Tableau10.C3" office:value-type="string">
            <text:p text:style-name="P42">Jeder Eintrag im <text:s/>dataArray ist numerisch und hat die 4 Haupteigenschaften '<text:span text:style-name="T9">label'</text:span>, '<text:span text:style-name="T9">type'</text:span>, '<text:span text:style-name="T9">value'</text:span> und <text:s/>'<text:span text:style-name="T9">required'</text:span>. 'label' und 'value' haben stdWrap Eigenschaften. </text:p>
            <text:p text:style-name="P42">params ... Zusätzliche Parameter angeben </text:p>
            <text:p text:style-name="P42"/>
            <text:p text:style-name="P25">Beispiel:</text:p>
            <text:p text:style-name="Table_20_Contents_2f_PRE"><text:s text:c="2"/>form.SELECTAD.dataArray {</text:p>
            <text:p text:style-name="Table_20_Contents_2f_PRE"><text:s text:c="3"/>10.label = Hersteller:</text:p>
            <text:p text:style-name="Table_20_Contents_2f_PRE"><text:s text:c="3"/>10.type = tt_products[address]=select</text:p>
            <text:p text:style-name="Table_20_Contents_2f_PRE"><text:s text:c="3"/>10.params = onchange = "submit();"</text:p>
            <text:p text:style-name="P43"><text:s text:c="2"/>}</text:p>
            <text:p text:style-name="P43"/>
            <text:p text:style-name="Table_20_Contents">Enhancement for the selection of variants with selectColor, … specification.</text:p>
            <text:p text:style-name="Table_20_Contents_2f_PRE"/>
            <text:p text:style-name="Table_20_Contents_2f_PRE">form.ALL.selectColor.dataArray {</text:p>
            <text:p text:style-name="Table_20_Contents_2f_PRE"><text:s text:c="3"/>10.params = onchange = "submit();"</text:p>
            <text:p text:style-name="P43">}</text:p>
          </table:table-cell>
          <table:table-cell table:style-name="Tableau10.D3" office:value-type="string">
            <text:p text:style-name="P54"/>
          </table:table-cell>
        </table:table-row>
        <table:table-row>
          <table:table-cell table:style-name="Tableau10.A4" office:value-type="string">
            <text:p text:style-name="P8">image</text:p>
          </table:table-cell>
          <table:table-cell table:style-name="Tableau10.B2" office:value-type="string">
            <text:p text:style-name="P9">IMAGE</text:p>
          </table:table-cell>
          <table:table-cell table:style-name="Tableau10.C4" office:value-type="string">
            <text:p text:style-name="P42">Bild für die Ausgabe</text:p>
          </table:table-cell>
          <table:table-cell table:style-name="Tableau10.D3" office:value-type="string">
            <text:p text:style-name="P54"/>
          </table:table-cell>
        </table:table-row>
        <text:soft-page-break/>
        <table:table-row>
          <table:table-cell table:style-name="Tableau10.A5" office:value-type="string">
            <text:p text:style-name="P8">imageImport</text:p>
          </table:table-cell>
          <table:table-cell table:style-name="Tableau10.B2" office:value-type="string">
            <text:p text:style-name="P57">array of fields</text:p>
          </table:table-cell>
          <table:table-cell table:style-name="Tableau10.C5" office:value-type="string">
            <text:p text:style-name="P42">Bestimmung der Bilder anhand der relativen Position einer Variante</text:p>
            <text:p text:style-name="P42"/>
            <text:p text:style-name="P25">Beispiel:</text:p>
            <text:p text:style-name="Table_20_Contents_2f_PRE">form.ALL.selectColor.imageImport {</text:p>
            <text:p text:style-name="Table_20_Contents_2f_PRE"><text:s text:c="3"/>10.sql.where =</text:p>
            <text:p text:style-name="Table_20_Contents_2f_PRE"><text:s text:c="3"/>10.prod.0 = earth-round.gif</text:p>
            <text:p text:style-name="Table_20_Contents_2f_PRE"><text:s text:c="3"/>10.prod.1 = marigold-round.gif</text:p>
            <text:p text:style-name="Table_20_Contents_2f_PRE"><text:s text:c="3"/>10.prod.2 = delft-round.gif</text:p>
            <text:p text:style-name="Table_20_Contents_2f_PRE">}</text:p>
          </table:table-cell>
          <table:table-cell table:style-name="Tableau10.D3" office:value-type="string">
            <text:p text:style-name="P54"/>
          </table:table-cell>
        </table:table-row>
        <table:table-row>
          <table:table-cell table:style-name="Tableau10.A6" office:value-type="string">
            <text:p text:style-name="P8">layout</text:p>
          </table:table-cell>
          <table:table-cell table:style-name="Tableau10.B2" office:value-type="string">
            <text:p text:style-name="P9">string</text:p>
          </table:table-cell>
          <table:table-cell table:style-name="Tableau10.C6" office:value-type="string">
            <text:p text:style-name="P42">Hierüber wird bestimmt, wie die Eingabefelder und andere Marker relativ zueinander eingefügt werden..</text:p>
            <text:p text:style-name="P42"/>
            <text:p text:style-name="P26">Beispiel:</text:p>
            <text:p text:style-name="P42">Das ersetzt "###INPUT###" <text:s/>mit dem Input HTML Tag und "###IMAGE###' mit der Bildausgabe. </text:p>
            <text:p text:style-name="P42"/>
            <text:p text:style-name="Table_20_Contents_2f_PRE">&lt;tr&gt;&lt;td&gt;###INPUT###&lt;/td&gt;&lt;td&gt; ###IMAGE###&lt;/td&gt;&lt;/tr&gt;</text:p>
          </table:table-cell>
          <table:table-cell table:style-name="Tableau10.D3" office:value-type="string">
            <text:p text:style-name="P54"/>
          </table:table-cell>
        </table:table-row>
        <table:table-row>
          <table:table-cell table:style-name="Tableau10.A7" office:value-type="string">
            <text:p text:style-name="P8">header</text:p>
          </table:table-cell>
          <table:table-cell table:style-name="Tableau10.B2" office:value-type="string">
            <text:p text:style-name="P9">string</text:p>
          </table:table-cell>
          <table:table-cell table:style-name="Tableau10.C7" office:value-type="string">
            <text:p text:style-name="P42">Überschrift als ersten Eintrag in der Varianten Select Box</text:p>
            <text:p text:style-name="P42"/>
            <text:p text:style-name="P25">Beispiel:</text:p>
            <text:p text:style-name="Table_20_Contents_2f_PRE">form.ALL.selectColor.header {</text:p>
            <text:p text:style-name="Table_20_Contents_2f_PRE"><text:s text:c="3"/>label = Bitte auswählen</text:p>
            <text:p text:style-name="P43">}</text:p>
          </table:table-cell>
          <table:table-cell table:style-name="Tableau10.D3" office:value-type="string">
            <text:p text:style-name="P54"/>
          </table:table-cell>
        </table:table-row>
      </table:table>
      <text:h text:style-name="Heading_20_3" text:outline-level="3"><text:bookmark-start text:name="__RefHeading__17623_1782085564"/>Warenkorb Konfiguration<text:bookmark-end text:name="__RefHeading__17623_1782085564"/></text:h>
      <text:p text:style-name="Text_20_body">nur Setup<text:line-break/>Hier kann das Verhalten des Warenkorbs eingestellt werden.</text:p>
      <text:p text:style-name="P26">Beispiel:</text:p>
      <text:h text:style-name="Preformatted_20_Text" text:outline-level="5">plugin.tt_products.basket.minPrice {</text:h>
      <text:p text:style-name="Table_20_Contents_2f_PRE"><text:s text:c="4"/>type = price</text:p>
      <text:p text:style-name="Table_20_Contents_2f_PRE"><text:s text:c="4"/>collect = goodstotal</text:p>
      <text:p text:style-name="Table_20_Contents_2f_PRE"><text:s text:c="4"/>value = 250</text:p>
      <text:p text:style-name="Table_20_Contents_2f_PRE">}</text:p>
      <text:p text:style-name="Table_20_Contents_2f_PRE"/>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Table_20_Heading">Eigenschaft:</text:p>
            </table:table-cell>
            <table:table-cell table:style-name="Tableau11.B1" office:value-type="string">
              <text:p text:style-name="Table_20_Heading">Datentyp</text:p>
            </table:table-cell>
            <table:table-cell table:style-name="Tableau11.A1" office:value-type="string">
              <text:p text:style-name="Table_20_Heading">Beschreibung:</text:p>
            </table:table-cell>
            <table:table-cell table:style-name="Tableau11.D1" office:value-type="string">
              <text:p text:style-name="Table_20_Heading">Voreinstellung</text:p>
            </table:table-cell>
          </table:table-row>
        </table:table-header-rows>
        <table:table-row>
          <table:table-cell table:style-name="Tableau11.A2" office:value-type="string">
            <text:p text:style-name="Table_20_Contents">minPrice</text:p>
          </table:table-cell>
          <table:table-cell table:style-name="Tableau11.B2" office:value-type="string">
            <text:p text:style-name="P55">Feld von Strings</text:p>
          </table:table-cell>
          <table:table-cell table:style-name="Tableau11.C2" office:value-type="string">
            <text:p text:style-name="Table_20_Contents">Mindestbestellwert, den die Produkte erzielen müssen, damit die Bestellung angenommen wird. Es sollen zum Beispiel nur Bestellungen ab einem Gesamtwert von 250 Euro angenommen werden. Wenn bei einem Produkt 'kein Mindestbestellwert' angekreuzt ist, dann wird es nicht mitgezählt.</text:p>
            <text:p text:style-name="P26"/>
            <text:p text:style-name="P26">Beispiel:</text:p>
            <text:p text:style-name="Table_20_Contents_2f_PRE">minPrice {</text:p>
            <text:p text:style-name="Table_20_Contents_2f_PRE"><text:s text:c="4"/>type = price</text:p>
            <text:p text:style-name="Table_20_Contents_2f_PRE"><text:s text:c="4"/>collect = goodstotal</text:p>
            <text:p text:style-name="Table_20_Contents_2f_PRE"><text:s text:c="4"/>value = 250</text:p>
            <text:p text:style-name="Table_20_Contents_2f_PRE">}</text:p>
          </table:table-cell>
          <table:table-cell table:style-name="Tableau11.D2" office:value-type="string">
            <text:p text:style-name="P54"/>
          </table:table-cell>
        </table:table-row>
        <table:table-row>
          <table:table-cell table:style-name="Tableau11.A3" office:value-type="string">
            <text:p text:style-name="Table_20_Contents">maxPrice</text:p>
          </table:table-cell>
          <table:table-cell table:style-name="Tableau11.B2" office:value-type="string">
            <text:p text:style-name="P55">Feld von Strings</text:p>
          </table:table-cell>
          <table:table-cell table:style-name="Tableau11.C3" office:value-type="string">
            <text:p text:style-name="Table_20_Contents">Maximalbestellwert, den die Produkte erzielen dürfen, damit die Bestellung angenommen wird. Es sollen zum Beispiel nur Bestellungen bis zu einem Gesamtwert von 2500 Euro angenommen werden. Wenn bei einem Produkt 'kein Maximalbestellwert' angekreuzt ist, dann wird es nicht mitgezählt.</text:p>
            <text:p text:style-name="P26"/>
            <text:p text:style-name="P26">Beispiel:</text:p>
            <text:p text:style-name="Table_20_Contents_2f_PRE">maxPrice {</text:p>
            <text:p text:style-name="Table_20_Contents_2f_PRE"><text:s text:c="4"/>type = price</text:p>
            <text:p text:style-name="Table_20_Contents_2f_PRE"><text:s text:c="4"/>collect = goodstotal</text:p>
            <text:p text:style-name="Table_20_Contents_2f_PRE"><text:s text:c="4"/>value = 2500</text:p>
            <text:p text:style-name="Table_20_Contents_2f_PRE">}</text:p>
          </table:table-cell>
          <table:table-cell table:style-name="Tableau11.D2" office:value-type="string">
            <text:p text:style-name="P54"/>
          </table:table-cell>
        </table:table-row>
        <text:soft-page-break/>
        <table:table-row>
          <table:table-cell table:style-name="Tableau11.A4" office:value-type="string">
            <text:p text:style-name="Table_20_Contents">view</text:p>
          </table:table-cell>
          <table:table-cell table:style-name="Tableau11.B2" office:value-type="string">
            <text:p text:style-name="P55">array of string</text:p>
          </table:table-cell>
          <table:table-cell table:style-name="Tableau11.C4" office:value-type="string">
            <text:p text:style-name="Table_20_Contents">Konfiguration der Warenkorbanzeige</text:p>
            <text:p text:style-name="Table_20_Contents"/>
            <text:p text:style-name="Table_20_Contents">showAmount <text:s/>… basket ... wenn die Anzahl der Produkte im Warenkorb auf der Einzel- und Listenansicht angezeigt werden soll.</text:p>
            <text:p text:style-name="Table_20_Contents"><text:s text:c="14"/>… 0 … wenn die Anzahl bei den Produken immer 0 ist (für Caching)</text:p>
            <text:p text:style-name="Table_20_Contents"/>
            <text:p text:style-name="Table_20_Contents">input … Eingabefeld 'in den Warenkorb' als <text:span text:style-name="T1">dataArray für den Marker ###BASKET_INPUT###<text:line-break/>Radio Buttons für die Listenansicht der Produkte</text:span></text:p>
            <text:p text:style-name="Table_20_Contents">Eingabe der Namen der Radio Buttons</text:p>
            <text:p text:style-name="Table_20_Contents">where: SQL WHERE Bedinung für die Produkte</text:p>
            <text:p text:style-name="P8">checked: voreingestelltes Produkt</text:p>
            <text:p text:style-name="P8"/>
            <text:p text:style-name="P25">Beispiel:</text:p>
            <text:p text:style-name="Table_20_Contents_2f_PRE">basket.view.input {</text:p>
            <text:p text:style-name="Table_20_Contents_2f_PRE"><text:s text:c="2"/>10.label = einkaufen:</text:p>
            <text:p text:style-name="Table_20_Contents_2f_PRE"><text:s text:c="2"/>10.type = radio</text:p>
            <text:p text:style-name="Table_20_Contents_2f_PRE"><text:s text:c="2"/>10.where = uid IN (12,13,14,15)</text:p>
            <text:p text:style-name="Table_20_Contents_2f_PRE"><text:s text:c="2"/>10.checked = 12</text:p>
            <text:p text:style-name="Table_20_Contents_2f_PRE"><text:s text:c="2"/>10.name = Radiobox1</text:p>
            <text:p text:style-name="Table_20_Contents_2f_PRE"><text:s text:c="2"/>10.params =</text:p>
            <text:p text:style-name="P12">}</text:p>
            <text:p text:style-name="P13"/>
          </table:table-cell>
          <table:table-cell table:style-name="Tableau11.D4" office:value-type="string">
            <text:p text:style-name="P54">showAmount = basket</text:p>
          </table:table-cell>
        </table:table-row>
        <table:table-row>
          <table:table-cell table:style-name="Tableau11.A5" office:value-type="string">
            <text:p text:style-name="Table_20_Contents">activity</text:p>
          </table:table-cell>
          <table:table-cell table:style-name="Tableau11.B2" office:value-type="string">
            <text:p text:style-name="P55">array of string</text:p>
          </table:table-cell>
          <table:table-cell table:style-name="Tableau11.C5" office:value-type="string">
            <text:p text:style-name="Table_20_Contents">Einstellung für Aktivitäten.</text:p>
            <text:p text:style-name="Table_20_Contents">Es gibt diese möglichen Aktivitäten:</text:p>
            <text:p text:style-name="Table_20_Contents">basket, info, payment, verify, finalize, overview</text:p>
            <text:p text:style-name="Table_20_Contents"/>
            <text:p text:style-name="Table_20_Contents">check: (Prüfung)</text:p>
            <text:p text:style-name="Table_20_Contents">address … ob die verlangten Felder ausgefüllt worden sind (siehe requiredInfoFields)</text:p>
            <text:p text:style-name="Table_20_Contents">agb … ob die AGB Checkbox angeklickt worden ist</text:p>
            <text:p text:style-name="Table_20_Contents">basket … ob sich etwas im Warenkorb befindet<text:line-break/><text:span text:style-name="T37">edit_variant .. ob die Eingabe Variante gewissen Einschränkungen entspricht.</text:span></text:p>
            <text:p text:style-name="Table_20_Contents"/>
            <text:p text:style-name="Table_20_Contents">clear:</text:p>
            <text:p text:style-name="Table_20_Contents">memo … <text:span text:style-name="T38">Wenn die</text:span> MEMO <text:span text:style-name="T38">der Produkte gelöscht werden soll</text:span></text:p>
            <text:p text:style-name="Table_20_Contents"/>
            <text:p text:style-name="Table_20_Contents"/>
            <text:p text:style-name="P25">Beispiel:</text:p>
            <text:p text:style-name="Table_20_Contents_2f_PRE">basket.activity.payment {</text:p>
            <text:p text:style-name="Table_20_Contents_2f_PRE"><text:s text:c="2"/>check = address,agb,basket</text:p>
            <text:p text:style-name="P12">}</text:p>
          </table:table-cell>
          <table:table-cell table:style-name="Tableau11.D2" office:value-type="string">
            <text:p text:style-name="P54"/>
          </table:table-cell>
        </table:table-row>
        <table:table-row>
          <table:table-cell table:style-name="Tableau11.A6" office:value-type="string">
            <text:p text:style-name="Table_20_Contents">store</text:p>
          </table:table-cell>
          <table:table-cell table:style-name="Tableau11.B2" office:value-type="string">
            <text:p text:style-name="P2">boolean</text:p>
          </table:table-cell>
          <table:table-cell table:style-name="Tableau11.C6" office:value-type="string">
            <text:p text:style-name="P2">Wenn auf 0 gesetzt, dann wird kein Warenkorb gespeichert. <text:s/>Das ist nur dann notwendig, wenn es mehrere Shop Plugins auf einer Seite gibt und man den Warenkorb mit jeden Klick genau einmal erhöhen möchte.</text:p>
          </table:table-cell>
          <table:table-cell table:style-name="Tableau11.D2" office:value-type="string">
            <text:p text:style-name="P2"/>
          </table:table-cell>
        </table:table-row>
        <table:table-row>
          <table:table-cell table:style-name="Tableau11.A7" office:value-type="string">
            <text:p text:style-name="Table_20_Contents">round</text:p>
          </table:table-cell>
          <table:table-cell table:style-name="Tableau11.B2" office:value-type="string">
            <text:p text:style-name="P2">string</text:p>
          </table:table-cell>
          <table:table-cell table:style-name="Tableau11.C7" office:value-type="string">
            <text:p text:style-name="P2">Rundungsformat für die Preise im Warenkorb.</text:p>
            <text:p text:style-name="P2">round.discount ... Rundungsfomat für den Rabatt aus dem Feld 'discount'.</text:p>
            <text:p text:style-name="P2"/>
            <text:p text:style-name="P25">Example:</text:p>
            <text:p text:style-name="Table_20_Contents_2f_PRE">basket {</text:p>
            <text:p text:style-name="Table_20_Contents_2f_PRE"><text:s text:c="2"/>round = .XX</text:p>
            <text:p text:style-name="Table_20_Contents_2f_PRE"><text:s text:c="2"/>round.discount = .XX</text:p>
            <text:p text:style-name="P10">}</text:p>
          </table:table-cell>
          <table:table-cell table:style-name="Tableau11.D2" office:value-type="string">
            <text:p text:style-name="P2"/>
          </table:table-cell>
        </table:table-row>
      </table:table>
      <text:h text:style-name="Heading_20_3" text:outline-level="3"><text:bookmark-start text:name="__RefHeading__17625_1782085564"/>Steuerungskonfiguration<text:bookmark-end text:name="__RefHeading__17625_1782085564"/></text:h>
      <text:p text:style-name="Text_20_body">nur Setup<text:line-break/>Damit können Sie das Verhalten der verschiedenen Ansichtsarten beeinflussen. Fügen Sie das CODE Feld nach dem Wort 'control' ein.</text:p>
      <text:p text:style-name="P26">Beispiel:</text:p>
      <text:h text:style-name="Preformatted_20_Text" text:outline-level="5">plugin.tt_products.control.LIST.param {</text:h>
      <text:p text:style-name="Table_20_Contents_2f_PRE"><text:s text:c="4"/>ignore = pp</text:p>
      <text:p text:style-name="Table_20_Contents_2f_PRE">}</text:p>
      <text:h text:style-name="Preformatted_20_Text" text:outline-level="5"/>
      <table:table table:name="Tableau17" table:style-name="Tableau17">
        <table:table-column table:style-name="Tableau17.A"/>
        <table:table-column table:style-name="Tableau17.B"/>
        <table:table-column table:style-name="Tableau17.C"/>
        <table:table-column table:style-name="Tableau17.D"/>
        <table:table-header-rows>
          <text:soft-page-break/>
          <table:table-row>
            <table:table-cell table:style-name="Tableau17.A1" office:value-type="string">
              <text:p text:style-name="Table_20_Heading">Property:</text:p>
            </table:table-cell>
            <table:table-cell table:style-name="Tableau17.B1" office:value-type="string">
              <text:p text:style-name="Table_20_Heading">Data type:</text:p>
            </table:table-cell>
            <table:table-cell table:style-name="Tableau17.A1" office:value-type="string">
              <text:p text:style-name="Table_20_Heading">Description:</text:p>
            </table:table-cell>
            <table:table-cell table:style-name="Tableau17.D1" office:value-type="string">
              <text:p text:style-name="Table_20_Heading">Default:</text:p>
            </table:table-cell>
          </table:table-row>
        </table:table-header-rows>
        <table:table-row>
          <table:table-cell table:style-name="Tableau17.A2" office:value-type="string">
            <text:p text:style-name="Table_20_Contents">param</text:p>
          </table:table-cell>
          <table:table-cell table:style-name="Tableau17.B2" office:value-type="string">
            <text:p text:style-name="P55">array of string</text:p>
          </table:table-cell>
          <table:table-cell table:style-name="Tableau17.C2" office:value-type="string">
            <text:p text:style-name="Table_20_Contents">Hier kann die Bedeutung der Steuerparameter beeinflusst werden. Das wird z.B. benötigt, wenn Sie mehrere Produktlisten auf einer Seite haben, und wenn Sie die URL Parameter deaktivieren müssen, damit in einer Liste nicht ungewollt Produkte ausgefiltert werden, oder an der falschen Position gestartet wird.</text:p>
            <text:p text:style-name="Table_20_Contents">use … wenn Parameter aktiviert ist (nur für backPID)</text:p>
            <text:p text:style-name="Table_20_Contents">item … wenn ein Link Parameter immer aus dem Datensatz des Produktes erzeugt werden muss (für cat)</text:p>
            <text:p text:style-name="P26"/>
            <text:p text:style-name="P26">Beispiel:</text:p>
            <text:p text:style-name="Table_20_Contents_2f_PRE">param {</text:p>
            <text:p text:style-name="Table_20_Contents_2f_PRE"><text:s text:c="4"/>ignore = pp</text:p>
            <text:p text:style-name="Table_20_Contents_2f_PRE"><text:s text:c="4"/>use = backPID</text:p>
            <text:p text:style-name="Table_20_Contents_2f_PRE"><text:s text:c="4"/>item = cat</text:p>
            <text:p text:style-name="Table_20_Contents_2f_PRE">}</text:p>
          </table:table-cell>
          <table:table-cell table:style-name="Tableau17.D2" office:value-type="string">
            <text:p text:style-name="P54"/>
          </table:table-cell>
        </table:table-row>
      </table:table>
      <text:h text:style-name="Heading_20_3" text:outline-level="3"><text:bookmark-start text:name="__RefHeading__17627_1782085564"/>Konfiguration für Bezahlung, Versand und Verpackung<text:bookmark-end text:name="__RefHeading__17627_1782085564"/></text:h>
      <text:p text:style-name="Text_20_body">nur Setup<text:line-break/>Die Bezahlung und der Versand sind einander von der Konfiguration her sehr ähnlich. Daher haben sie im wesentlichen dieselbe Liste an Eigenschaften mit Anmerkungen, wenn eine Eigenschaft nur bei einem zutrifft. Der Konfiguration der Bezahlung und des Versands bietet die Möglichkeit, verschiedene Versandarten und Bezahlmethoden für den Benutzer anzugeben. Außerdem können Sie festlegen, ob es über Auswahlknöpfe oder eine Auswahlbox wählbar sein soll.</text:p>
      <text:p text:style-name="Text_20_body">Die Nummer der ausgewählten Bezahl- und Versandmethode wird am Ende der Template Datei in der Dankeschön-Seite wieder ausgewertet, damit nur der entsprechende Text dort angezeigt wird . Sie können mit diesen Einstellungen auch die Ausführung von besonderen PHP Skripten veranlassen. Das ist alles möglich.</text:p>
      <text:p text:style-name="Text_20_body"/>
      <text:p text:style-name="P26">Beispiel:</text:p>
      <text:h text:style-name="Preformatted_20_Text" text:outline-level="5">plugin.tt_products.payment {</text:h>
      <text:h text:style-name="Preformatted_20_Text" text:outline-level="5"><text:s text:c="4"/>radio = 1</text:h>
      <text:h text:style-name="Preformatted_20_Text" text:outline-level="5"><text:s text:c="4"/>TAXpercentage = 19</text:h>
      <text:h text:style-name="Preformatted_20_Text" text:outline-level="5"><text:s text:c="4"/>10.title = Vorkasse</text:h>
      <text:h text:style-name="Preformatted_20_Text" text:outline-level="5"><text:s text:c="4"/>20.title = PayPal</text:h>
      <text:h text:style-name="Preformatted_20_Text" text:outline-level="5"><text:s text:c="4"/>20.percentOfTotalShipping = 0.04</text:h>
      <text:h text:style-name="Preformatted_20_Text" text:outline-level="5"><text:s text:c="4"/>30.title = Nachnahme</text:h>
      <text:h text:style-name="Preformatted_20_Text" text:outline-level="5"><text:s text:c="4"/>30.price.1 = 4</text:h>
      <text:h text:style-name="Preformatted_20_Text" text:outline-level="5"><text:s text:c="4"/>30.price.6 = 5.8</text:h>
      <text:h text:style-name="Preformatted_20_Text" text:outline-level="5"><text:s text:c="4"/>30.showLimit = 99</text:h>
      <text:p text:style-name="Table_20_Contents_2f_PRE">}</text:p>
      <text:p text:style-name="Table_20_Contents_2f_PRE"/>
      <text:p text:style-name="Table_20_Contents_2f_PRE">plugin.tt_products.shipping {</text:p>
      <text:p text:style-name="Table_20_Contents_2f_PRE"><text:s text:c="4"/>radio = 0</text:p>
      <text:p text:style-name="Table_20_Contents_2f_PRE"><text:s text:c="4"/>TAXpercentage = 19</text:p>
      <text:p text:style-name="Table_20_Contents_2f_PRE"><text:s text:c="4"/>10.title = Deutschland</text:p>
      <text:p text:style-name="Table_20_Contents_2f_PRE"><text:s text:c="4"/>10.image.params = align=absmiddle</text:p>
      <text:p text:style-name="Table_20_Contents_2f_PRE"><text:s text:c="4"/>10.price.type = count</text:p>
      <text:p text:style-name="Table_20_Contents_2f_PRE"><text:s text:c="4"/>10.price.1 = 2.5</text:p>
      <text:p text:style-name="Table_20_Contents_2f_PRE"><text:s text:c="4"/>10.price.20 = 4.8</text:p>
      <text:p text:style-name="Table_20_Contents_2f_PRE"><text:s text:c="4"/>10.price.50 = 10</text:p>
      <text:p text:style-name="Table_20_Contents_2f_PRE"><text:s text:c="4"/>10.price.100 = 25</text:p>
      <text:p text:style-name="Table_20_Contents_2f_PRE"><text:s text:c="4"/>10.price.120 = 30</text:p>
      <text:p text:style-name="Table_20_Contents_2f_PRE"><text:s text:c="4"/>10.price.300 = 150</text:p>
      <text:p text:style-name="Table_20_Contents_2f_PRE"><text:s text:c="4"/>10.percentOfGoodstotal = 0</text:p>
      <text:p text:style-name="Table_20_Contents_2f_PRE"/>
      <text:p text:style-name="Table_20_Contents_2f_PRE"><text:s text:c="4"/>20.title = Europa (nicht Deutschland)</text:p>
      <text:p text:style-name="Table_20_Contents_2f_PRE"><text:s text:c="4"/>20.image.params = align=absmiddle</text:p>
      <text:p text:style-name="Table_20_Contents_2f_PRE"><text:s text:c="4"/>20.price.type = count</text:p>
      <text:p text:style-name="Table_20_Contents_2f_PRE"><text:s text:c="4"/>20.price.1 = 8.8</text:p>
      <text:p text:style-name="Table_20_Contents_2f_PRE"><text:s text:c="4"/>20.price.20 = 11.8</text:p>
      <text:p text:style-name="Table_20_Contents_2f_PRE"><text:s text:c="4"/>20.price.50 = 11.8</text:p>
      <text:p text:style-name="Table_20_Contents_2f_PRE"><text:s text:c="4"/>20.price.100 = 25</text:p>
      <text:p text:style-name="Table_20_Contents_2f_PRE"><text:s text:c="4"/>20.price.120 = 30</text:p>
      <text:p text:style-name="Table_20_Contents_2f_PRE"><text:s text:c="4"/>20.price.300 = 150</text:p>
      <text:p text:style-name="Table_20_Contents_2f_PRE"><text:s text:c="4"/>20.percentOfGoodstotal = 0</text:p>
      <text:p text:style-name="Table_20_Contents_2f_PRE"/>
      <text:p text:style-name="Table_20_Contents_2f_PRE"><text:s text:c="4"/>30.title = Selbstabholung</text:p>
      <text:p text:style-name="Table_20_Contents_2f_PRE"><text:s text:c="4"/>30.type = pick_store</text:p>
      <text:p text:style-name="Table_20_Contents_2f_PRE"><text:s text:c="4"/>30.price.1 = 0</text:p>
      <text:p text:style-name="Table_20_Contents_2f_PRE">}</text:p>
      <text:p text:style-name="Table_20_Contents_2f_PRE"/>
      <text:p text:style-name="Table_20_Contents_2f_PRE">plugin.tt_products.handling {</text:p>
      <text:p text:style-name="Table_20_Contents_2f_PRE"><text:soft-page-break/><text:s text:c="4"/>10 {</text:p>
      <text:p text:style-name="Table_20_Contents_2f_PRE"><text:s text:c="6"/>TAXpercentage = 19</text:p>
      <text:p text:style-name="Table_20_Contents_2f_PRE"><text:s text:c="6"/>10.title = Druckkosten</text:p>
      <text:p text:style-name="Table_20_Contents_2f_PRE"><text:s text:c="6"/>10.price = 17</text:p>
      <text:p text:style-name="Table_20_Contents_2f_PRE"><text:s text:c="4"/>}</text:p>
      <text:p text:style-name="Table_20_Contents_2f_PRE"><text:s text:c="4"/>20 {</text:p>
      <text:p text:style-name="Table_20_Contents_2f_PRE"><text:s text:c="6"/>TAXpercentage = 19</text:p>
      <text:p text:style-name="Table_20_Contents_2f_PRE"><text:s text:c="6"/>10.title = Mindestmengenzuschlag</text:p>
      <text:p text:style-name="Table_20_Contents_2f_PRE"><text:s text:c="6"/>10.price = 5</text:p>
      <text:p text:style-name="Table_20_Contents_2f_PRE"><text:s text:c="4"/>}</text:p>
      <text:p text:style-name="Table_20_Contents_2f_PRE"><text:s text:c="4"/>30 {</text:p>
      <text:p text:style-name="Table_20_Contents_2f_PRE"><text:s text:c="6"/>TAXpercentage = 19</text:p>
      <text:p text:style-name="Table_20_Contents_2f_PRE"><text:s text:c="6"/>10.title = Verpackungskosten</text:p>
      <text:p text:style-name="Table_20_Contents_2f_PRE"><text:s text:c="6"/>10.price = 1.95</text:p>
      <text:p text:style-name="Table_20_Contents_2f_PRE"><text:s text:c="4"/>}</text:p>
      <text:p text:style-name="Table_20_Contents_2f_PRE">}</text:p>
      <text:p text:style-name="Table_20_Contents_2f_PRE"/>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Eigenschaft:</text:p>
            </table:table-cell>
            <table:table-cell table:style-name="Tableau2.B1" office:value-type="string">
              <text:p text:style-name="Table_20_Heading">Datentyp:</text:p>
            </table:table-cell>
            <table:table-cell table:style-name="Tableau2.A1" office:value-type="string">
              <text:p text:style-name="Table_20_Heading">Beschreibung:</text:p>
            </table:table-cell>
            <table:table-cell table:style-name="Tableau2.D1" office:value-type="string">
              <text:p text:style-name="Table_20_Heading">Voreinstellung:</text:p>
            </table:table-cell>
          </table:table-row>
        </table:table-header-rows>
        <table:table-row>
          <table:table-cell table:style-name="Tableau2.A2" office:value-type="string">
            <text:p text:style-name="Table_20_Contents">radio</text:p>
          </table:table-cell>
          <table:table-cell table:style-name="Tableau2.B2" office:value-type="string">
            <text:p text:style-name="Table_20_Contents">boolean</text:p>
          </table:table-cell>
          <table:table-cell table:style-name="Tableau2.C2" office:value-type="string">
            <text:p text:style-name="Table_20_Contents">Wenn gesetzt, werden Auswahlknöpfe angezeigt, ansonsten eine Auswahlbox.</text:p>
          </table:table-cell>
          <table:table-cell table:style-name="Tableau2.D2" office:value-type="string">
            <text:p text:style-name="Table_20_Contents">0</text:p>
          </table:table-cell>
        </table:table-row>
        <table:table-row>
          <table:table-cell table:style-name="Tableau2.A3" office:value-type="string">
            <text:p text:style-name="Table_20_Contents">template </text:p>
          </table:table-cell>
          <table:table-cell table:style-name="Tableau2.B2" office:value-type="string">
            <text:p text:style-name="Table_20_Contents">string</text:p>
          </table:table-cell>
          <table:table-cell table:style-name="Tableau2.C3" office:value-type="string">
            <text:p text:style-name="P26">(Nur Layout Auswahlknöpfe)</text:p>
            <text:p text:style-name="Table_20_Contents">Wenn .radio gesetzt ist, dann wird dieser Text als 'template' für die Auswahlknöpfe verwendet.</text:p>
            <text:p text:style-name="Table_20_Contents"/>
            <text:p text:style-name="P26">Standard ist (in einer Zeile):</text:p>
            <text:p text:style-name="P26"/>
            <text:p text:style-name="Table_20_Contents_2f_PRE">&lt;nobr&gt;###IMAGE### &lt;input type="radio" name="recs[tt_products]['.$pskey.']" onClick="submit()" value="###VALUE###"###CHECKED###&gt; ###TITLE###&lt;/nobr&gt;&lt;br&gt;</text:p>
          </table:table-cell>
          <table:table-cell table:style-name="Tableau2.D3" office:value-type="string">
            <text:p text:style-name="Table_20_Contents"/>
          </table:table-cell>
        </table:table-row>
        <table:table-row>
          <table:table-cell table:style-name="Tableau2.A4" office:value-type="string">
            <text:p text:style-name="Table_20_Contents">wrap</text:p>
          </table:table-cell>
          <table:table-cell table:style-name="Tableau2.B2" office:value-type="string">
            <text:p text:style-name="Table_20_Contents">string</text:p>
          </table:table-cell>
          <table:table-cell table:style-name="Tableau2.C4" office:value-type="string">
            <text:p text:style-name="P26">(Nur Auswahlbox Layout)</text:p>
            <text:p text:style-name="Table_20_Contents">Wenn .radio 0 ist, dann wird dieser Text um die &lt;option&gt; Tags in einem &lt;select&gt;-Tag <text:s/>ausgegeben.</text:p>
            <text:p text:style-name="Table_20_Contents"/>
            <text:p text:style-name="P26">Standard ist (in einer Zeile):</text:p>
            <text:p text:style-name="P26"/>
            <text:p text:style-name="Table_20_Contents_2f_PRE">'&lt;select name="recs[tt_products]['.$key.']" onChange="submit()"&gt;|&lt;/select&gt;'</text:p>
          </table:table-cell>
          <table:table-cell table:style-name="Tableau2.D3" office:value-type="string">
            <text:p text:style-name="Table_20_Contents"/>
          </table:table-cell>
        </table:table-row>
        <table:table-row>
          <table:table-cell table:style-name="Tableau2.A5" office:value-type="string">
            <text:p text:style-name="Table_20_Contents">TAXpercentage</text:p>
          </table:table-cell>
          <table:table-cell table:style-name="Tableau2.B2" office:value-type="string">
            <text:p text:style-name="Table_20_Contents">double</text:p>
          </table:table-cell>
          <table:table-cell table:style-name="Tableau2.C5" office:value-type="string">
            <text:p text:style-name="Table_20_Contents">Steuersatz.</text:p>
            <text:p text:style-name="Table_20_Contents">Double Wert (!) (das bedeutet, daß der Punkt '.' für die Dezimaltrennung verwendet werden muß)</text:p>
            <text:p text:style-name="Table_20_Contents">Das ersetzt die frühere Eigenschaft <text:span text:style-name="T2">priceNoTax. Dieser Steuersatz kann sich von dem globalen mit dem gleichen Namen unterscheiden.</text:span></text:p>
            <text:p text:style-name="Table_20_Contents"/>
            <text:p text:style-name="P26">Beispiel:</text:p>
            <text:p text:style-name="Table_20_Contents_2f_PRE"># Dänischer Steuersatz beträgt 25%:</text:p>
            <text:p text:style-name="Table_20_Contents_2f_PRE">payment.TAXpercentage = 25.00</text:p>
          </table:table-cell>
          <table:table-cell table:style-name="Tableau2.D5" office:value-type="string">
            <text:p text:style-name="Table_20_Contents">global übernommen</text:p>
          </table:table-cell>
        </table:table-row>
        <table:table-row>
          <table:table-cell table:style-name="Tableau2.A6" office:value-type="string">
            <text:p text:style-name="P60">TAXincluded</text:p>
          </table:table-cell>
          <table:table-cell table:style-name="Tableau2.B2" office:value-type="string">
            <text:p text:style-name="Table_20_Contents">boolean</text:p>
          </table:table-cell>
          <table:table-cell table:style-name="Tableau2.C6" office:value-type="string">
            <text:p text:style-name="Table_20_Contents">Setzen Sie das, wenn die Steuer in den Preisen für Bezahlung/Versand miteingerechnet ist.</text:p>
          </table:table-cell>
          <table:table-cell table:style-name="Tableau2.D6" office:value-type="string">
            <text:p text:style-name="Table_20_Contents">global übernommen</text:p>
          </table:table-cell>
        </table:table-row>
        <table:table-row>
          <table:table-cell table:style-name="Tableau2.A7" office:value-type="string">
            <text:p text:style-name="P53">Feld von Ganzzahlen</text:p>
          </table:table-cell>
          <table:table-cell table:style-name="Tableau2.B2" office:value-type="string">
            <text:p text:style-name="Table_20_Contents"/>
          </table:table-cell>
          <table:table-cell table:style-name="Tableau2.C7" office:value-type="string">
            <text:p text:style-name="Table_20_Contents">Konfiguration, siehe unten</text:p>
            <text:p text:style-name="Table_20_Contents"/>
            <text:p text:style-name="P26">Beispiels:</text:p>
            <text:p text:style-name="Table_20_Contents_2f_PRE">TAXpercentage = 12</text:p>
            <text:p text:style-name="Table_20_Contents_2f_PRE">10.title = Credit card</text:p>
            <text:p text:style-name="Table_20_Contents_2f_PRE">10.image.file = typo3/sysext/cms/tslib/media/logos/dankort.gif</text:p>
            <text:p text:style-name="Table_20_Contents_2f_PRE">10.price = </text:p>
            <text:p text:style-name="Table_20_Contents_2f_PRE">10.percentOfGoodstotal = 0</text:p>
            <text:p text:style-name="Table_20_Contents_2f_PRE">10.calculationScript = EXT:tt_products/pi1/products_comp_calcScript.inc</text:p>
            <text:p text:style-name="Table_20_Contents_2f_PRE">30.title = By mail</text:p>
            <text:p text:style-name="Table_20_Contents_2f_PRE">30.image.file = typo3/sysext/cms/tslib/media/logos/postdanmark.gif 30.price = 40</text:p>
            <text:p text:style-name="Table_20_Contents_2f_PRE"/>
          </table:table-cell>
          <table:table-cell table:style-name="Tableau2.D3" office:value-type="string">
            <text:p text:style-name="Table_20_Contents"/>
          </table:table-cell>
        </table:table-row>
        <table:table-row>
          <table:table-cell table:style-name="Tableau2.A8" table:number-columns-spanned="4" office:value-type="string">
            <text:p text:style-name="P3">Konfiguration der auswählbaren Einträge zu Bezahlung / Versand / Verpackung</text:p>
          </table:table-cell>
          <table:covered-table-cell/>
          <table:covered-table-cell/>
          <table:covered-table-cell/>
        </table:table-row>
        <table:table-row>
          <table:table-cell table:style-name="Tableau2.A9" office:value-type="string">
            <text:p text:style-name="P2">title</text:p>
          </table:table-cell>
          <table:table-cell table:style-name="Tableau2.B2" office:value-type="string">
            <text:p text:style-name="Table_20_Contents">string</text:p>
          </table:table-cell>
          <table:table-cell table:style-name="Tableau2.C9" office:value-type="string">
            <text:p text:style-name="Table_20_Contents">Name des Eintrags, z.B. “Master Card” oder “Postversand”</text:p>
            <text:p text:style-name="Table_20_Contents">Der Name wird mehrmals hintereinander aufgelistet, wenn Marker <text:s/>###STATIC_COUNTRIES_CN_ISO_3### vorkommen und where.static_countries gesetzt worden ist.</text:p>
          </table:table-cell>
          <table:table-cell table:style-name="Tableau2.D3" office:value-type="string">
            <text:p text:style-name="Table_20_Contents"/>
          </table:table-cell>
        </table:table-row>
        <text:soft-page-break/>
        <table:table-row>
          <table:table-cell table:style-name="Tableau2.A10" office:value-type="string">
            <text:p text:style-name="P2">type</text:p>
            <text:p text:style-name="P2"/>
          </table:table-cell>
          <table:table-cell table:style-name="Tableau2.B2" office:value-type="string">
            <text:p text:style-name="Table_20_Contents">string</text:p>
          </table:table-cell>
          <table:table-cell table:style-name="Tableau2.C10" office:value-type="string">
            <text:p text:style-name="Table_20_Contents">Nur für Shipping!</text:p>
            <text:p text:style-name="Table_20_Contents">Art des Versands</text:p>
            <text:p text:style-name="Table_20_Contents"/>
            <text:p text:style-name="Table_20_Contents">pick_store <text:s/>… die Produkte im Geschäft abholen. Es werden die Zustelldaten des ausgewählten Ladens eingetragen (siehe UIDstore).</text:p>
            <text:p text:style-name="Table_20_Contents">nocopy <text:s/>… Die Rechnungsadresse wird nicht in die Lieferadresse kopiert, auch dann nicht, wenn keine Lieferadresse eingetragen worden ist.</text:p>
          </table:table-cell>
          <table:table-cell table:style-name="Tableau2.D3" office:value-type="string">
            <text:p text:style-name="Table_20_Contents"/>
          </table:table-cell>
        </table:table-row>
        <table:table-row>
          <table:table-cell table:style-name="Tableau2.A11" office:value-type="string">
            <text:p text:style-name="P2">mode</text:p>
          </table:table-cell>
          <table:table-cell table:style-name="Tableau2.B2" office:value-type="string">
            <text:p text:style-name="Table_20_Contents">string</text:p>
          </table:table-cell>
          <table:table-cell table:style-name="Tableau2.C11" office:value-type="string">
            <text:p text:style-name="Table_20_Contents">Nur für Payment!</text:p>
            <text:p text:style-name="Table_20_Contents">Art der Bezahlung</text:p>
            <text:p text:style-name="Table_20_Contents"/>
            <text:p text:style-name="Table_20_Contents">bank_transfer ... Kontoüberweisung</text:p>
            <text:p text:style-name="Table_20_Contents">credit_card <text:s/>... Kreditkarte</text:p>
            <text:p text:style-name="Table_20_Contents">cash ... bar</text:p>
            <text:p text:style-name="Table_20_Contents">PayPal</text:p>
            <text:p text:style-name="Table_20_Contents">Saferpay</text:p>
            <text:p text:style-name="Table_20_Contents">iPayment</text:p>
            <text:p text:style-name="Table_20_Contents">Payone</text:p>
            <text:p text:style-name="Table_20_Contents">ClickandBuy</text:p>
            <text:p text:style-name="Table_20_Contents">vrepay</text:p>
            <text:p text:style-name="Table_20_Contents">Authorize.net</text:p>
          </table:table-cell>
          <table:table-cell table:style-name="Tableau2.D11" office:value-type="string">
            <text:p text:style-name="Table_20_Contents"/>
          </table:table-cell>
        </table:table-row>
        <table:table-row>
          <table:table-cell table:style-name="Tableau2.A12" office:value-type="string">
            <text:p text:style-name="P2">image</text:p>
          </table:table-cell>
          <table:table-cell table:style-name="Tableau2.B2" office:value-type="string">
            <text:p text:style-name="Table_20_Contents">IMAGE cObject</text:p>
          </table:table-cell>
          <table:table-cell table:style-name="Tableau2.C12" office:value-type="string">
            <text:p text:style-name="Table_20_Contents">Logo Bild für den Eintrag</text:p>
          </table:table-cell>
          <table:table-cell table:style-name="Tableau2.D3" office:value-type="string">
            <text:p text:style-name="Table_20_Contents"/>
          </table:table-cell>
        </table:table-row>
        <table:table-row>
          <table:table-cell table:style-name="Tableau2.A13" office:value-type="string">
            <text:p text:style-name="P2">price</text:p>
          </table:table-cell>
          <table:table-cell table:style-name="Tableau2.B2" office:value-type="string">
            <text:p text:style-name="Table_20_Contents">double oder<text:line-break/><text:span text:style-name="T11">Feld von Ganzzahlen</text:span></text:p>
            <text:p text:style-name="P54">siehe unten für weitere Parameter</text:p>
          </table:table-cell>
          <table:table-cell table:style-name="Tableau2.C13" office:value-type="string">
            <text:p text:style-name="Table_20_Contents">Preis eines Eintrags, inkl. oder exkl. Steuer je nach TAXincluded.</text:p>
            <text:p text:style-name="Table_20_Contents">Verwenden Sie Ganzzahlen, um die minimale Anzahl an Produkten festzulegen, für die der Preis gültig ist. 6 Produkte und mehr würden in diesem Beispiel 5.8 Euro kosten.<text:line-break/>Mit dem Typ weight können Sie auch die Versandkosten nach Gewicht der Produkte berechnen.</text:p>
            <text:p text:style-name="P26"/>
            <text:p text:style-name="P26">Beispiel:</text:p>
            <text:p text:style-name="Table_20_Contents_2f_PRE">30.price.type = count<text:line-break/>30.price.1 = 4</text:p>
            <text:p text:style-name="Table_20_Contents_2f_PRE">30.price.6 = 5.8</text:p>
          </table:table-cell>
          <table:table-cell table:style-name="Tableau2.D3" office:value-type="string">
            <text:p text:style-name="Table_20_Contents"/>
          </table:table-cell>
        </table:table-row>
        <table:table-row>
          <table:table-cell table:style-name="Tableau2.A14" office:value-type="string">
            <text:p text:style-name="P60">replaceTAXpercentage</text:p>
          </table:table-cell>
          <table:table-cell table:style-name="Tableau2.B2" office:value-type="string">
            <text:p text:style-name="Table_20_Contents">double</text:p>
          </table:table-cell>
          <table:table-cell table:style-name="Tableau2.C14" office:value-type="string">
            <text:p text:style-name="Table_20_Contents">siehe <text:span text:style-name="T6">TAXpercentage</text:span><text:line-break/>Wenn gesetzt, wird die allgemeine <text:span text:style-name="T6">TAXpercentage damit überschrieben.</text:span></text:p>
          </table:table-cell>
          <table:table-cell table:style-name="Tableau2.D3" office:value-type="string">
            <text:p text:style-name="Table_20_Contents"/>
          </table:table-cell>
        </table:table-row>
        <table:table-row>
          <table:table-cell table:style-name="Tableau2.A15" office:value-type="string">
            <text:p text:style-name="P2">priceFactWeight</text:p>
          </table:table-cell>
          <table:table-cell table:style-name="Tableau2.B2" office:value-type="string">
            <text:p text:style-name="Table_20_Contents">double</text:p>
          </table:table-cell>
          <table:table-cell table:style-name="Tableau2.C15" office:value-type="string">
            <text:p text:style-name="Table_20_Contents"><text:span text:style-name="T3">nur Versand:<text:line-break/></text:span>Der Preis wird aus dem Gewicht aller Produkte berechnet. Das wird zum Gesamtpreis dazugezählt.</text:p>
            <text:p text:style-name="Table_20_Contents">Das Gewicht wird mit diesem Faktor multipliziert, um den Versandpreis zu erhöhen.</text:p>
          </table:table-cell>
          <table:table-cell table:style-name="Tableau2.D3" office:value-type="string">
            <text:p text:style-name="Table_20_Contents"/>
          </table:table-cell>
        </table:table-row>
        <table:table-row>
          <table:table-cell table:style-name="Tableau2.A16" office:value-type="string">
            <text:p text:style-name="P2">priceFactCount</text:p>
          </table:table-cell>
          <table:table-cell table:style-name="Tableau2.B2" office:value-type="string">
            <text:p text:style-name="Table_20_Contents">double</text:p>
          </table:table-cell>
          <table:table-cell table:style-name="Tableau2.C16" office:value-type="string">
            <text:p text:style-name="Table_20_Contents"><text:span text:style-name="T3">nur Versand:<text:line-break/></text:span>Der Preis wird aus der Anzahl aller Produkte berechnet. Das wird zum Gesamtpreis dazugezählt.</text:p>
            <text:p text:style-name="Table_20_Contents">Die Anzahl der Produkte im Warenkorb wird mit diesem Faktor multipliziert, um den Versandpreis zu erhöhen.</text:p>
          </table:table-cell>
          <table:table-cell table:style-name="Tableau2.D3" office:value-type="string">
            <text:p text:style-name="Table_20_Contents"/>
          </table:table-cell>
        </table:table-row>
        <table:table-row>
          <table:table-cell table:style-name="Tableau2.A17" office:value-type="string">
            <text:p text:style-name="P2">percentOfGoodstotal</text:p>
          </table:table-cell>
          <table:table-cell table:style-name="Tableau2.B2" office:value-type="string">
            <text:p text:style-name="P5">double</text:p>
          </table:table-cell>
          <table:table-cell table:style-name="Tableau2.C17" office:value-type="string">
            <text:p text:style-name="Table_20_Contents">Preis eines Produkts, <text:s/>berechnet über einen Prozentsatz des Gesamtbetrags vor der Bezahlung/Versand</text:p>
          </table:table-cell>
          <table:table-cell table:style-name="Tableau2.D3" office:value-type="string">
            <text:p text:style-name="Table_20_Contents"/>
          </table:table-cell>
        </table:table-row>
        <table:table-row>
          <table:table-cell table:style-name="Tableau2.A18" office:value-type="string">
            <text:p text:style-name="P2">percentOfTotalShipping</text:p>
          </table:table-cell>
          <table:table-cell table:style-name="Tableau2.B2" office:value-type="string">
            <text:p text:style-name="P5">double</text:p>
          </table:table-cell>
          <table:table-cell table:style-name="Tableau2.C18" office:value-type="string">
            <text:p text:style-name="P26">nur Versand:</text:p>
            <text:p text:style-name="Table_20_Contents">Wenn gesetzt, werden die Kosten für das Bezahlsystem als Prozente vom gesamten Produktpreis inklusive der Versandkosten und der Steuer errechnet.</text:p>
          </table:table-cell>
          <table:table-cell table:style-name="Tableau2.D3" office:value-type="string">
            <text:p text:style-name="Table_20_Contents"/>
          </table:table-cell>
        </table:table-row>
        <table:table-row>
          <table:table-cell table:style-name="Tableau2.A19" office:value-type="string">
            <text:p text:style-name="P2">creditcards</text:p>
          </table:table-cell>
          <table:table-cell table:style-name="Tableau2.B2" office:value-type="string">
            <text:p text:style-name="P5">string</text:p>
          </table:table-cell>
          <table:table-cell table:style-name="Tableau2.C19" office:value-type="string">
            <text:p text:style-name="P26">nur Bezahlung:</text:p>
            <text:p text:style-name="P40">Durch Beistriche/Komma ',' getrennte Liste der uids der erlaubten Kreditkarten.</text:p>
            <text:p text:style-name="P40">Siehe Datei lgocalland_db.xml (sys_products_cards.cc_type.I)</text:p>
            <text:p text:style-name="P40">0 ... American Express</text:p>
            <text:p text:style-name="P40">1 ... Diners Club</text:p>
            <text:p text:style-name="P40">2 ... Mastercard</text:p>
            <text:p text:style-name="P40">3 ... Visa</text:p>
          </table:table-cell>
          <table:table-cell table:style-name="Tableau2.D3" office:value-type="string">
            <text:p text:style-name="Table_20_Contents"/>
          </table:table-cell>
        </table:table-row>
        <text:soft-page-break/>
        <table:table-row>
          <table:table-cell table:style-name="Tableau2.A20" office:value-type="string">
            <text:p text:style-name="P2">creditcardSelect</text:p>
          </table:table-cell>
          <table:table-cell table:style-name="Tableau2.B2" office:value-type="string">
            <text:p text:style-name="P56">Feld von Form Elementen</text:p>
          </table:table-cell>
          <table:table-cell table:style-name="Tableau2.C20" office:value-type="string">
            <text:p text:style-name="P28">nur Bezahlung:</text:p>
            <text:p text:style-name="P40">Falls gesetzt, dann werden Monat und Jahr der Kreditkarte als Selectboxen dargestellt.</text:p>
            <text:p text:style-name="P40">Unterwerte: mm (Monat) und yy (Jahr)</text:p>
            <text:p text:style-name="P40"/>
            <text:p text:style-name="P26">Beispiel:</text:p>
            <text:p text:style-name="Table_20_Contents_2f_PRE">creditcardSelect {</text:p>
            <text:p text:style-name="Table_20_Contents_2f_PRE"><text:s text:c="2"/>mm {</text:p>
            <text:p text:style-name="Table_20_Contents_2f_PRE"><text:s text:c="4"/>label = Month</text:p>
            <text:p text:style-name="Table_20_Contents_2f_PRE"><text:s text:c="4"/>valueArray {</text:p>
            <text:p text:style-name="Table_20_Contents_2f_PRE"><text:s text:c="6"/>10.label = 1</text:p>
            <text:p text:style-name="Table_20_Contents_2f_PRE"><text:s text:c="6"/>10.value = 1</text:p>
            <text:p text:style-name="Table_20_Contents_2f_PRE"><text:s text:c="6"/>20.label = 2</text:p>
            <text:p text:style-name="Table_20_Contents_2f_PRE"><text:s text:c="6"/>20.value = 2</text:p>
            <text:p text:style-name="Table_20_Contents_2f_PRE"><text:s text:c="6"/>30.label = 3</text:p>
            <text:p text:style-name="Table_20_Contents_2f_PRE"><text:s text:c="6"/>30.value = 3</text:p>
            <text:p text:style-name="Table_20_Contents_2f_PRE"><text:s text:c="6"/>40.label = 4</text:p>
            <text:p text:style-name="Table_20_Contents_2f_PRE"><text:s text:c="6"/>40.value = 4</text:p>
            <text:p text:style-name="Table_20_Contents_2f_PRE"><text:s text:c="6"/>50.label = 5</text:p>
            <text:p text:style-name="Table_20_Contents_2f_PRE"><text:s text:c="6"/>50.value = 5</text:p>
            <text:p text:style-name="Table_20_Contents_2f_PRE"><text:s text:c="6"/>60.label = 6</text:p>
            <text:p text:style-name="Table_20_Contents_2f_PRE"><text:s text:c="6"/>60.value = 6</text:p>
            <text:p text:style-name="Table_20_Contents_2f_PRE"><text:s text:c="6"/>70.label = 7</text:p>
            <text:p text:style-name="Table_20_Contents_2f_PRE"><text:s text:c="6"/>70.value = 7</text:p>
            <text:p text:style-name="Table_20_Contents_2f_PRE"><text:s text:c="6"/>80.label = 8</text:p>
            <text:p text:style-name="Table_20_Contents_2f_PRE"><text:s text:c="6"/>80.value = 8</text:p>
            <text:p text:style-name="Table_20_Contents_2f_PRE"><text:s text:c="6"/>90.label = 9</text:p>
            <text:p text:style-name="Table_20_Contents_2f_PRE"><text:s text:c="6"/>90.value = 9</text:p>
            <text:p text:style-name="Table_20_Contents_2f_PRE"><text:s text:c="6"/>100.label = 10</text:p>
            <text:p text:style-name="Table_20_Contents_2f_PRE"><text:s text:c="6"/>100.value = 10</text:p>
            <text:p text:style-name="Table_20_Contents_2f_PRE"><text:s text:c="6"/>110.label = 11</text:p>
            <text:p text:style-name="Table_20_Contents_2f_PRE"><text:s text:c="6"/>110.value = 11</text:p>
            <text:p text:style-name="Table_20_Contents_2f_PRE"><text:s text:c="6"/>120.label = 12</text:p>
            <text:p text:style-name="Table_20_Contents_2f_PRE"><text:s text:c="6"/>120.value = 12</text:p>
            <text:p text:style-name="Table_20_Contents_2f_PRE"><text:s text:c="4"/>}</text:p>
            <text:p text:style-name="Table_20_Contents_2f_PRE"><text:s text:c="2"/>}</text:p>
            <text:p text:style-name="Table_20_Contents_2f_PRE"/>
            <text:p text:style-name="Table_20_Contents_2f_PRE"><text:s text:c="2"/>yy {</text:p>
            <text:p text:style-name="Table_20_Contents_2f_PRE"><text:s text:c="4"/>label = Year</text:p>
            <text:p text:style-name="Table_20_Contents_2f_PRE"><text:s text:c="4"/>type = recs[creditcard][endtime_yy]=select</text:p>
            <text:p text:style-name="Table_20_Contents_2f_PRE"><text:s text:c="4"/>valueArray {</text:p>
            <text:p text:style-name="Table_20_Contents_2f_PRE"><text:s text:c="6"/>10.label = 2007</text:p>
            <text:p text:style-name="Table_20_Contents_2f_PRE"><text:s text:c="6"/>10.value = 2007</text:p>
            <text:p text:style-name="Table_20_Contents_2f_PRE"><text:s text:c="6"/>20.label = 2008</text:p>
            <text:p text:style-name="Table_20_Contents_2f_PRE"><text:s text:c="6"/>20.value = 2008</text:p>
            <text:p text:style-name="Table_20_Contents_2f_PRE"><text:s text:c="6"/>30.label = 2009</text:p>
            <text:p text:style-name="Table_20_Contents_2f_PRE"><text:s text:c="6"/>30.value = 2009</text:p>
            <text:p text:style-name="Table_20_Contents_2f_PRE"><text:s text:c="6"/>40.label = 2010</text:p>
            <text:p text:style-name="Table_20_Contents_2f_PRE"><text:s text:c="6"/>40.value = 2010</text:p>
            <text:p text:style-name="Table_20_Contents_2f_PRE"><text:s text:c="2"/>}</text:p>
            <text:p text:style-name="P41">}</text:p>
          </table:table-cell>
          <table:table-cell table:style-name="Tableau2.D3" office:value-type="string">
            <text:p text:style-name="Table_20_Contents"/>
          </table:table-cell>
        </table:table-row>
        <table:table-row>
          <table:table-cell table:style-name="Tableau2.A21" office:value-type="string">
            <text:p text:style-name="P2">accounts</text:p>
          </table:table-cell>
          <table:table-cell table:style-name="Tableau2.B2" office:value-type="string">
            <text:p text:style-name="P5">boolean</text:p>
          </table:table-cell>
          <table:table-cell table:style-name="Tableau2.C21" office:value-type="string">
            <text:p text:style-name="P26">nur Bezahlung:</text:p>
            <text:p text:style-name="P40">Wenn gesetzt, dann wird die Bezahlung durch Abbuchung vom eingegebenen Bankkonto ermöglicht.</text:p>
          </table:table-cell>
          <table:table-cell table:style-name="Tableau2.D3" office:value-type="string">
            <text:p text:style-name="Table_20_Contents"/>
          </table:table-cell>
        </table:table-row>
        <table:table-row>
          <table:table-cell table:style-name="Tableau2.A22" office:value-type="string">
            <text:p text:style-name="P2">useAsterisk</text:p>
          </table:table-cell>
          <table:table-cell table:style-name="Tableau2.B2" office:value-type="string">
            <text:p text:style-name="P5">Int+</text:p>
          </table:table-cell>
          <table:table-cell table:style-name="Tableau2.C22" office:value-type="string">
            <text:p text:style-name="P26">nur Bezahlung:</text:p>
            <text:p text:style-name="P40">Wenn gesetzt, werden die Konto und Kreditkartendaten nach der Eingabe ausgesternt angezeigt.</text:p>
          </table:table-cell>
          <table:table-cell table:style-name="Tableau2.D22" office:value-type="string">
            <text:p text:style-name="Table_20_Contents">1</text:p>
          </table:table-cell>
        </table:table-row>
        <table:table-row>
          <table:table-cell table:style-name="Tableau2.A23" office:value-type="string">
            <text:p text:style-name="Table_20_Contents">bulkilyAddition</text:p>
          </table:table-cell>
          <table:table-cell table:style-name="Tableau2.B23" office:value-type="string">
            <text:p text:style-name="Table_20_Contents">int+</text:p>
          </table:table-cell>
          <table:table-cell table:style-name="Tableau2.C23" office:value-type="string">
            <text:p text:style-name="P26">nur Versand:</text:p>
            <text:p text:style-name="Table_20_Contents">Betrag um den die Versandkosten für ein sperriges Produkt erhöht werden.</text:p>
          </table:table-cell>
          <table:table-cell table:style-name="Tableau2.D23" office:value-type="string">
            <text:p text:style-name="Table_20_Contents"/>
          </table:table-cell>
        </table:table-row>
        <table:table-row>
          <table:table-cell table:style-name="Tableau2.A23" office:value-type="string">
            <text:p text:style-name="Table_20_Contents">bulkilyFeeTax</text:p>
          </table:table-cell>
          <table:table-cell table:style-name="Tableau2.B23" office:value-type="string">
            <text:p text:style-name="Table_20_Contents">int+</text:p>
          </table:table-cell>
          <table:table-cell table:style-name="Tableau2.C23" office:value-type="string">
            <text:p text:style-name="P26">nur Versand:</text:p>
            <text:p text:style-name="Table_20_Contents">Steuerbetrag in Prozent für das Versenden eines Sperrguts</text:p>
          </table:table-cell>
          <table:table-cell table:style-name="Tableau2.D23" office:value-type="string">
            <text:p text:style-name="Table_20_Contents"/>
          </table:table-cell>
        </table:table-row>
        <table:table-row>
          <table:table-cell table:style-name="Tableau2.A25" office:value-type="string">
            <text:p text:style-name="P2">calculationScript</text:p>
          </table:table-cell>
          <table:table-cell table:style-name="Tableau2.B2" office:value-type="string">
            <text:p text:style-name="Table_20_Contents">resouce</text:p>
          </table:table-cell>
          <table:table-cell table:style-name="Tableau2.C25" office:value-type="string">
            <text:p text:style-name="Table_20_Contents">PHP Skript, das inkludiert wird. Es soll die internen Arrays zur Berechnung heranziehen.</text:p>
            <text:p text:style-name="Table_20_Contents">Dieses Skript kann dazu verwendet werden, um <text:s/>eine besondere Gebühr für Bezahlung/Versand zu berechnen.</text:p>
            <text:p text:style-name="Table_20_Contents">Für eine Beispielsanwendung siehe <text:s/>pi/products_comp_calcScript.inc, das zeigt wie der Endbetrag um 5.75% seines eigenen Wertes erhöht wird, um die Gebühren der internationalen Kreditkarten Organisation abzudecken.</text:p>
            <text:p text:style-name="Table_20_Contents">Das Berechnungsskript erhält die TypoScript Eigenschaften im $conf Array.</text:p>
          </table:table-cell>
          <table:table-cell table:style-name="Tableau2.D3" office:value-type="string">
            <text:p text:style-name="Table_20_Contents"/>
          </table:table-cell>
        </table:table-row>
        <text:soft-page-break/>
        <table:table-row>
          <table:table-cell table:style-name="Tableau2.A26" office:value-type="string">
            <text:p text:style-name="P2">handleScript</text:p>
          </table:table-cell>
          <table:table-cell table:style-name="Tableau2.B2" office:value-type="string">
            <text:p text:style-name="Table_20_Contents">resource</text:p>
          </table:table-cell>
          <table:table-cell table:style-name="Tableau2.C26" office:value-type="string">
            <text:p text:style-name="Table_20_Contents">PHP Skript, das nach dem Abschluß einer Bestellung aufgerufen wird.</text:p>
            <text:p text:style-name="Table_20_Contents">Dieses Skript muß sich selber um die Bildschirmausgabe und um den Abschluß der Bestellung kümmern.</text:p>
            <text:p text:style-name="Table_20_Contents">Siehe pi/payment_DIBS.php als Beispiel. </text:p>
            <text:p text:style-name="Table_20_Contents">Die Eigenschaften des Handle Skripts werden an die Funktion als $conf Array übergeben. Der Inhalt der Variable $content muß den HTML-Inhalt als Ergebnis zurückliefern.</text:p>
          </table:table-cell>
          <table:table-cell table:style-name="Tableau2.D3" office:value-type="string">
            <text:p text:style-name="Table_20_Contents"/>
          </table:table-cell>
        </table:table-row>
        <table:table-row>
          <table:table-cell table:style-name="Tableau2.A27" office:value-type="string">
            <text:p text:style-name="P2">handleLib</text:p>
          </table:table-cell>
          <table:table-cell table:style-name="Tableau2.B2" office:value-type="string">
            <text:p text:style-name="Table_20_Contents">string / array</text:p>
          </table:table-cell>
          <table:table-cell table:style-name="Tableau2.C27" office:value-type="string">
            <text:p text:style-name="P26">nur Bezahlung:</text:p>
            <text:p text:style-name="Table_20_Contents">Name der TYPO3 Library für das Bezahlungssystem. Im Moment kann hier nur 'paymentlib' gesetzt werden, um die Payment Library Extension von Rober Lemke zu verwenden.</text:p>
            <text:p text:style-name="P26"/>
            <text:p text:style-name="P26">Beispiel:</text:p>
            <text:p text:style-name="Table_20_Contents_2f_PRE">30.handleLib = paymentlib</text:p>
            <text:p text:style-name="Table_20_Contents_2f_PRE"/>
            <text:p text:style-name="P49">Array Werte: </text:p>
            <text:p text:style-name="Table_20_Contents"><text:span text:style-name="Teletype"><text:span text:style-name="T21">extName ... Name der spezifischen Payment Library (SPL) Extension</text:span></text:span></text:p>
            <text:p text:style-name="Table_20_Contents"><text:span text:style-name="Teletype"><text:span text:style-name="T21">paymentMethod ... Methode der SPL (z.B. <text:s/>paymentlib_transcentral_cc_mastercard)</text:span></text:span></text:p>
            <text:p text:style-name="Table_20_Contents"><text:span text:style-name="Teletype"><text:span text:style-name="T21">Currency ... zu verwendende Währung</text:span></text:span></text:p>
            <text:p text:style-name="Table_20_Contents"><text:span text:style-name="Teletype"><text:span text:style-name="T21">templateFile ... Template Datei zur Anzeige des Bezahlvorgangs</text:span></text:span></text:p>
            <text:p text:style-name="Table_20_Contents"><text:span text:style-name="Teletype"><text:span text:style-name="T21">gatewaymode ... Modus des Gateways (form / request)</text:span></text:span></text:p>
            <text:p text:style-name="Table_20_Contents"><text:span text:style-name="Teletype"><text:span text:style-name="T21"/></text:span></text:p>
            <text:p text:style-name="P26"><text:span text:style-name="Teletype"><text:span text:style-name="T21">Beispiel:</text:span></text:span></text:p>
            <text:p text:style-name="Table_20_Contents_2f_PRE"><text:span text:style-name="Teletype"><text:span text:style-name="T14">40.title = Mastercard<text:line-break/>40.handleLib = paymentlib<text:line-break/>40.image.file = EXT:tt_products/res/icons/fe/mastercard.gif<text:line-break/>40.handleLib {<text:line-break/>extName = transcentral<text:line-break/>paymentMethod = paymentlib_transcentral_cc_mastercard<text:line-break/>Currency = $<text:line-break/>templateFile = EXT:tt_products/template/paymentlib.tmpl</text:span></text:span></text:p>
            <text:p text:style-name="Table_20_Contents_2f_PRE"><text:span text:style-name="Teletype"><text:span text:style-name="T14">gatewaymode = form</text:span></text:span></text:p>
            <text:p text:style-name="Table_20_Contents_2f_PRE"><text:span text:style-name="Teletype"><text:span text:style-name="T14">} </text:span></text:span></text:p>
          </table:table-cell>
          <table:table-cell table:style-name="Tableau2.D3" office:value-type="string">
            <text:p text:style-name="Table_20_Contents"/>
          </table:table-cell>
        </table:table-row>
        <table:table-row>
          <table:table-cell table:style-name="Tableau2.A28" office:value-type="string">
            <text:p text:style-name="P2">handleURL</text:p>
          </table:table-cell>
          <table:table-cell table:style-name="Tableau2.B2" office:value-type="string">
            <text:p text:style-name="Table_20_Contents">string</text:p>
          </table:table-cell>
          <table:table-cell table:style-name="Tableau2.C28" office:value-type="string">
            <text:p text:style-name="Table_20_Contents">Wenn gesetzt, wird dieses handleURL anstelle der Dankeschön-Seite (über PIDthanks) ausgegeben, damit z.B. ein handleScript die Information bzgl. Bezahlsystem usw. Verarbeiten kann.</text:p>
          </table:table-cell>
          <table:table-cell table:style-name="Tableau2.D3" office:value-type="string">
            <text:p text:style-name="Table_20_Contents"/>
          </table:table-cell>
        </table:table-row>
        <table:table-row>
          <table:table-cell table:style-name="Tableau2.A29" office:value-type="string">
            <text:p text:style-name="P2">handleTarget</text:p>
          </table:table-cell>
          <table:table-cell table:style-name="Tableau2.B2" office:value-type="string">
            <text:p text:style-name="Table_20_Contents">string</text:p>
          </table:table-cell>
          <table:table-cell table:style-name="Tableau2.C29" office:value-type="string">
            <text:p text:style-name="Table_20_Contents">Alternatives Target der HTML-Form.</text:p>
          </table:table-cell>
          <table:table-cell table:style-name="Tableau2.D3" office:value-type="string">
            <text:p text:style-name="Table_20_Contents"/>
          </table:table-cell>
        </table:table-row>
        <table:table-row>
          <table:table-cell table:style-name="Tableau2.A30" office:value-type="string">
            <text:p text:style-name="P2">excludePayment</text:p>
          </table:table-cell>
          <table:table-cell table:style-name="Tableau2.B2" office:value-type="string">
            <text:p text:style-name="P53">list of integers</text:p>
          </table:table-cell>
          <table:table-cell table:style-name="Tableau2.C30" office:value-type="string">
            <text:p text:style-name="P26">nur Versand:</text:p>
            <text:p text:style-name="Table_20_Contents">Dies ist eine Liste an Schlüsseln der Bezahlmethoden (ihre Nummern), <text:s text:c="3"/>die für eine bestimmte Versandart nicht angezeigt werden. <text:s/>Wenn zum Beispiel Leute Waren im Geschäft kaufen, dann möchten Sie nicht, daß diese Geld überweisen oder Online bezahlen, sondern daß sie die Waren sofort bar bezahlen. <text:s/>Daher können Sie diese Bezahlmethoden ausschließen.</text:p>
            <text:p text:style-name="Table_20_Contents"/>
            <text:p text:style-name="P26">Beispiel:</text:p>
            <text:p text:style-name="Table_20_Contents_2f_PRE">...</text:p>
            <text:p text:style-name="Table_20_Contents_2f_PRE"><text:s text:c="2"/>40.title = Abholen der Waren im Geschäft</text:p>
            <text:p text:style-name="Table_20_Contents_2f_PRE"><text:s text:c="2"/>40.excludePayment = 10,40</text:p>
            <text:p text:style-name="Table_20_Contents_2f_PRE">}</text:p>
          </table:table-cell>
          <table:table-cell table:style-name="Tableau2.D3" office:value-type="string">
            <text:p text:style-name="Table_20_Contents"/>
          </table:table-cell>
        </table:table-row>
        <table:table-row>
          <table:table-cell table:style-name="Tableau2.A31" office:value-type="string">
            <text:p text:style-name="P2">excludeHandling</text:p>
          </table:table-cell>
          <table:table-cell table:style-name="Tableau2.B2" office:value-type="string">
            <text:p text:style-name="P53">list of integers</text:p>
          </table:table-cell>
          <table:table-cell table:style-name="Tableau2.C31" office:value-type="string">
            <text:p text:style-name="P26">nur Versand:</text:p>
            <text:p text:style-name="Table_20_Contents">Dies ist eine Liste an Schlüsseln der Bearbeitungsmethoden (ihre Nummern), die für eine bestimmte Versandart nicht angezeigt werden. <text:s/>Wenn zum Beispiel Leute Waren im Geschäft kaufen, dann möchten Sie nicht, dann benötigen Sie keine transportfähige Verpackung. <text:s/>Daher können Sie diese Bearbeitungsmethode ausschließen.</text:p>
            <text:p text:style-name="Table_20_Contents"/>
            <text:p text:style-name="P26">Beispiel:</text:p>
            <text:p text:style-name="Table_20_Contents_2f_PRE">...</text:p>
            <text:p text:style-name="Table_20_Contents_2f_PRE"><text:s text:c="2"/>40.title = Abholen der Waren im Geschäft</text:p>
            <text:p text:style-name="Table_20_Contents_2f_PRE"><text:s text:c="2"/>40.excludeHandling = 10,40</text:p>
            <text:p text:style-name="Table_20_Contents_2f_PRE">}</text:p>
          </table:table-cell>
          <table:table-cell table:style-name="Tableau2.D3" office:value-type="string">
            <text:p text:style-name="Table_20_Contents"/>
          </table:table-cell>
        </table:table-row>
        <text:soft-page-break/>
        <table:table-row>
          <table:table-cell table:style-name="Tableau2.A32" office:value-type="string">
            <text:p text:style-name="P2">replacePayment</text:p>
          </table:table-cell>
          <table:table-cell table:style-name="Tableau2.B2" office:value-type="string">
            <text:p text:style-name="P53">list of integers</text:p>
          </table:table-cell>
          <table:table-cell table:style-name="Tableau2.C32" office:value-type="string">
            <text:p text:style-name="P26">nur Versand:</text:p>
            <text:p text:style-name="Table_20_Contents">Diese Einstellungen der Bezahlung werden überschrieben, wenn diese Bezahlmethode ausgewählt worden ist.</text:p>
            <text:p text:style-name="Table_20_Contents"/>
            <text:p text:style-name="P26">Example:</text:p>
            <text:p text:style-name="Table_20_Contents_2f_PRE">...</text:p>
            <text:p text:style-name="Table_20_Contents_2f_PRE"><text:s text:c="2"/>40.title = China</text:p>
            <text:p text:style-name="Table_20_Contents_2f_PRE"><text:s text:c="2"/>40.replacePayment.10.title = Bezahlung nach China</text:p>
            <text:p text:style-name="Table_20_Contents_2f_PRE"><text:s text:c="2"/>40.replacePayment.10.price = 100</text:p>
            <text:p text:style-name="Table_20_Contents_2f_PRE">}</text:p>
          </table:table-cell>
          <table:table-cell table:style-name="Tableau2.D3" office:value-type="string">
            <text:p text:style-name="Table_20_Contents"/>
          </table:table-cell>
        </table:table-row>
        <table:table-row>
          <table:table-cell table:style-name="Tableau2.A33" office:value-type="string">
            <text:p text:style-name="P2">show</text:p>
          </table:table-cell>
          <table:table-cell table:style-name="Tableau2.B2" office:value-type="string">
            <text:p text:style-name="P2">boolean</text:p>
          </table:table-cell>
          <table:table-cell table:style-name="Tableau2.C33" office:value-type="string">
            <text:p text:style-name="P42">Wenn das gesetzt ist, wird der Eintrag in der Liste angezeigt.</text:p>
          </table:table-cell>
          <table:table-cell table:style-name="Tableau2.D33" office:value-type="string">
            <text:p text:style-name="Table_20_Contents">1</text:p>
          </table:table-cell>
        </table:table-row>
        <table:table-row>
          <table:table-cell table:style-name="Tableau2.A34" office:value-type="string">
            <text:p text:style-name="P2">showLimit</text:p>
          </table:table-cell>
          <table:table-cell table:style-name="Tableau2.B2" office:value-type="string">
            <text:p text:style-name="P2">double</text:p>
          </table:table-cell>
          <table:table-cell table:style-name="Tableau2.C34" office:value-type="string">
            <text:p text:style-name="P42">Wenn gesetzt, dann wird der Eintrag nur dann angezeigt, wenn zumindest diese Anzahl an Produkten im Warenkorb liegt. <text:line-break/>0 ... zeige diesen Eintrag immer an</text:p>
          </table:table-cell>
          <table:table-cell table:style-name="Tableau2.D34" office:value-type="string">
            <text:p text:style-name="Table_20_Contents">0</text:p>
          </table:table-cell>
        </table:table-row>
        <table:table-row>
          <table:table-cell table:style-name="Tableau2.A35" office:value-type="string">
            <text:p text:style-name="P2">type</text:p>
          </table:table-cell>
          <table:table-cell table:style-name="Tableau2.B2" office:value-type="string">
            <text:p text:style-name="Table_20_Contents">string</text:p>
          </table:table-cell>
          <table:table-cell table:style-name="Tableau2.C35" office:value-type="string">
            <text:p text:style-name="P25">nur Bezahlung:</text:p>
            <text:p text:style-name="Table_20_Contents">fe_users ... die Bezahlart kann über die fe_users Tabelle konfiguriert werden</text:p>
          </table:table-cell>
          <table:table-cell table:style-name="Tableau2.D3" office:value-type="string">
            <text:p text:style-name="Table_20_Contents"/>
          </table:table-cell>
        </table:table-row>
        <table:table-row>
          <table:table-cell table:style-name="Tableau2.A23" office:value-type="string">
            <text:p text:style-name="Table_20_Contents">visibleForGroupID</text:p>
          </table:table-cell>
          <table:table-cell table:style-name="Tableau2.B23" office:value-type="string">
            <text:p text:style-name="Table_20_Contents">int+</text:p>
          </table:table-cell>
          <table:table-cell table:style-name="Tableau2.C23" office:value-type="string">
            <text:p text:style-name="P25">nur Bezahlung:</text:p>
            <text:p text:style-name="P40">Diese Bezahlmethode ist nur verfügbar, wenn ein Benutzer eingeloggt ist und wenn er ein Mitglied dieser Benutzergruppe ist.</text:p>
          </table:table-cell>
          <table:table-cell table:style-name="Tableau2.D23" office:value-type="string">
            <text:p text:style-name="Table_20_Contents"/>
          </table:table-cell>
        </table:table-row>
        <table:table-row>
          <table:table-cell table:style-name="Tableau2.A23" office:value-type="string">
            <text:p text:style-name="Table_20_Contents">addRequiredInfoFields</text:p>
          </table:table-cell>
          <table:table-cell table:style-name="Tableau2.B23" office:value-type="string">
            <text:p text:style-name="Table_20_Contents">string</text:p>
          </table:table-cell>
          <table:table-cell table:style-name="Tableau2.C23" office:value-type="string">
            <text:p text:style-name="P25">nur Bezahlung:</text:p>
            <text:p text:style-name="Table_20_Contents">Zusätzlich benötigte Felder auf der INFO Seite, wenn diese Bezahlmethode ausgewählt worden ist. Brauchbar für Bezahlungen mit der Kreditkarte.</text:p>
          </table:table-cell>
          <table:table-cell table:style-name="Tableau2.D23" office:value-type="string">
            <text:p text:style-name="Table_20_Contents"/>
          </table:table-cell>
        </table:table-row>
        <table:table-row>
          <table:table-cell table:style-name="Tableau2.A38" office:value-type="string">
            <text:p text:style-name="P2">where.static_countries</text:p>
          </table:table-cell>
          <table:table-cell table:style-name="Tableau2.B2" office:value-type="string">
            <text:p text:style-name="P2">string</text:p>
          </table:table-cell>
          <table:table-cell table:style-name="Tableau2.C38" office:value-type="string">
            <text:p text:style-name="Table_20_Contents"><text:span text:style-name="T3">nur Versand:</text:span><text:line-break/>Zum Setzen einer <text:s/>SQL WHERE Bedingung für die mit der Select-Box ausgewählten Länder. Diese stammen aus der static_countries Tabelle der static_info_tables Extension.</text:p>
            <text:p text:style-name="P26"/>
            <text:p text:style-name="P26">Beispiel:</text:p>
            <text:p text:style-name="Table_20_Contents_2f_PRE">plugin.tt_products.shipping { <text:line-break/> 10.title = Paket Deutschland <text:line-break/> 10.where.static_countries = cn_short_local = 'Deutschland'</text:p>
            <text:p text:style-name="Table_20_Contents_2f_PRE"><text:s/>10.price = 5.9<text:line-break/> 20.title = Paket EU ###STATICCOUNTRIES_CN_SHORT_DE###<text:line-break/> 20.where.static_countries = cn_eu_member = 1 AND cn_short_local != 'Deutschland'</text:p>
            <text:p text:style-name="Table_20_Contents_2f_PRE"><text:s/>20.price = 8.9<text:line-break/> 30.title = außerhalb EU <text:s/>###STATICCOUNTRIES_CN_SHORT_DE###<text:line-break/> 30.where.static_countries = cn_eu_member &lt;&gt; 1</text:p>
            <text:p text:style-name="Table_20_Contents_2f_PRE"><text:s/>30.price = 15<text:line-break/>}</text:p>
          </table:table-cell>
          <table:table-cell table:style-name="Tableau2.D3" office:value-type="string">
            <text:p text:style-name="Table_20_Contents"/>
          </table:table-cell>
        </table:table-row>
        <table:table-row>
          <table:table-cell table:style-name="Tableau2.A39" table:number-columns-spanned="4" office:value-type="string">
            <text:p text:style-name="Table_20_Heading">Configuration price Parameters for payment / shipping</text:p>
          </table:table-cell>
          <table:covered-table-cell/>
          <table:covered-table-cell/>
          <table:covered-table-cell/>
        </table:table-row>
        <table:table-row>
          <table:table-cell table:style-name="Tableau2.A40" office:value-type="string">
            <text:p text:style-name="P2">type</text:p>
          </table:table-cell>
          <table:table-cell table:style-name="Tableau2.B2" office:value-type="string">
            <text:p text:style-name="Table_20_Contents">string</text:p>
          </table:table-cell>
          <table:table-cell table:style-name="Tableau2.C40" office:value-type="string">
            <text:p text:style-name="Table_20_Contents">Bedeutung der Nummer:<text:line-break/>count ... die Anzahl der Produkte</text:p>
            <text:p text:style-name="Table_20_Contents">weight ... das berechnete Gewicht in Gramm<text:line-break/>price ... der Gesamtpreis der Produkte</text:p>
          </table:table-cell>
          <table:table-cell table:style-name="Tableau2.D3" office:value-type="string">
            <text:p text:style-name="Table_20_Contents"/>
          </table:table-cell>
        </table:table-row>
        <table:table-row>
          <table:table-cell table:style-name="Tableau2.A41" office:value-type="string">
            <text:p text:style-name="P2">WherePIDMinPrice</text:p>
          </table:table-cell>
          <table:table-cell table:style-name="Tableau2.B2" office:value-type="string">
            <text:p text:style-name="P53">list of integers</text:p>
          </table:table-cell>
          <table:table-cell table:style-name="Tableau2.C41" office:value-type="string">
            <text:p text:style-name="Table_20_Contents"><text:span text:style-name="T3">nur Versand:</text:span><text:line-break/>Setzen eines Minimalpreises für den Versand, wenn es ein Produkt im Warenkorb gibt, das aus dem Sysfolder mit der angegebenen PID stammt.</text:p>
            <text:p text:style-name="Table_20_Contents">Wobei 155 die PID ist und 7.5 ist der Minimalpreis, der als Versandkosten berechnet wird, wenn zumindest ein Artikel im Warenkorb mit der PID liegt.</text:p>
            <text:p text:style-name="P26"/>
            <text:p text:style-name="P26">Beispiel:</text:p>
            <text:p text:style-name="Table_20_Contents_2f_PRE">plugin.tt_products.shipping { <text:line-break/> 10.title = Paket <text:line-break/> 10.price.type = weight <text:line-break/> 10.price.WherePIDMinPrice.155 = 7.5 <text:line-break/> 10.price.1 = 1.5 <text:line-break/> 10.price.500 = 2.5 <text:line-break/> 10.price.1000 =3.5 <text:line-break/>}</text:p>
          </table:table-cell>
          <table:table-cell table:style-name="Tableau2.D3" office:value-type="string">
            <text:p text:style-name="Table_20_Contents"/>
          </table:table-cell>
        </table:table-row>
        <text:soft-page-break/>
        <table:table-row>
          <table:table-cell table:style-name="Tableau2.A42" office:value-type="string">
            <text:p text:style-name="P2">calc</text:p>
          </table:table-cell>
          <table:table-cell table:style-name="Tableau2.B2" office:value-type="string">
            <text:p text:style-name="P2">array</text:p>
          </table:table-cell>
          <table:table-cell table:style-name="Tableau2.C42" office:value-type="string">
            <text:p text:style-name="Table_20_Contents"><text:span text:style-name="T3">nur Versand:</text:span><text:line-break/>zu verwendende Preisberechnungen über Shippingcalc. (siehe Kapitel Versandpreis Berechnung)</text:p>
            <text:p text:style-name="Table_20_Contents_2f_PRE">plugin.tt_products.shipping { <text:line-break/> 10.title = Paket <text:line-break/> 10.price.calc {</text:p>
            <text:p text:style-name="Table_20_Contents_2f_PRE"><text:s text:c="3"/>use = 10</text:p>
            <text:p text:style-name="Table_20_Contents_2f_PRE"><text:s/>}<text:line-break/>}</text:p>
          </table:table-cell>
          <table:table-cell table:style-name="Tableau2.D3" office:value-type="string">
            <text:p text:style-name="Table_20_Contents"/>
          </table:table-cell>
        </table:table-row>
        <table:table-row>
          <table:table-cell table:style-name="Tableau2.A43" office:value-type="string">
            <text:p text:style-name="P59">productsNoTax</text:p>
          </table:table-cell>
          <table:table-cell table:style-name="Tableau2.B2" office:value-type="string">
            <text:p text:style-name="P59">int+</text:p>
          </table:table-cell>
          <table:table-cell table:style-name="Tableau2.C43" office:value-type="string">
            <text:p text:style-name="P58"><text:span text:style-name="T3">nur Versand:</text:span><text:line-break/>Wenn gesetzt wird für kein Produkt eine MWSt verrechnet.</text:p>
          </table:table-cell>
          <table:table-cell table:style-name="Tableau2.D3" office:value-type="string">
            <text:p text:style-name="P58"/>
          </table:table-cell>
        </table:table-row>
        <table:table-row>
          <table:table-cell table:style-name="Tableau2.A44" office:value-type="string">
            <text:p text:style-name="P61">mode</text:p>
          </table:table-cell>
          <table:table-cell table:style-name="Tableau2.B2" office:value-type="string">
            <text:p text:style-name="P61">string</text:p>
          </table:table-cell>
          <table:table-cell table:style-name="Tableau2.C44" office:value-type="string">
            <text:p text:style-name="P60">Modus wie verschiedene Berechnungen summiert werden sollen.</text:p>
            <text:p text:style-name="P60"/>
            <text:p text:style-name="P60">mögliche Werte:</text:p>
            <text:p text:style-name="P60">additive <text:s/>... Die einzelnen Versandkosten werden aufaddiert.</text:p>
          </table:table-cell>
          <table:table-cell table:style-name="Tableau2.D44" office:value-type="string">
            <text:p text:style-name="P60">additive</text:p>
          </table:table-cell>
        </table:table-row>
        <table:table-row>
          <table:table-cell table:style-name="Tableau2.A45" office:value-type="string">
            <text:p text:style-name="P2">noCostsAmount</text:p>
          </table:table-cell>
          <table:table-cell table:style-name="Tableau2.B2" office:value-type="string">
            <text:p text:style-name="Table_20_Contents">double</text:p>
          </table:table-cell>
          <table:table-cell table:style-name="Tableau2.C45" office:value-type="string">
            <text:p text:style-name="Table_20_Contents">Wenn der Gesamtpreis für ein Produkt diese Summe erreicht hat, dann werden keine Kosten berechnet.</text:p>
            <text:p text:style-name="Table_20_Contents"/>
            <text:p text:style-name="P26">Beispiel:</text:p>
            <text:p text:style-name="Table_20_Contents_2f_PRE">plugin.tt_products.shipping { <text:line-break/> 10.title = Paket<text:line-break/> 10.price.type = count <text:line-break/> 10.price.noCostsAmount = 200 <text:line-break/> 10.price.1 = 1.5 <text:line-break/>}</text:p>
          </table:table-cell>
          <table:table-cell table:style-name="Tableau2.D3" office:value-type="string">
            <text:p text:style-name="Table_20_Contents"/>
          </table:table-cell>
        </table:table-row>
        <table:table-row>
          <table:table-cell table:style-name="Tableau2.A46" office:value-type="string">
            <text:p text:style-name="P2">order</text:p>
          </table:table-cell>
          <table:table-cell table:style-name="Tableau2.B2" office:value-type="string">
            <text:p text:style-name="Table_20_Contents">string</text:p>
          </table:table-cell>
          <table:table-cell table:style-name="Tableau2.C46" office:value-type="string">
            <text:p text:style-name="Table_20_Contents">Durch Komma getrennte Auflistung der Einstellungen zur Preisberechnung. Nach dieser Reihenfolge wird der Preis ermittelt.</text:p>
          </table:table-cell>
          <table:table-cell table:style-name="Tableau2.D46" office:value-type="string">
            <text:p text:style-name="Table_20_Contents"/>
          </table:table-cell>
        </table:table-row>
      </table:table>
      <text:p text:style-name="Text_20_body"/>
      <text:h text:style-name="Heading_20_3" text:outline-level="3"><text:bookmark-start text:name="__RefHeading__17629_1782085564"/>Versandpreis Berechnung shippingcalc/handlingcalc<text:bookmark-end text:name="__RefHeading__17629_1782085564"/></text:h>
      <text:p text:style-name="Text_20_body">nur Setup<text:line-break/>Die Berechnung des Versandpreises kann noch komplexer durchgeführt werden. Es kann z.B. eine Reihenfolge angegeben werden, nach der die Berechnung durchgeführt wird. Dies ist notwendig, wenn 2 verschiedene Berechnungsarten gleichzeitig verwendet werden. Standardmäßig wird der günstigere Preis verrechnet.</text:p>
      <text:p text:style-name="P26">Beispiel:</text:p>
      <text:h text:style-name="Preformatted_20_Text" text:outline-level="5">plugin.tt_products.shippingcalc {</text:h>
      <text:p text:style-name="P4"><text:s text:c="3"/>10.type = price</text:p>
      <text:p text:style-name="P4"><text:s text:c="3"/>10.sql.where = category = 12</text:p>
      <text:p text:style-name="Table_20_Contents_2f_PRE"><text:s text:c="3"/>10.prod.250 = 0.06</text:p>
      <text:p text:style-name="Table_20_Contents_2f_PRE">}</text:p>
      <text:p text:style-name="Table_20_Contents_2f_PRE"/>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Property:</text:p>
            </table:table-cell>
            <table:table-cell table:style-name="Tableau12.B1" office:value-type="string">
              <text:p text:style-name="Table_20_Heading">Data type:</text:p>
            </table:table-cell>
            <table:table-cell table:style-name="Tableau12.A1" office:value-type="string">
              <text:p text:style-name="Table_20_Heading">Description:</text:p>
            </table:table-cell>
            <table:table-cell table:style-name="Tableau12.D1" office:value-type="string">
              <text:p text:style-name="Table_20_Heading">Default:</text:p>
            </table:table-cell>
          </table:table-row>
        </table:table-header-rows>
        <table:table-row>
          <table:table-cell table:style-name="Tableau12.A2" office:value-type="string">
            <text:p text:style-name="Table_20_Contents">type</text:p>
          </table:table-cell>
          <table:table-cell table:style-name="Tableau12.B2" office:value-type="string">
            <text:p text:style-name="P2">string</text:p>
          </table:table-cell>
          <table:table-cell table:style-name="Tableau12.C2" office:value-type="string">
            <text:p text:style-name="Table_20_Contents">Eine spezielle Preisberechnung, die nur für bestimmte Produkte gilt. Ident zu discountprice.</text:p>
            <text:p text:style-name="P26"/>
            <text:p text:style-name="P40">percent ... in Prozent des Preises</text:p>
            <text:p text:style-name="P40"/>
            <text:p text:style-name="P40">Im Beispiel wird von allen roten Produkten ein Versandpreis von 25% zum Produktpreis eines roten Produktes aufgeschlagen, immer wenn der Gesamtpreis aller Produkte &gt; 0 ist.</text:p>
            <text:p text:style-name="P26">Beispiel:</text:p>
            <text:p text:style-name="Table_20_Contents_2f_PRE">shippingcalc.10 {</text:p>
            <text:p text:style-name="Table_20_Contents_2f_PRE"><text:s text:c="4"/>type = <text:span text:style-name="T2">price</text:span></text:p>
            <text:p text:style-name="Table_20_Contents_2f_PRE"><text:s text:c="4"/>sql.where = color = 'rot'</text:p>
            <text:p text:style-name="Table_20_Contents_2f_PRE"><text:s text:c="4"/>prod.type = percent</text:p>
            <text:p text:style-name="Table_20_Contents_2f_PRE"><text:s text:c="4"/>prod.0 = 0.06</text:p>
            <text:p text:style-name="Table_20_Contents_2f_PRE">}</text:p>
          </table:table-cell>
          <table:table-cell table:style-name="Tableau12.D2" office:value-type="string">
            <text:p text:style-name="P54"/>
          </table:table-cell>
        </table:table-row>
        <table:table-row>
          <table:table-cell table:style-name="Tableau12.A3" office:value-type="string">
            <text:p text:style-name="P2">sql</text:p>
          </table:table-cell>
          <table:table-cell table:style-name="Tableau12.B2" office:value-type="string">
            <text:p text:style-name="Table_20_Contents">select</text:p>
          </table:table-cell>
          <table:table-cell table:style-name="Tableau12.C3" office:value-type="string">
            <text:p text:style-name="Table_20_Contents">SQL Bedingung über die Datensätze</text:p>
          </table:table-cell>
          <table:table-cell table:style-name="Tableau12.D2" office:value-type="string">
            <text:p text:style-name="Table_20_Contents"/>
          </table:table-cell>
        </table:table-row>
      </table:table>
      <text:h text:style-name="Heading_20_3" text:outline-level="3"/>
      <text:h text:style-name="Heading_20_3" text:outline-level="3"><text:bookmark-start text:name="__RefHeading__17631_1782085564"/>Pricecalc, discountprice und creditpoints Konfiguration<text:bookmark-end text:name="__RefHeading__17631_1782085564"/></text:h>
      <text:p text:style-name="Text_20_body">nur Setup</text:p>
      <text:p text:style-name="Text_20_body"><text:soft-page-break/>Die Preisberechnung (pricecalc) gibt Ihnen die Möglichkeit, Preissummen über die Produkte über eine Berechnungstabelle zu ermitteln. Der Discount Preis (discountprice) wird für Kunden verwendet, die Frontend Benutzer sind und zur Gruppe mit dem Namen gehören, der über <text:span text:style-name="T2">discountGroupName gesetzt worden ist.. </text:span></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Eigenschaft:</text:p>
            </table:table-cell>
            <table:table-cell table:style-name="Tableau3.B1" office:value-type="string">
              <text:p text:style-name="Table_20_Heading">Datentyp:</text:p>
            </table:table-cell>
            <table:table-cell table:style-name="Tableau3.A1" office:value-type="string">
              <text:p text:style-name="Table_20_Heading">Beschreibung:</text:p>
            </table:table-cell>
            <table:table-cell table:style-name="Tableau3.D1" office:value-type="string">
              <text:p text:style-name="Table_20_Heading">Voreinstellung:</text:p>
            </table:table-cell>
          </table:table-row>
        </table:table-header-rows>
        <table:table-row>
          <table:table-cell table:style-name="Tableau3.A2" table:number-rows-spanned="4" office:value-type="string">
            <text:p text:style-name="P2">prod</text:p>
          </table:table-cell>
          <table:table-cell table:style-name="Tableau3.B2" table:number-rows-spanned="4" office:value-type="string">
            <text:p text:style-name="P53">Zweischneidige Liste von Ganzzahlen</text:p>
          </table:table-cell>
          <table:table-cell table:style-name="Tableau3.C2" office:value-type="string">
            <text:p text:style-name="P42">Die linke Seite der Integer kennzeichnet Zeilen, die zusammengehören. Die Bedeutung der rechten Integer ergibt sich aus den Einstellungen jeder Zeile. </text:p>
            <text:p text:style-name="P40">Bei pricecalc gibt es nur für die angegebenen Mengen eine Ermäßigung, bei discountprice auch für alle dazwischen liegenden Stückzahlen ab einer bestimmten Menge.</text:p>
          </table:table-cell>
          <table:table-cell table:style-name="Tableau3.D2" table:number-rows-spanned="4" office:value-type="string">
            <text:p text:style-name="Table_20_Contents">0</text:p>
          </table:table-cell>
        </table:table-row>
        <table:table-row>
          <table:covered-table-cell table:style-name="Tableau3.A3"/>
          <table:covered-table-cell table:style-name="Tableau3.B2"/>
          <table:table-cell table:style-name="Tableau3.C3" office:value-type="string">
            <text:p text:style-name="P25">Pricecalc:</text:p>
            <text:p text:style-name="P40">Spezielle Preise für die Produkte. Wo 1 Produkt 4.99 kostet, dort werden 2 Produkte 8.99 kosten. <text:s/>Mit discountprice wird der Preis für ein Produkt eingegeben, mit pricecalc ist es der Preis für alle Produkte zusammen, für die eines davon 4.99 als Preis im Sysfolder eines x-beliebigen Produktes eingetragen ist. Der discountprice überschreibt die Ergebnisse von pricecalc, weil hier immer das niedrigere Ergebnis als Endpreis herauskommen muß. Wenn das Preisfeld price2 verwendet wird, dann überschreibt dieses alle Preisberechnungen.</text:p>
            <text:p text:style-name="P40">Achtung: <text:span text:style-name="T2">getDiscountPrice muss 1 sein, wenn die Rabatte für alle Benutzer gelten sollen.</text:span></text:p>
            <text:p text:style-name="P40"/>
            <text:p text:style-name="P26">Beispiel:</text:p>
            <text:p text:style-name="Table_20_Contents_2f_PRE">pricecalc {</text:p>
            <text:p text:style-name="Table_20_Contents_2f_PRE"><text:s text:c="2"/>10.type = count</text:p>
            <text:p text:style-name="Table_20_Contents_2f_PRE"><text:s text:c="2"/>10.field = price</text:p>
            <text:p text:style-name="Table_20_Contents_2f_PRE"><text:s text:c="2"/>10.sql.where = <text:line-break/> <text:s/>10.prod.1 = 4.99</text:p>
            <text:p text:style-name="Table_20_Contents_2f_PRE"><text:s text:c="2"/>10.prod.2 = 8.99</text:p>
            <text:p text:style-name="Table_20_Contents_2f_PRE"><text:s text:c="2"/>10.prod.5 = 19.99</text:p>
            <text:p text:style-name="Table_20_Contents_2f_PRE"><text:s text:c="2"/>20.type = count</text:p>
            <text:p text:style-name="Table_20_Contents_2f_PRE"><text:s text:c="2"/>20.field = price</text:p>
            <text:p text:style-name="Table_20_Contents_2f_PRE"><text:s text:c="2"/>20.sql.where = <text:line-break/> <text:s/>20.prod.1 = 6.99</text:p>
            <text:p text:style-name="Table_20_Contents_2f_PRE"><text:s text:c="2"/>20.prod.2 = 13.98</text:p>
            <text:p text:style-name="Table_20_Contents_2f_PRE"><text:s text:c="2"/>20.prod.5 = 29.99</text:p>
            <text:p text:style-name="Table_20_Contents_2f_PRE">}</text:p>
            <text:p text:style-name="Table_20_Contents_2f_PRE"/>
          </table:table-cell>
          <table:covered-table-cell table:style-name="Tableau3.D3"/>
        </table:table-row>
        <table:table-row>
          <table:covered-table-cell table:style-name="Tableau3.A4"/>
          <table:covered-table-cell table:style-name="Tableau3.B2"/>
          <table:table-cell table:style-name="Tableau3.C4" office:value-type="string">
            <text:p text:style-name="P25">Discountprice:</text:p>
            <text:p text:style-name="P40">Hier werden die Preise der Produkte entsprechend der Typ-Einstellung berechnet. Bei 'count' werden die Preise der Artikel zusammengezählt.</text:p>
            <text:p text:style-name="P40">Die 'additive'-Einstellung bewirkt, daß die Artikel über alle Konfigurations-Zeilen hinweg zusammengezählt werden und nicht wie sonst, nur zeilenweise.</text:p>
            <text:p text:style-name="P40">Verwenden Sie type = count und prod.type=percent, wenn Sie statt Preisangaben lieber Prozentangaben machen wollen. Aber Sie müssen in diesem Fall eine SQL Bedingung setzen, damit nicht alle Produkte dafür herangezogen werden.</text:p>
            <text:p text:style-name="P26">Beispiel:</text:p>
            <text:p text:style-name="Table_20_Contents_2f_PRE">discountprice.50 {</text:p>
            <text:p text:style-name="Table_20_Contents_2f_PRE"><text:s text:c="4"/>type = <text:span text:style-name="T2">count</text:span></text:p>
            <text:p text:style-name="Table_20_Contents_2f_PRE"><text:s text:c="4"/>sql.where = color = 'rot'</text:p>
            <text:p text:style-name="Table_20_Contents_2f_PRE"><text:s text:c="4"/>prod.type = percent</text:p>
            <text:p text:style-name="Table_20_Contents_2f_PRE"><text:s text:c="4"/>prod.0 = 6</text:p>
            <text:p text:style-name="P41">}</text:p>
            <text:p text:style-name="P40"/>
            <text:p text:style-name="P26">Beispiel:</text:p>
            <text:p text:style-name="Table_20_Contents_2f_PRE">discountprice {</text:p>
            <text:p text:style-name="Table_20_Contents_2f_PRE"><text:s text:c="2"/>10.type = count</text:p>
            <text:p text:style-name="Table_20_Contents_2f_PRE"><text:s text:c="2"/>10.field = price<text:line-break/> <text:s/>10.additive = 0</text:p>
            <text:p text:style-name="Table_20_Contents_2f_PRE"><text:s text:c="2"/>10.sql.where =</text:p>
            <text:p text:style-name="Table_20_Contents_2f_PRE"><text:s text:c="2"/>10.prod.1 = 4.99</text:p>
            <text:p text:style-name="Table_20_Contents_2f_PRE"><text:s text:c="2"/>10.prod.100 = 2.49</text:p>
            <text:p text:style-name="Table_20_Contents_2f_PRE"><text:s text:c="2"/>10.prod.1050 = 2.39</text:p>
            <text:p text:style-name="Table_20_Contents_2f_PRE"><text:s text:c="2"/>20.type = count</text:p>
            <text:p text:style-name="Table_20_Contents_2f_PRE"><text:s text:c="2"/>20.field = price<text:line-break/> <text:s/>20.sql.where =</text:p>
            <text:p text:style-name="Table_20_Contents_2f_PRE"><text:s text:c="2"/>20.prod.1 = 6.99</text:p>
            <text:p text:style-name="Table_20_Contents_2f_PRE"><text:s text:c="2"/>20.prod.100 = 2.59</text:p>
            <text:p text:style-name="Table_20_Contents_2f_PRE"><text:s text:c="2"/>20.prod.1050 = 2.49</text:p>
            <text:p text:style-name="Table_20_Contents_2f_PRE">}</text:p>
          </table:table-cell>
          <table:covered-table-cell table:style-name="Tableau3.D4"/>
        </table:table-row>
        <table:table-row>
          <table:covered-table-cell table:style-name="Tableau3.A5"/>
          <table:covered-table-cell table:style-name="Tableau3.B2"/>
          <table:table-cell table:style-name="Tableau3.C5" office:value-type="string">
            <text:p text:style-name="P25">Creditpoints:</text:p>
            <text:p text:style-name="P40">Damit wird eingestellt, wieviele Gutscheinpunkte jemand erhalten wird, wenn er Artikel im Shop kauft. Die Werte auf der rechten Seite sind die Prozente der bestellten Artikel, wenn 'type=price' ist.</text:p>
            <text:p text:style-name="P26"><text:line-break/>Beispiel:</text:p>
            <text:p text:style-name="Table_20_Contents_2f_PRE">creditpoints {</text:p>
            <text:p text:style-name="Table_20_Contents_2f_PRE"><text:s text:c="2"/>pricefactor = 0.5</text:p>
            <text:p text:style-name="Table_20_Contents_2f_PRE"><text:s text:c="2"/>10.type = price</text:p>
            <text:p text:style-name="Table_20_Contents_2f_PRE"><text:s text:c="2"/>10.prod.1 <text:s text:c="2"/>= 0.02</text:p>
            <text:p text:style-name="Table_20_Contents_2f_PRE"><text:s text:c="2"/>10.prod.101 = 0.04</text:p>
            <text:p text:style-name="Table_20_Contents_2f_PRE"><text:s text:c="2"/>10.prod.501 = 0.06</text:p>
            <text:p text:style-name="Table_20_Contents_2f_PRE">}</text:p>
          </table:table-cell>
          <table:covered-table-cell table:style-name="Tableau3.D5"/>
        </table:table-row>
        <table:table-row>
          <table:table-cell table:style-name="Tableau3.A6" office:value-type="string">
            <text:p text:style-name="P2">additive</text:p>
          </table:table-cell>
          <table:table-cell table:style-name="Tableau3.B2" office:value-type="string">
            <text:p text:style-name="P2">double</text:p>
          </table:table-cell>
          <table:table-cell table:style-name="Tableau3.C6" office:value-type="string">
            <text:p text:style-name="P42">Nur für discountprice gültig. Wenn gesetzt, werden alle Produkte von allen Discount-Preisen zusammengezählt, um den effektiven Disount-Preis zu berechnen. Wenn nicht gesezt, dann werden nur die Produkte mit demselben Preis zusammengezählt.</text:p>
          </table:table-cell>
          <table:table-cell table:style-name="Tableau3.D6" office:value-type="string">
            <text:p text:style-name="Table_20_Contents"/>
          </table:table-cell>
        </table:table-row>
        <table:table-row>
          <table:table-cell table:style-name="Tableau3.A7" office:value-type="string">
            <text:p text:style-name="P2">type</text:p>
          </table:table-cell>
          <table:table-cell table:style-name="Tableau3.B2" office:value-type="string">
            <text:p text:style-name="Table_20_Contents">string</text:p>
          </table:table-cell>
          <table:table-cell table:style-name="Tableau3.C7" office:value-type="string">
            <text:p text:style-name="Table_20_Contents">Die Bedeutung der Ganzzahl auf der rechten Seite, die normalerweise zusammengezählt wird:<text:line-break/>count ... die Anzahl der Produkte (nur pricecalc und discountprice)<text:line-break/>price <text:s/>... der Gesamtpreis der Produkte (nur creditpoints)</text:p>
          </table:table-cell>
          <table:table-cell table:style-name="Tableau3.D6" office:value-type="string">
            <text:p text:style-name="Table_20_Contents"/>
          </table:table-cell>
        </table:table-row>
        <table:table-row>
          <table:table-cell table:style-name="Tableau3.A8" office:value-type="string">
            <text:p text:style-name="P2">sql</text:p>
          </table:table-cell>
          <table:table-cell table:style-name="Tableau3.B2" office:value-type="string">
            <text:p text:style-name="Table_20_Contents">select</text:p>
          </table:table-cell>
          <table:table-cell table:style-name="Tableau3.C8" office:value-type="string">
            <text:p text:style-name="Table_20_Contents">SQL Bedingung über die Datensätze</text:p>
          </table:table-cell>
          <table:table-cell table:style-name="Tableau3.D8" office:value-type="string">
            <text:p text:style-name="Table_20_Contents"/>
          </table:table-cell>
        </table:table-row>
      </table:table>
      <text:p text:style-name="P5">[tsref:(script).productsLib.payment/(script).productsLib.shipping]</text:p>
      <text:p text:style-name="Text_20_body"/>
      <text:h text:style-name="Heading_20_4" text:outline-level="4">Creditpoints Konfiguration</text:h>
      <text:p text:style-name="Text_20_body"/>
      <text:p text:style-name="Text_20_body">Siehe vorige Tabelle für die Hauptkonfiguration der Creditpoints.</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Eigenschaft:</text:p>
            </table:table-cell>
            <table:table-cell table:style-name="Tabelle1.B1" office:value-type="string">
              <text:p text:style-name="Table_20_Heading">Datentyp:</text:p>
            </table:table-cell>
            <table:table-cell table:style-name="Tabelle1.A1" office:value-type="string">
              <text:p text:style-name="Table_20_Heading">Beschreibung:</text:p>
            </table:table-cell>
            <table:table-cell table:style-name="Tabelle1.D1" office:value-type="string">
              <text:p text:style-name="Table_20_Heading">Voreinstellung:</text:p>
            </table:table-cell>
          </table:table-row>
        </table:table-header-rows>
        <table:table-row>
          <table:table-cell table:style-name="Tabelle1.A2" office:value-type="string">
            <text:p text:style-name="P2">pricefactor</text:p>
          </table:table-cell>
          <table:table-cell table:style-name="Tabelle1.B2" office:value-type="string">
            <text:p text:style-name="Table_20_Contents">double</text:p>
          </table:table-cell>
          <table:table-cell table:style-name="Tabelle1.C2" office:value-type="string">
            <text:p text:style-name="Table_20_Contents">Damit wird berechnet, wieviel Geld jemand für seine Gutscheinpunkte erhalten wird. 2 Gutscheinpunkte werden 1 Euro an Gutschrift in der eingestellten Währung ergeben.</text:p>
            <text:p text:style-name="Table_20_Contents">In diesem Beispiel hat ein Gutscheinpunkt den Gegenwert von 50 Cent.</text:p>
            <text:p text:style-name="Table_20_Contents"/>
            <text:p text:style-name="P25">Beispiel:</text:p>
            <text:p text:style-name="Table_20_Contents_2f_PRE">creditpoints {</text:p>
            <text:p text:style-name="Table_20_Contents_2f_PRE"><text:s text:c="2"/>pricefactor = 0.5</text:p>
            <text:p text:style-name="Table_20_Contents_2f_PRE">}</text:p>
          </table:table-cell>
          <table:table-cell table:style-name="Tabelle1.D2" office:value-type="string">
            <text:p text:style-name="Table_20_Contents"/>
          </table:table-cell>
        </table:table-row>
        <table:table-row>
          <table:table-cell table:style-name="Tabelle1.A3" office:value-type="string">
            <text:p text:style-name="P2">mode</text:p>
          </table:table-cell>
          <table:table-cell table:style-name="Tabelle1.B2" office:value-type="string">
            <text:p text:style-name="Table_20_Contents">string</text:p>
          </table:table-cell>
          <table:table-cell table:style-name="Tabelle1.C3" office:value-type="string">
            <text:p text:style-name="Table_20_Contents">Normalerweise müssen im HTML Shop Template Eingabefelder für die Anzahl der zu verwendenden Konto(Gutschein-)punkte eingebaut werden.</text:p>
            <text:p text:style-name="Table_20_Contents">Ändern Sie das auf den Modus 'auto' um. Dann werden alle für den Einkauf benötigten Kontopunkte automatisch verwendet.</text:p>
            <text:p text:style-name="Table_20_Contents"/>
            <text:p text:style-name="P25">Example:</text:p>
            <text:p text:style-name="Table_20_Contents_2f_PRE">creditpoints {</text:p>
            <text:p text:style-name="Table_20_Contents_2f_PRE"><text:s text:c="2"/><text:span text:style-name="T2">mode</text:span> = auto</text:p>
            <text:p text:style-name="Table_20_Contents_2f_PRE">}</text:p>
          </table:table-cell>
          <table:table-cell table:style-name="Tabelle1.D3" office:value-type="string">
            <text:p text:style-name="Table_20_Contents"/>
          </table:table-cell>
        </table:table-row>
      </table:table>
      <text:h text:style-name="Heading_20_3" text:outline-level="3"><text:bookmark-start text:name="__RefHeading__17633_1782085564"/>Freundschaftswerbung/Gutschein Konfiguration<text:bookmark-end text:name="__RefHeading__17633_1782085564"/></text:h>
      <text:p text:style-name="Text_20_body">nur Setup</text:p>
      <text:p text:style-name="Text_20_body">Die Accounts der Freunde, von denen man angeworben worden ist bzw. die Gutscheinpunkte müssen in einer Datenbanktabelle gespeichert werden. Normalerweise werden in der fe_users Tabelle die Benutzernamen der Frontend Benutzer, von denen jemand auf den Shop aufmerksam gemacht worden ist, abgespeichert. Der werbende Kunde erhält beim nächsten Kauf einen Preisnachlaß. Wenn aber ein Tabellenname eingetragen worden ist, dann läuft es z.B. über die voucher Extension. Es wird dann bei der Eingabe eines gültigen Gutschein-Codes eine Preisermäßigung bewirkt.</text:p>
      <text:p text:style-name="P26">Example:</text:p>
      <text:h text:style-name="Preformatted_20_Text" text:outline-level="5">plugin.tt_products.voucher {</text:h>
      <text:p text:style-name="P4"><text:s text:c="3"/>table = my_voucher_table</text:p>
      <text:p text:style-name="Table_20_Contents_2f_PRE"><text:soft-page-break/>}</text:p>
      <text:p text:style-name="Table_20_Contents_2f_PRE"/>
      <table:table table:name="Tableau13" table:style-name="Tableau13">
        <table:table-column table:style-name="Tableau13.A"/>
        <table:table-column table:style-name="Tableau13.B"/>
        <table:table-column table:style-name="Tableau13.C"/>
        <table:table-column table:style-name="Tableau13.D"/>
        <table:table-header-rows>
          <table:table-row>
            <table:table-cell table:style-name="Tableau13.A1" office:value-type="string">
              <text:p text:style-name="Table_20_Heading">Property:</text:p>
            </table:table-cell>
            <table:table-cell table:style-name="Tableau13.B1" office:value-type="string">
              <text:p text:style-name="Table_20_Heading">Data type:</text:p>
            </table:table-cell>
            <table:table-cell table:style-name="Tableau13.A1" office:value-type="string">
              <text:p text:style-name="Table_20_Heading">Description:</text:p>
            </table:table-cell>
            <table:table-cell table:style-name="Tableau13.D1" office:value-type="string">
              <text:p text:style-name="Table_20_Heading">Default:</text:p>
            </table:table-cell>
          </table:table-row>
        </table:table-header-rows>
        <table:table-row>
          <table:table-cell table:style-name="Tableau13.A2" office:value-type="string">
            <text:p text:style-name="P2">table</text:p>
          </table:table-cell>
          <table:table-cell table:style-name="Tableau13.B2" office:value-type="string">
            <text:p text:style-name="Table_20_Contents">string</text:p>
          </table:table-cell>
          <table:table-cell table:style-name="Tableau13.C2" office:value-type="string">
            <text:p text:style-name="Table_20_Contents">Name der Tabelle, in welcher die Gutscheinpunkte gespeichert werden. Sie muß ein Feld fe_users_uid mit der uid des FE Benutzers haben.</text:p>
            <text:p text:style-name="Table_20_Contents">Wenn sie leer ist, wird der Gutschein Code in der fe_users Tabelle im Feld tt_products_vouchercode gespeichert.</text:p>
          </table:table-cell>
          <table:table-cell table:style-name="Tableau13.D2" office:value-type="string">
            <text:p text:style-name="Table_20_Contents"/>
          </table:table-cell>
        </table:table-row>
        <table:table-row>
          <table:table-cell table:style-name="Tableau13.A3" office:value-type="string">
            <text:p text:style-name="P2">amount</text:p>
          </table:table-cell>
          <table:table-cell table:style-name="Tableau13.B2" office:value-type="string">
            <text:p text:style-name="Table_20_Contents">double</text:p>
          </table:table-cell>
          <table:table-cell table:style-name="Tableau13.C3" office:value-type="string">
            <text:p text:style-name="Table_20_Contents">Preisermäßigung bei der Verwendung von Benutzernamen als Gutscheine, wenn die fe_users Tabelle verwendet worden ist.</text:p>
          </table:table-cell>
          <table:table-cell table:style-name="Tableau13.D2" office:value-type="string">
            <text:p text:style-name="Table_20_Contents"/>
          </table:table-cell>
        </table:table-row>
        <table:table-row>
          <table:table-cell table:style-name="Tableau13.A4" office:value-type="string">
            <text:p text:style-name="P2">price</text:p>
          </table:table-cell>
          <table:table-cell table:style-name="Tableau13.B2" office:value-type="string">
            <text:p text:style-name="Table_20_Contents">double</text:p>
          </table:table-cell>
          <table:table-cell table:style-name="Tableau13.C4" office:value-type="string">
            <text:p text:style-name="Table_20_Contents">Preis für einen Gutschein, wenn er als Belohnung für die Anwerbung eines Freundes verwendet wird.</text:p>
          </table:table-cell>
          <table:table-cell table:style-name="Tableau13.D2" office:value-type="string">
            <text:p text:style-name="Table_20_Contents"/>
          </table:table-cell>
        </table:table-row>
      </table:table>
      <text:p text:style-name="P5"/>
      <text:h text:style-name="Heading_20_3" text:outline-level="3"><text:bookmark-start text:name="__RefHeading__17635_1782085564"/>Bestellbestätigung Konfiguration<text:bookmark-end text:name="__RefHeading__17635_1782085564"/></text:h>
      <text:p text:style-name="Text_20_body">nur Setup</text:p>
      <text:p text:style-name="Text_20_body">Es gibt einige Einstellungen, die den Ablauf der Bestellbestätigung beeinflussen können.</text:p>
      <text:p text:style-name="P26">Example:</text:p>
      <text:h text:style-name="Preformatted_20_Text" text:outline-level="5">plugin.tt_products.finalize {</text:h>
      <text:p text:style-name="P4"><text:s text:c="3"/>productsFilter {</text:p>
      <text:p text:style-name="P4"><text:s text:c="6"/>10 {</text:p>
      <text:p text:style-name="P4"><text:s text:c="9"/>pid = 12</text:p>
      <text:p text:style-name="P4"><text:s text:c="9"/>email = myemail@mytypo3site1.com</text:p>
      <text:p text:style-name="P4"><text:s text:c="6"/>}</text:p>
      <text:p text:style-name="P4"><text:s text:c="6"/>20 {</text:p>
      <text:p text:style-name="P4"><text:s text:c="9"/>pid = 12</text:p>
      <text:p text:style-name="P4"><text:s text:c="9"/>email = myemail@mytypo3site2.com</text:p>
      <text:p text:style-name="P4"><text:s text:c="6"/>}</text:p>
      <text:p text:style-name="P4"><text:s text:c="3"/>}</text:p>
      <text:p text:style-name="Table_20_Contents_2f_PRE">}</text:p>
      <text:p text:style-name="Table_20_Contents_2f_PRE"/>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Table_20_Heading">Property:</text:p>
            </table:table-cell>
            <table:table-cell table:style-name="Tableau19.B1" office:value-type="string">
              <text:p text:style-name="Table_20_Heading">Data type:</text:p>
            </table:table-cell>
            <table:table-cell table:style-name="Tableau19.A1" office:value-type="string">
              <text:p text:style-name="Table_20_Heading">Description:</text:p>
            </table:table-cell>
            <table:table-cell table:style-name="Tableau19.D1" office:value-type="string">
              <text:p text:style-name="Table_20_Heading">Default:</text:p>
            </table:table-cell>
          </table:table-row>
        </table:table-header-rows>
        <table:table-row>
          <table:table-cell table:style-name="Tableau19.A2" office:value-type="string">
            <text:p text:style-name="P4">productsFilter</text:p>
          </table:table-cell>
          <table:table-cell table:style-name="Tableau19.B2" office:value-type="string">
            <text:p text:style-name="Table_20_Contents">string</text:p>
          </table:table-cell>
          <table:table-cell table:style-name="Tableau19.C2" office:value-type="string">
            <text:p text:style-name="Table_20_Contents">Damit werden die Bestellbestätigungsemails auf die Produkte unterschiedlicher Seiten aufgeteilt. Die jeweiligen Emails erhalten nur die Produkte aus den angegebenen Seiten.</text:p>
            <text:p text:style-name="Table_20_Contents"/>
            <text:p text:style-name="Table_20_Contents">Das Array enthält diese Einträge:</text:p>
            <text:p text:style-name="Table_20_Contents">pid … eine Liste von Email</text:p>
            <text:p text:style-name="Table_20_Contents">email … eine Liste von Email Adressen </text:p>
          </table:table-cell>
          <table:table-cell table:style-name="Tableau19.D2" office:value-type="string">
            <text:p text:style-name="Table_20_Contents"/>
          </table:table-cell>
        </table:table-row>
      </table:table>
      <text:p text:style-name="P5"/>
      <text:h text:style-name="Heading_20_3" text:outline-level="3"><text:bookmark-start text:name="__RefHeading__17637_1782085564"/>Rechnung und Lieferschein Konfiguration<text:bookmark-end text:name="__RefHeading__17637_1782085564"/></text:h>
      <text:p text:style-name="Text_20_body">nur Setup</text:p>
      <text:p text:style-name="Text_20_body">Es gibt einige Einstellungen, die bei der Erstellung und der Verwendung von Rechnung und Lieferschein nützlich sein können. Sie werden im Verzeichnis “fileadmin/data/bill” erstellt.</text:p>
      <text:p text:style-name="P26">Example:</text:p>
      <text:h text:style-name="Preformatted_20_Text" text:outline-level="5">plugin.tt_products.bill {</text:h>
      <text:p text:style-name="P4"><text:s text:c="3"/>generation = auto</text:p>
      <text:p text:style-name="Table_20_Contents_2f_PRE">}</text:p>
      <text:h text:style-name="Preformatted_20_Text" text:outline-level="5">plugin.tt_products.delivery {</text:h>
      <text:p text:style-name="P4"><text:s text:c="3"/>generation = </text:p>
      <text:p text:style-name="Table_20_Contents_2f_PRE">}</text:p>
      <text:p text:style-name="Table_20_Contents_2f_PRE"/>
      <table:table table:name="Tableau15" table:style-name="Tableau15">
        <table:table-column table:style-name="Tableau15.A"/>
        <table:table-column table:style-name="Tableau15.B"/>
        <table:table-column table:style-name="Tableau15.C"/>
        <table:table-column table:style-name="Tableau15.D"/>
        <table:table-header-rows>
          <table:table-row>
            <table:table-cell table:style-name="Tableau15.A1" office:value-type="string">
              <text:p text:style-name="Table_20_Heading">Property:</text:p>
            </table:table-cell>
            <table:table-cell table:style-name="Tableau15.B1" office:value-type="string">
              <text:p text:style-name="Table_20_Heading">Data type:</text:p>
            </table:table-cell>
            <table:table-cell table:style-name="Tableau15.A1" office:value-type="string">
              <text:p text:style-name="Table_20_Heading">Description:</text:p>
            </table:table-cell>
            <table:table-cell table:style-name="Tableau15.D1" office:value-type="string">
              <text:p text:style-name="Table_20_Heading">Default:</text:p>
            </table:table-cell>
          </table:table-row>
        </table:table-header-rows>
        <table:table-row>
          <table:table-cell table:style-name="Tableau15.A2" office:value-type="string">
            <text:p text:style-name="P2">generation</text:p>
          </table:table-cell>
          <table:table-cell table:style-name="Tableau15.B2" office:value-type="string">
            <text:p text:style-name="Table_20_Contents">string</text:p>
          </table:table-cell>
          <table:table-cell table:style-name="Tableau15.C2" office:value-type="string">
            <text:p text:style-name="Table_20_Contents">Damit wird die Erzeugen von Rechnung oder Lieferschein festgelegt.</text:p>
            <text:p text:style-name="Table_20_Contents"/>
            <text:p text:style-name="Table_20_Contents">auto … Die Erzeugung wird automatisch beim Abschluss der Bestellung durchgeführt.</text:p>
          </table:table-cell>
          <table:table-cell table:style-name="Tableau15.D2" office:value-type="string">
            <text:p text:style-name="Table_20_Contents"/>
          </table:table-cell>
        </table:table-row>
        <table:table-row>
          <table:table-cell table:style-name="Tableau15.A3" office:value-type="string">
            <text:p text:style-name="P2">type</text:p>
          </table:table-cell>
          <table:table-cell table:style-name="Tableau15.B2" office:value-type="string">
            <text:p text:style-name="Table_20_Contents">string</text:p>
          </table:table-cell>
          <table:table-cell table:style-name="Tableau15.C3" office:value-type="string">
            <text:p text:style-name="Table_20_Contents">Typ von Rechnung oder Lieferschein</text:p>
            <text:p text:style-name="Table_20_Contents">html … HTML Format </text:p>
            <text:p text:style-name="Table_20_Contents">pdf <text:s text:c="2"/>… PDF Format (Die Extension 'fpdf' muss installiert sein.)</text:p>
          </table:table-cell>
          <table:table-cell table:style-name="Tableau15.D2" office:value-type="string">
            <text:p text:style-name="Table_20_Contents"/>
          </table:table-cell>
        </table:table-row>
        <text:soft-page-break/>
        <table:table-row>
          <table:table-cell table:style-name="Tableau15.A4" office:value-type="string">
            <text:p text:style-name="P2">handleLib</text:p>
          </table:table-cell>
          <table:table-cell table:style-name="Tableau15.B2" office:value-type="string">
            <text:p text:style-name="Table_20_Contents">string / array</text:p>
          </table:table-cell>
          <table:table-cell table:style-name="Tableau15.C4" office:value-type="string">
            <text:p text:style-name="P26"><text:span text:style-name="T43">nur PDF</text:span>:</text:p>
            <text:p text:style-name="Table_20_Contents">Name <text:span text:style-name="T43">der</text:span> <text:span text:style-name="T43">PHP</text:span> <text:span text:style-name="T43">Bibliothek</text:span> <text:span text:style-name="T43">für die</text:span> <text:span text:style-name="T42">PDF Generierung</text:span>. <text:span text:style-name="T43">Im Moment kann hier nur</text:span> '<text:span text:style-name="T42">PhpWord</text:span>' <text:span text:style-name="T43">eingetragen werden</text:span>.</text:p>
            <text:p text:style-name="P26"/>
            <text:p text:style-name="P26"><text:span text:style-name="T43">Beispiel</text:span>:</text:p>
            <text:p text:style-name="Table_20_Contents_2f_PRE">bill.handleLib = <text:s/><text:span text:style-name="T42">PhpWord</text:span></text:p>
            <text:p text:style-name="Table_20_Contents_2f_PRE"/>
            <text:p text:style-name="P49"><text:span text:style-name="T44">A</text:span>rray <text:span text:style-name="T44">Werte</text:span>: </text:p>
            <text:p text:style-name="Table_20_Contents"><text:span text:style-name="Teletype"><text:span text:style-name="T22">path</text:span></text:span><text:span text:style-name="Teletype"><text:span text:style-name="T21"> ... </text:span></text:span><text:span text:style-name="Teletype"><text:span text:style-name="T22">Dateipfad zur Bibliothek, </text:span></text:span><text:span text:style-name="Teletype"><text:span text:style-name="T23">relativ zur TYPO3 Umgebung<text:line-break/></text:span></text:span><text:span text:style-name="Teletype"><text:span text:style-name="T24">rendererLibrary.path ... </text:span></text:span><text:span text:style-name="Teletype"><text:span text:style-name="T25">Dateipfad zu einer weitereen Bibliothek, um Formate zu schreiben, mit denen die Hauptbibliothek nicht umgehen kann</text:span></text:span></text:p>
            <text:p text:style-name="Table_20_Contents"><text:span text:style-name="Teletype"><text:span text:style-name="T23"/></text:span></text:p>
            <text:p text:style-name="Table_20_Contents"><text:span text:style-name="Teletype"><text:span text:style-name="T21"/></text:span></text:p>
            <text:p text:style-name="P26"><text:span text:style-name="Teletype"><text:span text:style-name="T21">Example:</text:span></text:span></text:p>
            <text:p text:style-name="Table_20_Contents_2f_PRE"><text:span text:style-name="Teletype"><text:span text:style-name="T16">bill.</text:span></text:span><text:span text:style-name="Teletype"><text:span text:style-name="T14">handleLib = </text:span></text:span><text:span text:style-name="Teletype"><text:span text:style-name="T17">PhpWord</text:span></text:span><text:span text:style-name="Teletype"><text:span text:style-name="T14"><text:line-break/></text:span></text:span><text:span text:style-name="Teletype"><text:span text:style-name="T16">bill.</text:span></text:span><text:span text:style-name="Teletype"><text:span text:style-name="T14">handleLib {<text:line-break/> <text:s/></text:span></text:span><text:span text:style-name="Teletype"><text:span text:style-name="T18">path</text:span></text:span><text:span text:style-name="Teletype"><text:span text:style-name="T14"> = </text:span></text:span><text:span text:style-name="Teletype"><text:span text:style-name="T19">PHPWord-master<text:line-break/> <text:s/>rendererLibrary {<text:line-break/> <text:s text:c="4"/>path = dompdf-0.6.1<text:line-break/> <text:s/>}</text:span></text:span><text:span text:style-name="Teletype"><text:span text:style-name="T14"><text:line-break/>}</text:span></text:span></text:p>
          </table:table-cell>
          <table:table-cell table:style-name="Tableau15.D4" office:value-type="string">
            <text:p text:style-name="Table_20_Contents"/>
          </table:table-cell>
        </table:table-row>
      </table:table>
      <text:p text:style-name="P5"/>
      <text:p text:style-name="Text_20_body"/>
      <text:h text:style-name="Heading_20_3" text:outline-level="3"><text:bookmark-start text:name="__RefHeading__17639_1782085564"/>Bestellung/Verwaltung Konfiguration<text:bookmark-end text:name="__RefHeading__17639_1782085564"/></text:h>
      <text:p text:style-name="Text_20_body">nur Setup</text:p>
      <text:p text:style-name="Text_20_body">Mit diesen Einstellungen kann die Anzeige des Tracking geändert werden.</text:p>
      <text:p text:style-name="P26">Beispiel:</text:p>
      <text:h text:style-name="Preformatted_20_Text" text:outline-level="5">plugin.tt_products.tracking {</text:h>
      <text:p text:style-name="P4"><text:s text:c="3"/>fields = uid,name,tracking_code,amount,status,status_log,bill_no</text:p>
      <text:p text:style-name="P4">}</text:p>
      <text:p text:style-name="Table_20_Contents_2f_PRE"/>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Table_20_Heading">Eigenschaft:</text:p>
            </table:table-cell>
            <table:table-cell table:style-name="Tableau18.B1" office:value-type="string">
              <text:p text:style-name="Table_20_Heading">Datentyp</text:p>
            </table:table-cell>
            <table:table-cell table:style-name="Tableau18.A1" office:value-type="string">
              <text:p text:style-name="Table_20_Heading">Beschreibung:</text:p>
            </table:table-cell>
            <table:table-cell table:style-name="Tableau18.D1" office:value-type="string">
              <text:p text:style-name="Table_20_Heading">Voreinstellung:</text:p>
            </table:table-cell>
          </table:table-row>
        </table:table-header-rows>
        <table:table-row>
          <table:table-cell table:style-name="Tableau18.A2" office:value-type="string">
            <text:p text:style-name="P2">fields</text:p>
          </table:table-cell>
          <table:table-cell table:style-name="Tableau18.B2" office:value-type="string">
            <text:p text:style-name="Table_20_Contents">string</text:p>
          </table:table-cell>
          <table:table-cell table:style-name="Tableau18.C2" office:value-type="string">
            <text:p text:style-name="Table_20_Contents">Damit werden die Felder der Tabelle sys_products_orders festgelegt, die in der Auswahlbox der Bestellungen angezeigt werden.</text:p>
          </table:table-cell>
          <table:table-cell table:style-name="Tableau18.D2" office:value-type="string">
            <text:p text:style-name="Table_20_Contents"/>
          </table:table-cell>
        </table:table-row>
        <table:table-row>
          <table:table-cell table:style-name="Tableau18.A3" office:value-type="string">
            <text:p text:style-name="P2">recordLine</text:p>
          </table:table-cell>
          <table:table-cell table:style-name="Tableau18.B2" office:value-type="string">
            <text:p text:style-name="Table_20_Contents">string</text:p>
          </table:table-cell>
          <table:table-cell table:style-name="Tableau18.C3" office:value-type="string">
            <text:p text:style-name="Table_20_Contents">Vollständige HTML Zeile für den Optionen Tag der Bestellungen in der Select-Box.</text:p>
            <text:p text:style-name="Table_20_Contents"/>
            <text:p text:style-name="P26">Beispiel:</text:p>
            <text:h text:style-name="Preformatted_20_Text" text:outline-level="5">plugin.tt_products.tracking {</text:h>
            <text:p text:style-name="P4"><text:s text:c="3"/>recordLine = ###ORDER_UID### (###ORDER_BILL_NO###): ###ORDER_NAME### (###ORDER_AMOUNT### ###CUR_SYM###) / ###ORDER_STATUS###) ###ORDER_CRDATE### ###LAST_ORDER_TYPE### ###LAST_ORDER_COUNT###</text:p>
            <text:p text:style-name="P4">}</text:p>
          </table:table-cell>
          <table:table-cell table:style-name="Tableau18.D2" office:value-type="string">
            <text:p text:style-name="Table_20_Contents"/>
          </table:table-cell>
        </table:table-row>
        <table:table-row>
          <table:table-cell table:style-name="Tableau18.A4" office:value-type="string">
            <text:p text:style-name="P2">recordType</text:p>
          </table:table-cell>
          <table:table-cell table:style-name="Tableau18.B2" office:value-type="string">
            <text:p text:style-name="Table_20_Contents">string</text:p>
          </table:table-cell>
          <table:table-cell table:style-name="Tableau18.C4" office:value-type="string">
            <text:p text:style-name="Table_20_Contents">Typ der HTML Auswahlbox für die Bestellungen:</text:p>
            <text:p text:style-name="Table_20_Contents"/>
            <text:list text:style-name="L9">
              <text:list-item>
                <text:p text:style-name="P92">select</text:p>
              </text:list-item>
              <text:list-item>
                <text:p text:style-name="P92">radio</text:p>
              </text:list-item>
              <text:list-item>
                <text:p text:style-name="P92">checkbox</text:p>
              </text:list-item>
            </text:list>
          </table:table-cell>
          <table:table-cell table:style-name="Tableau18.D2" office:value-type="string">
            <text:p text:style-name="Table_20_Contents"/>
          </table:table-cell>
        </table:table-row>
        <table:table-row>
          <table:table-cell table:style-name="Tableau18.A5" office:value-type="string">
            <text:p text:style-name="P2">recordBox</text:p>
          </table:table-cell>
          <table:table-cell table:style-name="Tableau18.B2" office:value-type="string">
            <text:p text:style-name="Table_20_Contents">-&gt;stdWrap</text:p>
          </table:table-cell>
          <table:table-cell table:style-name="Tableau18.C5" office:value-type="string">
            <text:p text:style-name="Table_20_Contents">Box, welche die Bestellzeilen umgibt.</text:p>
            <text:p text:style-name="Table_20_Contents"/>
            <text:p text:style-name="P21">Beispiel:</text:p>
            <text:h text:style-name="Preformatted_20_Text" text:outline-level="5">plugin.tt_products.tracking {</text:h>
            <text:p text:style-name="Table_20_Contents_2f_PRE"><text:span text:style-name="T2"><text:s text:c="3"/>recordBox.wrap = </text:span><text:span text:style-name="T29">&lt;table id="thetable" cellspacing="0"&gt;&lt;tbody&gt;</text:span></text:p>
            <text:p text:style-name="P65"><text:s/>| &lt;/tbody&gt;&lt;/table&gt;</text:p>
            <text:p text:style-name="P4">}</text:p>
          </table:table-cell>
          <table:table-cell table:style-name="Tableau18.D2" office:value-type="string">
            <text:p text:style-name="Table_20_Contents"/>
          </table:table-cell>
        </table:table-row>
        <table:table-row>
          <table:table-cell table:style-name="Tableau18.A6" office:value-type="string">
            <text:p text:style-name="P2">sql.where</text:p>
          </table:table-cell>
          <table:table-cell table:style-name="Tableau18.B2" office:value-type="string">
            <text:p text:style-name="Table_20_Contents">string</text:p>
          </table:table-cell>
          <table:table-cell table:style-name="Tableau18.C6" office:value-type="string">
            <text:p text:style-name="Table_20_Contents">SQL Where Bedingung für die Auswahlbox der Bestellungen. Die Bedingung für die versteckten und gelöschten Dateien wird automatisch angehängt.</text:p>
            <text:p text:style-name="Table_20_Contents"/>
            <text:p text:style-name="P21">Beispiel:</text:p>
            <text:h text:style-name="Preformatted_20_Text" text:outline-level="5">plugin.tt_products.tracking {</text:h>
            <text:p text:style-name="Table_20_Contents_2f_PRE"><text:span text:style-name="T2"><text:s text:c="3"/>sql.where = </text:span><text:span text:style-name="T30">status!=0 AND status&lt;100</text:span></text:p>
            <text:p text:style-name="P4">}</text:p>
          </table:table-cell>
          <table:table-cell table:style-name="Tableau18.D2" office:value-type="string">
            <text:p text:style-name="Table_20_Contents"/>
          </table:table-cell>
        </table:table-row>
        <text:soft-page-break/>
        <table:table-row>
          <table:table-cell table:style-name="Tableau18.A7" office:value-type="string">
            <text:p text:style-name="P2">sql.orderBy</text:p>
          </table:table-cell>
          <table:table-cell table:style-name="Tableau18.B2" office:value-type="string">
            <text:p text:style-name="Table_20_Contents">string</text:p>
          </table:table-cell>
          <table:table-cell table:style-name="Tableau18.C7" office:value-type="string">
            <text:p text:style-name="Table_20_Contents">SQL Sortierung für die Auswahlbox der Bestellungen.</text:p>
            <text:p text:style-name="Table_20_Contents"/>
            <text:p text:style-name="P21">Beispiel:</text:p>
            <text:h text:style-name="Preformatted_20_Text" text:outline-level="5">plugin.tt_products.tracking {</text:h>
            <text:p text:style-name="Table_20_Contents_2f_PRE"><text:span text:style-name="T2"><text:s text:c="3"/>sql.orderBy = </text:span><text:span text:style-name="T30">crdate</text:span></text:p>
            <text:p text:style-name="P4">}</text:p>
          </table:table-cell>
          <table:table-cell table:style-name="Tableau18.D2" office:value-type="string">
            <text:p text:style-name="Table_20_Contents"/>
          </table:table-cell>
        </table:table-row>
      </table:table>
      <text:p text:style-name="P5"/>
      <text:p text:style-name="Text_20_body">view</text:p>
      <text:h text:style-name="Heading_20_3" text:outline-level="3"><text:bookmark-start text:name="__RefHeading__27145_2121584579"/>Fehlerkonfiguration<text:bookmark-end text:name="__RefHeading__27145_2121584579"/></text:h>
      <text:p text:style-name="Text_20_body">Nur Setup. </text:p>
      <text:p text:style-name="Text_20_body">Sie können das Verhalten von tt_products im Fehlerfall steuern. Die Datei pi1/locallang.xml enthält die Namenskürzel der Fehlermeldungen.</text:p>
      <text:h text:style-name="Preformatted_20_Text" text:outline-level="5"/>
      <text:h text:style-name="Preformatted_20_Text" text:outline-level="5">plugin.tt_products.error.wrong_parameter.redirect.pid = 422</text:h>
      <text:h text:style-name="Heading_20_4" text:outline-level="4">allgemei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redirect</text:p>
          </table:table-cell>
          <table:table-cell table:style-name="Table3.B2" office:value-type="string">
            <text:p text:style-name="Table_20_Contents">array</text:p>
          </table:table-cell>
          <table:table-cell table:style-name="Table3.C2" office:value-type="string">
            <text:p text:style-name="Table_20_Contents">pid ... <text:s text:c="2"/>PID der Weiterleitungsseite.</text:p>
          </table:table-cell>
          <table:table-cell table:style-name="Table3.D2" office:value-type="string">
            <text:p text:style-name="Table_20_Contents"/>
          </table:table-cell>
        </table:table-row>
      </table:table>
      <text:h text:style-name="P79" text:outline-level="3"/>
      <text:h text:style-name="Heading_20_2" text:outline-level="2"><text:bookmark-start text:name="__RefHeading__17641_1782085564"/>Bekannte Probleme<text:bookmark-end text:name="__RefHeading__17641_1782085564"/></text:h>
      <text:h text:style-name="P71" text:outline-level="3"><text:bookmark-start text:name="__RefHeading__17643_1782085564"/>Prüfliste:<text:bookmark-end text:name="__RefHeading__17643_1782085564"/></text:h>
      <text:list text:style-name="L20">
        <text:list-item>
          <text:p text:style-name="P110">füge unter 'Template' – Static (aus Extensions) die statische Template Datei 'Shop System' ein.</text:p>
        </text:list-item>
        <text:list-item>
          <text:p text:style-name="P110"><text:span text:style-name="T4">niemals</text:span> das 'plugin.tt_producs [DEPRECATED]' im Setup verwenden</text:p>
        </text:list-item>
        <text:list-item>
          <text:p text:style-name="P110">setze 'auf Lager' für alle Produkte und Artikel auf einen Wert größer 0</text:p>
        </text:list-item>
        <text:list-item>
          <text:p text:style-name="P110">verwende keine TYPO3-Einstellungen zur Mehrsprachigkeit oder lege Einträge in den Tabellen 'Produkte – alternative Sprache' an.</text:p>
        </text:list-item>
        <text:list-item>
          <text:p text:style-name="P110">die Shop Template Datei muss gefunden werden</text:p>
        </text:list-item>
        <text:list-item>
          <text:p text:style-name="P110">ein Fehler im Shop erzeugt einen Eintrag in der PHP error_log Datei (im Install Tool und php.ini aktivierbar)</text:p>
        </text:list-item>
        <text:list-item>
          <text:p text:style-name="P110">der TYPO3 Cache ist vorher gelöscht worden</text:p>
        </text:list-item>
        <text:list-item>
          <text:p text:style-name="P110">der <text:a xlink:type="simple" xlink:href="http://support.mozilla.com/en-US/kb/How%20to%20clear%20the%20cache" text:style-name="Internet_20_link" text:visited-style-name="Visited_20_Internet_20_Link">Firefox Cache</text:a> ist vorher gelöscht worden</text:p>
        </text:list-item>
        <text:list-item>
          <text:p text:style-name="P110">setze pid_list und recursive im TypoScript Setup. Setze andernfalls den Ausgangspunkt und Rekursiv im Plugin, damit alle Seiten des Shops erfaßt werden.</text:p>
        </text:list-item>
      </text:list>
      <text:h text:style-name="Heading_20_3" text:outline-level="3"><text:bookmark-start text:name="__RefHeading__17645_1782085564"/>Allgemein:<text:bookmark-end text:name="__RefHeading__17645_1782085564"/></text:h>
      <text:list text:style-name="L21">
        <text:list-item>
          <text:p text:style-name="P112">Wenn Sie über den Extension Manager ein Update von einer vorher installierten älteren Version von tt_products machen, und wenn Sie vorher nicht die Table Library 'table' und FEBE Library 'fh_library' installiert haben, dann wird das ganze TYPO3 CMS unbenutzbar und Sie erhalten die folgende Fehlermeldung <text:line-break/><text:line-break/><text:span text:style-name="T4">TYPO3 Fatal Error: Extension key "table" was NOT loaded! (t3lib_extMgm::extPath)<text:line-break/><text:line-break/></text:span>Schritte zur Reparatur des TYPO3 CMS:</text:p>
        </text:list-item>
      </text:list>
      <text:h text:style-name="Preformatted_20_Text" text:outline-level="5"><text:tab/>1. Editieren Sie die Datei typo3conf/localconf.php</text:h>
      <text:h text:style-name="Preformatted_20_Text" text:outline-level="5"><text:tab/>2. Löschen Sie den Eintrag ',tt_products'</text:h>
      <text:h text:style-name="Preformatted_20_Text" text:outline-level="5"><text:tab/>3. Löschen Sie die temp_CACHED_ Dateien aus typo3conf</text:h>
      <text:h text:style-name="P75" text:outline-level="5"><text:tab/>4. Klicken Sie auf Neuladen im Internet Browser</text:h>
      <text:list text:style-name="L22">
        <text:list-item>
          <text:p text:style-name="P82">Verwenden Sie immer die Versionen der Table Library und fh_library, wie in tt_products im Extension Manager angegeben.</text:p>
        </text:list-item>
        <text:list-item>
          <text:p text:style-name="P82">Bitte sehen Sie auf die Webseite <text:a xlink:type="simple" xlink:href="http://wiki.typo3.org/index.php/Ext_tt_products" text:style-name="Internet_20_link" text:visited-style-name="Visited_20_Internet_20_Link">http://wiki.typo3.org/index.php/Ext_tt_products</text:a> .<text:line-break/>Oder schauen Sie auf <text:a xlink:type="simple" xlink:href="http://jambage.com/" text:style-name="Internet_20_link" text:visited-style-name="Visited_20_Internet_20_Link">http://jambage.com</text:a> nach.</text:p>
        </text:list-item>
        <text:list-item>
          <text:p text:style-name="P82">.htaccess muß richtig konfiguriert werden, sonst läuft tt_products nicht wie erwartet, weil das Plugin sonst nicht alle benötigten Skripte finden kann.</text:p>
        </text:list-item>
        <text:list-item>
          <text:p text:style-name="P82"><text:span text:style-name="T4">Falscher Parameter, GET/POST var 'tt_products[product]' wurde nicht angegeben oder kein Produkt mit uid = 0 gefunden.<text:line-break/><text:line-break/></text:span><text:span text:style-name="T5">Sie müssen die Einstellungen für PIDitemDisplay vornehmen, damit der Shop weiß, wie der Linkparameter 'tt_products[product]' auf die Einzelansicht erzeugt werden muß.</text:span></text:p>
        </text:list-item>
        <text:list-item>
          <text:p text:style-name="P82"><text:span text:style-name="T4">Achtung Massen-Abmahnungen!<text:line-break/>Rechtliches</text:span>: <text:a xlink:type="simple" xlink:href="http://www.wettbewerbszentrale.de/media/getlivedoc.aspx?id=567" text:style-name="Internet_20_link" text:visited-style-name="Visited_20_Internet_20_Link"><text:span text:style-name="T5">http://www.wettbewerbszentrale.de/media/getlivedoc.aspx?id=567</text:span></text:a><text:line-break/>Fehler im Online-Handel: <text:a xlink:type="simple" xlink:href="http://www.wettbewerbszentrale.de/media/getlivedoc.aspx?id=568" text:style-name="Internet_20_link" text:visited-style-name="Visited_20_Internet_20_Link">http://www.wettbewerbszentrale.de/media/getlivedoc.aspx?id=568<text:line-break/></text:a>Beim Versand ins Ausland müssen Sie auch die Gesetze aller Länder genauestens beachten, in die Sie Waren versenden. Damit ersparen Sie sich sehr hohe Kosten verursacht durch saublöde Abmahnungen eines Anwalts, der auch mehrere Filialen gleichzeitig vertreten könnte, womit sich solche Abmahnungen für einen einzigen Fall sogar multiplizieren könnten. Außerdem könnte für jedes betroffene und falsch ausgezeichnete Produkt eine eigene Abmahnung verschickt werden, also eine weitere Multiplikation der Fälle durch den gegnerischen Anwalt vorgenommen werden. Im Internet bestimmt der Abmahner den Gerichtsort danach, wo er bisher von den Gerichten die höchsten fiktiven Schadenssummen zugesprochen erhalten hat.</text:p>
        </text:list-item>
        <text:list-item>
          <text:p text:style-name="P111">Das Plugin zeigt eine leere Seite<text:line-break/>Siehe die Prüfliste oben.</text:p>
        </text:list-item>
        <text:list-item>
          <text:p text:style-name="P103">Setzen sie den Hook $GLOBALS['TYPO3_CONF_VARS']['EXTCONF']['tt_products']['extendingTCA'] damit das $TCA Ihrer Extension eingebunden wird. Denn sonst werden die Marker Ihrer Felder nicht ersetzt. Vergewissern Sie sich, dass Ihre Erweiterung vor tt_products installiert wird. Andernfalls ändern Sie die Reihenfolge in der Variable $TYPO3_CONF_VARS['EXT']['extList'].</text:p>
        </text:list-item>
      </text:list>
      <text:h text:style-name="Heading_20_2" text:outline-level="2"><text:bookmark-start text:name="__RefHeading__17647_1782085564"/>To-Do Liste<text:bookmark-end text:name="__RefHeading__17647_1782085564"/></text:h>
      <text:list text:style-name="L23">
        <text:list-item>
          <text:p text:style-name="P113">Wunschliste: <text:a xlink:type="simple" xlink:href="http://wiki.typo3.org/index.php/Ext_tt_products#Wishlist" text:style-name="Internet_20_link" text:visited-style-name="Visited_20_Internet_20_Link">http://wiki.typo3.org/index.php/Ext_tt_products#Wishlist</text:a></text:p>
        </text:list-item>
        <text:list-item>
          <text:p text:style-name="P113">ab 2.7.0: PHP5 ist Voraussetzung</text:p>
        </text:list-item>
      </text:list>
      <text:h text:style-name="Heading_20_2" text:outline-level="2"><text:bookmark-start text:name="__RefHeading__17649_1782085564"/>Changelog<text:bookmark-end text:name="__RefHeading__17649_1782085564"/></text:h>
      <text:p text:style-name="Text_20_body">siehe auch Datei tt_products/ChangeLog </text:p>
      <text:list text:style-name="L24">
        <text:list-item>
          <text:p text:style-name="P114">26.03.2005 Einbringen des Codes von Klaus Zierer (zk_products), mehrspaltige Listenansicht, Rechnung, Lieferschein und spezielle Preisberechnungen von Franz Holzinger</text:p>
        </text:list-item>
        <text:list-item>
          <text:p text:style-name="P114"><text:span text:style-name="T27">06.05.2005 zweiter Preis und Preis für Zubehör von </text:span><text:span text:style-name="T28">Jens Schmietendorf, Beispiel Template von </text:span><text:a xlink:type="simple" xlink:href="http://bananaguard.de/" text:style-name="Internet_20_link" text:visited-style-name="Visited_20_Internet_20_Link"><text:span text:style-name="T28">http://bananaguard.de</text:span></text:a><text:span text:style-name="T26"> , zk_products 1.3.2 von Klaus Zierer, MWSt von Franz Holzinger</text:span> </text:p>
        </text:list-item>
        <text:list-item>
          <text:p text:style-name="P114">23.06.2005 products_mail.inc gelöscht, Beispiel Template von Franz Holzinger </text:p>
        </text:list-item>
        <text:list-item>
          <text:p text:style-name="P114">26.07.2005 Anzeige der Bestellungen, Gutscheinpunkte System und Freundschaftswerbung von Bert Hiddink </text:p>
        </text:list-item>
        <text:list-item>
          <text:p text:style-name="P114">03.08.2005 Anmerkungen aus dem zk_products Forum, PIDtracking </text:p>
        </text:list-item>
        <text:list-item>
          <text:p text:style-name="P114">11.09.2005 Geschenk Gutscheine -14.09.2005 Flexforms statt CODEs </text:p>
        </text:list-item>
        <text:list-item>
          <text:p text:style-name="P114">05.10.2005 Ergänzungen von Andrea Herzog-Kienast (--&gt; Übersetzer für das französische Manual gesucht) </text:p>
        </text:list-item>
        <text:list-item>
          <text:p text:style-name="P114">13.10.2005 Gutscheinpunkte und Freundschaftswerbung </text:p>
        </text:list-item>
        <text:list-item>
          <text:p text:style-name="P114">28.10.2005 Zubehör ist durch Größe mit Eintrag in der Artikeltabelle ersetzt worden.</text:p>
        </text:list-item>
        <text:list-item>
          <text:p text:style-name="P114">14.07.2006 Ab jetzt muß das statische Shop-Template <text:s/>manuell im Template Setup eingebunden werden.<text:line-break/> CSS-Shop Template von Robert Markula für ein barrierefreies Shop</text:p>
        </text:list-item>
        <text:list-item>
          <text:p text:style-name="P114">06.10.2007 Das CODE Feld wird im Seiten Modul für die ausgewählten Flexforms angezeigt.</text:p>
        </text:list-item>
        <text:list-item>
          <text:p text:style-name="P114">5.11.2013 Features von tt_products 2.10.0 inkl. Edit Varianten als flexible Produkt Eingabefeld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face style:name="Arial Unicode MS" svg:font-family="'Arial Unicode MS'" style:font-pitch="variable"/>
    <style:font-face style:name="Arial1" svg:font-family="Arial" style:font-family-generic="swiss"/>
    <style:font-face style:name="Arial2" svg:font-family="Arial" style:font-adornments="Bold" style:font-family-generic="swiss" style:font-pitch="variable"/>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 svg:font-family="Cumberland"/>
    <style:font-face style:name="Cumberland1" svg:font-family="Cumberland" style:font-family-generic="modern" style:font-pitch="fixed"/>
    <style:font-face style:name="HG Mincho Light J" svg:font-family="'HG Mincho Light J'" style:font-pitch="variable"/>
    <style:font-face style:name="Monospace" svg:font-family="Monospac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mily-generic="swiss"/>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NewRomanPS-BoldItalicMT" svg:font-family="TimesNewRomanPS-BoldItalicMT" style:font-family-generic="roman"/>
    <style:font-face style:name="Verdana" svg:font-family="Verdana" style:font-family-generic="swiss" style:font-pitch="variable"/>
    <style:font-face style:name="Verdana1" svg:font-family="Verdana" style:font-adornments="Regular" style:font-family-generic="swiss" style:font-pitch="variable"/>
    <style:font-face style:name="monospace" svg:font-family="monospac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2"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2"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2"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loext:opacity="100%" style:font-name="Tahoma2"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2"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2"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2"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loext:opacity="100%" style:font-name="Tahoma2"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2"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Tahoma2"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5"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 fo:font-family="'Courier New'" style:font-style-name="Normal" style:font-family-generic="modern" style:font-pitch="fixed" fo:font-size="8pt" style:font-name-asian="Cumberland1" style:font-family-asian="Cumberland" style:font-family-generic-asian="modern" style:font-pitch-asian="fixed" style:font-size-asian="10pt" style:font-name-complex="Cumberland1"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Labels" style:family="graphic">
      <style:graphic-properties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6" draw:name="Shape1" draw:style-name="Mgr1" draw:text-style-name="MP2" svg:x1="-0.003cm" svg:y1="0.778cm" svg:x2="17.684cm" svg:y2="0.778cm"><text:p/></draw:line><text:span text:style-name="MT1"><text:s/></text:span><text:span text:style-name="MT1"><text:title>EXT: Shop System</text:title></text:span><text:span text:style-name="MT1"><text:s/>- </text:span><text:span text:style-name="MT1"><text:subject>tt_products</text:subject></text:span><text:span text:style-name="MT2"><text:tab/></text:span><text:span text:style-name="MT1"><text:chapter text:display="number" text:outline-level="2"/></text:span><text:span text:style-name="MT1"> </text:span><text:span text:style-name="MT1"><text:chapter text:display="name" text:outline-level="2">Changelog</text:chapter></text:span></text:p>
      </style:header>
      <style:footer>
        <text:p text:style-name="MP3"><text:page-number text:select-page="current">1</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Shop System</dc:title>
    <dc:subject>tt_products</dc:subject>
    <meta:initial-creator>Kasper Skårhøj</meta:initial-creator>
    <meta:creation-date>2002-11-01T00:32:00</meta:creation-date>
    <dc:creator>Franz Holzinger</dc:creator>
    <dc:date>2015-03-04T12:42:08.691355133</dc:date>
    <meta:printed-by>Kasper Skårhøj</meta:printed-by>
    <meta:print-date>2002-12-11T11:38:18</meta:print-date>
    <meta:keyword>forAdmins</meta:keyword>
    <meta:keyword>forIntermediates</meta:keyword>
    <meta:editing-cycles>488</meta:editing-cycles>
    <meta:editing-duration>P4DT16H1M29S</meta:editing-duration>
    <meta:document-statistic meta:table-count="22" meta:image-count="2" meta:object-count="0" meta:page-count="57" meta:paragraph-count="2714" meta:word-count="16935" meta:character-count="127586" meta:non-whitespace-character-count="111633"/>
    <meta:user-defined meta:name="Author">Franz Holzinger</meta:user-defined>
    <meta:user-defined meta:name="Email">franz@ttproducts.de</meta:user-defined>
    <meta:user-defined meta:name="Info 4"/>
    <meta:user-defined meta:name="language (en, de, fr, nl, dk, es, ... )">de</meta:user-defined>
  </office:meta>
</office:document-meta>
</file>