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200000332CBE387EA.png" manifest:media-type="image/png"/>
  <manifest:file-entry manifest:full-path="Pictures/10000001000001C4000002D57327A2C9.png" manifest:media-type="image/png"/>
  <manifest:file-entry manifest:full-path="Pictures/100000000000007B00000022693D9A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Arial" svg:font-family="Arial"/>
    <style:font-face style:name="Arial Unicode MS" svg:font-family="'Arial Unicode MS'"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DejaVu Sans" svg:font-family="'DejaVu Sans'" style:font-adornments="Normal" style:font-family-generic="swiss" style:font-pitch="variable"/>
    <style:font-face style:name="HG Mincho Light J" svg:font-family="'HG Mincho Light J'" style:font-pitch="variable"/>
    <style:font-face style:name="Monospace" svg:font-family="Monospace"/>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horndale" svg:font-family="Thorndale" style:font-family-generic="roman"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3.579cm" style:rel-column-width="13258*"/>
    </style:style>
    <style:style style:name="Tableau1.B" style:family="table-column">
      <style:table-column-properties style:column-width="10.04cm" style:rel-column-width="37194*"/>
    </style:style>
    <style:style style:name="Tableau1.C" style:family="table-column">
      <style:table-column-properties style:column-width="4.071cm" style:rel-column-width="1508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C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C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C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C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C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C29" style:family="table-cell">
      <style:table-cell-properties fo:padding="0.097cm" fo:border-left="0.05pt solid #000000" fo:border-right="0.05pt solid #000000" fo:border-top="none" fo:border-bottom="0.05pt solid #000000"/>
    </style:style>
    <style:style style:name="Tableau1.A30" style:family="table-cell">
      <style:table-cell-properties fo:padding="0.097cm" fo:border-left="0.05pt solid #000000" fo:border-right="none" fo:border-top="none" fo:border-bottom="0.05pt solid #000000"/>
    </style:style>
    <style:style style:name="Tableau1.C30" style:family="table-cell">
      <style:table-cell-properties fo:padding="0.097cm" fo:border-left="0.05pt solid #000000" fo:border-right="0.05pt solid #000000" fo:border-top="none" fo:border-bottom="0.05pt solid #000000"/>
    </style:style>
    <style:style style:name="Tableau1.A31" style:family="table-cell">
      <style:table-cell-properties fo:padding="0.097cm" fo:border-left="0.05pt solid #000000" fo:border-right="none" fo:border-top="none" fo:border-bottom="0.05pt solid #000000"/>
    </style:style>
    <style:style style:name="Tableau1.C31" style:family="table-cell">
      <style:table-cell-properties fo:padding="0.097cm" fo:border-left="0.05pt solid #000000" fo:border-right="0.05pt solid #000000" fo:border-top="none" fo:border-bottom="0.05pt solid #000000"/>
    </style:style>
    <style:style style:name="Tableau8" style:family="table">
      <style:table-properties style:width="17.699cm" table:align="margins"/>
    </style:style>
    <style:style style:name="Tableau8.A" style:family="table-column">
      <style:table-column-properties style:column-width="4.002cm" style:rel-column-width="14822*"/>
    </style:style>
    <style:style style:name="Tableau8.B" style:family="table-column">
      <style:table-column-properties style:column-width="2cm" style:rel-column-width="7407*"/>
    </style:style>
    <style:style style:name="Tableau8.C" style:family="table-column">
      <style:table-column-properties style:column-width="7.779cm" style:rel-column-width="28802*"/>
    </style:style>
    <style:style style:name="Tableau8.D" style:family="table-column">
      <style:table-column-properties style:column-width="3.918cm" style:rel-column-width="14504*"/>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2" style:family="table">
      <style:table-properties style:width="17.692cm" fo:margin-left="0cm" fo:margin-right="0.007cm" fo:break-before="auto" fo:break-after="auto" table:align="margins"/>
    </style:style>
    <style:style style:name="Tableau2.A" style:family="table-column">
      <style:table-column-properties style:column-width="4.579cm" style:rel-column-width="16963*"/>
    </style:style>
    <style:style style:name="Tableau2.B" style:family="table-column">
      <style:table-column-properties style:column-width="13.113cm" style:rel-column-width="48572*"/>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692cm" fo:margin-left="0cm" fo:margin-right="0.007cm" fo:break-before="auto" fo:break-after="auto" table:align="margins"/>
    </style:style>
    <style:style style:name="Tableau3.A" style:family="table-column">
      <style:table-column-properties style:column-width="3.182cm" style:rel-column-width="11788*"/>
    </style:style>
    <style:style style:name="Tableau3.B" style:family="table-column">
      <style:table-column-properties style:column-width="2.514cm" style:rel-column-width="9311*"/>
    </style:style>
    <style:style style:name="Tableau3.C" style:family="table-column">
      <style:table-column-properties style:column-width="3.478cm" style:rel-column-width="12886*"/>
    </style:style>
    <style:style style:name="Tableau3.D" style:family="table-column">
      <style:table-column-properties style:column-width="6.029cm" style:rel-column-width="22335*"/>
    </style:style>
    <style:style style:name="Tableau3.E" style:family="table-column">
      <style:table-column-properties style:column-width="2.487cm" style:rel-column-width="921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style:vertical-align="top"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style:vertical-align="top"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E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none" fo:border-top="none" fo:border-bottom="0.05pt solid #000000"/>
    </style:style>
    <style:style style:name="Tableau3.D9" style:family="table-cell">
      <style:table-cell-properties fo:padding="0.097cm" fo:border-left="0.05pt solid #000000" fo:border-right="none" fo:border-top="none" fo:border-bottom="0.05pt solid #000000"/>
    </style:style>
    <style:style style:name="Tableau3.E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none" fo:border-top="none" fo:border-bottom="0.05pt solid #000000"/>
    </style:style>
    <style:style style:name="Tableau3.E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none" fo:border-top="none" fo:border-bottom="0.05pt solid #000000"/>
    </style:style>
    <style:style style:name="Tableau3.D11" style:family="table-cell">
      <style:table-cell-properties fo:padding="0.097cm" fo:border-left="0.05pt solid #000000" fo:border-right="none" fo:border-top="none" fo:border-bottom="0.05pt solid #000000"/>
    </style:style>
    <style:style style:name="Tableau3.E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none" fo:border-top="none" fo:border-bottom="0.05pt solid #000000"/>
    </style:style>
    <style:style style:name="Tableau3.E12" style:family="table-cell">
      <style:table-cell-properties fo:padding="0.097cm" fo:border-left="0.05pt solid #000000" fo:border-right="0.05pt solid #000000" fo:border-top="none" fo:border-bottom="0.05pt solid #000000"/>
    </style:style>
    <style:style style:name="Tableau3.A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none" fo:border-top="none" fo:border-bottom="0.05pt solid #000000"/>
    </style:style>
    <style:style style:name="Tableau3.D13" style:family="table-cell">
      <style:table-cell-properties fo:padding="0.097cm" fo:border-left="0.05pt solid #000000" fo:border-right="none" fo:border-top="none" fo:border-bottom="0.05pt solid #000000"/>
    </style:style>
    <style:style style:name="Tableau3.E13" style:family="table-cell">
      <style:table-cell-properties fo:padding="0.097cm" fo:border-left="0.05pt solid #000000" fo:border-right="0.05pt solid #000000" fo:border-top="none" fo:border-bottom="0.05pt solid #000000"/>
    </style:style>
    <style:style style:name="Tableau3.A14" style:family="table-cell">
      <style:table-cell-properties fo:padding="0.097cm" fo:border-left="0.05pt solid #000000" fo:border-right="none" fo:border-top="none" fo:border-bottom="0.05pt solid #000000"/>
    </style:style>
    <style:style style:name="Tableau3.C14" style:family="table-cell">
      <style:table-cell-properties fo:padding="0.097cm" fo:border-left="0.05pt solid #000000" fo:border-right="none" fo:border-top="none" fo:border-bottom="0.05pt solid #000000"/>
    </style:style>
    <style:style style:name="Tableau3.D14" style:family="table-cell">
      <style:table-cell-properties fo:padding="0.097cm" fo:border-left="0.05pt solid #000000" fo:border-right="none" fo:border-top="none" fo:border-bottom="0.05pt solid #000000"/>
    </style:style>
    <style:style style:name="Tableau3.E14" style:family="table-cell">
      <style:table-cell-properties fo:padding="0.097cm" fo:border-left="0.05pt solid #000000" fo:border-right="0.05pt solid #000000" fo:border-top="none" fo:border-bottom="0.05pt solid #000000"/>
    </style:style>
    <style:style style:name="Tableau3.A15" style:family="table-cell">
      <style:table-cell-properties fo:padding="0.097cm" fo:border-left="0.05pt solid #000000" fo:border-right="none" fo:border-top="none" fo:border-bottom="0.05pt solid #000000"/>
    </style:style>
    <style:style style:name="Tableau3.C15" style:family="table-cell">
      <style:table-cell-properties fo:padding="0.097cm" fo:border-left="0.05pt solid #000000" fo:border-right="none" fo:border-top="none" fo:border-bottom="0.05pt solid #000000"/>
    </style:style>
    <style:style style:name="Tableau3.E15" style:family="table-cell">
      <style:table-cell-properties fo:padding="0.097cm" fo:border-left="0.05pt solid #000000" fo:border-right="0.05pt solid #000000" fo:border-top="none" fo:border-bottom="0.05pt solid #000000"/>
    </style:style>
    <style:style style:name="Tableau3.A16" style:family="table-cell">
      <style:table-cell-properties fo:padding="0.097cm" fo:border-left="0.05pt solid #000000" fo:border-right="none" fo:border-top="none" fo:border-bottom="0.05pt solid #000000"/>
    </style:style>
    <style:style style:name="Tableau3.C16" style:family="table-cell">
      <style:table-cell-properties fo:padding="0.097cm" fo:border-left="0.05pt solid #000000" fo:border-right="none" fo:border-top="none" fo:border-bottom="0.05pt solid #000000"/>
    </style:style>
    <style:style style:name="Tableau3.E16" style:family="table-cell">
      <style:table-cell-properties fo:padding="0.097cm" fo:border-left="0.05pt solid #000000" fo:border-right="0.05pt solid #000000" fo:border-top="none" fo:border-bottom="0.05pt solid #000000"/>
    </style:style>
    <style:style style:name="Tableau3.A17" style:family="table-cell">
      <style:table-cell-properties fo:padding="0.097cm" fo:border-left="0.05pt solid #000000" fo:border-right="none" fo:border-top="none" fo:border-bottom="0.05pt solid #000000"/>
    </style:style>
    <style:style style:name="Tableau3.C17" style:family="table-cell">
      <style:table-cell-properties fo:padding="0.097cm" fo:border-left="0.05pt solid #000000" fo:border-right="none" fo:border-top="none" fo:border-bottom="0.05pt solid #000000"/>
    </style:style>
    <style:style style:name="Tableau3.E17" style:family="table-cell">
      <style:table-cell-properties fo:padding="0.097cm" fo:border-left="0.05pt solid #000000" fo:border-right="0.05pt solid #000000" fo:border-top="none" fo:border-bottom="0.05pt solid #000000"/>
    </style:style>
    <style:style style:name="Tableau3.A18" style:family="table-cell">
      <style:table-cell-properties fo:padding="0.097cm" fo:border-left="0.05pt solid #000000" fo:border-right="none" fo:border-top="none" fo:border-bottom="0.05pt solid #000000"/>
    </style:style>
    <style:style style:name="Tableau3.C18" style:family="table-cell">
      <style:table-cell-properties fo:padding="0.097cm" fo:border-left="0.05pt solid #000000" fo:border-right="none" fo:border-top="none" fo:border-bottom="0.05pt solid #000000"/>
    </style:style>
    <style:style style:name="Tableau3.E18" style:family="table-cell">
      <style:table-cell-properties fo:padding="0.097cm" fo:border-left="0.05pt solid #000000" fo:border-right="0.05pt solid #000000" fo:border-top="none" fo:border-bottom="0.05pt solid #000000"/>
    </style:style>
    <style:style style:name="Tableau3.A19" style:family="table-cell">
      <style:table-cell-properties fo:padding="0.097cm" fo:border-left="0.05pt solid #000000" fo:border-right="none" fo:border-top="none" fo:border-bottom="0.05pt solid #000000"/>
    </style:style>
    <style:style style:name="Tableau3.C19" style:family="table-cell">
      <style:table-cell-properties fo:padding="0.097cm" fo:border-left="0.05pt solid #000000" fo:border-right="none" fo:border-top="none" fo:border-bottom="0.05pt solid #000000"/>
    </style:style>
    <style:style style:name="Tableau3.E19" style:family="table-cell">
      <style:table-cell-properties fo:padding="0.097cm" fo:border-left="0.05pt solid #000000" fo:border-right="0.05pt solid #000000" fo:border-top="none" fo:border-bottom="0.05pt solid #000000"/>
    </style:style>
    <style:style style:name="Tableau3.A20" style:family="table-cell">
      <style:table-cell-properties fo:padding="0.097cm" fo:border-left="0.05pt solid #000000" fo:border-right="none" fo:border-top="none" fo:border-bottom="0.05pt solid #000000"/>
    </style:style>
    <style:style style:name="Tableau3.C20" style:family="table-cell">
      <style:table-cell-properties fo:padding="0.097cm" fo:border-left="0.05pt solid #000000" fo:border-right="none" fo:border-top="none" fo:border-bottom="0.05pt solid #000000"/>
    </style:style>
    <style:style style:name="Tableau3.E20" style:family="table-cell">
      <style:table-cell-properties fo:padding="0.097cm" fo:border-left="0.05pt solid #000000" fo:border-right="0.05pt solid #000000" fo:border-top="none" fo:border-bottom="0.05pt solid #000000"/>
    </style:style>
    <style:style style:name="Tableau3.A21" style:family="table-cell">
      <style:table-cell-properties fo:padding="0.097cm" fo:border-left="0.05pt solid #000000" fo:border-right="none" fo:border-top="none" fo:border-bottom="0.05pt solid #000000"/>
    </style:style>
    <style:style style:name="Tableau3.C21" style:family="table-cell">
      <style:table-cell-properties fo:padding="0.097cm" fo:border-left="0.05pt solid #000000" fo:border-right="none" fo:border-top="none" fo:border-bottom="0.05pt solid #000000"/>
    </style:style>
    <style:style style:name="Tableau3.E21" style:family="table-cell">
      <style:table-cell-properties fo:padding="0.097cm" fo:border-left="0.05pt solid #000000" fo:border-right="0.05pt solid #000000" fo:border-top="none" fo:border-bottom="0.05pt solid #000000"/>
    </style:style>
    <style:style style:name="Tableau3.A22" style:family="table-cell">
      <style:table-cell-properties fo:padding="0.097cm" fo:border-left="0.05pt solid #000000" fo:border-right="none" fo:border-top="none" fo:border-bottom="0.05pt solid #000000"/>
    </style:style>
    <style:style style:name="Tableau3.C22" style:family="table-cell">
      <style:table-cell-properties fo:padding="0.097cm" fo:border-left="0.05pt solid #000000" fo:border-right="none" fo:border-top="none" fo:border-bottom="0.05pt solid #000000"/>
    </style:style>
    <style:style style:name="Tableau3.E22" style:family="table-cell">
      <style:table-cell-properties fo:padding="0.097cm" fo:border-left="0.05pt solid #000000" fo:border-right="0.05pt solid #000000" fo:border-top="none" fo:border-bottom="0.05pt solid #000000"/>
    </style:style>
    <style:style style:name="Tableau3.A23" style:family="table-cell">
      <style:table-cell-properties fo:padding="0.097cm" fo:border-left="0.05pt solid #000000" fo:border-right="none" fo:border-top="none" fo:border-bottom="0.05pt solid #000000"/>
    </style:style>
    <style:style style:name="Tableau3.C23" style:family="table-cell">
      <style:table-cell-properties fo:padding="0.097cm" fo:border-left="0.05pt solid #000000" fo:border-right="none" fo:border-top="none" fo:border-bottom="0.05pt solid #000000"/>
    </style:style>
    <style:style style:name="Tableau3.E23" style:family="table-cell">
      <style:table-cell-properties fo:padding="0.097cm" fo:border-left="0.05pt solid #000000" fo:border-right="0.05pt solid #000000" fo:border-top="none" fo:border-bottom="0.05pt solid #000000"/>
    </style:style>
    <style:style style:name="Tableau3.A24" style:family="table-cell">
      <style:table-cell-properties fo:padding="0.097cm" fo:border-left="0.05pt solid #000000" fo:border-right="none" fo:border-top="none" fo:border-bottom="0.05pt solid #000000"/>
    </style:style>
    <style:style style:name="Tableau3.C24" style:family="table-cell">
      <style:table-cell-properties fo:padding="0.097cm" fo:border-left="0.05pt solid #000000" fo:border-right="none" fo:border-top="none" fo:border-bottom="0.05pt solid #000000"/>
    </style:style>
    <style:style style:name="Tableau3.E24" style:family="table-cell">
      <style:table-cell-properties fo:padding="0.097cm" fo:border-left="0.05pt solid #000000" fo:border-right="0.05pt solid #000000" fo:border-top="none" fo:border-bottom="0.05pt solid #000000"/>
    </style:style>
    <style:style style:name="Tableau3.A25" style:family="table-cell">
      <style:table-cell-properties fo:padding="0.097cm" fo:border-left="0.05pt solid #000000" fo:border-right="none" fo:border-top="none" fo:border-bottom="0.05pt solid #000000"/>
    </style:style>
    <style:style style:name="Tableau3.C25" style:family="table-cell">
      <style:table-cell-properties fo:padding="0.097cm" fo:border-left="0.05pt solid #000000" fo:border-right="none" fo:border-top="none" fo:border-bottom="0.05pt solid #000000"/>
    </style:style>
    <style:style style:name="Tableau3.E25" style:family="table-cell">
      <style:table-cell-properties fo:padding="0.097cm" fo:border-left="0.05pt solid #000000" fo:border-right="0.05pt solid #000000" fo:border-top="none" fo:border-bottom="0.05pt solid #000000"/>
    </style:style>
    <style:style style:name="Tableau3.A26" style:family="table-cell">
      <style:table-cell-properties fo:padding="0.097cm" fo:border-left="0.05pt solid #000000" fo:border-right="none" fo:border-top="none" fo:border-bottom="0.05pt solid #000000"/>
    </style:style>
    <style:style style:name="Tableau3.C26" style:family="table-cell">
      <style:table-cell-properties fo:padding="0.097cm" fo:border-left="0.05pt solid #000000" fo:border-right="none" fo:border-top="none" fo:border-bottom="0.05pt solid #000000"/>
    </style:style>
    <style:style style:name="Tableau3.E26" style:family="table-cell">
      <style:table-cell-properties fo:padding="0.097cm" fo:border-left="0.05pt solid #000000" fo:border-right="0.05pt solid #000000" fo:border-top="none" fo:border-bottom="0.05pt solid #000000"/>
    </style:style>
    <style:style style:name="Tableau3.A27" style:family="table-cell">
      <style:table-cell-properties fo:padding="0.097cm" fo:border-left="0.05pt solid #000000" fo:border-right="none" fo:border-top="none" fo:border-bottom="0.05pt solid #000000"/>
    </style:style>
    <style:style style:name="Tableau3.C27" style:family="table-cell">
      <style:table-cell-properties fo:padding="0.097cm" fo:border-left="0.05pt solid #000000" fo:border-right="none" fo:border-top="none" fo:border-bottom="0.05pt solid #000000"/>
    </style:style>
    <style:style style:name="Tableau3.E27" style:family="table-cell">
      <style:table-cell-properties fo:padding="0.097cm" fo:border-left="0.05pt solid #000000" fo:border-right="0.05pt solid #000000" fo:border-top="none" fo:border-bottom="0.05pt solid #000000"/>
    </style:style>
    <style:style style:name="Tableau3.A28" style:family="table-cell">
      <style:table-cell-properties fo:padding="0.097cm" fo:border-left="0.05pt solid #000000" fo:border-right="none" fo:border-top="none" fo:border-bottom="0.05pt solid #000000"/>
    </style:style>
    <style:style style:name="Tableau3.C28" style:family="table-cell">
      <style:table-cell-properties fo:padding="0.097cm" fo:border-left="0.05pt solid #000000" fo:border-right="none" fo:border-top="none" fo:border-bottom="0.05pt solid #000000"/>
    </style:style>
    <style:style style:name="Tableau3.E28" style:family="table-cell">
      <style:table-cell-properties fo:padding="0.097cm" fo:border-left="0.05pt solid #000000" fo:border-right="0.05pt solid #000000" fo:border-top="none" fo:border-bottom="0.05pt solid #000000"/>
    </style:style>
    <style:style style:name="Tableau3.A29" style:family="table-cell">
      <style:table-cell-properties fo:padding="0.097cm" fo:border-left="0.05pt solid #000000" fo:border-right="none" fo:border-top="none" fo:border-bottom="0.05pt solid #000000"/>
    </style:style>
    <style:style style:name="Tableau3.C29" style:family="table-cell">
      <style:table-cell-properties fo:padding="0.097cm" fo:border-left="0.05pt solid #000000" fo:border-right="none" fo:border-top="none" fo:border-bottom="0.05pt solid #000000"/>
    </style:style>
    <style:style style:name="Tableau3.E29" style:family="table-cell">
      <style:table-cell-properties fo:padding="0.097cm" fo:border-left="0.05pt solid #000000" fo:border-right="0.05pt solid #000000" fo:border-top="none" fo:border-bottom="0.05pt solid #000000"/>
    </style:style>
    <style:style style:name="Tableau3.A30" style:family="table-cell">
      <style:table-cell-properties fo:padding="0.097cm" fo:border-left="0.05pt solid #000000" fo:border-right="none" fo:border-top="none" fo:border-bottom="0.05pt solid #000000"/>
    </style:style>
    <style:style style:name="Tableau3.C30" style:family="table-cell">
      <style:table-cell-properties fo:padding="0.097cm" fo:border-left="0.05pt solid #000000" fo:border-right="none" fo:border-top="none" fo:border-bottom="0.05pt solid #000000"/>
    </style:style>
    <style:style style:name="Tableau3.E30" style:family="table-cell">
      <style:table-cell-properties fo:padding="0.097cm" fo:border-left="0.05pt solid #000000" fo:border-right="0.05pt solid #000000" fo:border-top="none" fo:border-bottom="0.05pt solid #000000"/>
    </style:style>
    <style:style style:name="Tableau3.A31" style:family="table-cell">
      <style:table-cell-properties fo:padding="0.097cm" fo:border-left="0.05pt solid #000000" fo:border-right="none" fo:border-top="none" fo:border-bottom="0.05pt solid #000000"/>
    </style:style>
    <style:style style:name="Tableau3.C31" style:family="table-cell">
      <style:table-cell-properties fo:padding="0.097cm" fo:border-left="0.05pt solid #000000" fo:border-right="none" fo:border-top="none" fo:border-bottom="0.05pt solid #000000"/>
    </style:style>
    <style:style style:name="Tableau3.E31" style:family="table-cell">
      <style:table-cell-properties fo:padding="0.097cm" fo:border-left="0.05pt solid #000000" fo:border-right="0.05pt solid #000000" fo:border-top="none" fo:border-bottom="0.05pt solid #000000"/>
    </style:style>
    <style:style style:name="Tableau3.A32" style:family="table-cell">
      <style:table-cell-properties fo:padding="0.097cm" fo:border-left="0.05pt solid #000000" fo:border-right="none" fo:border-top="none" fo:border-bottom="0.05pt solid #000000"/>
    </style:style>
    <style:style style:name="Tableau3.C32" style:family="table-cell">
      <style:table-cell-properties fo:padding="0.097cm" fo:border-left="0.05pt solid #000000" fo:border-right="none" fo:border-top="none" fo:border-bottom="0.05pt solid #000000"/>
    </style:style>
    <style:style style:name="Tableau3.E32" style:family="table-cell">
      <style:table-cell-properties fo:padding="0.097cm" fo:border-left="0.05pt solid #000000" fo:border-right="0.05pt solid #000000" fo:border-top="none" fo:border-bottom="0.05pt solid #000000"/>
    </style:style>
    <style:style style:name="Tableau3.A33" style:family="table-cell">
      <style:table-cell-properties fo:padding="0.097cm" fo:border-left="0.05pt solid #000000" fo:border-right="none" fo:border-top="none" fo:border-bottom="0.05pt solid #000000"/>
    </style:style>
    <style:style style:name="Tableau3.C33" style:family="table-cell">
      <style:table-cell-properties fo:padding="0.097cm" fo:border-left="0.05pt solid #000000" fo:border-right="none" fo:border-top="none" fo:border-bottom="0.05pt solid #000000"/>
    </style:style>
    <style:style style:name="Tableau3.E33" style:family="table-cell">
      <style:table-cell-properties fo:padding="0.097cm" fo:border-left="0.05pt solid #000000" fo:border-right="0.05pt solid #000000" fo:border-top="none" fo:border-bottom="0.05pt solid #000000"/>
    </style:style>
    <style:style style:name="Tableau3.A34" style:family="table-cell">
      <style:table-cell-properties fo:padding="0.097cm" fo:border-left="0.05pt solid #000000" fo:border-right="none" fo:border-top="none" fo:border-bottom="0.05pt solid #000000"/>
    </style:style>
    <style:style style:name="Tableau3.C34" style:family="table-cell">
      <style:table-cell-properties fo:padding="0.097cm" fo:border-left="0.05pt solid #000000" fo:border-right="none" fo:border-top="none" fo:border-bottom="0.05pt solid #000000"/>
    </style:style>
    <style:style style:name="Tableau3.E34" style:family="table-cell">
      <style:table-cell-properties fo:padding="0.097cm" fo:border-left="0.05pt solid #000000" fo:border-right="0.05pt solid #000000" fo:border-top="none" fo:border-bottom="0.05pt solid #000000"/>
    </style:style>
    <style:style style:name="Tableau3.A35" style:family="table-cell">
      <style:table-cell-properties fo:padding="0.097cm" fo:border-left="0.05pt solid #000000" fo:border-right="none" fo:border-top="none" fo:border-bottom="0.05pt solid #000000"/>
    </style:style>
    <style:style style:name="Tableau3.C35" style:family="table-cell">
      <style:table-cell-properties fo:padding="0.097cm" fo:border-left="0.05pt solid #000000" fo:border-right="none" fo:border-top="none" fo:border-bottom="0.05pt solid #000000"/>
    </style:style>
    <style:style style:name="Tableau3.E35" style:family="table-cell">
      <style:table-cell-properties fo:padding="0.097cm" fo:border-left="0.05pt solid #000000" fo:border-right="0.05pt solid #000000" fo:border-top="none" fo:border-bottom="0.05pt solid #000000"/>
    </style:style>
    <style:style style:name="Tableau3.A36" style:family="table-cell">
      <style:table-cell-properties fo:padding="0.097cm" fo:border-left="0.05pt solid #000000" fo:border-right="none" fo:border-top="none" fo:border-bottom="0.05pt solid #000000"/>
    </style:style>
    <style:style style:name="Tableau3.C36" style:family="table-cell">
      <style:table-cell-properties fo:padding="0.097cm" fo:border-left="0.05pt solid #000000" fo:border-right="none" fo:border-top="none" fo:border-bottom="0.05pt solid #000000"/>
    </style:style>
    <style:style style:name="Tableau3.E36" style:family="table-cell">
      <style:table-cell-properties fo:padding="0.097cm" fo:border-left="0.05pt solid #000000" fo:border-right="0.05pt solid #000000" fo:border-top="none" fo:border-bottom="0.05pt solid #000000"/>
    </style:style>
    <style:style style:name="Tableau3.A37" style:family="table-cell">
      <style:table-cell-properties fo:padding="0.097cm" fo:border-left="0.05pt solid #000000" fo:border-right="none" fo:border-top="none" fo:border-bottom="0.05pt solid #000000"/>
    </style:style>
    <style:style style:name="Tableau3.C37" style:family="table-cell">
      <style:table-cell-properties fo:padding="0.097cm" fo:border-left="0.05pt solid #000000" fo:border-right="none" fo:border-top="none" fo:border-bottom="0.05pt solid #000000"/>
    </style:style>
    <style:style style:name="Tableau3.E37" style:family="table-cell">
      <style:table-cell-properties fo:padding="0.097cm" fo:border-left="0.05pt solid #000000" fo:border-right="0.05pt solid #000000" fo:border-top="none" fo:border-bottom="0.05pt solid #000000"/>
    </style:style>
    <style:style style:name="Tableau3.A38" style:family="table-cell">
      <style:table-cell-properties fo:padding="0.097cm" fo:border-left="0.05pt solid #000000" fo:border-right="none" fo:border-top="none" fo:border-bottom="0.05pt solid #000000"/>
    </style:style>
    <style:style style:name="Tableau3.C38" style:family="table-cell">
      <style:table-cell-properties fo:padding="0.097cm" fo:border-left="0.05pt solid #000000" fo:border-right="none" fo:border-top="none" fo:border-bottom="0.05pt solid #000000"/>
    </style:style>
    <style:style style:name="Tableau3.E38" style:family="table-cell">
      <style:table-cell-properties fo:padding="0.097cm" fo:border-left="0.05pt solid #000000" fo:border-right="0.05pt solid #000000" fo:border-top="none" fo:border-bottom="0.05pt solid #000000"/>
    </style:style>
    <style:style style:name="Tableau3.A39" style:family="table-cell">
      <style:table-cell-properties fo:padding="0.097cm" fo:border-left="0.05pt solid #000000" fo:border-right="none" fo:border-top="none" fo:border-bottom="0.05pt solid #000000"/>
    </style:style>
    <style:style style:name="Tableau3.C39" style:family="table-cell">
      <style:table-cell-properties fo:padding="0.097cm" fo:border-left="0.05pt solid #000000" fo:border-right="none" fo:border-top="none" fo:border-bottom="0.05pt solid #000000"/>
    </style:style>
    <style:style style:name="Tableau3.E39" style:family="table-cell">
      <style:table-cell-properties fo:padding="0.097cm" fo:border-left="0.05pt solid #000000" fo:border-right="0.05pt solid #000000" fo:border-top="none" fo:border-bottom="0.05pt solid #000000"/>
    </style:style>
    <style:style style:name="Tableau3.A40" style:family="table-cell">
      <style:table-cell-properties fo:padding="0.097cm" fo:border-left="0.05pt solid #000000" fo:border-right="none" fo:border-top="none" fo:border-bottom="0.05pt solid #000000"/>
    </style:style>
    <style:style style:name="Tableau3.C40" style:family="table-cell">
      <style:table-cell-properties fo:padding="0.097cm" fo:border-left="0.05pt solid #000000" fo:border-right="none" fo:border-top="none" fo:border-bottom="0.05pt solid #000000"/>
    </style:style>
    <style:style style:name="Tableau3.E40" style:family="table-cell">
      <style:table-cell-properties fo:padding="0.097cm" fo:border-left="0.05pt solid #000000" fo:border-right="0.05pt solid #000000" fo:border-top="none" fo:border-bottom="0.05pt solid #000000"/>
    </style:style>
    <style:style style:name="Tableau3.A41" style:family="table-cell">
      <style:table-cell-properties fo:padding="0.097cm" fo:border-left="0.05pt solid #000000" fo:border-right="none" fo:border-top="none" fo:border-bottom="0.05pt solid #000000"/>
    </style:style>
    <style:style style:name="Tableau3.C41" style:family="table-cell">
      <style:table-cell-properties fo:padding="0.097cm" fo:border-left="0.05pt solid #000000" fo:border-right="none" fo:border-top="none" fo:border-bottom="0.05pt solid #000000"/>
    </style:style>
    <style:style style:name="Tableau3.E41" style:family="table-cell">
      <style:table-cell-properties fo:padding="0.097cm" fo:border-left="0.05pt solid #000000" fo:border-right="0.05pt solid #000000" fo:border-top="none" fo:border-bottom="0.05pt solid #000000"/>
    </style:style>
    <style:style style:name="Tableau3.A42" style:family="table-cell">
      <style:table-cell-properties fo:padding="0.097cm" fo:border-left="0.05pt solid #000000" fo:border-right="none" fo:border-top="none" fo:border-bottom="0.05pt solid #000000"/>
    </style:style>
    <style:style style:name="Tableau3.C42" style:family="table-cell">
      <style:table-cell-properties fo:padding="0.097cm" fo:border-left="0.05pt solid #000000" fo:border-right="none" fo:border-top="none" fo:border-bottom="0.05pt solid #000000"/>
    </style:style>
    <style:style style:name="Tableau3.E42" style:family="table-cell">
      <style:table-cell-properties fo:padding="0.097cm" fo:border-left="0.05pt solid #000000" fo:border-right="0.05pt solid #000000" fo:border-top="none" fo:border-bottom="0.05pt solid #000000"/>
    </style:style>
    <style:style style:name="Tableau3.A43" style:family="table-cell">
      <style:table-cell-properties fo:padding="0.097cm" fo:border-left="0.05pt solid #000000" fo:border-right="none" fo:border-top="none" fo:border-bottom="0.05pt solid #000000"/>
    </style:style>
    <style:style style:name="Tableau3.C43" style:family="table-cell">
      <style:table-cell-properties fo:padding="0.097cm" fo:border-left="0.05pt solid #000000" fo:border-right="none" fo:border-top="none" fo:border-bottom="0.05pt solid #000000"/>
    </style:style>
    <style:style style:name="Tableau3.E43" style:family="table-cell">
      <style:table-cell-properties fo:padding="0.097cm" fo:border-left="0.05pt solid #000000" fo:border-right="0.05pt solid #000000" fo:border-top="none" fo:border-bottom="0.05pt solid #000000"/>
    </style:style>
    <style:style style:name="Tableau3.A44" style:family="table-cell">
      <style:table-cell-properties fo:padding="0.097cm" fo:border-left="0.05pt solid #000000" fo:border-right="none" fo:border-top="none" fo:border-bottom="0.05pt solid #000000"/>
    </style:style>
    <style:style style:name="Tableau3.C44" style:family="table-cell">
      <style:table-cell-properties fo:padding="0.097cm" fo:border-left="0.05pt solid #000000" fo:border-right="none" fo:border-top="none" fo:border-bottom="0.05pt solid #000000"/>
    </style:style>
    <style:style style:name="Tableau3.E44" style:family="table-cell">
      <style:table-cell-properties fo:padding="0.097cm" fo:border-left="0.05pt solid #000000" fo:border-right="0.05pt solid #000000" fo:border-top="none" fo:border-bottom="0.05pt solid #000000"/>
    </style:style>
    <style:style style:name="Tableau3.A45" style:family="table-cell">
      <style:table-cell-properties fo:padding="0.097cm" fo:border-left="0.05pt solid #000000" fo:border-right="none" fo:border-top="none" fo:border-bottom="0.05pt solid #000000"/>
    </style:style>
    <style:style style:name="Tableau3.C45" style:family="table-cell">
      <style:table-cell-properties fo:padding="0.097cm" fo:border-left="0.05pt solid #000000" fo:border-right="none" fo:border-top="none" fo:border-bottom="0.05pt solid #000000"/>
    </style:style>
    <style:style style:name="Tableau3.E45" style:family="table-cell">
      <style:table-cell-properties fo:padding="0.097cm" fo:border-left="0.05pt solid #000000" fo:border-right="0.05pt solid #000000" fo:border-top="none" fo:border-bottom="0.05pt solid #000000"/>
    </style:style>
    <style:style style:name="Tableau3.A46" style:family="table-cell">
      <style:table-cell-properties fo:padding="0.097cm" fo:border-left="0.05pt solid #000000" fo:border-right="none" fo:border-top="none" fo:border-bottom="0.05pt solid #000000"/>
    </style:style>
    <style:style style:name="Tableau3.C46" style:family="table-cell">
      <style:table-cell-properties fo:padding="0.097cm" fo:border-left="0.05pt solid #000000" fo:border-right="none" fo:border-top="none" fo:border-bottom="0.05pt solid #000000"/>
    </style:style>
    <style:style style:name="Tableau3.E46" style:family="table-cell">
      <style:table-cell-properties fo:padding="0.097cm" fo:border-left="0.05pt solid #000000" fo:border-right="0.05pt solid #000000" fo:border-top="none" fo:border-bottom="0.05pt solid #000000"/>
    </style:style>
    <style:style style:name="Tableau3.A47" style:family="table-cell">
      <style:table-cell-properties fo:padding="0.097cm" fo:border-left="0.05pt solid #000000" fo:border-right="none" fo:border-top="none" fo:border-bottom="0.05pt solid #000000"/>
    </style:style>
    <style:style style:name="Tableau3.C47" style:family="table-cell">
      <style:table-cell-properties fo:padding="0.097cm" fo:border-left="0.05pt solid #000000" fo:border-right="none" fo:border-top="none" fo:border-bottom="0.05pt solid #000000"/>
    </style:style>
    <style:style style:name="Tableau3.E47" style:family="table-cell">
      <style:table-cell-properties fo:padding="0.097cm" fo:border-left="0.05pt solid #000000" fo:border-right="0.05pt solid #000000" fo:border-top="none" fo:border-bottom="0.05pt solid #000000"/>
    </style:style>
    <style:style style:name="Tableau3.A48" style:family="table-cell">
      <style:table-cell-properties fo:padding="0.097cm" fo:border-left="0.05pt solid #000000" fo:border-right="none" fo:border-top="none" fo:border-bottom="0.05pt solid #000000"/>
    </style:style>
    <style:style style:name="Tableau3.C48" style:family="table-cell">
      <style:table-cell-properties fo:padding="0.097cm" fo:border-left="0.05pt solid #000000" fo:border-right="none" fo:border-top="none" fo:border-bottom="0.05pt solid #000000"/>
    </style:style>
    <style:style style:name="Tableau3.E48" style:family="table-cell">
      <style:table-cell-properties fo:padding="0.097cm" fo:border-left="0.05pt solid #000000" fo:border-right="0.05pt solid #000000" fo:border-top="none" fo:border-bottom="0.05pt solid #000000"/>
    </style:style>
    <style:style style:name="Tableau3.A49" style:family="table-cell">
      <style:table-cell-properties fo:padding="0.097cm" fo:border-left="0.05pt solid #000000" fo:border-right="none" fo:border-top="none" fo:border-bottom="0.05pt solid #000000"/>
    </style:style>
    <style:style style:name="Tableau3.C49" style:family="table-cell">
      <style:table-cell-properties fo:padding="0.097cm" fo:border-left="0.05pt solid #000000" fo:border-right="none" fo:border-top="none" fo:border-bottom="0.05pt solid #000000"/>
    </style:style>
    <style:style style:name="Tableau3.E49" style:family="table-cell">
      <style:table-cell-properties fo:padding="0.097cm" fo:border-left="0.05pt solid #000000" fo:border-right="0.05pt solid #000000" fo:border-top="none" fo:border-bottom="0.05pt solid #000000"/>
    </style:style>
    <style:style style:name="Tableau3.A50" style:family="table-cell">
      <style:table-cell-properties fo:padding="0.097cm" fo:border-left="0.05pt solid #000000" fo:border-right="none" fo:border-top="none" fo:border-bottom="0.05pt solid #000000"/>
    </style:style>
    <style:style style:name="Tableau3.C50" style:family="table-cell">
      <style:table-cell-properties fo:padding="0.097cm" fo:border-left="0.05pt solid #000000" fo:border-right="none" fo:border-top="none" fo:border-bottom="0.05pt solid #000000"/>
    </style:style>
    <style:style style:name="Tableau3.E50" style:family="table-cell">
      <style:table-cell-properties fo:padding="0.097cm" fo:border-left="0.05pt solid #000000" fo:border-right="0.05pt solid #000000" fo:border-top="none" fo:border-bottom="0.05pt solid #000000"/>
    </style:style>
    <style:style style:name="Tableau3.A51" style:family="table-cell">
      <style:table-cell-properties fo:padding="0.097cm" fo:border-left="0.05pt solid #000000" fo:border-right="none" fo:border-top="none" fo:border-bottom="0.05pt solid #000000"/>
    </style:style>
    <style:style style:name="Tableau3.C51" style:family="table-cell">
      <style:table-cell-properties fo:padding="0.097cm" fo:border-left="0.05pt solid #000000" fo:border-right="none" fo:border-top="none" fo:border-bottom="0.05pt solid #000000"/>
    </style:style>
    <style:style style:name="Tableau3.E51" style:family="table-cell">
      <style:table-cell-properties fo:padding="0.097cm" fo:border-left="0.05pt solid #000000" fo:border-right="0.05pt solid #000000" fo:border-top="none" fo:border-bottom="0.05pt solid #000000"/>
    </style:style>
    <style:style style:name="Tableau3.A52" style:family="table-cell">
      <style:table-cell-properties fo:padding="0.097cm" fo:border-left="0.05pt solid #000000" fo:border-right="none" fo:border-top="none" fo:border-bottom="0.05pt solid #000000"/>
    </style:style>
    <style:style style:name="Tableau3.C52" style:family="table-cell">
      <style:table-cell-properties fo:padding="0.097cm" fo:border-left="0.05pt solid #000000" fo:border-right="none" fo:border-top="none" fo:border-bottom="0.05pt solid #000000"/>
    </style:style>
    <style:style style:name="Tableau3.E52" style:family="table-cell">
      <style:table-cell-properties fo:padding="0.097cm" fo:border-left="0.05pt solid #000000" fo:border-right="0.05pt solid #000000" fo:border-top="none" fo:border-bottom="0.05pt solid #000000"/>
    </style:style>
    <style:style style:name="Tableau3.A53" style:family="table-cell">
      <style:table-cell-properties fo:padding="0.097cm" fo:border-left="0.05pt solid #000000" fo:border-right="none" fo:border-top="none" fo:border-bottom="0.05pt solid #000000"/>
    </style:style>
    <style:style style:name="Tableau3.C53" style:family="table-cell">
      <style:table-cell-properties fo:padding="0.097cm" fo:border-left="0.05pt solid #000000" fo:border-right="none" fo:border-top="none" fo:border-bottom="0.05pt solid #000000"/>
    </style:style>
    <style:style style:name="Tableau3.E53" style:family="table-cell">
      <style:table-cell-properties fo:padding="0.097cm" fo:border-left="0.05pt solid #000000" fo:border-right="0.05pt solid #000000" fo:border-top="none" fo:border-bottom="0.05pt solid #000000"/>
    </style:style>
    <style:style style:name="Tableau3.A54" style:family="table-cell">
      <style:table-cell-properties fo:padding="0.097cm" fo:border-left="0.05pt solid #000000" fo:border-right="none" fo:border-top="none" fo:border-bottom="0.05pt solid #000000"/>
    </style:style>
    <style:style style:name="Tableau3.C54" style:family="table-cell">
      <style:table-cell-properties fo:padding="0.097cm" fo:border-left="0.05pt solid #000000" fo:border-right="none" fo:border-top="none" fo:border-bottom="0.05pt solid #000000"/>
    </style:style>
    <style:style style:name="Tableau3.E54" style:family="table-cell">
      <style:table-cell-properties fo:padding="0.097cm" fo:border-left="0.05pt solid #000000" fo:border-right="0.05pt solid #000000" fo:border-top="none" fo:border-bottom="0.05pt solid #000000"/>
    </style:style>
    <style:style style:name="Tableau3.A55" style:family="table-cell">
      <style:table-cell-properties fo:padding="0.097cm" fo:border-left="0.05pt solid #000000" fo:border-right="none" fo:border-top="none" fo:border-bottom="0.05pt solid #000000"/>
    </style:style>
    <style:style style:name="Tableau3.C55" style:family="table-cell">
      <style:table-cell-properties fo:padding="0.097cm" fo:border-left="0.05pt solid #000000" fo:border-right="none" fo:border-top="none" fo:border-bottom="0.05pt solid #000000"/>
    </style:style>
    <style:style style:name="Tableau3.E55" style:family="table-cell">
      <style:table-cell-properties fo:padding="0.097cm" fo:border-left="0.05pt solid #000000" fo:border-right="0.05pt solid #000000" fo:border-top="none" fo:border-bottom="0.05pt solid #000000"/>
    </style:style>
    <style:style style:name="Tableau3.A56" style:family="table-cell">
      <style:table-cell-properties fo:padding="0.097cm" fo:border-left="0.05pt solid #000000" fo:border-right="none" fo:border-top="none" fo:border-bottom="0.05pt solid #000000"/>
    </style:style>
    <style:style style:name="Tableau3.C56" style:family="table-cell">
      <style:table-cell-properties fo:padding="0.097cm" fo:border-left="0.05pt solid #000000" fo:border-right="none" fo:border-top="none" fo:border-bottom="0.05pt solid #000000"/>
    </style:style>
    <style:style style:name="Tableau3.E56" style:family="table-cell">
      <style:table-cell-properties fo:padding="0.097cm" fo:border-left="0.05pt solid #000000" fo:border-right="0.05pt solid #000000" fo:border-top="none" fo:border-bottom="0.05pt solid #000000"/>
    </style:style>
    <style:style style:name="Tableau3.A57" style:family="table-cell">
      <style:table-cell-properties fo:padding="0.097cm" fo:border-left="0.05pt solid #000000" fo:border-right="none" fo:border-top="none" fo:border-bottom="0.05pt solid #000000"/>
    </style:style>
    <style:style style:name="Tableau3.C57" style:family="table-cell">
      <style:table-cell-properties fo:padding="0.097cm" fo:border-left="0.05pt solid #000000" fo:border-right="none" fo:border-top="none" fo:border-bottom="0.05pt solid #000000"/>
    </style:style>
    <style:style style:name="Tableau3.E57" style:family="table-cell">
      <style:table-cell-properties fo:padding="0.097cm" fo:border-left="0.05pt solid #000000" fo:border-right="0.05pt solid #000000" fo:border-top="none" fo:border-bottom="0.05pt solid #000000"/>
    </style:style>
    <style:style style:name="Tableau3.A58" style:family="table-cell">
      <style:table-cell-properties fo:padding="0.097cm" fo:border-left="0.05pt solid #000000" fo:border-right="none" fo:border-top="none" fo:border-bottom="0.05pt solid #000000"/>
    </style:style>
    <style:style style:name="Tableau3.C58" style:family="table-cell">
      <style:table-cell-properties fo:padding="0.097cm" fo:border-left="0.05pt solid #000000" fo:border-right="none" fo:border-top="none" fo:border-bottom="0.05pt solid #000000"/>
    </style:style>
    <style:style style:name="Tableau3.E58" style:family="table-cell">
      <style:table-cell-properties fo:padding="0.097cm" fo:border-left="0.05pt solid #000000" fo:border-right="0.05pt solid #000000" fo:border-top="none" fo:border-bottom="0.05pt solid #000000"/>
    </style:style>
    <style:style style:name="Tableau3.A59" style:family="table-cell">
      <style:table-cell-properties fo:padding="0.097cm" fo:border-left="0.05pt solid #000000" fo:border-right="none" fo:border-top="none" fo:border-bottom="0.05pt solid #000000"/>
    </style:style>
    <style:style style:name="Tableau3.C59" style:family="table-cell">
      <style:table-cell-properties fo:padding="0.097cm" fo:border-left="0.05pt solid #000000" fo:border-right="none" fo:border-top="none" fo:border-bottom="0.05pt solid #000000"/>
    </style:style>
    <style:style style:name="Tableau3.E59" style:family="table-cell">
      <style:table-cell-properties fo:padding="0.097cm" fo:border-left="0.05pt solid #000000" fo:border-right="0.05pt solid #000000" fo:border-top="none" fo:border-bottom="0.05pt solid #000000"/>
    </style:style>
    <style:style style:name="Tableau3.A60" style:family="table-cell">
      <style:table-cell-properties fo:padding="0.097cm" fo:border-left="0.05pt solid #000000" fo:border-right="none" fo:border-top="none" fo:border-bottom="0.05pt solid #000000"/>
    </style:style>
    <style:style style:name="Tableau3.C60" style:family="table-cell">
      <style:table-cell-properties fo:padding="0.097cm" fo:border-left="0.05pt solid #000000" fo:border-right="none" fo:border-top="none" fo:border-bottom="0.05pt solid #000000"/>
    </style:style>
    <style:style style:name="Tableau3.E60" style:family="table-cell">
      <style:table-cell-properties fo:padding="0.097cm" fo:border-left="0.05pt solid #000000" fo:border-right="0.05pt solid #000000" fo:border-top="none" fo:border-bottom="0.05pt solid #000000"/>
    </style:style>
    <style:style style:name="Tableau3.A61" style:family="table-cell">
      <style:table-cell-properties fo:padding="0.097cm" fo:border-left="0.05pt solid #000000" fo:border-right="none" fo:border-top="none" fo:border-bottom="0.05pt solid #000000"/>
    </style:style>
    <style:style style:name="Tableau3.C61" style:family="table-cell">
      <style:table-cell-properties fo:padding="0.097cm" fo:border-left="0.05pt solid #000000" fo:border-right="none" fo:border-top="none" fo:border-bottom="0.05pt solid #000000"/>
    </style:style>
    <style:style style:name="Tableau3.E61" style:family="table-cell">
      <style:table-cell-properties fo:padding="0.097cm" fo:border-left="0.05pt solid #000000" fo:border-right="0.05pt solid #000000" fo:border-top="none" fo:border-bottom="0.05pt solid #000000"/>
    </style:style>
    <style:style style:name="Tableau3.A62" style:family="table-cell">
      <style:table-cell-properties fo:padding="0.097cm" fo:border-left="0.05pt solid #000000" fo:border-right="none" fo:border-top="none" fo:border-bottom="0.05pt solid #000000"/>
    </style:style>
    <style:style style:name="Tableau3.C62" style:family="table-cell">
      <style:table-cell-properties fo:padding="0.097cm" fo:border-left="0.05pt solid #000000" fo:border-right="none" fo:border-top="none" fo:border-bottom="0.05pt solid #000000"/>
    </style:style>
    <style:style style:name="Tableau3.E62" style:family="table-cell">
      <style:table-cell-properties fo:padding="0.097cm" fo:border-left="0.05pt solid #000000" fo:border-right="0.05pt solid #000000" fo:border-top="none" fo:border-bottom="0.05pt solid #000000"/>
    </style:style>
    <style:style style:name="Tableau3.A63" style:family="table-cell">
      <style:table-cell-properties fo:padding="0.097cm" fo:border-left="0.05pt solid #000000" fo:border-right="none" fo:border-top="none" fo:border-bottom="0.05pt solid #000000"/>
    </style:style>
    <style:style style:name="Tableau3.C63" style:family="table-cell">
      <style:table-cell-properties fo:padding="0.097cm" fo:border-left="0.05pt solid #000000" fo:border-right="none" fo:border-top="none" fo:border-bottom="0.05pt solid #000000"/>
    </style:style>
    <style:style style:name="Tableau3.E63" style:family="table-cell">
      <style:table-cell-properties fo:padding="0.097cm" fo:border-left="0.05pt solid #000000" fo:border-right="0.05pt solid #000000" fo:border-top="none" fo:border-bottom="0.05pt solid #000000"/>
    </style:style>
    <style:style style:name="Tableau3.A64" style:family="table-cell">
      <style:table-cell-properties fo:padding="0.097cm" fo:border-left="0.05pt solid #000000" fo:border-right="none" fo:border-top="none" fo:border-bottom="0.05pt solid #000000"/>
    </style:style>
    <style:style style:name="Tableau3.C64" style:family="table-cell">
      <style:table-cell-properties fo:padding="0.097cm" fo:border-left="0.05pt solid #000000" fo:border-right="none" fo:border-top="none" fo:border-bottom="0.05pt solid #000000"/>
    </style:style>
    <style:style style:name="Tableau3.E64" style:family="table-cell">
      <style:table-cell-properties fo:padding="0.097cm" fo:border-left="0.05pt solid #000000" fo:border-right="0.05pt solid #000000" fo:border-top="none" fo:border-bottom="0.05pt solid #000000"/>
    </style:style>
    <style:style style:name="Tableau3.A65" style:family="table-cell">
      <style:table-cell-properties fo:padding="0.097cm" fo:border-left="0.05pt solid #000000" fo:border-right="none" fo:border-top="none" fo:border-bottom="0.05pt solid #000000"/>
    </style:style>
    <style:style style:name="Tableau3.C65" style:family="table-cell">
      <style:table-cell-properties fo:padding="0.097cm" fo:border-left="0.05pt solid #000000" fo:border-right="none" fo:border-top="none" fo:border-bottom="0.05pt solid #000000"/>
    </style:style>
    <style:style style:name="Tableau3.E65" style:family="table-cell">
      <style:table-cell-properties fo:padding="0.097cm" fo:border-left="0.05pt solid #000000" fo:border-right="0.05pt solid #000000" fo:border-top="none" fo:border-bottom="0.05pt solid #000000"/>
    </style:style>
    <style:style style:name="Tableau3.A66" style:family="table-cell">
      <style:table-cell-properties fo:padding="0.097cm" fo:border-left="0.05pt solid #000000" fo:border-right="none" fo:border-top="none" fo:border-bottom="0.05pt solid #000000"/>
    </style:style>
    <style:style style:name="Tableau3.C66" style:family="table-cell">
      <style:table-cell-properties fo:padding="0.097cm" fo:border-left="0.05pt solid #000000" fo:border-right="none" fo:border-top="none" fo:border-bottom="0.05pt solid #000000"/>
    </style:style>
    <style:style style:name="Tableau3.E66" style:family="table-cell">
      <style:table-cell-properties fo:padding="0.097cm" fo:border-left="0.05pt solid #000000" fo:border-right="0.05pt solid #000000" fo:border-top="none" fo:border-bottom="0.05pt solid #000000"/>
    </style:style>
    <style:style style:name="Tableau3.A67" style:family="table-cell">
      <style:table-cell-properties fo:padding="0.097cm" fo:border-left="0.05pt solid #000000" fo:border-right="none" fo:border-top="none" fo:border-bottom="0.05pt solid #000000"/>
    </style:style>
    <style:style style:name="Tableau3.C67" style:family="table-cell">
      <style:table-cell-properties fo:padding="0.097cm" fo:border-left="0.05pt solid #000000" fo:border-right="none" fo:border-top="none" fo:border-bottom="0.05pt solid #000000"/>
    </style:style>
    <style:style style:name="Tableau3.E67" style:family="table-cell">
      <style:table-cell-properties fo:padding="0.097cm" fo:border-left="0.05pt solid #000000" fo:border-right="0.05pt solid #000000" fo:border-top="none" fo:border-bottom="0.05pt solid #000000"/>
    </style:style>
    <style:style style:name="Tableau3.A68" style:family="table-cell">
      <style:table-cell-properties fo:padding="0.097cm" fo:border-left="0.05pt solid #000000" fo:border-right="none" fo:border-top="none" fo:border-bottom="0.05pt solid #000000"/>
    </style:style>
    <style:style style:name="Tableau3.C68" style:family="table-cell">
      <style:table-cell-properties fo:padding="0.097cm" fo:border-left="0.05pt solid #000000" fo:border-right="none" fo:border-top="none" fo:border-bottom="0.05pt solid #000000"/>
    </style:style>
    <style:style style:name="Tableau3.E68" style:family="table-cell">
      <style:table-cell-properties fo:padding="0.097cm" fo:border-left="0.05pt solid #000000" fo:border-right="0.05pt solid #000000" fo:border-top="none" fo:border-bottom="0.05pt solid #000000"/>
    </style:style>
    <style:style style:name="Tableau3.A69" style:family="table-cell">
      <style:table-cell-properties fo:padding="0.097cm" fo:border-left="0.05pt solid #000000" fo:border-right="none" fo:border-top="none" fo:border-bottom="0.05pt solid #000000"/>
    </style:style>
    <style:style style:name="Tableau3.C69" style:family="table-cell">
      <style:table-cell-properties fo:padding="0.097cm" fo:border-left="0.05pt solid #000000" fo:border-right="none" fo:border-top="none" fo:border-bottom="0.05pt solid #000000"/>
    </style:style>
    <style:style style:name="Tableau3.E69" style:family="table-cell">
      <style:table-cell-properties fo:padding="0.097cm" fo:border-left="0.05pt solid #000000" fo:border-right="0.05pt solid #000000" fo:border-top="none" fo:border-bottom="0.05pt solid #000000"/>
    </style:style>
    <style:style style:name="Tableau3.A70" style:family="table-cell">
      <style:table-cell-properties fo:padding="0.097cm" fo:border-left="0.05pt solid #000000" fo:border-right="none" fo:border-top="none" fo:border-bottom="0.05pt solid #000000"/>
    </style:style>
    <style:style style:name="Tableau3.C70" style:family="table-cell">
      <style:table-cell-properties fo:padding="0.097cm" fo:border-left="0.05pt solid #000000" fo:border-right="none" fo:border-top="none" fo:border-bottom="0.05pt solid #000000"/>
    </style:style>
    <style:style style:name="Tableau3.E70" style:family="table-cell">
      <style:table-cell-properties fo:padding="0.097cm" fo:border-left="0.05pt solid #000000" fo:border-right="0.05pt solid #000000" fo:border-top="none" fo:border-bottom="0.05pt solid #000000"/>
    </style:style>
    <style:style style:name="Tableau3.A71" style:family="table-cell">
      <style:table-cell-properties fo:padding="0.097cm" fo:border-left="0.05pt solid #000000" fo:border-right="none" fo:border-top="none" fo:border-bottom="0.05pt solid #000000"/>
    </style:style>
    <style:style style:name="Tableau3.C71" style:family="table-cell">
      <style:table-cell-properties fo:padding="0.097cm" fo:border-left="0.05pt solid #000000" fo:border-right="none" fo:border-top="none" fo:border-bottom="0.05pt solid #000000"/>
    </style:style>
    <style:style style:name="Tableau3.E71" style:family="table-cell">
      <style:table-cell-properties fo:padding="0.097cm" fo:border-left="0.05pt solid #000000" fo:border-right="0.05pt solid #000000" fo:border-top="none" fo:border-bottom="0.05pt solid #000000"/>
    </style:style>
    <style:style style:name="Tableau3.A72" style:family="table-cell">
      <style:table-cell-properties fo:padding="0.097cm" fo:border-left="0.05pt solid #000000" fo:border-right="none" fo:border-top="none" fo:border-bottom="0.05pt solid #000000"/>
    </style:style>
    <style:style style:name="Tableau3.C72" style:family="table-cell">
      <style:table-cell-properties fo:padding="0.097cm" fo:border-left="0.05pt solid #000000" fo:border-right="none" fo:border-top="none" fo:border-bottom="0.05pt solid #000000"/>
    </style:style>
    <style:style style:name="Tableau3.E72" style:family="table-cell">
      <style:table-cell-properties fo:padding="0.097cm" fo:border-left="0.05pt solid #000000" fo:border-right="0.05pt solid #000000" fo:border-top="none" fo:border-bottom="0.05pt solid #000000"/>
    </style:style>
    <style:style style:name="Tableau3.A73" style:family="table-cell">
      <style:table-cell-properties fo:padding="0.097cm" fo:border-left="0.05pt solid #000000" fo:border-right="none" fo:border-top="none" fo:border-bottom="0.05pt solid #000000"/>
    </style:style>
    <style:style style:name="Tableau3.C73" style:family="table-cell">
      <style:table-cell-properties fo:padding="0.097cm" fo:border-left="0.05pt solid #000000" fo:border-right="none" fo:border-top="none" fo:border-bottom="0.05pt solid #000000"/>
    </style:style>
    <style:style style:name="Tableau3.E73" style:family="table-cell">
      <style:table-cell-properties fo:padding="0.097cm" fo:border-left="0.05pt solid #000000" fo:border-right="0.05pt solid #000000" fo:border-top="none" fo:border-bottom="0.05pt solid #000000"/>
    </style:style>
    <style:style style:name="Tableau3.A74" style:family="table-cell">
      <style:table-cell-properties fo:padding="0.097cm" fo:border-left="0.05pt solid #000000" fo:border-right="none" fo:border-top="none" fo:border-bottom="0.05pt solid #000000"/>
    </style:style>
    <style:style style:name="Tableau3.C74" style:family="table-cell">
      <style:table-cell-properties fo:padding="0.097cm" fo:border-left="0.05pt solid #000000" fo:border-right="none" fo:border-top="none" fo:border-bottom="0.05pt solid #000000"/>
    </style:style>
    <style:style style:name="Tableau3.E74" style:family="table-cell">
      <style:table-cell-properties fo:padding="0.097cm" fo:border-left="0.05pt solid #000000" fo:border-right="0.05pt solid #000000" fo:border-top="none" fo:border-bottom="0.05pt solid #000000"/>
    </style:style>
    <style:style style:name="Tableau3.A75" style:family="table-cell">
      <style:table-cell-properties fo:padding="0.097cm" fo:border-left="0.05pt solid #000000" fo:border-right="none" fo:border-top="none" fo:border-bottom="0.05pt solid #000000"/>
    </style:style>
    <style:style style:name="Tableau3.C75" style:family="table-cell">
      <style:table-cell-properties fo:padding="0.097cm" fo:border-left="0.05pt solid #000000" fo:border-right="none" fo:border-top="none" fo:border-bottom="0.05pt solid #000000"/>
    </style:style>
    <style:style style:name="Tableau3.E75" style:family="table-cell">
      <style:table-cell-properties fo:padding="0.097cm" fo:border-left="0.05pt solid #000000" fo:border-right="0.05pt solid #000000" fo:border-top="none" fo:border-bottom="0.05pt solid #000000"/>
    </style:style>
    <style:style style:name="Tableau3.A76" style:family="table-cell">
      <style:table-cell-properties fo:padding="0.097cm" fo:border-left="0.05pt solid #000000" fo:border-right="none" fo:border-top="none" fo:border-bottom="0.05pt solid #000000"/>
    </style:style>
    <style:style style:name="Tableau3.C76" style:family="table-cell">
      <style:table-cell-properties fo:padding="0.097cm" fo:border-left="0.05pt solid #000000" fo:border-right="none" fo:border-top="none" fo:border-bottom="0.05pt solid #000000"/>
    </style:style>
    <style:style style:name="Tableau3.E76" style:family="table-cell">
      <style:table-cell-properties fo:padding="0.097cm" fo:border-left="0.05pt solid #000000" fo:border-right="0.05pt solid #000000" fo:border-top="none" fo:border-bottom="0.05pt solid #000000"/>
    </style:style>
    <style:style style:name="Tableau3.A77" style:family="table-cell">
      <style:table-cell-properties fo:padding="0.097cm" fo:border-left="0.05pt solid #000000" fo:border-right="none" fo:border-top="none" fo:border-bottom="0.05pt solid #000000"/>
    </style:style>
    <style:style style:name="Tableau3.C77" style:family="table-cell">
      <style:table-cell-properties fo:padding="0.097cm" fo:border-left="0.05pt solid #000000" fo:border-right="none" fo:border-top="none" fo:border-bottom="0.05pt solid #000000"/>
    </style:style>
    <style:style style:name="Tableau3.E77" style:family="table-cell">
      <style:table-cell-properties fo:padding="0.097cm" fo:border-left="0.05pt solid #000000" fo:border-right="0.05pt solid #000000" fo:border-top="none" fo:border-bottom="0.05pt solid #000000"/>
    </style:style>
    <style:style style:name="Tableau3.A78" style:family="table-cell">
      <style:table-cell-properties fo:padding="0.097cm" fo:border-left="0.05pt solid #000000" fo:border-right="none" fo:border-top="none" fo:border-bottom="0.05pt solid #000000"/>
    </style:style>
    <style:style style:name="Tableau3.C78" style:family="table-cell">
      <style:table-cell-properties fo:padding="0.097cm" fo:border-left="0.05pt solid #000000" fo:border-right="none" fo:border-top="none" fo:border-bottom="0.05pt solid #000000"/>
    </style:style>
    <style:style style:name="Tableau3.E78" style:family="table-cell">
      <style:table-cell-properties fo:padding="0.097cm" fo:border-left="0.05pt solid #000000" fo:border-right="0.05pt solid #000000" fo:border-top="none" fo:border-bottom="0.05pt solid #000000"/>
    </style:style>
    <style:style style:name="Tableau3.A79" style:family="table-cell">
      <style:table-cell-properties fo:padding="0.097cm" fo:border-left="0.05pt solid #000000" fo:border-right="none" fo:border-top="none" fo:border-bottom="0.05pt solid #000000"/>
    </style:style>
    <style:style style:name="Tableau3.C79" style:family="table-cell">
      <style:table-cell-properties fo:padding="0.097cm" fo:border-left="0.05pt solid #000000" fo:border-right="none" fo:border-top="none" fo:border-bottom="0.05pt solid #000000"/>
    </style:style>
    <style:style style:name="Tableau3.E79" style:family="table-cell">
      <style:table-cell-properties fo:padding="0.097cm" fo:border-left="0.05pt solid #000000" fo:border-right="0.05pt solid #000000" fo:border-top="none" fo:border-bottom="0.05pt solid #000000"/>
    </style:style>
    <style:style style:name="Tableau3.A80" style:family="table-cell">
      <style:table-cell-properties fo:padding="0.097cm" fo:border-left="0.05pt solid #000000" fo:border-right="none" fo:border-top="none" fo:border-bottom="0.05pt solid #000000"/>
    </style:style>
    <style:style style:name="Tableau3.C80" style:family="table-cell">
      <style:table-cell-properties fo:padding="0.097cm" fo:border-left="0.05pt solid #000000" fo:border-right="none" fo:border-top="none" fo:border-bottom="0.05pt solid #000000"/>
    </style:style>
    <style:style style:name="Tableau3.E80" style:family="table-cell">
      <style:table-cell-properties fo:padding="0.097cm" fo:border-left="0.05pt solid #000000" fo:border-right="0.05pt solid #000000" fo:border-top="none" fo:border-bottom="0.05pt solid #000000"/>
    </style:style>
    <style:style style:name="Tableau3.A81" style:family="table-cell">
      <style:table-cell-properties fo:padding="0.097cm" fo:border-left="0.05pt solid #000000" fo:border-right="none" fo:border-top="none" fo:border-bottom="0.05pt solid #000000"/>
    </style:style>
    <style:style style:name="Tableau3.C81" style:family="table-cell">
      <style:table-cell-properties fo:padding="0.097cm" fo:border-left="0.05pt solid #000000" fo:border-right="none" fo:border-top="none" fo:border-bottom="0.05pt solid #000000"/>
    </style:style>
    <style:style style:name="Tableau3.E81" style:family="table-cell">
      <style:table-cell-properties fo:padding="0.097cm" fo:border-left="0.05pt solid #000000" fo:border-right="0.05pt solid #000000" fo:border-top="none" fo:border-bottom="0.05pt solid #000000"/>
    </style:style>
    <style:style style:name="Tableau3.A82" style:family="table-cell">
      <style:table-cell-properties fo:padding="0.097cm" fo:border-left="0.05pt solid #000000" fo:border-right="none" fo:border-top="none" fo:border-bottom="0.05pt solid #000000"/>
    </style:style>
    <style:style style:name="Tableau3.C82" style:family="table-cell">
      <style:table-cell-properties fo:padding="0.097cm" fo:border-left="0.05pt solid #000000" fo:border-right="none" fo:border-top="none" fo:border-bottom="0.05pt solid #000000"/>
    </style:style>
    <style:style style:name="Tableau3.E82" style:family="table-cell">
      <style:table-cell-properties fo:padding="0.097cm" fo:border-left="0.05pt solid #000000" fo:border-right="0.05pt solid #000000" fo:border-top="none" fo:border-bottom="0.05pt solid #000000"/>
    </style:style>
    <style:style style:name="Tableau3.A83" style:family="table-cell">
      <style:table-cell-properties fo:padding="0.097cm" fo:border-left="0.05pt solid #000000" fo:border-right="none" fo:border-top="none" fo:border-bottom="0.05pt solid #000000"/>
    </style:style>
    <style:style style:name="Tableau3.C83" style:family="table-cell">
      <style:table-cell-properties fo:padding="0.097cm" fo:border-left="0.05pt solid #000000" fo:border-right="none" fo:border-top="none" fo:border-bottom="0.05pt solid #000000"/>
    </style:style>
    <style:style style:name="Tableau3.E83" style:family="table-cell">
      <style:table-cell-properties fo:padding="0.097cm" fo:border-left="0.05pt solid #000000" fo:border-right="0.05pt solid #000000" fo:border-top="none" fo:border-bottom="0.05pt solid #000000"/>
    </style:style>
    <style:style style:name="Tableau3.A84" style:family="table-cell">
      <style:table-cell-properties fo:padding="0.097cm" fo:border-left="0.05pt solid #000000" fo:border-right="none" fo:border-top="none" fo:border-bottom="0.05pt solid #000000"/>
    </style:style>
    <style:style style:name="Tableau3.C84" style:family="table-cell">
      <style:table-cell-properties fo:padding="0.097cm" fo:border-left="0.05pt solid #000000" fo:border-right="none" fo:border-top="none" fo:border-bottom="0.05pt solid #000000"/>
    </style:style>
    <style:style style:name="Tableau3.E84" style:family="table-cell">
      <style:table-cell-properties fo:padding="0.097cm" fo:border-left="0.05pt solid #000000" fo:border-right="0.05pt solid #000000" fo:border-top="none" fo:border-bottom="0.05pt solid #000000"/>
    </style:style>
    <style:style style:name="Tableau3.A85" style:family="table-cell">
      <style:table-cell-properties fo:padding="0.097cm" fo:border-left="0.05pt solid #000000" fo:border-right="none" fo:border-top="none" fo:border-bottom="0.05pt solid #000000"/>
    </style:style>
    <style:style style:name="Tableau3.C85" style:family="table-cell">
      <style:table-cell-properties fo:padding="0.097cm" fo:border-left="0.05pt solid #000000" fo:border-right="none" fo:border-top="none" fo:border-bottom="0.05pt solid #000000"/>
    </style:style>
    <style:style style:name="Tableau3.E85" style:family="table-cell">
      <style:table-cell-properties fo:padding="0.097cm" fo:border-left="0.05pt solid #000000" fo:border-right="0.05pt solid #000000" fo:border-top="none" fo:border-bottom="0.05pt solid #000000"/>
    </style:style>
    <style:style style:name="Tableau3.A86" style:family="table-cell">
      <style:table-cell-properties fo:padding="0.097cm" fo:border-left="0.05pt solid #000000" fo:border-right="none" fo:border-top="none" fo:border-bottom="0.05pt solid #000000"/>
    </style:style>
    <style:style style:name="Tableau3.C86" style:family="table-cell">
      <style:table-cell-properties fo:padding="0.097cm" fo:border-left="0.05pt solid #000000" fo:border-right="none" fo:border-top="none" fo:border-bottom="0.05pt solid #000000"/>
    </style:style>
    <style:style style:name="Tableau3.E86" style:family="table-cell">
      <style:table-cell-properties fo:padding="0.097cm" fo:border-left="0.05pt solid #000000" fo:border-right="0.05pt solid #000000" fo:border-top="none" fo:border-bottom="0.05pt solid #000000"/>
    </style:style>
    <style:style style:name="Tableau3.A87" style:family="table-cell">
      <style:table-cell-properties fo:padding="0.097cm" fo:border-left="0.05pt solid #000000" fo:border-right="none" fo:border-top="none" fo:border-bottom="0.05pt solid #000000"/>
    </style:style>
    <style:style style:name="Tableau3.C87" style:family="table-cell">
      <style:table-cell-properties fo:padding="0.097cm" fo:border-left="0.05pt solid #000000" fo:border-right="none" fo:border-top="none" fo:border-bottom="0.05pt solid #000000"/>
    </style:style>
    <style:style style:name="Tableau3.E87" style:family="table-cell">
      <style:table-cell-properties fo:padding="0.097cm" fo:border-left="0.05pt solid #000000" fo:border-right="0.05pt solid #000000" fo:border-top="none" fo:border-bottom="0.05pt solid #000000"/>
    </style:style>
    <style:style style:name="Tableau3.A88" style:family="table-cell">
      <style:table-cell-properties fo:padding="0.097cm" fo:border-left="0.05pt solid #000000" fo:border-right="none" fo:border-top="none" fo:border-bottom="0.05pt solid #000000"/>
    </style:style>
    <style:style style:name="Tableau3.C88" style:family="table-cell">
      <style:table-cell-properties fo:padding="0.097cm" fo:border-left="0.05pt solid #000000" fo:border-right="none" fo:border-top="none" fo:border-bottom="0.05pt solid #000000"/>
    </style:style>
    <style:style style:name="Tableau3.E88" style:family="table-cell">
      <style:table-cell-properties fo:padding="0.097cm" fo:border-left="0.05pt solid #000000" fo:border-right="0.05pt solid #000000" fo:border-top="none" fo:border-bottom="0.05pt solid #000000"/>
    </style:style>
    <style:style style:name="Tableau3.A89" style:family="table-cell">
      <style:table-cell-properties fo:padding="0.097cm" fo:border-left="0.05pt solid #000000" fo:border-right="none" fo:border-top="none" fo:border-bottom="0.05pt solid #000000"/>
    </style:style>
    <style:style style:name="Tableau3.C89" style:family="table-cell">
      <style:table-cell-properties fo:padding="0.097cm" fo:border-left="0.05pt solid #000000" fo:border-right="none" fo:border-top="none" fo:border-bottom="0.05pt solid #000000"/>
    </style:style>
    <style:style style:name="Tableau3.E89" style:family="table-cell">
      <style:table-cell-properties fo:padding="0.097cm" fo:border-left="0.05pt solid #000000" fo:border-right="0.05pt solid #000000" fo:border-top="none" fo:border-bottom="0.05pt solid #000000"/>
    </style:style>
    <style:style style:name="Tableau3.A90" style:family="table-cell">
      <style:table-cell-properties fo:padding="0.097cm" fo:border-left="0.05pt solid #000000" fo:border-right="none" fo:border-top="none" fo:border-bottom="0.05pt solid #000000"/>
    </style:style>
    <style:style style:name="Tableau3.C90" style:family="table-cell">
      <style:table-cell-properties fo:padding="0.097cm" fo:border-left="0.05pt solid #000000" fo:border-right="none" fo:border-top="none" fo:border-bottom="0.05pt solid #000000"/>
    </style:style>
    <style:style style:name="Tableau3.E90" style:family="table-cell">
      <style:table-cell-properties fo:padding="0.097cm" fo:border-left="0.05pt solid #000000" fo:border-right="0.05pt solid #000000" fo:border-top="none" fo:border-bottom="0.05pt solid #000000"/>
    </style:style>
    <style:style style:name="Tableau3.A91" style:family="table-cell">
      <style:table-cell-properties fo:padding="0.097cm" fo:border-left="0.05pt solid #000000" fo:border-right="none" fo:border-top="none" fo:border-bottom="0.05pt solid #000000"/>
    </style:style>
    <style:style style:name="Tableau3.C91" style:family="table-cell">
      <style:table-cell-properties fo:padding="0.097cm" fo:border-left="0.05pt solid #000000" fo:border-right="none" fo:border-top="none" fo:border-bottom="0.05pt solid #000000"/>
    </style:style>
    <style:style style:name="Tableau3.E91" style:family="table-cell">
      <style:table-cell-properties fo:padding="0.097cm" fo:border-left="0.05pt solid #000000" fo:border-right="0.05pt solid #000000" fo:border-top="none" fo:border-bottom="0.05pt solid #000000"/>
    </style:style>
    <style:style style:name="Tableau3.A92" style:family="table-cell">
      <style:table-cell-properties fo:padding="0.097cm" fo:border-left="0.05pt solid #000000" fo:border-right="none" fo:border-top="none" fo:border-bottom="0.05pt solid #000000"/>
    </style:style>
    <style:style style:name="Tableau3.C92" style:family="table-cell">
      <style:table-cell-properties fo:padding="0.097cm" fo:border-left="0.05pt solid #000000" fo:border-right="none" fo:border-top="none" fo:border-bottom="0.05pt solid #000000"/>
    </style:style>
    <style:style style:name="Tableau3.E92" style:family="table-cell">
      <style:table-cell-properties fo:padding="0.097cm" fo:border-left="0.05pt solid #000000" fo:border-right="0.05pt solid #000000" fo:border-top="none" fo:border-bottom="0.05pt solid #000000"/>
    </style:style>
    <style:style style:name="Tableau3.A93" style:family="table-cell">
      <style:table-cell-properties fo:padding="0.097cm" fo:border-left="0.05pt solid #000000" fo:border-right="none" fo:border-top="none" fo:border-bottom="0.05pt solid #000000"/>
    </style:style>
    <style:style style:name="Tableau3.C93" style:family="table-cell">
      <style:table-cell-properties fo:padding="0.097cm" fo:border-left="0.05pt solid #000000" fo:border-right="none" fo:border-top="none" fo:border-bottom="0.05pt solid #000000"/>
    </style:style>
    <style:style style:name="Tableau3.E93" style:family="table-cell">
      <style:table-cell-properties fo:padding="0.097cm" fo:border-left="0.05pt solid #000000" fo:border-right="0.05pt solid #000000" fo:border-top="none" fo:border-bottom="0.05pt solid #000000"/>
    </style:style>
    <style:style style:name="Tableau3.A94" style:family="table-cell">
      <style:table-cell-properties fo:padding="0.097cm" fo:border-left="0.05pt solid #000000" fo:border-right="none" fo:border-top="none" fo:border-bottom="0.05pt solid #000000"/>
    </style:style>
    <style:style style:name="Tableau3.C94" style:family="table-cell">
      <style:table-cell-properties fo:padding="0.097cm" fo:border-left="0.05pt solid #000000" fo:border-right="none" fo:border-top="none" fo:border-bottom="0.05pt solid #000000"/>
    </style:style>
    <style:style style:name="Tableau3.E94" style:family="table-cell">
      <style:table-cell-properties fo:padding="0.097cm" fo:border-left="0.05pt solid #000000" fo:border-right="0.05pt solid #000000" fo:border-top="none" fo:border-bottom="0.05pt solid #000000"/>
    </style:style>
    <style:style style:name="Tableau3.A95" style:family="table-cell">
      <style:table-cell-properties fo:padding="0.097cm" fo:border-left="0.05pt solid #000000" fo:border-right="none" fo:border-top="none" fo:border-bottom="0.05pt solid #000000"/>
    </style:style>
    <style:style style:name="Tableau3.C95" style:family="table-cell">
      <style:table-cell-properties fo:padding="0.097cm" fo:border-left="0.05pt solid #000000" fo:border-right="none" fo:border-top="none" fo:border-bottom="0.05pt solid #000000"/>
    </style:style>
    <style:style style:name="Tableau3.E95" style:family="table-cell">
      <style:table-cell-properties fo:padding="0.097cm" fo:border-left="0.05pt solid #000000" fo:border-right="0.05pt solid #000000" fo:border-top="none" fo:border-bottom="0.05pt solid #000000"/>
    </style:style>
    <style:style style:name="Tableau3.A96" style:family="table-cell">
      <style:table-cell-properties fo:padding="0.097cm" fo:border-left="0.05pt solid #000000" fo:border-right="none" fo:border-top="none" fo:border-bottom="0.05pt solid #000000"/>
    </style:style>
    <style:style style:name="Tableau3.C96" style:family="table-cell">
      <style:table-cell-properties fo:padding="0.097cm" fo:border-left="0.05pt solid #000000" fo:border-right="none" fo:border-top="none" fo:border-bottom="0.05pt solid #000000"/>
    </style:style>
    <style:style style:name="Tableau3.E96" style:family="table-cell">
      <style:table-cell-properties fo:padding="0.097cm" fo:border-left="0.05pt solid #000000" fo:border-right="0.05pt solid #000000" fo:border-top="none" fo:border-bottom="0.05pt solid #000000"/>
    </style:style>
    <style:style style:name="Tableau3.A97" style:family="table-cell">
      <style:table-cell-properties fo:padding="0.097cm" fo:border-left="0.05pt solid #000000" fo:border-right="none" fo:border-top="none" fo:border-bottom="0.05pt solid #000000"/>
    </style:style>
    <style:style style:name="Tableau3.C97" style:family="table-cell">
      <style:table-cell-properties fo:padding="0.097cm" fo:border-left="0.05pt solid #000000" fo:border-right="none" fo:border-top="none" fo:border-bottom="0.05pt solid #000000"/>
    </style:style>
    <style:style style:name="Tableau3.E97" style:family="table-cell">
      <style:table-cell-properties fo:padding="0.097cm" fo:border-left="0.05pt solid #000000" fo:border-right="0.05pt solid #000000" fo:border-top="none" fo:border-bottom="0.05pt solid #000000"/>
    </style:style>
    <style:style style:name="Tableau4" style:family="table">
      <style:table-properties style:width="17.648cm" fo:margin-left="0cm" fo:margin-right="0.051cm" fo:break-before="auto" fo:break-after="auto" table:align="margins"/>
    </style:style>
    <style:style style:name="Tableau4.A" style:family="table-column">
      <style:table-column-properties style:column-width="3.182cm" style:rel-column-width="11815*"/>
    </style:style>
    <style:style style:name="Tableau4.B" style:family="table-column">
      <style:table-column-properties style:column-width="2.515cm" style:rel-column-width="9338*"/>
    </style:style>
    <style:style style:name="Tableau4.C" style:family="table-column">
      <style:table-column-properties style:column-width="9.509cm" style:rel-column-width="35310*"/>
    </style:style>
    <style:style style:name="Tableau4.D" style:family="table-column">
      <style:table-column-properties style:column-width="2.443cm" style:rel-column-width="9072*"/>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top"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top"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none" fo:border-top="none" fo:border-bottom="0.05pt solid #000000"/>
    </style:style>
    <style:style style:name="Tableau4.D8" style:family="table-cell">
      <style:table-cell-properties fo:padding="0.097cm" fo:border-left="0.05pt solid #000000" fo:border-right="0.05pt solid #000000"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none" fo:border-top="none" fo:border-bottom="0.05pt solid #000000"/>
    </style:style>
    <style:style style:name="Tableau4.D9" style:family="table-cell">
      <style:table-cell-properties fo:padding="0.097cm" fo:border-left="0.05pt solid #000000" fo:border-right="0.05pt solid #000000" fo:border-top="none" fo:border-bottom="0.05pt solid #000000"/>
    </style:style>
    <style:style style:name="Tableau4.A10" style:family="table-cell">
      <style:table-cell-properties fo:padding="0.097cm" fo:border-left="0.05pt solid #000000" fo:border-right="none" fo:border-top="none" fo:border-bottom="0.05pt solid #000000"/>
    </style:style>
    <style:style style:name="Tableau4.C10" style:family="table-cell">
      <style:table-cell-properties fo:padding="0.097cm" fo:border-left="0.05pt solid #000000" fo:border-right="none" fo:border-top="none" fo:border-bottom="0.05pt solid #000000"/>
    </style:style>
    <style:style style:name="Tableau4.D10" style:family="table-cell">
      <style:table-cell-properties fo:padding="0.097cm" fo:border-left="0.05pt solid #000000" fo:border-right="0.05pt solid #000000" fo:border-top="none" fo:border-bottom="0.05pt solid #000000"/>
    </style:style>
    <style:style style:name="Tableau4.A11" style:family="table-cell">
      <style:table-cell-properties fo:padding="0.097cm" fo:border-left="0.05pt solid #000000" fo:border-right="none" fo:border-top="none" fo:border-bottom="0.05pt solid #000000"/>
    </style:style>
    <style:style style:name="Tableau4.C11" style:family="table-cell">
      <style:table-cell-properties fo:padding="0.097cm" fo:border-left="0.05pt solid #000000" fo:border-right="none" fo:border-top="none" fo:border-bottom="0.05pt solid #000000"/>
    </style:style>
    <style:style style:name="Tableau4.D11" style:family="table-cell">
      <style:table-cell-properties fo:padding="0.097cm" fo:border-left="0.05pt solid #000000" fo:border-right="0.05pt solid #000000" fo:border-top="none" fo:border-bottom="0.05pt solid #000000"/>
    </style:style>
    <style:style style:name="Tableau4.A12" style:family="table-cell">
      <style:table-cell-properties fo:padding="0.097cm" fo:border-left="0.05pt solid #000000" fo:border-right="none" fo:border-top="none" fo:border-bottom="0.05pt solid #000000"/>
    </style:style>
    <style:style style:name="Tableau4.C12" style:family="table-cell">
      <style:table-cell-properties fo:padding="0.097cm" fo:border-left="0.05pt solid #000000" fo:border-right="none" fo:border-top="none" fo:border-bottom="0.05pt solid #000000"/>
    </style:style>
    <style:style style:name="Tableau4.D12" style:family="table-cell">
      <style:table-cell-properties fo:padding="0.097cm" fo:border-left="0.05pt solid #000000" fo:border-right="0.05pt solid #000000" fo:border-top="none" fo:border-bottom="0.05pt solid #000000"/>
    </style:style>
    <style:style style:name="Tableau4.A13" style:family="table-cell">
      <style:table-cell-properties fo:padding="0.097cm" fo:border-left="0.05pt solid #000000" fo:border-right="none" fo:border-top="none" fo:border-bottom="0.05pt solid #000000"/>
    </style:style>
    <style:style style:name="Tableau4.C13" style:family="table-cell">
      <style:table-cell-properties fo:padding="0.097cm" fo:border-left="0.05pt solid #000000" fo:border-right="none" fo:border-top="none" fo:border-bottom="0.05pt solid #000000"/>
    </style:style>
    <style:style style:name="Tableau4.D13" style:family="table-cell">
      <style:table-cell-properties fo:padding="0.097cm" fo:border-left="0.05pt solid #000000" fo:border-right="0.05pt solid #000000" fo:border-top="none" fo:border-bottom="0.05pt solid #000000"/>
    </style:style>
    <style:style style:name="Tableau4.A14" style:family="table-cell">
      <style:table-cell-properties fo:padding="0.097cm" fo:border-left="0.05pt solid #000000" fo:border-right="none" fo:border-top="none" fo:border-bottom="0.05pt solid #000000"/>
    </style:style>
    <style:style style:name="Tableau4.C14" style:family="table-cell">
      <style:table-cell-properties fo:padding="0.097cm" fo:border-left="0.05pt solid #000000" fo:border-right="none" fo:border-top="none" fo:border-bottom="0.05pt solid #000000"/>
    </style:style>
    <style:style style:name="Tableau4.D14" style:family="table-cell">
      <style:table-cell-properties fo:padding="0.097cm" fo:border-left="0.05pt solid #000000" fo:border-right="0.05pt solid #000000" fo:border-top="none" fo:border-bottom="0.05pt solid #000000"/>
    </style:style>
    <style:style style:name="Tableau4.A15" style:family="table-cell">
      <style:table-cell-properties fo:padding="0.097cm" fo:border-left="0.05pt solid #000000" fo:border-right="none" fo:border-top="none" fo:border-bottom="0.05pt solid #000000"/>
    </style:style>
    <style:style style:name="Tableau4.C15" style:family="table-cell">
      <style:table-cell-properties fo:padding="0.097cm" fo:border-left="0.05pt solid #000000" fo:border-right="none" fo:border-top="none" fo:border-bottom="0.05pt solid #000000"/>
    </style:style>
    <style:style style:name="Tableau4.D15" style:family="table-cell">
      <style:table-cell-properties fo:padding="0.097cm" fo:border-left="0.05pt solid #000000" fo:border-right="0.05pt solid #000000" fo:border-top="none" fo:border-bottom="0.05pt solid #000000"/>
    </style:style>
    <style:style style:name="Tableau4.A16" style:family="table-cell">
      <style:table-cell-properties fo:padding="0.097cm" fo:border-left="0.05pt solid #000000" fo:border-right="none" fo:border-top="none" fo:border-bottom="0.05pt solid #000000"/>
    </style:style>
    <style:style style:name="Tableau4.C16" style:family="table-cell">
      <style:table-cell-properties fo:padding="0.097cm" fo:border-left="0.05pt solid #000000" fo:border-right="none" fo:border-top="none" fo:border-bottom="0.05pt solid #000000"/>
    </style:style>
    <style:style style:name="Tableau4.D16" style:family="table-cell">
      <style:table-cell-properties fo:padding="0.097cm" fo:border-left="0.05pt solid #000000" fo:border-right="0.05pt solid #000000" fo:border-top="none" fo:border-bottom="0.05pt solid #000000"/>
    </style:style>
    <style:style style:name="Tableau4.A17" style:family="table-cell">
      <style:table-cell-properties fo:padding="0.097cm" fo:border-left="0.05pt solid #000000" fo:border-right="none" fo:border-top="none" fo:border-bottom="0.05pt solid #000000"/>
    </style:style>
    <style:style style:name="Tableau4.C17" style:family="table-cell">
      <style:table-cell-properties fo:padding="0.097cm" fo:border-left="0.05pt solid #000000" fo:border-right="none" fo:border-top="none" fo:border-bottom="0.05pt solid #000000"/>
    </style:style>
    <style:style style:name="Tableau4.D17" style:family="table-cell">
      <style:table-cell-properties fo:padding="0.097cm" fo:border-left="0.05pt solid #000000" fo:border-right="0.05pt solid #000000" fo:border-top="none" fo:border-bottom="0.05pt solid #000000"/>
    </style:style>
    <style:style style:name="Tableau4.A18" style:family="table-cell">
      <style:table-cell-properties fo:padding="0.097cm" fo:border-left="0.05pt solid #000000" fo:border-right="none" fo:border-top="none" fo:border-bottom="0.05pt solid #000000"/>
    </style:style>
    <style:style style:name="Tableau4.C18" style:family="table-cell">
      <style:table-cell-properties fo:padding="0.097cm" fo:border-left="0.05pt solid #000000" fo:border-right="none" fo:border-top="none" fo:border-bottom="0.05pt solid #000000"/>
    </style:style>
    <style:style style:name="Tableau4.D18" style:family="table-cell">
      <style:table-cell-properties fo:padding="0.097cm" fo:border-left="0.05pt solid #000000" fo:border-right="0.05pt solid #000000" fo:border-top="none" fo:border-bottom="0.05pt solid #000000"/>
    </style:style>
    <style:style style:name="Tableau4.A19" style:family="table-cell">
      <style:table-cell-properties fo:padding="0.097cm" fo:border-left="0.05pt solid #000000" fo:border-right="none" fo:border-top="none" fo:border-bottom="0.05pt solid #000000"/>
    </style:style>
    <style:style style:name="Tableau4.C19" style:family="table-cell">
      <style:table-cell-properties fo:padding="0.097cm" fo:border-left="0.05pt solid #000000" fo:border-right="none" fo:border-top="none" fo:border-bottom="0.05pt solid #000000"/>
    </style:style>
    <style:style style:name="Tableau4.D19" style:family="table-cell">
      <style:table-cell-properties fo:padding="0.097cm" fo:border-left="0.05pt solid #000000" fo:border-right="0.05pt solid #000000" fo:border-top="none" fo:border-bottom="0.05pt solid #000000"/>
    </style:style>
    <style:style style:name="Tableau4.A20" style:family="table-cell">
      <style:table-cell-properties fo:padding="0.097cm" fo:border-left="0.05pt solid #000000" fo:border-right="none" fo:border-top="none" fo:border-bottom="0.05pt solid #000000"/>
    </style:style>
    <style:style style:name="Tableau4.C20" style:family="table-cell">
      <style:table-cell-properties fo:padding="0.097cm" fo:border-left="0.05pt solid #000000" fo:border-right="none" fo:border-top="none" fo:border-bottom="0.05pt solid #000000"/>
    </style:style>
    <style:style style:name="Tableau4.D20" style:family="table-cell">
      <style:table-cell-properties fo:padding="0.097cm" fo:border-left="0.05pt solid #000000" fo:border-right="0.05pt solid #000000" fo:border-top="none" fo:border-bottom="0.05pt solid #000000"/>
    </style:style>
    <style:style style:name="Tableau4.A21" style:family="table-cell">
      <style:table-cell-properties fo:padding="0.097cm" fo:border-left="0.05pt solid #000000" fo:border-right="none" fo:border-top="none" fo:border-bottom="0.05pt solid #000000"/>
    </style:style>
    <style:style style:name="Tableau4.C21" style:family="table-cell">
      <style:table-cell-properties fo:padding="0.097cm" fo:border-left="0.05pt solid #000000" fo:border-right="none" fo:border-top="none" fo:border-bottom="0.05pt solid #000000"/>
    </style:style>
    <style:style style:name="Tableau4.D21" style:family="table-cell">
      <style:table-cell-properties fo:padding="0.097cm" fo:border-left="0.05pt solid #000000" fo:border-right="0.05pt solid #000000" fo:border-top="none" fo:border-bottom="0.05pt solid #000000"/>
    </style:style>
    <style:style style:name="Tableau4.A22" style:family="table-cell">
      <style:table-cell-properties fo:padding="0.097cm" fo:border-left="0.05pt solid #000000" fo:border-right="none" fo:border-top="none" fo:border-bottom="0.05pt solid #000000"/>
    </style:style>
    <style:style style:name="Tableau4.C22" style:family="table-cell">
      <style:table-cell-properties fo:padding="0.097cm" fo:border-left="0.05pt solid #000000" fo:border-right="none" fo:border-top="none" fo:border-bottom="0.05pt solid #000000"/>
    </style:style>
    <style:style style:name="Tableau4.D22" style:family="table-cell">
      <style:table-cell-properties fo:padding="0.097cm" fo:border-left="0.05pt solid #000000" fo:border-right="0.05pt solid #000000" fo:border-top="none" fo:border-bottom="0.05pt solid #000000"/>
    </style:style>
    <style:style style:name="Tableau4.A23" style:family="table-cell">
      <style:table-cell-properties fo:padding="0.097cm" fo:border-left="0.05pt solid #000000" fo:border-right="none" fo:border-top="none" fo:border-bottom="0.05pt solid #000000"/>
    </style:style>
    <style:style style:name="Tableau4.C23" style:family="table-cell">
      <style:table-cell-properties fo:padding="0.097cm" fo:border-left="0.05pt solid #000000" fo:border-right="none" fo:border-top="none" fo:border-bottom="0.05pt solid #000000"/>
    </style:style>
    <style:style style:name="Tableau4.D23" style:family="table-cell">
      <style:table-cell-properties fo:padding="0.097cm" fo:border-left="0.05pt solid #000000" fo:border-right="0.05pt solid #000000" fo:border-top="none" fo:border-bottom="0.05pt solid #000000"/>
    </style:style>
    <style:style style:name="Tableau4.A24" style:family="table-cell">
      <style:table-cell-properties fo:padding="0.097cm" fo:border-left="0.05pt solid #000000" fo:border-right="none" fo:border-top="none" fo:border-bottom="0.05pt solid #000000"/>
    </style:style>
    <style:style style:name="Tableau4.C24" style:family="table-cell">
      <style:table-cell-properties fo:padding="0.097cm" fo:border-left="0.05pt solid #000000" fo:border-right="none" fo:border-top="none" fo:border-bottom="0.05pt solid #000000"/>
    </style:style>
    <style:style style:name="Tableau4.D24" style:family="table-cell">
      <style:table-cell-properties fo:padding="0.097cm" fo:border-left="0.05pt solid #000000" fo:border-right="0.05pt solid #000000" fo:border-top="none" fo:border-bottom="0.05pt solid #000000"/>
    </style:style>
    <style:style style:name="Tableau4.A25" style:family="table-cell">
      <style:table-cell-properties fo:padding="0.097cm" fo:border-left="0.05pt solid #000000" fo:border-right="none" fo:border-top="none" fo:border-bottom="0.05pt solid #000000"/>
    </style:style>
    <style:style style:name="Tableau4.C25" style:family="table-cell">
      <style:table-cell-properties fo:padding="0.097cm" fo:border-left="0.05pt solid #000000" fo:border-right="none" fo:border-top="none" fo:border-bottom="0.05pt solid #000000"/>
    </style:style>
    <style:style style:name="Tableau4.D25" style:family="table-cell">
      <style:table-cell-properties fo:padding="0.097cm" fo:border-left="0.05pt solid #000000" fo:border-right="0.05pt solid #000000" fo:border-top="none" fo:border-bottom="0.05pt solid #000000"/>
    </style:style>
    <style:style style:name="Tableau4.A26" style:family="table-cell">
      <style:table-cell-properties fo:padding="0.097cm" fo:border-left="0.05pt solid #000000" fo:border-right="none" fo:border-top="none" fo:border-bottom="0.05pt solid #000000"/>
    </style:style>
    <style:style style:name="Tableau4.C26" style:family="table-cell">
      <style:table-cell-properties fo:padding="0.097cm" fo:border-left="0.05pt solid #000000" fo:border-right="none" fo:border-top="none" fo:border-bottom="0.05pt solid #000000"/>
    </style:style>
    <style:style style:name="Tableau4.D26" style:family="table-cell">
      <style:table-cell-properties fo:padding="0.097cm" fo:border-left="0.05pt solid #000000" fo:border-right="0.05pt solid #000000" fo:border-top="none" fo:border-bottom="0.05pt solid #000000"/>
    </style:style>
    <style:style style:name="Tableau5" style:family="table">
      <style:table-properties style:width="17.648cm" fo:margin-left="0cm" fo:margin-right="0.051cm" fo:break-before="auto" fo:break-after="auto" table:align="margins"/>
    </style:style>
    <style:style style:name="Tableau5.A" style:family="table-column">
      <style:table-column-properties style:column-width="3.18cm" style:rel-column-width="11813*"/>
    </style:style>
    <style:style style:name="Tableau5.B" style:family="table-column">
      <style:table-column-properties style:column-width="2.514cm" style:rel-column-width="9336*"/>
    </style:style>
    <style:style style:name="Tableau5.C" style:family="table-column">
      <style:table-column-properties style:column-width="9.511cm" style:rel-column-width="35316*"/>
    </style:style>
    <style:style style:name="Tableau5.D" style:family="table-column">
      <style:table-column-properties style:column-width="2.443cm" style:rel-column-width="9070*"/>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top"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top"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none" fo:border-top="none" fo:border-bottom="0.05pt solid #000000"/>
    </style:style>
    <style:style style:name="Tableau5.D8" style:family="table-cell">
      <style:table-cell-properties fo:padding="0.097cm" fo:border-left="0.05pt solid #000000" fo:border-right="0.05pt solid #000000" fo:border-top="none" fo:border-bottom="0.05pt solid #000000"/>
    </style:style>
    <style:style style:name="Tableau6" style:family="table">
      <style:table-properties style:width="17.699cm" table:align="margins"/>
    </style:style>
    <style:style style:name="Tableau6.A" style:family="table-column">
      <style:table-column-properties style:column-width="2.939cm" style:rel-column-width="10883*"/>
    </style:style>
    <style:style style:name="Tableau6.B" style:family="table-column">
      <style:table-column-properties style:column-width="2.699cm" style:rel-column-width="9994*"/>
    </style:style>
    <style:style style:name="Tableau6.C" style:family="table-column">
      <style:table-column-properties style:column-width="9.576cm" style:rel-column-width="35458*"/>
    </style:style>
    <style:style style:name="Tableau6.D" style:family="table-column">
      <style:table-column-properties style:column-width="2.485cm" style:rel-column-width="9200*"/>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data-style-name="N0">
      <style:table-cell-properties style:vertical-align="bottom" fo:padding="0.097cm" fo:border-left="0.05pt solid #000000" fo:border-right="0.05pt solid #000000"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D21" style:family="table-cell">
      <style:table-cell-properties fo:padding="0.097cm" fo:border-left="0.05pt solid #000000" fo:border-right="0.05pt solid #000000" fo:border-top="none" fo:border-bottom="0.05pt solid #000000"/>
    </style:style>
    <style:style style:name="Tableau6.D22" style:family="table-cell">
      <style:table-cell-properties fo:padding="0.097cm" fo:border-left="0.05pt solid #000000" fo:border-right="0.05pt solid #000000" fo:border-top="none" fo:border-bottom="0.05pt solid #000000"/>
    </style:style>
    <style:style style:name="Tableau6.D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0.05pt solid #000000" fo:border-top="none" fo:border-bottom="0.05pt solid #000000"/>
    </style:style>
    <style:style style:name="Tableau6.D25" style:family="table-cell">
      <style:table-cell-properties fo:padding="0.097cm" fo:border-left="0.05pt solid #000000" fo:border-right="0.05pt solid #000000" fo:border-top="none" fo:border-bottom="0.05pt solid #000000"/>
    </style:style>
    <style:style style:name="Tableau6.D26" style:family="table-cell">
      <style:table-cell-properties fo:padding="0.097cm" fo:border-left="0.05pt solid #000000" fo:border-right="0.05pt solid #000000" fo:border-top="none" fo:border-bottom="0.05pt solid #000000"/>
    </style:style>
    <style:style style:name="Tableau7" style:family="table">
      <style:table-properties style:width="17.692cm" fo:margin-left="0cm" fo:margin-right="0.007cm" fo:break-before="auto" fo:break-after="auto" table:align="margins"/>
    </style:style>
    <style:style style:name="Tableau7.A" style:family="table-column">
      <style:table-column-properties style:column-width="3.182cm" style:rel-column-width="11790*"/>
    </style:style>
    <style:style style:name="Tableau7.B" style:family="table-column">
      <style:table-column-properties style:column-width="2.515cm" style:rel-column-width="9317*"/>
    </style:style>
    <style:style style:name="Tableau7.C" style:family="table-column">
      <style:table-column-properties style:column-width="9.506cm" style:rel-column-width="35213*"/>
    </style:style>
    <style:style style:name="Tableau7.D" style:family="table-column">
      <style:table-column-properties style:column-width="2.487cm" style:rel-column-width="9215*"/>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style:vertical-align="top"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top"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C8" style:family="table-cell">
      <style:table-cell-properties fo:padding="0.097cm" fo:border-left="0.05pt solid #000000" fo:border-right="none" fo:border-top="none" fo:border-bottom="0.05pt solid #000000"/>
    </style:style>
    <style:style style:name="Tableau7.D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C10" style:family="table-cell">
      <style:table-cell-properties fo:padding="0.097cm" fo:border-left="0.05pt solid #000000" fo:border-right="none" fo:border-top="none" fo:border-bottom="0.05pt solid #000000"/>
    </style:style>
    <style:style style:name="Tableau7.D10" style:family="table-cell">
      <style:table-cell-properties fo:padding="0.097cm" fo:border-left="0.05pt solid #000000" fo:border-right="0.05pt solid #000000" fo:border-top="none" fo:border-bottom="0.05pt solid #000000"/>
    </style:style>
    <style:style style:name="Tableau7.A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C12" style:family="table-cell">
      <style:table-cell-properties fo:padding="0.097cm" fo:border-left="0.05pt solid #000000" fo:border-right="none" fo:border-top="none" fo:border-bottom="0.05pt solid #000000"/>
    </style:style>
    <style:style style:name="Tableau7.D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P3" style:family="paragraph" style:parent-style-name="Table_20_Heading">
      <style:text-properties fo:font-style="normal" style:font-style-asian="normal" style:font-style-complex="normal"/>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text-properties fo:font-style="normal"/>
    </style:style>
    <style:style style:name="P6" style:family="paragraph" style:parent-style-name="Text_20_body">
      <style:paragraph-properties fo:text-align="center" style:justify-single-word="false"/>
    </style:style>
    <style:style style:name="P7" style:family="paragraph" style:parent-style-name="Footer">
      <style:paragraph-properties fo:text-align="end" style:justify-single-word="false"/>
      <style:text-properties fo:font-size="9pt" style:font-size-asian="9pt" style:font-size-complex="9pt"/>
    </style:style>
    <style:style style:name="P8" style:family="paragraph" style:parent-style-name="Standard">
      <style:paragraph-properties fo:text-align="start"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paragraph-properties fo:margin-top="0.499cm" fo:margin-bottom="0cm" style:contextual-spacing="false" fo:text-align="start" style:justify-single-word="false"/>
    </style:style>
    <style:style style:name="P11" style:family="paragraph" style:parent-style-name="Text_20_body">
      <style:text-properties style:font-name="Verdana" fo:font-size="8pt" fo:font-style="normal"/>
    </style:style>
    <style:style style:name="P12" style:family="paragraph" style:parent-style-name="Text_20_body">
      <style:text-properties style:use-window-font-color="true" loext:opacity="0%"/>
    </style:style>
    <style:style style:name="P13" style:family="paragraph" style:parent-style-name="Text_20_body">
      <style:text-properties style:use-window-font-color="true" loext:opacity="0%" style:text-line-through-style="none" style:text-line-through-type="none"/>
    </style:style>
    <style:style style:name="P14" style:family="paragraph" style:parent-style-name="Text_20_body">
      <style:text-properties style:use-window-font-color="true" loext:opacity="0%" fo:font-style="normal" style:font-style-asian="normal" style:font-style-complex="normal"/>
    </style:style>
    <style:style style:name="P15" style:family="paragraph" style:parent-style-name="Table_20_Contents">
      <style:text-properties style:use-window-font-color="true" loext:opacity="0%" fo:font-style="normal" style:font-style-asian="normal" style:font-style-complex="normal"/>
    </style:style>
    <style:style style:name="P16" style:family="paragraph" style:parent-style-name="Text_20_body">
      <style:text-properties fo:font-weight="bold"/>
    </style:style>
    <style:style style:name="P17" style:family="paragraph" style:parent-style-name="Text_20_body">
      <style:text-properties fo:font-weight="bold"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weight="bold"/>
    </style:style>
    <style:style style:name="P20" style:family="paragraph" style:parent-style-name="Table_20_Contents">
      <style:paragraph-properties fo:text-align="justify" style:justify-single-word="false"/>
      <style:text-properties fo:font-weight="bold"/>
    </style:style>
    <style:style style:name="P21" style:family="paragraph" style:parent-style-name="Text_20_body">
      <style:text-properties fo:color="#ff0000" loext:opacity="100%"/>
    </style:style>
    <style:style style:name="P22" style:family="paragraph" style:parent-style-name="Text_20_body">
      <style:text-properties style:text-underline-style="solid" style:text-underline-width="auto" style:text-underline-color="font-color"/>
    </style:style>
    <style:style style:name="P23" style:family="paragraph" style:parent-style-name="Table_20_Contents">
      <style:text-properties style:text-underline-style="solid" style:text-underline-width="auto" style:text-underline-color="font-color"/>
    </style:style>
    <style:style style:name="P24" style:family="paragraph" style:parent-style-name="Table_20_Contents">
      <style:paragraph-properties fo:margin-left="-0.009cm" fo:margin-right="0.062cm" fo:text-indent="0cm" style:auto-text-indent="false"/>
      <style:text-properties style:text-underline-style="solid" style:text-underline-width="auto" style:text-underline-color="font-color"/>
    </style:style>
    <style:style style:name="P25" style:family="paragraph" style:parent-style-name="Text_20_body">
      <style:text-properties style:text-underline-style="none"/>
    </style:style>
    <style:style style:name="P26" style:family="paragraph" style:parent-style-name="Table_20_Contents">
      <style:text-properties style:text-underline-style="none"/>
    </style:style>
    <style:style style:name="P27" style:family="paragraph" style:parent-style-name="Table_20_Contents">
      <style:paragraph-properties fo:margin-left="-0.009cm" fo:margin-right="0.062cm" fo:text-indent="0cm" style:auto-text-indent="false"/>
      <style:text-properties style:text-underline-style="none"/>
    </style:style>
    <style:style style:name="P28" style:family="paragraph" style:parent-style-name="Table_20_Contents">
      <style:paragraph-properties fo:margin-left="0cm" fo:margin-right="0.062cm" fo:text-indent="0cm" style:auto-text-indent="false"/>
      <style:text-properties style:text-underline-style="none"/>
    </style:style>
    <style:style style:name="P29" style:family="paragraph" style:parent-style-name="Table_20_Contents">
      <style:paragraph-properties style:text-autospace="none"/>
      <style:text-properties style:font-name="Arial" fo:font-size="8pt" style:font-name-asian="Monospace" style:font-size-asian="8pt" style:font-name-complex="Monospace" style:font-size-complex="8pt"/>
    </style:style>
    <style:style style:name="P30" style:family="paragraph" style:parent-style-name="Table_20_Contents">
      <style:text-properties fo:font-size="8pt" style:font-size-asian="8pt" style:font-size-complex="8pt"/>
    </style:style>
    <style:style style:name="P31" style:family="paragraph" style:parent-style-name="Table_20_Contents">
      <style:paragraph-properties fo:text-align="justify" style:justify-single-word="false"/>
    </style:style>
    <style:style style:name="P32" style:family="paragraph" style:parent-style-name="Table_20_Contents">
      <style:text-properties fo:font-style="italic"/>
    </style:style>
    <style:style style:name="P33" style:family="paragraph" style:parent-style-name="Table_20_Contents">
      <style:text-properties style:text-line-through-style="none" style:text-line-through-type="none"/>
    </style:style>
    <style:style style:name="P34" style:family="paragraph" style:parent-style-name="Table_20_Contents">
      <style:text-properties fo:font-weight="normal"/>
    </style:style>
    <style:style style:name="P35" style:family="paragraph" style:parent-style-name="Table_20_Contents">
      <style:text-properties fo:font-weight="normal" style:font-weight-asian="normal" style:font-weight-complex="normal"/>
    </style:style>
    <style:style style:name="P36" style:family="paragraph" style:parent-style-name="Table_20_Contents">
      <style:text-properties style:text-line-through-style="solid" style:text-line-through-type="single" fo:font-style="normal" style:font-style-asian="normal" style:font-style-complex="normal"/>
    </style:style>
    <style:style style:name="P37" style:family="paragraph" style:parent-style-name="Table_20_Contents">
      <style:text-properties style:text-outline="false" fo:font-style="normal" style:text-underline-style="solid" style:text-underline-width="auto" style:text-underline-color="font-color" style:font-style-asian="normal" style:font-style-complex="normal"/>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margin-left="-0.009cm" fo:margin-right="0.062cm" fo:text-indent="0cm" style:auto-text-indent="false"/>
    </style:style>
    <style:style style:name="P40" style:family="paragraph" style:parent-style-name="Table_20_Contents">
      <style:paragraph-properties fo:margin-left="0cm" fo:margin-right="0.062cm" fo:text-indent="0cm" style:auto-text-indent="false"/>
    </style:style>
    <style:style style:name="P41" style:family="paragraph" style:parent-style-name="Contents_20_3">
      <style:paragraph-properties>
        <style:tab-stops>
          <style:tab-stop style:position="16.701cm" style:type="right" style:leader-style="dotted" style:leader-text="."/>
        </style:tab-stops>
      </style:paragraph-properties>
    </style:style>
    <style:style style:name="P42" style:family="paragraph" style:parent-style-name="Contents_20_2">
      <style:paragraph-properties>
        <style:tab-stops>
          <style:tab-stop style:position="17.2cm" style:type="right" style:leader-style="dotted" style:leader-text="."/>
        </style:tab-stops>
      </style:paragraph-properties>
    </style:style>
    <style:style style:name="P43" style:family="paragraph" style:parent-style-name="Contents_20_1">
      <style:paragraph-properties>
        <style:tab-stops>
          <style:tab-stop style:position="17.699cm" style:type="right" style:leader-style="dotted" style:leader-text="."/>
        </style:tab-stops>
      </style:paragraph-properties>
    </style:style>
    <style:style style:name="P44" style:family="paragraph" style:parent-style-name="Heading_20_1" style:master-page-name="">
      <style:paragraph-properties fo:text-align="start" style:justify-single-word="false" style:page-number="auto" fo:break-before="auto" fo:break-after="auto"/>
    </style:style>
    <style:style style:name="P45" style:family="paragraph" style:parent-style-name="Heading_20_2">
      <style:paragraph-properties fo:break-before="page"/>
    </style:style>
    <style:style style:name="P46" style:family="paragraph" style:parent-style-name="Heading_20_3">
      <style:paragraph-properties fo:break-before="page"/>
    </style:style>
    <style:style style:name="P47" style:family="paragraph" style:parent-style-name="Heading_20_4">
      <style:paragraph-properties fo:margin-top="0.499cm" fo:margin-bottom="0cm" style:contextual-spacing="false" fo:text-align="start" style:justify-single-word="false" fo:keep-with-next="always"/>
    </style:style>
    <style:style style:name="P48" style:family="paragraph" style:parent-style-name="Table_20_Contents">
      <style:text-properties fo:font-style="normal" style:font-style-asian="normal" style:font-style-complex="normal"/>
    </style:style>
    <style:style style:name="P49" style:family="paragraph" style:parent-style-name="Table_20_Contents">
      <style:text-properties fo:font-style="italic"/>
    </style:style>
    <style:style style:name="P50" style:family="paragraph" style:parent-style-name="Text_20_body" style:list-style-name="L1">
      <style:paragraph-properties fo:margin-top="0cm" fo:margin-bottom="0.199cm" style:contextual-spacing="false"/>
    </style:style>
    <style:style style:name="P51" style:family="paragraph" style:parent-style-name="Text_20_body" style:list-style-name="L1">
      <style:paragraph-properties fo:margin-top="0cm" fo:margin-bottom="0.199cm" style:contextual-spacing="false"/>
      <style:text-properties style:use-window-font-color="true" loext:opacity="0%"/>
    </style:style>
    <style:style style:name="P52" style:family="paragraph" style:parent-style-name="Text_20_body" style:list-style-name="L2">
      <style:paragraph-properties fo:margin-top="0cm" fo:margin-bottom="0.199cm" style:contextual-spacing="false"/>
      <style:text-properties style:use-window-font-color="true" loext:opacity="0%"/>
    </style:style>
    <style:style style:name="P53" style:family="paragraph" style:parent-style-name="Text_20_body" style:list-style-name="L2">
      <style:paragraph-properties fo:margin-top="0cm" fo:margin-bottom="0.199cm" style:contextual-spacing="false"/>
    </style:style>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line-through-style="none" style:text-line-through-type="none"/>
    </style:style>
    <style:style style:name="T6" style:family="text">
      <style:text-properties style:text-line-through-style="none" style:text-line-through-type="none" style:text-underline-style="none"/>
    </style:style>
    <style:style style:name="T7" style:family="text">
      <style:text-properties style:text-line-through-style="none" style:text-line-through-type="none" style:text-position="super 58%" style:text-underline-style="none"/>
    </style:style>
    <style:style style:name="T8" style:family="text">
      <style:text-properties style:text-underline-style="none"/>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text-underline-style="solid" style:text-underline-width="auto" style:text-underline-color="font-color"/>
    </style:style>
    <style:style style:name="T12" style:family="text">
      <style:text-properties style:font-name="Arial2" fo:font-size="9pt" style:font-size-asian="9pt" style:font-size-complex="9pt"/>
    </style:style>
    <style:style style:name="T13" style:family="text">
      <style:text-properties style:font-name="Arial2" fo:font-size="9pt" style:font-name-asian="Arial1" style:font-size-asian="9pt" style:font-name-complex="Arial1" style:font-size-complex="9pt"/>
    </style:style>
    <style:style style:name="T14" style:family="text">
      <style:text-properties style:font-name="DejaVu Sans"/>
    </style:style>
    <style:style style:name="T15" style:family="text">
      <style:text-properties style:font-name="Arial" fo:font-size="8pt" style:font-name-asian="Monospace" style:font-size-asian="8pt" style:font-name-complex="Monospace" style:font-size-complex="8pt"/>
    </style:style>
    <style:style style:name="T16" style:family="text">
      <style:text-properties style:use-window-font-color="true" loext:opacity="0%"/>
    </style:style>
    <style:style style:name="T17" style:family="text">
      <style:text-properties style:font-name="Tahoma1"/>
    </style:style>
    <style:style style:name="fr1"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2">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3">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4">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5">
      <text:list-level-style-number text:level="1" text:style-name="Numbering_20_Symbols" loext:num-list-format="%1%." style:num-suffix="." style:num-format="1">
        <style:list-level-properties text:min-label-width="0.499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L6">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h text:style-name="P44" text:outline-level="1"><text:title>EXT: Documentation Française tt_products</text:title></text:h>
      <text:p text:style-name="P8">Extension Key: <text:subject>doc_ttproducts_fr</text:subject></text:p>
      <text:p text:style-name="P8">Language: <text:user-defined style:data-style-name="N0" text:name="language (en, de, fr, nl, dk, es, ... )">fr</text:user-defined></text:p>
      <text:p text:style-name="P8">Keywords: <text:keywords>forEditors, forIntermediates, tt_products, shop, produit</text:keywords></text:p>
      <text:p text:style-name="P8">Copyright 2009-2010, <text:user-defined style:data-style-name="N0" text:name="Author">Franz Holzinger</text:user-defined>, &lt;<text:user-defined style:data-style-name="N0" text:name="Email">franz@ttproducts.de</text:user-defined>&gt;</text:p>
      <text:p text:style-name="P6"/>
      <text:p text:style-name="P9">Ce document est publié sous la licence open source,</text:p>
      <text:p text:style-name="P9">disponible sous: http://www.opencontent.org/opl.shtml.</text:p>
      <text:p text:style-name="P9"/>
      <text:p text:style-name="P9">Le contenu e de ce document se réfère à TYPO3 </text:p>
      <text:p text:style-name="P9">- un GNU/gpl CMS/Framework qui est disponible sous www.typo3.com.</text:p>
      <text:p text:style-name="P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text:a xlink:type="simple" xlink:href="#1.EXT: Documentation Française tt_products|outline" text:style-name="Internet_20_link" text:visited-style-name="Internet_20_link">EXT: Documentation Française tt_products<text:tab/>1</text:a></text:p>
          <text:p text:style-name="P42"><text:a xlink:type="simple" xlink:href="#1.1.Introduction|outline" text:style-name="Internet_20_link" text:visited-style-name="Internet_20_link">Introduction<text:tab/>3</text:a></text:p>
          <text:p text:style-name="P41"><text:a xlink:type="simple" xlink:href="#1.1.1.À quoi sert-il cela?|outline" text:style-name="Internet_20_link" text:visited-style-name="Internet_20_link">À quoi sert-il cela?<text:tab/>3</text:a></text:p>
          <text:p text:style-name="P41"><text:a xlink:type="simple" xlink:href="#1.1.2.Promoteur|outline" text:style-name="Internet_20_link" text:visited-style-name="Internet_20_link">Promoteur<text:tab/>3</text:a></text:p>
          <text:p text:style-name="P41"><text:a xlink:type="simple" xlink:href="#1.1.3.Sponsors|outline" text:style-name="Internet_20_link" text:visited-style-name="Internet_20_link">Sponsors<text:tab/>4</text:a></text:p>
          <text:p text:style-name="P42"><text:a xlink:type="simple" xlink:href="#1.2.Manuel d'utilisation|outline" text:style-name="Internet_20_link" text:visited-style-name="Internet_20_link">Manuel d'utilisation<text:tab/>5</text:a></text:p>
          <text:p text:style-name="P41"><text:a xlink:type="simple" xlink:href="#1.2.1.Note:|outline" text:style-name="Internet_20_link" text:visited-style-name="Internet_20_link">Note:<text:tab/>5</text:a></text:p>
          <text:p text:style-name="P41"><text:a xlink:type="simple" xlink:href="#1.2.2.Mini-panier des Marchandises:|outline" text:style-name="Internet_20_link" text:visited-style-name="Internet_20_link">Mini-panier des Marchandises:<text:tab/>5</text:a></text:p>
          <text:p text:style-name="P41"><text:a xlink:type="simple" xlink:href="#1.2.3.Scripte de calcul:|outline" text:style-name="Internet_20_link" text:visited-style-name="Internet_20_link">Scripte de calcul:<text:tab/>6</text:a></text:p>
          <text:p text:style-name="P41"><text:a xlink:type="simple" xlink:href="#1.2.4.Remise:|outline" text:style-name="Internet_20_link" text:visited-style-name="Internet_20_link">Remise:<text:tab/>6</text:a></text:p>
          <text:p text:style-name="P41"><text:a xlink:type="simple" xlink:href="#1.2.5.Lien pour chercher des produits des derniers jours X|outline" text:style-name="Internet_20_link" text:visited-style-name="Internet_20_link">Lien pour chercher des produits des derniers jours X<text:tab/>6</text:a></text:p>
          <text:p text:style-name="P41"><text:a xlink:type="simple" xlink:href="#1.2.6.Offres et tops des produits|outline" text:style-name="Internet_20_link" text:visited-style-name="Internet_20_link">Offres et tops des produits<text:tab/>6</text:a></text:p>
          <text:p text:style-name="P41"><text:a xlink:type="simple" xlink:href="#1.2.7.Conditions générales commerciales|outline" text:style-name="Internet_20_link" text:visited-style-name="Internet_20_link">Conditions générales commerciales<text:tab/>6</text:a></text:p>
          <text:p text:style-name="P41"><text:a xlink:type="simple" xlink:href="#1.2.8.Page mémoire |outline" text:style-name="Internet_20_link" text:visited-style-name="Internet_20_link">Page mémoire <text:tab/>6</text:a></text:p>
          <text:p text:style-name="P41"><text:a xlink:type="simple" xlink:href="#1.2.9.Publicité d'amitié |outline" text:style-name="Internet_20_link" text:visited-style-name="Internet_20_link">Publicité d'amitié <text:tab/>6</text:a></text:p>
          <text:p text:style-name="P41"><text:a xlink:type="simple" xlink:href="#1.2.10.Bons de Cadeaux|outline" text:style-name="Internet_20_link" text:visited-style-name="Internet_20_link">Bons de Cadeaux<text:tab/>7</text:a></text:p>
          <text:p text:style-name="P41"><text:a xlink:type="simple" xlink:href="#1.2.11.Achat d'une boîte|outline" text:style-name="Internet_20_link" text:visited-style-name="Internet_20_link">Achat d'une boîte<text:tab/>7</text:a></text:p>
          <text:p text:style-name="P42"><text:a xlink:type="simple" xlink:href="#1.3.Adminstration|outline" text:style-name="Internet_20_link" text:visited-style-name="Internet_20_link">Adminstration<text:tab/>8</text:a></text:p>
          <text:p text:style-name="P41"><text:a xlink:type="simple" xlink:href="#1.3.1.Installation|outline" text:style-name="Internet_20_link" text:visited-style-name="Internet_20_link">Installation<text:tab/>8</text:a></text:p>
          <text:p text:style-name="P41"><text:a xlink:type="simple" xlink:href="#1.3.2.Traitement des catégories|outline" text:style-name="Internet_20_link" text:visited-style-name="Internet_20_link">Traitement des catégories<text:tab/>8</text:a></text:p>
          <text:p text:style-name="P41"><text:a xlink:type="simple" xlink:href="#1.3.3.Indications importantes|outline" text:style-name="Internet_20_link" text:visited-style-name="Internet_20_link">Indications importantes<text:tab/>8</text:a></text:p>
          <text:p text:style-name="P41"><text:a xlink:type="simple" xlink:href="#1.3.4.Template Marker|outline" text:style-name="Internet_20_link" text:visited-style-name="Internet_20_link">Template Marker<text:tab/>8</text:a></text:p>
          <text:p text:style-name="P41"><text:a xlink:type="simple" xlink:href="#1.3.5.Création automatique des utilisateurs front |outline" text:style-name="Internet_20_link" text:visited-style-name="Internet_20_link">Création automatique des utilisateurs front <text:tab/>11</text:a></text:p>
          <text:p text:style-name="P41"><text:a xlink:type="simple" xlink:href="#1.3.6.Caractéristiques du produit:|outline" text:style-name="Internet_20_link" text:visited-style-name="Internet_20_link">Caractéristiques du produit:<text:tab/>11</text:a></text:p>
          <text:p text:style-name="P42"><text:a xlink:type="simple" xlink:href="#1.4.Configuration|outline" text:style-name="Internet_20_link" text:visited-style-name="Internet_20_link">Configuration<text:tab/>14</text:a></text:p>
          <text:p text:style-name="P41"><text:a xlink:type="simple" xlink:href="#1.4.1.Fichiers|outline" text:style-name="Internet_20_link" text:visited-style-name="Internet_20_link">Fichiers<text:tab/>14</text:a></text:p>
          <text:p text:style-name="P41"><text:a xlink:type="simple" xlink:href="#1.4.2.Description|outline" text:style-name="Internet_20_link" text:visited-style-name="Internet_20_link">Description<text:tab/>14</text:a></text:p>
          <text:p text:style-name="P41"><text:a xlink:type="simple" xlink:href="#1.4.3.Référence|outline" text:style-name="Internet_20_link" text:visited-style-name="Internet_20_link">Référence<text:tab/>14</text:a></text:p>
          <text:p text:style-name="P41"><text:a xlink:type="simple" xlink:href="#1.4.4.class.tx_ttproducts.php properties|outline" text:style-name="Internet_20_link" text:visited-style-name="Internet_20_link">class.tx_ttproducts.php properties<text:tab/>14</text:a></text:p>
          <text:p text:style-name="P41"><text:a xlink:type="simple" xlink:href="#1.4.6.Configuration pour payement et  expédition|outline" text:style-name="Internet_20_link" text:visited-style-name="Internet_20_link">Configuration pour payement et <text:s/>expédition<text:tab/>23</text:a></text:p>
          <text:p text:style-name="P41"><text:a xlink:type="simple" xlink:href="#1.4.7.Pricecalc, discountprice und creditpoints Konfiguration|outline" text:style-name="Internet_20_link" text:visited-style-name="Internet_20_link">Pricecalc, discountprice und creditpoints Konfiguration<text:tab/>25</text:a></text:p>
          <text:p text:style-name="P41"><text:a xlink:type="simple" xlink:href="#1.4.8.Prit du zk_products 1.3.2 |outline" text:style-name="Internet_20_link" text:visited-style-name="Internet_20_link">Prit du zk_products 1.3.2 <text:tab/>27</text:a></text:p>
          <text:p text:style-name="P41"><text:a xlink:type="simple" xlink:href="#1.4.9.payment_DIBS.php|outline" text:style-name="Internet_20_link" text:visited-style-name="Internet_20_link">payment_DIBS.php<text:tab/>28</text:a></text:p>
          <text:p text:style-name="P42"><text:a xlink:type="simple" xlink:href="#1.5.Tutorial|outline" text:style-name="Internet_20_link" text:visited-style-name="Internet_20_link">Tutorial<text:tab/>30</text:a></text:p>
          <text:p text:style-name="P42"><text:a xlink:type="simple" xlink:href="#1.6.Problèmes connues|outline" text:style-name="Internet_20_link" text:visited-style-name="Internet_20_link">Problèmes connues<text:tab/>34</text:a></text:p>
          <text:p text:style-name="P42"><text:a xlink:type="simple" xlink:href="#1.7.To-Do Liste|outline" text:style-name="Internet_20_link" text:visited-style-name="Internet_20_link">To-Do Liste<text:tab/>35</text:a></text:p>
          <text:p text:style-name="P42"><text:a xlink:type="simple" xlink:href="#1.8.Changelog|outline" text:style-name="Internet_20_link" text:visited-style-name="Internet_20_link">Changelog<text:tab/>36</text:a></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P45" text:outline-level="2">Introduction</text:h>
      <text:h text:style-name="Heading_20_3" text:outline-level="3">À quoi sert-il cela?</text:h>
      <text:p text:style-name="Text_20_body">L'extension Typo3 Shop (Boutique) vous donne possibilité de...</text:p>
      <text:list text:style-name="L1">
        <text:list-item>
          <text:p text:style-name="P50">énumérer des Produits avec plusieurs images et détails </text:p>
        </text:list-item>
        <text:list-item>
          <text:p text:style-name="P50">Panier d'achat</text:p>
        </text:list-item>
        <text:list-item>
          <text:p text:style-name="P51">une page "payer" - <text:s/>la commande est indiquée ici et peut être réexaminée, avant que les articles ne soient commandés définitivement/que commande soit expédiée définitivement</text:p>
        </text:list-item>
      </text:list>
      <text:list text:style-name="L2">
        <text:list-item>
          <text:p text:style-name="P53">Poursuite de l'état d'une commande de client (suivi de stock)</text:p>
        </text:list-item>
        <text:list-item>
          <text:p text:style-name="P53">Production automatique d'une facture et d'un bulletin de livraison</text:p>
        </text:list-item>
        <text:list-item>
          <text:p text:style-name="P53">Différents taux d'imposition par articles, pour la distribution et le paiement</text:p>
        </text:list-item>
        <text:list-item>
          <text:p text:style-name="P53">gestion du magasin simple</text:p>
        </text:list-item>
        <text:list-item>
          <text:p text:style-name="P53">expédier un fichier CSV pour chaque commande au administrateur de la boutique (2 formats de fichier sélectionnables)</text:p>
        </text:list-item>
        <text:list-item>
          <text:p text:style-name="P53">Annexes de courrier électronique pour confirmation émail (par exemple AGB = conditions commerciales générales)</text:p>
        </text:list-item>
        <text:list-item>
          <text:p text:style-name="P53">variantes d'article s sélectionnable s(couleurs, dimensions, échelonnements)</text:p>
        </text:list-item>
        <text:list-item>
          <text:p text:style-name="P53">Contrainte accepter des conditions commerciales générales (AGB) par le client sur une boîte de contrôle</text:p>
        </text:list-item>
        <text:list-item>
          <text:p text:style-name="P53">Offres, points culminants et les articles à nouveau ajoutés</text:p>
        </text:list-item>
        <text:list-item>
          <text:p text:style-name="P53">Fabrication spéciale et poids (peuvent être utiliser pour le calcul des frais d'expédition)</text:p>
        </text:list-item>
        <text:list-item>
          <text:p text:style-name="P53">Possibilité de limiter les méthodes de paiement sur des groupes d'utilisateurs particuliers</text:p>
        </text:list-item>
        <text:list-item>
          <text:p text:style-name="P53">Production automatique d'un utilisateur front <text:s/>lors de la première commande</text:p>
        </text:list-item>
        <text:list-item>
          <text:p text:style-name="P52">Liste de relevé pour les articles - l'utilisateur peut noter/stocker les articles avec la fonction de note</text:p>
        </text:list-item>
        <text:list-item>
          <text:p text:style-name="P52">Remise en pour cent par utilisateurs</text:p>
        </text:list-item>
        <text:list-item>
          <text:p text:style-name="P52">Méthodes de calcul des prix avec des remises pour des détaillants/groupes</text:p>
        </text:list-item>
        <text:list-item>
          <text:p text:style-name="P52">Annonce de commandes</text:p>
        </text:list-item>
        <text:list-item>
          <text:p text:style-name="P52">système de points de bon: <text:s/>les clients peuvent rassembler des points de bon avec chaque commande. Le client peut racheter les points de bon stockés lors d'une nouvelle commande. Sur votre demande, seulement certains produits peuvent être achetés avec ces bons,.</text:p>
        </text:list-item>
        <text:list-item>
          <text:p text:style-name="P52">Publicité d'amitié: <text:s/>Si un client indique lors de son enregistrement qu'il a été engagé par un autre client(déjà existent), alors ce luici reçoit un crédit de points de bon. <text:s/>Le nouveau client reçoit une remise lors de sa première commande.</text:p>
        </text:list-item>
        <text:list-item>
          <text:p text:style-name="P52">Bons de cadeau: <text:s/>Des utilisateurs peuvent acheter des bons de cadeau et les envoyer par émail à leurs partenaires. <text:s/>Lorsque ce q'un partenaire s'annonce dans le front il peut les transformer en points de bonet lors de sa première commande utiliser son bon de cadeau.</text:p>
        </text:list-item>
      </text:list>
      <text:h text:style-name="Heading_20_3" text:outline-level="3">Promoteur</text:h>
      <text:list text:style-name="L3">
        <text:list-item>
          <text:p text:style-name="P54">Kasper Skårhøj &lt;<text:a xlink:type="simple" xlink:href="mailto:kasperYYYY@typo3.com" text:style-name="Internet_20_link" text:visited-style-name="Visited_20_Internet_20_Link">kasperYYYY@typo3.com</text:a>&gt;: Version 1.2.7 / TYPO3 3.8</text:p>
        </text:list-item>
        <text:list-item>
          <text:p text:style-name="P54">René Fritz &lt;<text:a xlink:type="simple" xlink:href="mailto:r.fritz@colorcube.de" text:style-name="Internet_20_link" text:visited-style-name="Visited_20_Internet_20_Link">r.fritz@colorcube.de</text:a>&gt;: Version 1.2.7 / TYPO3 3.8</text:p>
        </text:list-item>
        <text:list-item>
          <text:p text:style-name="P54">Franz Holzinger &lt;<text:a xlink:type="simple" xlink:href="mailto:franz@ttproducts.de" text:style-name="Internet_20_link" text:visited-style-name="Visited_20_Internet_20_Link">franz@ttproducts.de</text:a>&gt; (Chef de projet): <text:s/>Formation zk_products et mkl_products, calcul des prix, remise prix, bons de cadeau, tableau émail pour information, corrections des erreurs, facture, bulletin de livraison, avis de liste, les tableau d'articles<text:line-break/><text:a xlink:type="simple" xlink:href="http://fholzinger.com/" text:style-name="Internet_20_link" text:visited-style-name="Visited_20_Internet_20_Link">http://jambage.com</text:a>, +49 (0)221 16823649</text:p>
        </text:list-item>
        <text:list-item>
          <text:p text:style-name="P54">Klaus Zierer &lt;<text:a xlink:type="simple" xlink:href="mailto:zierer@pz-systeme.de" text:style-name="Internet_20_link" text:visited-style-name="Visited_20_Internet_20_Link">zierer@pz-systeme.de</text:a>&gt;: Promoteur zk_products: <text:s/>plusieurs dimensions et couleurs, liste de relevé, AGB, CSV, enregistrement automatique des Frontend utilisateurs, côtés comme catégories</text:p>
        </text:list-item>
        <text:list-item>
          <text:p text:style-name="P54">Milosz Klosowicz &lt;<text:a xlink:type="simple" xlink:href="mailto:typo3@miklobit.com" text:style-name="Internet_20_link" text:visited-style-name="Visited_20_Internet_20_Link">typo3@miklobit.com</text:a>&gt;: Promoteur mkl_products: <text:s/>tableaux polyglottes et différentes monnaies, Flexform</text:p>
        </text:list-item>
        <text:list-item>
          <text:p text:style-name="P54">Els Verberne &lt;<text:a xlink:type="simple" xlink:href="mailto:verberne@bendoo.nl" text:style-name="Internet_20_link" text:visited-style-name="Visited_20_Internet_20_Link">verberne@bendoo.nl</text:a>&gt;: Points de bon et système publicité d'amitié, liste des commandes</text:p>
        </text:list-item>
      </text:list>
      <text:h text:style-name="Heading_20_3" text:outline-level="3"><text:soft-page-break/>Sponsors</text:h>
      <text:list text:style-name="L4">
        <text:list-item>
          <text:p text:style-name="P55">Le développement des bons de cadeau a été mis en oeuvre par Franz Holzinger. <text:s/>Le Gesponsert l'est devenu de BENDOO e-work solutions, des Pays-Bas (http://www.bendoo.nl). <text:s/>Pour vous BENDOO prenez contact avec plus de plus d'informations,: <text:s/>hiddink@bendoo.com</text:p>
          <text:p text:style-name="P55"/>
        </text:list-item>
      </text:list>
      <text:h text:style-name="Heading_20_2" text:outline-level="2">Manuel d'utilisation</text:h>
      <text:h text:style-name="Heading_20_3" text:outline-level="3">Note:</text:h>
      <text:p text:style-name="Text_20_body">La voie a été rebaptisée aux fichiers par 'pi 'sur 'pi1 ', afin que tt_products comme d'autres TYPO3 le Extensionen soit maintenant tout de suite développé. <text:s/>C'est pourquoi vous devez maintenant modifier vos voies, si elle ces le TypoScript Setup de plus vieilles versions tt_products verwendet haben.</text:p>
      <text:p text:style-name="P12">Si vous installez à nouveau ou mettez l'extension à jour: <text:s/>* s'il vous plaît veuillez considérer les Depencies dans le TER (en ligne Extension Repository). <text:s/>La Table Library doit être installée.</text:p>
      <text:p text:style-name="P12">Vous devez remplire le champ 'en stoque (pices.) ' <text:s/>dans les qualités du produit. <text:s/>Autrement, aucun Artiecle n'est indiqué dans le Frontend, puisque la valeur est alors placée sur 0. <text:s/>Et zéro articles n'existent pas.</text:p>
      <text:p text:style-name="P12">Des valeurs négative ont une importance particulière: -1 signifie qu'une marchandise est toujours 'en stoque'. <text:s/>Le produit est toujours livrable ainsi.</text:p>
      <text:p text:style-name="P13">Avant d'indiquer des prix de produit, vous devez décider si les prix sont suggérés avec ou sans des impôts (voir <text:s/>TAXincluded). <text:s/>Tous les calculs et configurations utiliseront les indications de prix, avec lesquelles ils sont stockés dans le tableau tt_products.</text:p>
      <text:p text:style-name="P13"><text:line-break/>Vous devrez toutefois enregistrer dans la base de données aux mieux les prix y compris la taxe. <text:s/>Cela vous faciliter la donné de prix comme le client les verra également. <text:s/>Ces prix devraient enfin avoir les conventions de la formation des prix comme € 1,99 et pas € 1,72.</text:p>
      <text:p text:style-name="P13"><text:line-break/>Lorsque vous commencez avec votre nouveau Shop, Utiliser alors un Template example de tt_products/template, le Template example_template_bill_de.tmpl. Vous devez plus q'undiquer la Page-Id à gauche (derrière 'id =... ') , afin que ici la Page-Id du panier soit indiqué. </text:p>
      <text:p text:style-name="P13">Le marqueur ### DOMAIN ### vous sauve l'entrée de vos URL. Ce ci est logique, si p. ex. vous utilisez un nouveau Host. <text:s/>Dans le Setup du Shoptemplate la donné de la Domaine doit être entrepris: <text:s/>plugin.domain = votredomaine.fr</text:p>
      <text:p text:style-name="P13">Si vous entreprenez des entrées dans les champs de variantes (dimension, couleur...), vous devez placer en conséquence selectSize et selectColors sur 0 ou 1. <text:s/>Autrement, ceux-ci sont enregistrés faux aux nombres d'articles dans la liste de produit.</text:p>
      <text:p text:style-name="P13">Beaucoup d'adaptations peuvent être entreprises sur les Constant du rédacteur. <text:s/>La plupart devrait être enregistré mieux directement dans les champs du Setup et aux Constants des Templates pour les pages du Shop.</text:p>
      <text:p text:style-name="P13">tt_products se base sur les Extensionen Table Library (table) et FE/BE Library (fh_library). <text:s/>Lorsque vous mettez ainsi une mise à jour en oeuvre de tt_products vous devez mettre aussi en même temps une mise à jour de ces deux Extensionen en oeuvre.</text:p>
      <text:p text:style-name="P13">Quelques réglages du TypoScript ne fonctionnent pas sur le champ Constants et doivent être enregistrés dans le champ Setup.</text:p>
      <text:h text:style-name="Heading_20_3" text:outline-level="3">Mini-panier des Marchandises:</text:h>
      <text:p text:style-name="P12">À côté du panier des marchandises "normal" qui indique une liste complète des articles suggérés dans une certaine séquence, il y a aussi un "mini-panier", qui indique le nombre de produits dans le panier des marchandises et le prix global.</text:p>
      <text:p text:style-name="P12">Celui-ci vous montre pendant la durée de séjour dans la boutique. Constamment dessus le contenu de votre panier des marchandises au-dessus de l'avis normal (ou où vous le souhaitez). <text:s/>La place, à laquelle le "mini-panier" doit être indiqué, peut être indiqué dans Typoscript.<text:line-break/><text:line-break/>Pour, ajoutez ez pouvoir utiliser ce mini-panier un nouvel élément de contenu du côté "Plugin: <text:s/>Des produits "et enregistrer dans le champ CODE OVERVIEW.<text:line-break/><text:line-break/>Utilisez les marquages suivants dans le Template tt_products pour activer et adapter le mini-panier:</text:p>
      <text:p text:style-name="Text_20_body"><text:span text:style-name="Strong_20_Emphasis">Code Listage:</text:span></text:p>
      <text:p text:style-name="Preformatted_20_Text">&lt;!-- ###BASKET_OVERVIEW_TEMPLATE### begin --&gt;</text:p>
      <text:p text:style-name="Preformatted_20_Text"><text:s text:c="2"/>&lt;div class="shop_minibasket"&gt;</text:p>
      <text:p text:style-name="Preformatted_20_Text"><text:s text:c="5"/>&lt;div class="shop_minibasket_image"&gt;&lt;!--###LINK_BASKET###--&gt;###IMAGE_BASKET###&lt;!--###LINK_BASKET###--&gt;&lt;/div&gt;</text:p>
      <text:p text:style-name="Preformatted_20_Text"><text:s text:c="4"/>&lt;p&gt;###NUMBER_GOODSTOTAL### Produits (EUR ###PRICE_GOODSTOTAL_TAX###.-)&lt;/p&gt;</text:p>
      <text:p text:style-name="Preformatted_20_Text">&lt;!-- ###BASKET_OVERVIEW_TEMPLATE### end --&gt;</text:p>
      <text:p text:style-name="Preformatted_20_Text"/>
      <text:p text:style-name="Preformatted_20_Text"><text:soft-page-break/></text:p>
      <text:p text:style-name="Preformatted_20_Text"/>
      <text:p text:style-name="Preformatted_20_Text">&lt;!-- ###BASKET_OVERVIEW_EMPTY### begin --&gt;</text:p>
      <text:p text:style-name="Preformatted_20_Text"><text:s text:c="2"/>&lt;p&gt;Riens des produits dan le panier.&lt;/p&gt;</text:p>
      <text:p text:style-name="Preformatted_20_Text">&lt;!-- ###BASKET_OVERVIEW_EMPTY### end --&gt;</text:p>
      <text:p text:style-name="Preformatted_20_Text"><text:s text:c="3"/>&lt;/div&gt;</text:p>
      <text:p text:style-name="Preformatted_20_Text">&lt;!-- ###BASKET_OVERVIEW_TEMPLATE### end --&gt;<text:line-break/></text:p>
      <text:h text:style-name="Heading_20_3" text:outline-level="3">Scripte de calcul:</text:h>
      <text:p text:style-name="Text_20_body">Si vous voullez utiliser ou écrire votre propre Scripte de calculation, Vous devez toujours indiquer le prix taxe y compris. Les variables PriceNoTax eront supprimées fin août 2008, parce qu'ils peuvent être calculés par la constante priceTax et la variable TAXpercentage.<text:line-break/><text:line-break/>Vous pouvez utiliser les Variables PHP globalement $this-&gt;calculatedArray et <text:s/>$this-&gt;itemArray, pour mettre vos propres calculs de prix en oeuvre.</text:p>
      <text:h text:style-name="Heading_20_3" text:outline-level="3">Remise:</text:h>
      <text:p text:style-name="Text_20_body">Il existent différentes méthodes autour d'une remise .</text:p>
      <text:list text:style-name="L5">
        <text:list-item>
          <text:p text:style-name="P56">Utilisation du champ de remise du Frontend utilisateur et entrée du pourcentage pour le discount</text:p>
        </text:list-item>
        <text:list-item>
          <text:p text:style-name="P56">Utilisation du champ price2 pour specials FE utilisateurs groupes at autres choses. Vous pouvez mettre le en TypoScript avant le commande IF.</text:p>
        </text:list-item>
        <text:list-item>
          <text:p text:style-name="P56">Calcul des prix discount. La remise depend du numeros enti<text:span text:style-name="T14">è</text:span>res des produits du prix speciale. La remise est gagne pour le group FE '<text:span text:style-name="T1">discountGroupName'.</text:span></text:p>
        </text:list-item>
      </text:list>
      <text:h text:style-name="Heading_20_3" text:outline-level="3">Lien pour chercher des produits des derniers jours X</text:h>
      <text:p text:style-name="Text_20_body">C'est pratique pour les pages nouveaux. Faisez tout semplement un lien vers la page SEARCH et ensuite le "newitemdays" comme parametre <text:s/><text:a xlink:type="simple" xlink:href="http://www.mytypo3shop.com/?id=8&amp;newitemdays=10" text:style-name="Internet_20_link" text:visited-style-name="Visited_20_Internet_20_Link">http://www.mytypo3shop.com/?id=8&amp;amp;newitemdays=10</text:a> La recherche vous montre tous les produits des 7 jours en avant. Par contre vous pouves aussi mettre la constante "newItemDays".</text:p>
      <text:h text:style-name="Heading_20_3" text:outline-level="3">Offres et tops des produits</text:h>
      <text:p text:style-name="Text_20_body">Vous devez utiliser le plugin code LISTOFFERS pour les articles marques comme 'offres'. Et avec HIGHLIGHTS vous obteine une list des articles speciaux (Highlights).</text:p>
      <text:h text:style-name="Heading_20_3" text:outline-level="3">Conditions générales commerciales</text:h>
      <text:p text:style-name="Text_20_body">Avant le commande et de continuer la mise en commande <text:s/>il faut accepter les AGB. Pour cela on peut definier une page 'PIDagb'. Les AGB doivent être indiquer ici. Vous pouvez ansi mettre un lien sur « agbtarget! ».</text:p>
      <text:p text:style-name="Text_20_body">Un document (par example un PDF inform fichier) sur le serveur. contenant les AGB, peutêtre entreprits sur « AGBattachment! » Cela se peut envoyé au client attaché à une èmail avec la confirmation de commande, la Shop Administration ne recoit pas cet fichier. Par contre elle peut en cas de besoin recevoir une fichier CSV avec les dates des commandes.</text:p>
      <text:h text:style-name="Heading_20_3" text:outline-level="3">Page mémoire </text:h>
      <text:p text:style-name="P12">L'utilisateur logé peut ajouté des articles à une page mémoire. Ce page MEMO sear entreposé dans le tableau utilisateurs front . Ajoutez tout simplement <text:s/>une nouvelle page avec le plugin boutique comme contenu puis tapez le code 'MEMO'. Aussi il faut mettre le point du début comme aux pages SEARCH:</text:p>
      <text:h text:style-name="Heading_20_3" text:outline-level="3">Publicité d'amitié </text:h>
      <text:p text:style-name="Text_20_body">Un client intéresse reçoit par email une invitation pour visiter la boutique afin d'achates des articles. Ajouté a cette invitation est un code unique, qui correspond à un certain nombre des points de créance. Si vous achetez quelque chose vous présentez cette créance. laquelle sera remplacer par des points des bons pour le utilisateur front. Quand un client à son enregistrement indique qu'il a eté recruté par un autre client celui reçoit alors des points de bon. Ainsi reçoit le nouveau client pour sa première commande une remise. Quelqu'un pout taper le code remise quand il fait une commande. Alors le utilisateur <text:s/>reçoit une remise de 15 Euro. Le code de remise contient le nom du utilisateur de quelqu'un d'autre (celui de l'émail adresse), disout utilisateur no. 2. <text:s/>Alors utilisateur no. 2 reçoit 5 points de bons. Chaque utilisateur profite uniquement une fois du code de bon lors du remise d'amitié. Dans le tableau FE utilisateurs il y a un target 'tt_products_vouchercode', qui contient le code de remise (émail du utilisateur no. 2)</text:p>
      <text:p text:style-name="Preformatted_20_Text"><text:soft-page-break/>creditpoints { pricefactor = 0.5</text:p>
      <text:p text:style-name="Preformatted_20_Text"><text:s/>10.type = price 10.prod.1 <text:s text:c="2"/>= 0.02 10.prod.101 = 0.04 10.prod.501 = 0.06 } </text:p>
      <text:h text:style-name="Heading_20_3" text:outline-level="3">Bons de Cadeaux</text:h>
      <text:p text:style-name="Text_20_body">Si un client acheté un certain nombre dárticles, il gagne alors des points de bons, qui sont enregistrés sur son compte titulaire. Quand il achète plus tard d'autres articles il peut investire ses points et pous profiter d'une remise spéciale sur son achat. Lors de chaque achat les clients peuvent ramasser des points. </text:p>
      <text:p text:style-name="Text_20_body">Un entrepreneur d'un shop peut rendre des bons des bouteilles de vins comme cadeau électronique. Je commande un bon correspondant à 50 points (=25 Euro). Si vous voulez mettre en zen ces bon de cadeau reçoitus devez vous enregistrer comme client du boutique et indiquer le code sur le bon. Alors apres vous recevez de 50 points sur votre compte. Avec ces points de cadeau vous pouvez achater certains produits. Par exemple quelcun peut acheter 3 bons à 25 points de bon, 5 bons à 50 points de bon, 8 bons à 75 points de bon, toute en une commande.</text:p>
      <text:h text:style-name="Heading_20_3" text:outline-level="3">Achat d'une boîte</text:h>
      <text:p text:style-name="Text_20_body">Un shop vend du vin. Normalement vous vendez une caisse de vin (contenant 6 à 12 articles). Le service extra "achat d'une caisse" donne au client la possibilité de remballer lui même sa propre boite: dit 2 rouge, 2 blanc, 2 rosé </text:p>
      <text:p text:style-name="Text_20_body">Sous le programme "achat d'une boîte" se trouve le traitement des bouteilles et des boîtes. Le prix d'une bouteille est à 1,50 Euro, tandis que pour 2 cartons on calcule 2 x 6 x 1.50=18 Euro.</text:p>
      <text:p text:style-name="Text_20_body"/>
      <text:h text:style-name="P45" text:outline-level="2">Adminstration</text:h>
      <text:p text:style-name="Text_20_body">Si vous voulez rester copmatible vous devez mettre le suivant (ou laisser vide) </text:p>
      <text:p text:style-name="Text_20_body">$TYPO3_CONF_VARS['EXTCONF']['tt_products']['pageAsCategory'] = 0</text:p>
      <text:p text:style-name="Text_20_body">Pour être compatible à 95% vers l'additif zk_products, il faut mettre la valeur 1. Mais il vaut mieux ne pas le faire.</text:p>
      <text:p text:style-name="Text_20_body">Activez maintenant les flexforms dans le backup. Alors on remplace la introduction des codes dans le target CODE pour par une surface graphique. D'alors il faut faire entrer tous les codes à nouveaux.</text:p>
      <text:p text:style-name="Text_20_body">$TYPO3_CONF_VARS['EXTCONF']['tt_products']['useFlexforms'] = 1</text:p>
      <text:h text:style-name="Heading_20_3" text:outline-level="3">Installation</text:h>
      <text:p text:style-name="Text_20_body">Il faut installer l'additif sur le Extension Manager. Si vous utilisez une version tt_products ancien il y'a dans l'environ “global” (typo3/ext/) installé. Si vous voulez essayer une version nouvelle, vous devez l'installer dans ”lokal” dossier (typo3conf/ext/) afin de ne pas effacer l'ancien version.</text:p>
      <text:p text:style-name="Text_20_body">Désinstallez l'additif <text:s/>par l'Extension Manager. Puis vous enlevez la version de votre choix avec l'Extension Manager du Online Repository. Ensuite vous vous servez dans l'Extension Manager "Available extensions to install" et rajoutez le système boutique. </text:p>
      <text:p text:style-name="Text_20_body">Cet additif marche le mieux si silón utilise ensemble avec les additifs suivantes: <text:s/>sr_static_info, sr_feuser_register,<text:span text:style-name="T1"> </text:span><text:span text:style-name="Emphasis"><text:span text:style-name="T1">rtehtmlarea, mkl_currxrate,</text:span></text:span> <text:span text:style-name="Emphasis"><text:span text:style-name="T1">conf_userts et feuserextrafields.</text:span></text:span></text:p>
      <text:h text:style-name="Heading_20_3" text:outline-level="3">Traitement des catégories</text:h>
      <text:p text:style-name="Text_20_body">Il existent plusieurs moyens d'installer une boutique. La methode normale va par dossier système pour les produits. Pour l'installation d'un boutique plus grande avec TYPO3, sera pas pratique. </text:p>
      <text:p text:style-name="Text_20_body">Si vous voulez installer des boutiques plus grandes avec catégories hiérarchiques, vous devez installer l'additif mbi_products_categories.</text:p>
      <text:p text:style-name="P16">Example du tt_products/ext_localconf.php:</text:p>
      <text:p text:style-name="Text_20_body">$TYPO3_CONF_VARS[’EXTCONF’][’tt_products’][’pageAsCategory’] = 0;</text:p>
      <text:p text:style-name="Table_20_Contents_2f_PRE"/>
      <text:h text:style-name="Heading_20_3" text:outline-level="3">Indications importantes</text:h>
      <text:p text:style-name="Text_20_body">Le boutique doît entrepris de préférence en descendant compatible en vue des versions d'avance tt_products 1.2.7 . Mais la template fichier à besoin quelques petites adaptions. Le mieux sera de comparer votre template avec les templates exemplaires qui sont livrées avac tt_products. </text:p>
      <text:p text:style-name="Text_20_body">Dans le ###BASKET_TEMPLATE### <text:s/>vous devez inserer le ligne &lt;input type="hidden" name="mode_update" value="1"&gt; avant le ligne &lt;input type="Submit" name="products_update" value="update basket"&gt; .</text:p>
      <text:p text:style-name="Text_20_body">Dans le <text:s/>###BASKET_TEMPLATE### <text:s/>vous devez changer la balise ###FIELD_NAME### au <text:s/>###FIELD_NAME_BASKET### . C'est compatible avec zk_products 1.3.2 mais ne peut pas utilisé en même temps.</text:p>
      <text:h text:style-name="Heading_20_4" text:outline-level="4">Fichiers Template </text:h>
      <text:p text:style-name="Text_20_body">Dans les fichiers template de votre boutique il faut faire des corrections suivantes, pour pouvoir s'en servir </text:p>
      <text:p text:style-name="Text_20_body">&lt;input type="hidden" name="mode_update" value="1"&gt;</text:p>
      <text:p text:style-name="Text_20_body">&lt;input type="Submit" name="products_update" value="update basket"&gt;</text:p>
      <text:p text:style-name="Text_20_body">Posez ces FORM-Attributes dans votre BASKET_TEMPLATE.</text:p>
      <text:h text:style-name="Heading_20_3" text:outline-level="3">Template Marker</text:h>
      <text:p text:style-name="Text_20_body">Les suivantes marqueurs template sont utilisés dans le fichier template. Vous devez insérer ### <text:s/>en avant et après. Il'y a encore des autres balises que vous pouvez voir dans les fichiers template exemples.</text:p>
      <text:h text:style-name="Heading_20_4" text:outline-level="4">Marquer de domaine:</text:h>
      <text:p text:style-name="Text_20_body"/>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Marquage:</text:p>
            </table:table-cell>
            <table:table-cell table:style-name="Tableau1.B1" office:value-type="string">
              <text:p text:style-name="Table_20_Heading">Description:</text:p>
            </table:table-cell>
            <table:table-cell table:style-name="Tableau1.C1" office:value-type="string">
              <text:p text:style-name="Table_20_Heading">Secteur:</text:p>
            </table:table-cell>
          </table:table-row>
        </table:table-header-rows>
        <table:table-row>
          <table:table-cell table:style-name="Tableau1.A2" office:value-type="string">
            <text:p text:style-name="Table_20_Contents">BASKET_TEMPLATE</text:p>
          </table:table-cell>
          <table:table-cell table:style-name="Tableau1.B2" office:value-type="string">
            <text:p text:style-name="Table_20_Contents"/>
          </table:table-cell>
          <table:table-cell table:style-name="Tableau1.C2" office:value-type="string">
            <text:p text:style-name="Table_20_Contents">en haut</text:p>
          </table:table-cell>
        </table:table-row>
        <table:table-row>
          <table:table-cell table:style-name="Tableau1.A3" office:value-type="string">
            <text:p text:style-name="Table_20_Contents">BASKET_INFO_TEMPLATE</text:p>
          </table:table-cell>
          <table:table-cell table:style-name="Tableau1.B2" office:value-type="string">
            <text:p text:style-name="Table_20_Contents">C'est normalement usé pour que les clients mettent leur dates d'adresse a l'extérieur de leurs panier d'achat.</text:p>
            <text:p text:style-name="Table_20_Contents">Il emporte les mêmes caractéristiques que <text:span text:style-name="T15">BASKET_TEMPLATE.</text:span></text:p>
          </table:table-cell>
          <table:table-cell table:style-name="Tableau1.C3" office:value-type="string">
            <text:p text:style-name="Table_20_Contents">en haut</text:p>
          </table:table-cell>
        </table:table-row>
        <table:table-row>
          <table:table-cell table:style-name="Tableau1.A4" office:value-type="string">
            <text:p text:style-name="Table_20_Contents">BASKET_ORDERCONFIRMATION_TEMPLATE</text:p>
          </table:table-cell>
          <table:table-cell table:style-name="Tableau1.B2" office:value-type="string">
            <text:p text:style-name="Table_20_Contents">Dernier page apres que la commande soit mis en oeuvre. Quand PIDthanks soit mis, se n'est pas usé pour indication. Mais ils sont toujours utilisés <text:s/>pour les émail messagères, si HTML émails sont mis en place (orderEmail_htmlmail=1).</text:p>
            <text:p text:style-name="Table_20_Contents">voir: BASKET_ORDERTHANKS_TEMPLATE</text:p>
          </table:table-cell>
          <table:table-cell table:style-name="Tableau1.C4" office:value-type="string">
            <text:p text:style-name="Table_20_Contents"/>
          </table:table-cell>
        </table:table-row>
        <table:table-row>
          <table:table-cell table:style-name="Tableau1.A5" office:value-type="string">
            <text:p text:style-name="Table_20_Contents">BASKET_ORDERCONFIRMATION_NOSAVE_TEMPLATE</text:p>
          </table:table-cell>
          <table:table-cell table:style-name="Tableau1.B2" office:value-type="string">
            <text:p text:style-name="Table_20_Contents">Ces fichiers HTML sont indiqués après que la commande soit enregistrée dans la banque de données.</text:p>
          </table:table-cell>
          <table:table-cell table:style-name="Tableau1.C4" office:value-type="string">
            <text:p text:style-name="Table_20_Contents"/>
          </table:table-cell>
        </table:table-row>
        <table:table-row>
          <table:table-cell table:style-name="Tableau1.A6" office:value-type="string">
            <text:p text:style-name="Table_20_Contents">BASKET_ORDERTHANKS_TEMPLATE</text:p>
          </table:table-cell>
          <table:table-cell table:style-name="Tableau1.B2" office:value-type="string">
            <text:p text:style-name="P30">Annonce d'une page « mercii », quand PIDthanks est mise. Pour les expéditions de émails HTML il n'est pas nécessaire.</text:p>
            <text:p text:style-name="P30">voir BASKET_ORDERCONFIRMATION_TEMPLATE</text:p>
          </table:table-cell>
          <table:table-cell table:style-name="Tableau1.C4" office:value-type="string">
            <text:p text:style-name="Table_20_Contents"/>
          </table:table-cell>
        </table:table-row>
        <table:table-row>
          <table:table-cell table:style-name="Tableau1.A7" office:value-type="string">
            <text:p text:style-name="Table_20_Contents">BASKET_OVERVIEW_EMPTY</text:p>
          </table:table-cell>
          <table:table-cell table:style-name="Tableau1.B2" office:value-type="string">
            <text:p text:style-name="P30">Annonce 'Votre panier est encore vide' pour OVERVIEW</text:p>
          </table:table-cell>
          <table:table-cell table:style-name="Tableau1.C4" office:value-type="string">
            <text:p text:style-name="Table_20_Contents"/>
          </table:table-cell>
        </table:table-row>
        <table:table-row>
          <table:table-cell table:style-name="Tableau1.A8" office:value-type="string">
            <text:p text:style-name="Table_20_Contents">BASKET_OVERVIEW_TEMPLATE</text:p>
          </table:table-cell>
          <table:table-cell table:style-name="Tableau1.B2" office:value-type="string">
            <text:p text:style-name="Table_20_Contents"/>
          </table:table-cell>
          <table:table-cell table:style-name="Tableau1.C4" office:value-type="string">
            <text:p text:style-name="Table_20_Contents"/>
          </table:table-cell>
        </table:table-row>
        <table:table-row>
          <table:table-cell table:style-name="Tableau1.A9" office:value-type="string">
            <text:p text:style-name="Table_20_Contents">BASKET_PAYMENT_TEMPLATE</text:p>
          </table:table-cell>
          <table:table-cell table:style-name="Tableau1.B2" office:value-type="string">
            <text:p text:style-name="Table_20_Contents"/>
          </table:table-cell>
          <table:table-cell table:style-name="Tableau1.C4" office:value-type="string">
            <text:p text:style-name="Table_20_Contents"/>
          </table:table-cell>
        </table:table-row>
        <table:table-row>
          <table:table-cell table:style-name="Tableau1.A10" office:value-type="string">
            <text:p text:style-name="Table_20_Contents">BASKET_REQUIRED_INFO_MISSING</text:p>
          </table:table-cell>
          <table:table-cell table:style-name="Tableau1.B2" office:value-type="string">
            <text:p text:style-name="Table_20_Contents"/>
          </table:table-cell>
          <table:table-cell table:style-name="Tableau1.C4" office:value-type="string">
            <text:p text:style-name="Table_20_Contents"/>
          </table:table-cell>
        </table:table-row>
        <table:table-row>
          <table:table-cell table:style-name="Tableau1.A11" office:value-type="string">
            <text:p text:style-name="Table_20_Contents">BASKET_TEMPLATE_EMPTY</text:p>
          </table:table-cell>
          <table:table-cell table:style-name="Tableau1.B2" office:value-type="string">
            <text:p text:style-name="P30">Annonce 'Votre panier est encore vide'</text:p>
          </table:table-cell>
          <table:table-cell table:style-name="Tableau1.C4" office:value-type="string">
            <text:p text:style-name="Table_20_Contents"/>
          </table:table-cell>
        </table:table-row>
        <table:table-row>
          <table:table-cell table:style-name="Tableau1.A12" office:value-type="string">
            <text:p text:style-name="Table_20_Contents">BASKET_TEMPLATE_NOT_LOGGED_IN</text:p>
          </table:table-cell>
          <table:table-cell table:style-name="Tableau1.B2" office:value-type="string">
            <text:p text:style-name="Table_20_Contents">Annonce d'erreur que l'utilisateur se n'est pas encore logé.</text:p>
          </table:table-cell>
          <table:table-cell table:style-name="Tableau1.C4" office:value-type="string">
            <text:p text:style-name="Table_20_Contents"/>
          </table:table-cell>
        </table:table-row>
        <table:table-row>
          <table:table-cell table:style-name="Tableau1.A13" office:value-type="string">
            <text:p text:style-name="Table_20_Contents">BASKET_TEMPLATE_INVALID_GIFT_UNIQUE_ID</text:p>
          </table:table-cell>
          <table:table-cell table:style-name="Tableau1.B2" office:value-type="string">
            <text:p text:style-name="Table_20_Contents">Annonce d'erreur que le numéro indicatif soit injuste pour un certificat de cadeau.</text:p>
          </table:table-cell>
          <table:table-cell table:style-name="Tableau1.C4" office:value-type="string">
            <text:p text:style-name="Table_20_Contents"/>
          </table:table-cell>
        </table:table-row>
        <table:table-row>
          <table:table-cell table:style-name="Tableau1.A14" office:value-type="string">
            <text:p text:style-name="Table_20_Contents">BILL_TEMPLATE</text:p>
          </table:table-cell>
          <table:table-cell table:style-name="Tableau1.B2" office:value-type="string">
            <text:p text:style-name="Table_20_Contents">pour mise en oeuvre de la facture</text:p>
          </table:table-cell>
          <table:table-cell table:style-name="Tableau1.C4" office:value-type="string">
            <text:p text:style-name="Table_20_Contents"/>
          </table:table-cell>
        </table:table-row>
        <table:table-row>
          <table:table-cell table:style-name="Tableau1.A15" office:value-type="string">
            <text:p text:style-name="Table_20_Contents">DELIVERY_TEMPLATE</text:p>
          </table:table-cell>
          <table:table-cell table:style-name="Tableau1.B2" office:value-type="string">
            <text:p text:style-name="Table_20_Contents">Activer les dates de livraisons</text:p>
          </table:table-cell>
          <table:table-cell table:style-name="Tableau1.C4" office:value-type="string">
            <text:p text:style-name="Table_20_Contents"/>
          </table:table-cell>
        </table:table-row>
        <table:table-row>
          <table:table-cell table:style-name="Tableau1.A16" office:value-type="string">
            <text:p text:style-name="Table_20_Contents">EMAIL_PLAINTEXT_TEMPLATE</text:p>
          </table:table-cell>
          <table:table-cell table:style-name="Tableau1.B2" office:value-type="string">
            <text:p text:style-name="Table_20_Contents">Texte pour le message d'émail. La première ligne est réservée au champ rapport </text:p>
          </table:table-cell>
          <table:table-cell table:style-name="Tableau1.C4" office:value-type="string">
            <text:p text:style-name="Table_20_Contents"/>
          </table:table-cell>
        </table:table-row>
        <table:table-row>
          <table:table-cell table:style-name="Tableau1.A17" office:value-type="string">
            <text:p text:style-name="Table_20_Contents">EMAIL_NEWUSER_TEMPLATE</text:p>
          </table:table-cell>
          <table:table-cell table:style-name="Tableau1.B2" office:value-type="string">
            <text:p text:style-name="Table_20_Contents">Émail après la génération d'un utilisateur front.</text:p>
          </table:table-cell>
          <table:table-cell table:style-name="Tableau1.C4" office:value-type="string">
            <text:p text:style-name="Table_20_Contents"/>
          </table:table-cell>
        </table:table-row>
        <table:table-row>
          <table:table-cell table:style-name="Tableau1.A18" office:value-type="string">
            <text:p text:style-name="Table_20_Contents">ITEM_LIST_TEMPLATE</text:p>
          </table:table-cell>
          <table:table-cell table:style-name="Tableau1.B2" office:value-type="string">
            <text:p text:style-name="Table_20_Contents">Catalogue des produits sur la page du départ LIST</text:p>
          </table:table-cell>
          <table:table-cell table:style-name="Tableau1.C4" office:value-type="string">
            <text:p text:style-name="Table_20_Contents"/>
          </table:table-cell>
        </table:table-row>
        <table:table-row>
          <table:table-cell table:style-name="Tableau1.A19" office:value-type="string">
            <text:p text:style-name="Table_20_Contents">ITEM_LIST_GIFTS_TEMPLATE</text:p>
          </table:table-cell>
          <table:table-cell table:style-name="Tableau1.B2" office:value-type="string">
            <text:p text:style-name="Table_20_Contents">Énumération des produits avec bon de cadeau.</text:p>
          </table:table-cell>
          <table:table-cell table:style-name="Tableau1.C4" office:value-type="string">
            <text:p text:style-name="Table_20_Contents"/>
          </table:table-cell>
        </table:table-row>
        <table:table-row>
          <table:table-cell table:style-name="Tableau1.A20" office:value-type="string">
            <text:p text:style-name="Table_20_Contents">ITEM_SEARCH</text:p>
          </table:table-cell>
          <table:table-cell table:style-name="Tableau1.B2" office:value-type="string">
            <text:p text:style-name="Table_20_Contents"/>
          </table:table-cell>
          <table:table-cell table:style-name="Tableau1.C4" office:value-type="string">
            <text:p text:style-name="Table_20_Contents"/>
          </table:table-cell>
        </table:table-row>
        <table:table-row>
          <table:table-cell table:style-name="Tableau1.A21" office:value-type="string">
            <text:p text:style-name="Table_20_Contents">ITEM_SEARCH_EMPTY</text:p>
          </table:table-cell>
          <table:table-cell table:style-name="Tableau1.B2" office:value-type="string">
            <text:p text:style-name="Table_20_Contents"/>
          </table:table-cell>
          <table:table-cell table:style-name="Tableau1.C4" office:value-type="string">
            <text:p text:style-name="Table_20_Contents"/>
          </table:table-cell>
        </table:table-row>
        <table:table-row>
          <table:table-cell table:style-name="Tableau1.A22" office:value-type="string">
            <text:p text:style-name="Table_20_Contents">ITEM_SINGLE_DISPLAY</text:p>
          </table:table-cell>
          <table:table-cell table:style-name="Tableau1.B2" office:value-type="string">
            <text:p text:style-name="Table_20_Contents"/>
          </table:table-cell>
          <table:table-cell table:style-name="Tableau1.C4" office:value-type="string">
            <text:p text:style-name="Table_20_Contents"/>
          </table:table-cell>
        </table:table-row>
        <table:table-row>
          <table:table-cell table:style-name="Tableau1.A23" office:value-type="string">
            <text:p text:style-name="Table_20_Contents">ITEM_SINGLE_DISPLAY_GIFT</text:p>
          </table:table-cell>
          <table:table-cell table:style-name="Tableau1.B2" office:value-type="string">
            <text:p text:style-name="Table_20_Contents">Revue en détail des bons de cadeaux</text:p>
          </table:table-cell>
          <table:table-cell table:style-name="Tableau1.C4" office:value-type="string">
            <text:p text:style-name="Table_20_Contents"/>
          </table:table-cell>
        </table:table-row>
        <table:table-row>
          <table:table-cell table:style-name="Tableau1.A24" office:value-type="string">
            <text:p text:style-name="Table_20_Contents">ITEM_SINGLE_DISPLAY_NOT_IN_STOCK</text:p>
          </table:table-cell>
          <table:table-cell table:style-name="Tableau1.B2" office:value-type="string">
            <text:p text:style-name="Table_20_Contents">Revue en détail pour articles qui ne sont pas en stock.</text:p>
          </table:table-cell>
          <table:table-cell table:style-name="Tableau1.C4" office:value-type="string">
            <text:p text:style-name="Table_20_Contents"/>
          </table:table-cell>
        </table:table-row>
        <table:table-row>
          <table:table-cell table:style-name="Tableau1.A25" office:value-type="string">
            <text:p text:style-name="Table_20_Contents">ITEM_SINGLE_DISPLAY_RECORDINSERT</text:p>
          </table:table-cell>
          <table:table-cell table:style-name="Tableau1.B2" office:value-type="string">
            <text:p text:style-name="Table_20_Contents">Voir displayCurrentRecord: générer de $cObj-&gt;data</text:p>
          </table:table-cell>
          <table:table-cell table:style-name="Tableau1.C4" office:value-type="string">
            <text:p text:style-name="Table_20_Contents"/>
          </table:table-cell>
        </table:table-row>
        <table:table-row>
          <table:table-cell table:style-name="Tableau1.A26" office:value-type="string">
            <text:p text:style-name="Table_20_Contents">MEMO_TEMPLATE</text:p>
          </table:table-cell>
          <table:table-cell table:style-name="Tableau1.B2" office:value-type="string">
            <text:p text:style-name="Table_20_Contents"/>
          </table:table-cell>
          <table:table-cell table:style-name="Tableau1.C4" office:value-type="string">
            <text:p text:style-name="Table_20_Contents"/>
          </table:table-cell>
        </table:table-row>
        <table:table-row>
          <table:table-cell table:style-name="Tableau1.A27" office:value-type="string">
            <text:p text:style-name="Table_20_Contents">MEMO_NOT_LOGGED_IN</text:p>
          </table:table-cell>
          <table:table-cell table:style-name="Tableau1.B2" office:value-type="string">
            <text:p text:style-name="Table_20_Contents">Annonce d'erreur que l'utilisateur pour MEMO n'est pas logé.</text:p>
          </table:table-cell>
          <table:table-cell table:style-name="Tableau1.C4" office:value-type="string">
            <text:p text:style-name="Table_20_Contents"/>
          </table:table-cell>
        </table:table-row>
        <table:table-row>
          <table:table-cell table:style-name="Tableau1.A28" office:value-type="string">
            <text:p text:style-name="Table_20_Contents">ORDERS_LIST_TEMPLATE</text:p>
          </table:table-cell>
          <table:table-cell table:style-name="Tableau1.B2" office:value-type="string">
            <text:p text:style-name="Table_20_Contents">Annonce liste des commandes</text:p>
          </table:table-cell>
          <table:table-cell table:style-name="Tableau1.C4" office:value-type="string">
            <text:p text:style-name="Table_20_Contents"/>
          </table:table-cell>
        </table:table-row>
        <table:table-row>
          <table:table-cell table:style-name="Tableau1.A29" office:value-type="string">
            <text:p text:style-name="Table_20_Contents">TRACKING_EMAIL_GIFTNOTIFY_TEMPLATE</text:p>
          </table:table-cell>
          <table:table-cell table:style-name="Tableau1.B2" office:value-type="string">
            <text:p text:style-name="Table_20_Contents">Information au bénéficiaire d'un bon de cadeau dans l'administration des commandes.</text:p>
          </table:table-cell>
          <table:table-cell table:style-name="Tableau1.C4" office:value-type="string">
            <text:p text:style-name="Table_20_Contents"/>
          </table:table-cell>
        </table:table-row>
        <table:table-row>
          <table:table-cell table:style-name="Tableau1.A30" office:value-type="string">
            <text:p text:style-name="Table_20_Contents">TRACKING_ENTER_NUMBER</text:p>
          </table:table-cell>
          <table:table-cell table:style-name="Tableau1.B2" office:value-type="string">
            <text:p text:style-name="Table_20_Contents"/>
          </table:table-cell>
          <table:table-cell table:style-name="Tableau1.C4" office:value-type="string">
            <text:p text:style-name="Table_20_Contents"/>
          </table:table-cell>
        </table:table-row>
        <text:soft-page-break/>
        <table:table-row>
          <table:table-cell table:style-name="Tableau1.A31" office:value-type="string">
            <text:p text:style-name="Table_20_Contents">TRACKING_WRONG_NUMBER</text:p>
          </table:table-cell>
          <table:table-cell table:style-name="Tableau1.B2" office:value-type="string">
            <text:p text:style-name="Table_20_Contents"/>
          </table:table-cell>
          <table:table-cell table:style-name="Tableau1.C4" office:value-type="string">
            <text:p text:style-name="Table_20_Contents"/>
          </table:table-cell>
        </table:table-row>
      </table:table>
      <text:h text:style-name="P47" text:outline-level="4">Marquer <text:s/>individuel:</text:h>
      <text:p text:style-name="P10"/>
      <table:table table:name="Tableau8" table:style-name="Tableau8">
        <table:table-column table:style-name="Tableau8.A"/>
        <table:table-column table:style-name="Tableau8.B"/>
        <table:table-column table:style-name="Tableau8.C"/>
        <table:table-column table:style-name="Tableau8.D"/>
        <table:table-header-rows>
          <table:table-row>
            <table:table-cell table:style-name="Tableau8.A1" office:value-type="string">
              <text:p text:style-name="Table_20_Heading">Marquage:</text:p>
            </table:table-cell>
            <table:table-cell table:style-name="Tableau8.A1" office:value-type="string">
              <text:p text:style-name="Table_20_Heading">Type:</text:p>
            </table:table-cell>
            <table:table-cell table:style-name="Tableau8.A1" office:value-type="string">
              <text:p text:style-name="Table_20_Heading">Description:</text:p>
            </table:table-cell>
            <table:table-cell table:style-name="Tableau8.D1" office:value-type="string">
              <text:p text:style-name="Table_20_Heading">Secteur:</text:p>
            </table:table-cell>
          </table:table-row>
        </table:table-header-rows>
        <table:table-row>
          <table:table-cell table:style-name="Tableau8.A2" office:value-type="string">
            <text:p text:style-name="Table_20_Contents">BROWSE_LINKS</text:p>
          </table:table-cell>
          <table:table-cell table:style-name="Tableau8.A2" office:value-type="string">
            <text:p text:style-name="Table_20_Contents"/>
          </table:table-cell>
          <table:table-cell table:style-name="Tableau8.A2" office:value-type="string">
            <text:p text:style-name="Table_20_Contents">Pour regarder sur plusieurs pages dans l'annonce</text:p>
          </table:table-cell>
          <table:table-cell table:style-name="Tableau8.D2" office:value-type="string">
            <text:p text:style-name="Table_20_Contents"/>
          </table:table-cell>
        </table:table-row>
        <table:table-row>
          <table:table-cell table:style-name="Tableau8.A2" office:value-type="string">
            <text:p text:style-name="Table_20_Contents">DELIVERYCOSTS</text:p>
          </table:table-cell>
          <table:table-cell table:style-name="Tableau8.A2" office:value-type="string">
            <text:p text:style-name="Table_20_Contents">value</text:p>
          </table:table-cell>
          <table:table-cell table:style-name="Tableau8.A2" office:value-type="string">
            <text:p text:style-name="Table_20_Contents">Somme de frais de livraison et frais pour la paiement.</text:p>
          </table:table-cell>
          <table:table-cell table:style-name="Tableau8.D2" office:value-type="string">
            <text:p text:style-name="Table_20_Contents"/>
          </table:table-cell>
        </table:table-row>
        <table:table-row>
          <table:table-cell table:style-name="Tableau8.A2" office:value-type="string">
            <text:p text:style-name="Table_20_Contents">DELIVERY_...<text:line-break/>NOTE<text:line-break/>NOTE_DISPLAY<text:line-break/>DESIRED_DATE</text:p>
          </table:table-cell>
          <table:table-cell table:style-name="Tableau8.A2" office:value-type="string">
            <text:p text:style-name="Table_20_Contents">value</text:p>
          </table:table-cell>
          <table:table-cell table:style-name="Tableau8.A2" office:value-type="string">
            <text:p text:style-name="Table_20_Contents">Voir aussi PERSON_...</text:p>
            <text:p text:style-name="Table_20_Contents">Champ de saisie remarque pour la commande.</text:p>
            <text:p text:style-name="Table_20_Contents">Annonce remarque avec &lt;br&gt; pour changement de lignes</text:p>
            <text:p text:style-name="Table_20_Contents">livraison désirée </text:p>
          </table:table-cell>
          <table:table-cell table:style-name="Tableau8.D2" office:value-type="string">
            <text:p text:style-name="Table_20_Contents">BASKET_INFO_TEMPLATE</text:p>
          </table:table-cell>
        </table:table-row>
        <table:table-row>
          <table:table-cell table:style-name="Tableau8.A2" office:value-type="string">
            <text:p text:style-name="Table_20_Contents">EXTERNAL_COBJECT</text:p>
          </table:table-cell>
          <table:table-cell table:style-name="Tableau8.A2" office:value-type="string">
            <text:p text:style-name="Table_20_Contents">value</text:p>
          </table:table-cell>
          <table:table-cell table:style-name="Tableau8.A2" office:value-type="string">
            <text:p text:style-name="Table_20_Contents">objet d'en plus</text:p>
          </table:table-cell>
          <table:table-cell table:style-name="Tableau8.D2" office:value-type="string">
            <text:p text:style-name="Table_20_Contents"/>
          </table:table-cell>
        </table:table-row>
        <table:table-row>
          <table:table-cell table:style-name="Tableau8.A2" office:value-type="string">
            <text:p text:style-name="Table_20_Contents">FIELD_NAME</text:p>
          </table:table-cell>
          <table:table-cell table:style-name="Tableau8.A2" office:value-type="string">
            <text:p text:style-name="Table_20_Contents">value in form</text:p>
          </table:table-cell>
          <table:table-cell table:style-name="Tableau8.A2" office:value-type="string">
            <text:p text:style-name="Table_20_Contents">nome du champs dans une formule (HTML)</text:p>
          </table:table-cell>
          <table:table-cell table:style-name="Tableau8.D2" office:value-type="string">
            <text:p text:style-name="Table_20_Contents"/>
          </table:table-cell>
        </table:table-row>
        <table:table-row>
          <table:table-cell table:style-name="Tableau8.A2" office:value-type="string">
            <text:p text:style-name="Table_20_Contents">FIELD_NAME_BASKET</text:p>
          </table:table-cell>
          <table:table-cell table:style-name="Tableau8.A2" office:value-type="string">
            <text:p text:style-name="Table_20_Contents">value in form</text:p>
          </table:table-cell>
          <table:table-cell table:style-name="Tableau8.A2" office:value-type="string">
            <text:p text:style-name="Table_20_Contents">Les données du panier d'une manière chiffrée.</text:p>
          </table:table-cell>
          <table:table-cell table:style-name="Tableau8.D2" office:value-type="string">
            <text:p text:style-name="Table_20_Contents"/>
          </table:table-cell>
        </table:table-row>
        <table:table-row>
          <table:table-cell table:style-name="Tableau8.A2" office:value-type="string">
            <text:p text:style-name="P29">GC1, GC2, GC3</text:p>
          </table:table-cell>
          <table:table-cell table:style-name="Tableau8.A2" office:value-type="string">
            <text:p text:style-name="Table_20_Contents">value</text:p>
          </table:table-cell>
          <table:table-cell table:style-name="Tableau8.A2" office:value-type="string">
            <text:p text:style-name="Table_20_Contents">couleurs globales</text:p>
          </table:table-cell>
          <table:table-cell table:style-name="Tableau8.D2" office:value-type="string">
            <text:p text:style-name="Table_20_Contents">tous</text:p>
          </table:table-cell>
        </table:table-row>
        <table:table-row>
          <table:table-cell table:style-name="Tableau8.A2" office:value-type="string">
            <text:p text:style-name="P29">GW1B, GW2B, GW1E, GW2E</text:p>
          </table:table-cell>
          <table:table-cell table:style-name="Tableau8.A2" office:value-type="string">
            <text:p text:style-name="Table_20_Contents">wrap</text:p>
          </table:table-cell>
          <table:table-cell table:style-name="Tableau8.A2" office:value-type="string">
            <text:p text:style-name="Table_20_Contents">Marques globales enveloppes (HTML wraps)</text:p>
          </table:table-cell>
          <table:table-cell table:style-name="Tableau8.D2" office:value-type="string">
            <text:p text:style-name="Table_20_Contents">tous</text:p>
          </table:table-cell>
        </table:table-row>
        <table:table-row>
          <table:table-cell table:style-name="Tableau8.A2" office:value-type="string">
            <text:p text:style-name="P29">PRICE_TAX</text:p>
            <text:p text:style-name="P29">PRICE_NO_TAX</text:p>
            <text:p text:style-name="P29">PRICE2_TAX</text:p>
            <text:p text:style-name="P29">PRICE2_NO_TAX</text:p>
          </table:table-cell>
          <table:table-cell table:style-name="Tableau8.A2" office:value-type="string">
            <text:p text:style-name="Table_20_Contents">value</text:p>
          </table:table-cell>
          <table:table-cell table:style-name="Tableau8.A2" office:value-type="string">
            <text:p text:style-name="Table_20_Contents">prix/prix2 d'article taxe compris on tax non compris </text:p>
          </table:table-cell>
          <table:table-cell table:style-name="Tableau8.D2" office:value-type="string">
            <text:p text:style-name="Table_20_Contents">ITEM_SINGLE</text:p>
          </table:table-cell>
        </table:table-row>
        <table:table-row>
          <table:table-cell table:style-name="Tableau8.A2" office:value-type="string">
            <text:p text:style-name="P29">PRICE_TOTAL_TAX</text:p>
            <text:p text:style-name="P29">PRICE_TOTAL_NO_TAX</text:p>
          </table:table-cell>
          <table:table-cell table:style-name="Tableau8.A2" office:value-type="string">
            <text:p text:style-name="Table_20_Contents">value</text:p>
          </table:table-cell>
          <table:table-cell table:style-name="Tableau8.A2" office:value-type="string">
            <text:p text:style-name="Table_20_Contents">somme totale ent tous avec paiement et frais de livraisons</text:p>
          </table:table-cell>
          <table:table-cell table:style-name="Tableau8.D2" office:value-type="string">
            <text:p text:style-name="Table_20_Contents">tous</text:p>
          </table:table-cell>
        </table:table-row>
        <table:table-row>
          <table:table-cell table:style-name="Tableau8.A2" office:value-type="string">
            <text:p text:style-name="P29">PRICE_GOODSTOTAL_TAX</text:p>
            <text:p text:style-name="P29">PRICE_GOODSTOTAL_NO_TAX</text:p>
            <text:p text:style-name="P29">PRICE2_GOODSTOTAL_TAX</text:p>
            <text:p text:style-name="P29">PRICE2_GOODSTOTAL_NO_TAX</text:p>
          </table:table-cell>
          <table:table-cell table:style-name="Tableau8.A2" office:value-type="string">
            <text:p text:style-name="Table_20_Contents">value</text:p>
          </table:table-cell>
          <table:table-cell table:style-name="Tableau8.A2" office:value-type="string">
            <text:p text:style-name="Table_20_Contents">somme totale sur tous item pour prix ou prix2</text:p>
          </table:table-cell>
          <table:table-cell table:style-name="Tableau8.D2" office:value-type="string">
            <text:p text:style-name="Table_20_Contents">tous</text:p>
          </table:table-cell>
        </table:table-row>
        <table:table-row>
          <table:table-cell table:style-name="Tableau8.A2" office:value-type="string">
            <text:p text:style-name="Table_20_Contents">LINK_DATASHEET</text:p>
          </table:table-cell>
          <table:table-cell table:style-name="Tableau8.A2" office:value-type="string">
            <text:p text:style-name="Table_20_Contents"/>
          </table:table-cell>
          <table:table-cell table:style-name="Tableau8.A2" office:value-type="string">
            <text:p text:style-name="Table_20_Contents">Lien sur fiche technique dans</text:p>
            <text:p text:style-name="Table_20_Contents">uploads/tx_ttproducts/datasheet</text:p>
          </table:table-cell>
          <table:table-cell table:style-name="Tableau8.D2" office:value-type="string">
            <text:p text:style-name="Table_20_Contents"/>
          </table:table-cell>
        </table:table-row>
        <table:table-row>
          <table:table-cell table:style-name="Tableau8.A2" office:value-type="string">
            <text:p text:style-name="Table_20_Contents">ORDER_STATUS_TIME, </text:p>
            <text:p text:style-name="Table_20_Contents">ORDER_STATUS, ORDER_STATUS_INFO, ORDER_STATUS_COMMENT</text:p>
          </table:table-cell>
          <table:table-cell table:style-name="Tableau8.A2" office:value-type="string">
            <text:p text:style-name="Table_20_Contents">value</text:p>
          </table:table-cell>
          <table:table-cell table:style-name="Tableau8.A2" office:value-type="string">
            <text:p text:style-name="Table_20_Contents">Données sur commande</text:p>
          </table:table-cell>
          <table:table-cell table:style-name="Tableau8.D2" office:value-type="string">
            <text:p text:style-name="Table_20_Contents">TRACKING_DISPLAY_INFO</text:p>
          </table:table-cell>
        </table:table-row>
        <table:table-row>
          <table:table-cell table:style-name="Tableau8.A2" office:value-type="string">
            <text:p text:style-name="Table_20_Contents">PERSON_...<text:line-break/>NAME,<text:line-break/>ADDRESS,<text:line-break/>TELEPHONE,</text:p>
            <text:p text:style-name="Table_20_Contents">FAX,<text:line-break/>EMAIL,</text:p>
            <text:p text:style-name="Table_20_Contents">COMPANY,</text:p>
            <text:p text:style-name="Table_20_Contents">CITY,</text:p>
            <text:p text:style-name="Table_20_Contents">ZIP,</text:p>
            <text:p text:style-name="Table_20_Contents">STATE,</text:p>
            <text:p text:style-name="Table_20_Contents">COUNTRY</text:p>
          </table:table-cell>
          <table:table-cell table:style-name="Tableau8.A2" office:value-type="string">
            <text:p text:style-name="Table_20_Contents">value</text:p>
          </table:table-cell>
          <table:table-cell table:style-name="Tableau8.A2" office:value-type="string">
            <text:p text:style-name="Table_20_Contents">Champs pour adresse information</text:p>
            <text:p text:style-name="Table_20_Contents">mettre au début un préfixe</text:p>
            <text:p text:style-name="Table_20_Contents">PERSON_... <text:s/>le client de la commande</text:p>
            <text:p text:style-name="Table_20_Contents">DELIVERY_... bénéficiaire de la commande</text:p>
          </table:table-cell>
          <table:table-cell table:style-name="Tableau8.D2" office:value-type="string">
            <text:p text:style-name="Table_20_Contents"/>
          </table:table-cell>
        </table:table-row>
        <table:table-row>
          <table:table-cell table:style-name="Tableau8.A2" office:value-type="string">
            <text:p text:style-name="Table_20_Contents">PID_TRACKING</text:p>
          </table:table-cell>
          <table:table-cell table:style-name="Tableau8.A2" office:value-type="string">
            <text:p text:style-name="Table_20_Contents">value</text:p>
          </table:table-cell>
          <table:table-cell table:style-name="Tableau8.A2" office:value-type="string">
            <text:p text:style-name="Table_20_Contents">Nombre de la page pour faire rétrospection sur le état de la commande</text:p>
          </table:table-cell>
          <table:table-cell table:style-name="Tableau8.D2" office:value-type="string">
            <text:p text:style-name="Table_20_Contents"/>
          </table:table-cell>
        </table:table-row>
        <table:table-row>
          <table:table-cell table:style-name="Tableau8.A2" office:value-type="string">
            <text:p text:style-name="Table_20_Contents">STATUS_CODE_60 </text:p>
          </table:table-cell>
          <table:table-cell table:style-name="Tableau8.A2" office:value-type="string">
            <text:p text:style-name="Table_20_Contents">wrap</text:p>
          </table:table-cell>
          <table:table-cell table:style-name="Tableau8.A2" office:value-type="string">
            <text:p text:style-name="Table_20_Contents">Sera utilisé pour garantir que l'envoi du bon de cadeau par émail ne sera pas fait avant le paiement .</text:p>
          </table:table-cell>
          <table:table-cell table:style-name="Tableau8.D2" office:value-type="string">
            <text:p text:style-name="Table_20_Contents">TRACKING_DISPLAY_INFO</text:p>
          </table:table-cell>
        </table:table-row>
        <table:table-row>
          <table:table-cell table:style-name="Tableau8.A2" office:value-type="string">
            <text:p text:style-name="Table_20_Contents">STATUS_OPTIONS</text:p>
          </table:table-cell>
          <table:table-cell table:style-name="Tableau8.A2" office:value-type="string">
            <text:p text:style-name="Table_20_Contents">value</text:p>
          </table:table-cell>
          <table:table-cell table:style-name="Tableau8.A2" office:value-type="string">
            <text:p text:style-name="Table_20_Contents">Menu du choix afin de voir l'actualité des états de les commandes.</text:p>
          </table:table-cell>
          <table:table-cell table:style-name="Tableau8.D2" office:value-type="string">
            <text:p text:style-name="P15">ADMIN_CONTROL inside TRACKING_DISPLAY_INFO</text:p>
          </table:table-cell>
        </table:table-row>
        <table:table-row>
          <table:table-cell table:style-name="Tableau8.A2" office:value-type="string">
            <text:p text:style-name="Table_20_Contents">SHOPADMIN_EMAIL</text:p>
          </table:table-cell>
          <table:table-cell table:style-name="Tableau8.A2" office:value-type="string">
            <text:p text:style-name="Table_20_Contents">value</text:p>
          </table:table-cell>
          <table:table-cell table:style-name="Tableau8.A2" office:value-type="string">
            <text:p text:style-name="Table_20_Contents">èmail adresse du administrateur de la boutique</text:p>
          </table:table-cell>
          <table:table-cell table:style-name="Tableau8.D2" office:value-type="string">
            <text:p text:style-name="P15">tous</text:p>
          </table:table-cell>
        </table:table-row>
      </table:table>
      <text:p text:style-name="P10"><text:soft-page-break/></text:p>
      <text:h text:style-name="P47" text:outline-level="4"/>
      <text:h text:style-name="Heading_20_3" text:outline-level="3">Création automatique des utilisateurs front </text:h>
      <text:p text:style-name="Text_20_body">Il est possible après chaque commande d'enregistrer automatiquement un utilisateur front. Vous devez mettre <text:s/>"createUsers" sur "1", puis enregistrer la PID du dossier système comme PIDuserFolder dans le champ setup. Par ailleurs il faut mettre la "memberOfGroup" sur la ID de votre group pour les utilisateurs front. Après la première commande le client reçoit par émail ses dates d'entrées. L'émail contient le nom du compte, identique à l'adresse d'émail et son mot de pas autogénérée. </text:p>
      <text:p text:style-name="Text_20_body">Si vous ne voulez pas avoir une seule zone de texte pour l'adresse et vous préférez ajouter des zones en plus ainsi que pour la rue, le numéro de la maison, et numéros postales de la ville ou du pays, alors il faut adapter le fichier modèle. Si vous utilisez “useStaticInfoCountry=1”, le petit champ static_info_country du tableau d'utilisateurs front <text:s/>sera mis en oeuvre au lieu du champ pays country. C'est nécessaire si vous faisez une select box pour choisir les pays.</text:p>
      <text:h text:style-name="Heading_20_3" text:outline-level="3">Caractéristiques du produit:</text:h>
      <text:p text:style-name="P12">Les attributs du produit serait mis dan le dossier système dans le backend polour le produit en question. Voir <text:s/>tableau suivante. <text:s/></text:p>
      <text:p text:style-name="P12"><draw:frame draw:style-name="fr1" draw:name="Image1" text:anchor-type="paragraph" svg:x="0.233cm" svg:y="0.429cm" svg:width="9.641cm" svg:height="14.54cm" draw:z-index="70"><draw:image xlink:href="Pictures/100000010000024200000332CBE387EA.png" xlink:type="simple" xlink:show="embed" xlink:actuate="onLoad" draw:mime-type="image/png"/></draw:frame></text:p>
      <text:h text:style-name="Heading_20_4" text:outline-level="4">Couleur, taille, additionnel <text:s/>et étalement </text:h>
      <text:p text:style-name="Text_20_body">Pour mettre des produits divers, il faut faire des valeurs par points virgules. Alors vous indiquez pour des tee-shirts en couleurs et tailles diverses "rouge, vert, bleue".la variante 1 et pour "S,X,XL,XXL" la variante 2. <text:soft-page-break/>Couleur (variante 1) et taille (variante 2): Servez vous ici des valeurs des titres en le séparant par "colon":</text:p>
      <text:p text:style-name="Preformatted_20_Text">M;L;XL;XXL</text:p>
      <text:p text:style-name="Text_20_body">Changez le fichier modèle pour que cela soit supporte:</text:p>
      <text:p text:style-name="Preformatted_20_Text"><text:s text:c="2"/>&lt;!-- ###display_variant1### --&gt;</text:p>
      <text:p text:style-name="Preformatted_20_Text"><text:s text:c="2"/>###GW2B### Color: ###GW2E### &lt;SELECT style="font-size: 10px"</text:p>
      <text:p text:style-name="Preformatted_20_Text"><text:s text:c="2"/>name="###FIELD_COLOR_NAME###" rows="1"&gt;###PRODUCT_COLOR###&lt;/SELECT&gt;&lt;br&gt;</text:p>
      <text:p text:style-name="Preformatted_20_Text"><text:s text:c="2"/>&lt;!-- ###display_variant1### --&gt;</text:p>
      <text:p text:style-name="Preformatted_20_Text"><text:s text:c="2"/>&lt;!-- ###display_variant2### --&gt;</text:p>
      <text:p text:style-name="Preformatted_20_Text"><text:s text:c="2"/>###GW2B### Size: ###GW2E### &lt;SELECT style="font-size: 10px"</text:p>
      <text:p text:style-name="Preformatted_20_Text"><text:s text:c="2"/>name="###FIELD_SIZE_NAME###" rows="1"&gt;###PRODUCT_SIZE###&lt;/SELECT&gt;&lt;br&gt; &lt;!-- ###display_variant2### --&gt; </text:p>
      <text:p text:style-name="P12">Si vous ne voulez pas faire les couleurs et tailles éligibles, vous devez mettre dans le modèle setup selectColor ou selectSize à zéro et enlever dans le modèle fichier les marqueurs ###display_variant### <text:s/>correspondantes. Vous pouvez utiliser ces marqueurs pour démontrer des couleurs aussi qu'aucune couleurs différentes peuvent être choisies (alors seulement utiliser les marquers ###PRODUCT_COLOR### <text:s/>et ###PRODUCT_SIZE###). <text:s/>Parce que couleurs et taille furent mis à zero.</text:p>
      <text:p text:style-name="P12">Le nome de le champ de tous les champs dans les listes en vue et en regard paniers de marchandises est adressé avec le marquer <text:s/><text:span text:style-name="T5">###FIELD_NAME### . Ce marqueur sera remplacé dans la boutique par un nom de champ afin que le champ soit lu et correctement enregistre. </text:span></text:p>
      <text:p text:style-name="P13">Si vous avez des produits nombreux <text:s/>des couleurs et tailles différentes alors il faut remplacer dans la zone <text:s/>BASKET_TEMPLATE le marqueur ###FIELD_NAME### <text:s/>par le marqueur ###FIELD_NAME_BASKET### .</text:p>
      <text:p text:style-name="P13">Dans la liste du module toile vous pouvez ajouter aux articles déjà existantes avec des des variantes, par exemple couleurs. Vous choisissez le tableau produit article: </text:p>
      <text:p text:style-name="P21"/>
      <text:p text:style-name="P21"><draw:frame draw:style-name="fr1" draw:name="Image2" text:anchor-type="paragraph" svg:x="0.012cm" svg:y="0cm" svg:width="8.819cm" svg:height="13.711cm" draw:z-index="71"><draw:image xlink:href="Pictures/10000001000001C4000002D57327A2C9.png" xlink:type="simple" xlink:show="embed" xlink:actuate="onLoad" draw:mime-type="image/png"/></draw:frame></text:p>
      <text:p text:style-name="P12">Vous devez mettre:</text:p>
      <text:p text:style-name="P12">Modèle setup <text:s/><text:span text:style-name="T1">useArticles=1, afin de mettre en oeuvre les caractéristiques des articles. Si vous avez déjà activé des produits et leurs ajoutés aussi des différents couleurs, vous n'avez qu'un numéro d'article et le prix de la marchandise. Vous avez en plus besoin pour des articles des couleurs différentes aussi différentes </text:span><text:soft-page-break/><text:span text:style-name="T1">numéros d'article et peut-être d'autre prix. Ces classements se trouvent dans les caractéristiques des articles (module toile, liste, tableau produit articles) l'avantage c'est que vous ne devez pas de nouveau inscrire des articles nouvelles, parce que les caractéristiques seront hérités. Vous mettez tout simplement la couleur, le numéro nouveau d'article et éventuellement un autre prix. Tout autre indice du produit serait copie. Si vous laissez une voie vide, alors le contenu de la voie sera copié des attributs du produit. </text:span></text:p>
      <text:p text:style-name="P14">Il y à une différence si un article des couleurs et de taille soit indiqué dans la liste du produit ou dans le panier de marchandise. Normalement on choisit la couleur et la taille d'une produit sur une "boîte de choix". La liste des produits indique le nombre pour la première couleur/taille. Dans le panier de marchandise les produits seront déclarés en détail. La liste des produits dans le panier et la page de choix sont presque identique, mais ils seront differentement <text:s/>utilisées. Il vous faut activer <text:s/>selectSize et selectColor, si vous ne voulez pas vous servir des boîtes à choisir dans la liste des produits.</text:p>
      <text:h text:style-name="Heading_20_4" text:outline-level="4">Poids, encombrant , fabrication spéciale</text:h>
      <text:p text:style-name="P12">Chaque produit peut être déclarer selon poids et aussi comme encombrant <text:s/>(oui/non). Le poids totale des articles commandes sera calculé et peut faire base pour le calcul des frais de transports.</text:p>
      <text:p text:style-name="Text_20_body"><text:span text:style-name="T16">Si un article est marqué "encombrant", alors il y aura une avertissement <text:s/>lors de son rapport. ("bulkilyWarning" dans setup). En activant "bulkilyWarning" dans le setup, vous pouvez ajouter des frais de transports supplémentaires pour cet encombrant. <text:s text:c="2"/>Une fabrication spéciale <text:s/>implique pas d'autres fonctions. On ne fait qu'une indice comme chez "bulkilyWarning" . Vous pouvez mettre un lien sur la page d'émail.</text:span></text:p>
      <text:p text:style-name="P17">Par example: </text:p>
      <text:p text:style-name="Preformatted_20_Text">specialPreparation = fabication speciale est possible! &lt;a HREF="?id=999&amp;tt_products=###PRODUCT_ID###"&gt;Ordonner&lt;/a&gt;. </text:p>
      <text:h text:style-name="Heading_20_4" text:outline-level="4">Simple administration du stock</text:h>
      <text:p text:style-name="Text_20_body">La voie stock serte pour l'administration du stock. Quand "inStock" est mis à "0" , l'article n'est visible pour l'utilisateur. Apres chaque commission le nombre des articles commandes sera réduit du "en stock".</text:p>
      <text:p text:style-name="Text_20_body">En placent un article noubeau on met son valeur à "1". Quand vous avez mis en oeuvre <text:s/>"<text:span text:style-name="T16">AlwaysInStock=1" , alors ces articles seront toujours disponible et visible. Autrement le nombre d'articles se réduise à chaque commande. Pour avoir certaines articles toujours en stock, if faut mettre la valeur -1. Mais c'est seulement valable pour l'article en question. Vous pouvez mettre l'unité des articles dans le stock sur "inStockPieces", par example "pieces" ou botte. Cette unité ne peut être usé uniquement une seule fois et est valable pour tous produits. </text:span></text:p>
      <text:h text:style-name="Heading_20_4" text:outline-level="4">Plusieurs impôts</text:h>
      <text:p text:style-name="Text_20_body">Vous pouvez indiquer les impôts à chaque article.</text:p>
      <text:h text:style-name="P45" text:outline-level="2">Configuration</text:h>
      <text:h text:style-name="Heading_20_3" text:outline-level="3">Fichiers</text:h>
      <table:table table:name="Tableau2" table:style-name="Tableau2">
        <table:table-column table:style-name="Tableau2.A"/>
        <table:table-column table:style-name="Tableau2.B"/>
        <table:table-header-rows>
          <table:table-row>
            <table:table-cell table:style-name="Tableau2.A1" office:value-type="string">
              <text:p text:style-name="Table_20_Heading">Fichier</text:p>
            </table:table-cell>
            <table:table-cell table:style-name="Tableau2.B1" office:value-type="string">
              <text:p text:style-name="Table_20_Heading">Description:</text:p>
            </table:table-cell>
          </table:table-row>
        </table:table-header-rows>
        <table:table-row>
          <table:table-cell table:style-name="Tableau2.A2" office:value-type="string">
            <text:p text:style-name="Table_20_Contents">class.tx_ttproducts.php</text:p>
          </table:table-cell>
          <table:table-cell table:style-name="Tableau2.B2" office:value-type="string">
            <text:p text:style-name="Table_20_Contents">Classe principal pour faire voir la liste des produits ou du panier de marchandise.</text:p>
            <text:p text:style-name="Table_20_Contents">Utilisez les par USER cObject über 'userFunc = user_products-&gt;main_products'.</text:p>
          </table:table-cell>
        </table:table-row>
        <table:table-row>
          <table:table-cell table:style-name="Tableau2.A2" office:value-type="string">
            <text:p text:style-name="Table_20_Contents">products_comp_calcScript.inc</text:p>
          </table:table-cell>
          <table:table-cell table:style-name="Tableau2.B2" office:value-type="string">
            <text:p text:style-name="Table_20_Contents">Exemple script de calcul</text:p>
          </table:table-cell>
        </table:table-row>
        <table:table-row>
          <table:table-cell table:style-name="Tableau2.A2" office:value-type="string">
            <text:p text:style-name="Table_20_Contents">products_template.tmpl</text:p>
            <text:p text:style-name="Table_20_Contents">products_template_htmlmail.tmpl</text:p>
          </table:table-cell>
          <table:table-cell table:style-name="Tableau2.B2" office:value-type="string">
            <text:p text:style-name="Table_20_Contents">Exemple fichiers modèles en anglais.</text:p>
            <text:p text:style-name="Table_20_Contents">'.._htmlmail.tmpl' est un modèle pour les émail HTML</text:p>
          </table:table-cell>
        </table:table-row>
        <table:table-row>
          <table:table-cell table:style-name="Tableau2.A2" office:value-type="string">
            <text:p text:style-name="Table_20_Contents">products_template_dk.tmpl</text:p>
          </table:table-cell>
          <table:table-cell table:style-name="Tableau2.B2" office:value-type="string">
            <text:p text:style-name="Table_20_Contents">Exemple fichier modèle danois</text:p>
          </table:table-cell>
        </table:table-row>
        <table:table-row>
          <table:table-cell table:style-name="Tableau2.A2" office:value-type="string">
            <text:p text:style-name="Table_20_Contents">Beispiel_template_bill_de.tmpl</text:p>
          </table:table-cell>
          <table:table-cell table:style-name="Tableau2.B2" office:value-type="string">
            <text:p text:style-name="Table_20_Contents">bananaguard.de fichier modèle avec exemples pour calcul et le certificat du livraison en allemand.</text:p>
          </table:table-cell>
        </table:table-row>
        <table:table-row>
          <table:table-cell table:style-name="Tableau2.A2" office:value-type="string">
            <text:p text:style-name="Table_20_Contents">products_template_se.tmpl</text:p>
          </table:table-cell>
          <table:table-cell table:style-name="Tableau2.B2" office:value-type="string">
            <text:p text:style-name="Table_20_Contents">Exemple fichier modèle en suédois</text:p>
          </table:table-cell>
        </table:table-row>
        <table:table-row>
          <table:table-cell table:style-name="Tableau2.A2" office:value-type="string">
            <text:p text:style-name="Table_20_Contents">product_detail.tmpl<text:line-break/>product_proefpakketten.tmpl<text:line-break/>shop-a-box.tmpl<text:line-break/>producten.tmpl</text:p>
          </table:table-cell>
          <table:table-cell table:style-name="Tableau2.B2" office:value-type="string">
            <text:p text:style-name="Table_20_Contents">Exemple fichiers pour système des points de bons et bon de cadeau en hollandais </text:p>
          </table:table-cell>
        </table:table-row>
        <table:table-row>
          <table:table-cell table:style-name="Tableau2.B2" table:number-columns-spanned="2" office:value-type="string">
            <text:p text:style-name="Table_20_Heading">Mode <text:s/>d'employé pour arriver aux voies de paiements exterieurs'</text:p>
          </table:table-cell>
          <table:covered-table-cell/>
        </table:table-row>
        <table:table-row>
          <table:table-cell table:style-name="Tableau2.A2" office:value-type="string">
            <text:p text:style-name="Table_20_Contents">payment_DIBS.php</text:p>
          </table:table-cell>
          <table:table-cell table:style-name="Tableau2.B2" office:value-type="string">
            <text:p text:style-name="Table_20_Contents">script pour la jonction vers DIBS (Système paiement internet danois) Vous le trouvez sous <text:s/><text:a xlink:type="simple" xlink:href="http://www.architrade.com/uk/" text:style-name="Internet_20_link" text:visited-style-name="Visited_20_Internet_20_Link">http://www.architrade.com/uk/</text:a> . </text:p>
          </table:table-cell>
        </table:table-row>
        <table:table-row>
          <table:table-cell table:style-name="Tableau2.A2" office:value-type="string">
            <text:p text:style-name="Table_20_Contents">payment_DIBS_template.tmpl</text:p>
          </table:table-cell>
          <table:table-cell table:style-name="Tableau2.B2" office:value-type="string">
            <text:p text:style-name="Table_20_Contents">Exemple fichier modèle pour le système paiement DIBS.</text:p>
          </table:table-cell>
        </table:table-row>
      </table:table>
      <text:p text:style-name="Text_20_body">[tsref:(cObject).TEST]</text:p>
      <text:h text:style-name="Heading_20_3" text:outline-level="3">Description</text:h>
      <text:p text:style-name="Text_20_body">Panier encastré et annonce des produits sous TYPO3. Il montre une jonction vide, afin de p0ermettre d'obtenir votre propre implantation du système de paiement.</text:p>
      <text:p text:style-name="Text_20_body">Actuellement <text:s/>il existe un implant pour DIBS à Danemark sous <text:a xlink:type="simple" xlink:href="http://www.architrade.dk/" text:style-name="Internet_20_link" text:visited-style-name="Visited_20_Internet_20_Link">www.architrade.dk</text:a>.</text:p>
      <text:h text:style-name="Heading_20_3" text:outline-level="3">Référence</text:h>
      <text:h text:style-name="Heading_20_3" text:outline-level="3">class.tx_ttproducts.php properties</text:h>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table-cell table:style-name="Tableau3.A1" office:value-type="string">
              <text:p text:style-name="Table_20_Heading">Propriété:</text:p>
            </table:table-cell>
            <table:table-cell table:style-name="Tableau3.B1" office:value-type="string">
              <text:p text:style-name="Table_20_Heading">Type date:</text:p>
            </table:table-cell>
            <table:table-cell table:style-name="Tableau3.A1" table:number-columns-spanned="2" office:value-type="string">
              <text:p text:style-name="Table_20_Heading">Description:</text:p>
            </table:table-cell>
            <table:covered-table-cell/>
            <table:table-cell table:style-name="Tableau3.E1" office:value-type="string">
              <text:p text:style-name="Table_20_Heading">Ajustement d'avance:</text:p>
            </table:table-cell>
          </table:table-row>
        </table:table-header-rows>
        <table:table-row>
          <table:table-cell table:style-name="Tableau3.A2" office:value-type="string">
            <text:p text:style-name="Table_20_Contents">templateFile</text:p>
          </table:table-cell>
          <table:table-cell table:style-name="Tableau3.B2" office:value-type="string">
            <text:p text:style-name="Table_20_Contents">resource</text:p>
          </table:table-cell>
          <table:table-cell table:style-name="Tableau3.C2" table:number-columns-spanned="2" office:value-type="string">
            <text:p text:style-name="Table_20_Contents">Fichier modèle. </text:p>
            <text:p text:style-name="Table_20_Contents">Voir exemple dans 'media/scripts/products_template.tmpl'</text:p>
          </table:table-cell>
          <table:covered-table-cell/>
          <table:table-cell table:style-name="Tableau3.E2" office:value-type="string">
            <text:p text:style-name="Table_20_Contents"/>
          </table:table-cell>
        </table:table-row>
        <table:table-row>
          <table:table-cell table:style-name="Tableau3.A3" office:value-type="string">
            <text:p text:style-name="Table_20_Contents">pid_list</text:p>
          </table:table-cell>
          <table:table-cell table:style-name="Tableau3.B2" office:value-type="string">
            <text:p text:style-name="Table_20_Contents">string /stdWrap</text:p>
          </table:table-cell>
          <table:table-cell table:style-name="Tableau3.C3" table:number-columns-spanned="2" office:value-type="string">
            <text:p text:style-name="Table_20_Contents">À l'aide des pids on peut lire les catégories les produits etc.. Le standard est la page actuelle. Ici on peut implanter plusieurs pids sépare par trait d'union.</text:p>
          </table:table-cell>
          <table:covered-table-cell/>
          <table:table-cell table:style-name="Tableau3.E2" office:value-type="string">
            <text:p text:style-name="Table_20_Contents"/>
          </table:table-cell>
        </table:table-row>
        <table:table-row>
          <table:table-cell table:style-name="Tableau3.A4" table:number-rows-spanned="12" office:value-type="string">
            <text:p text:style-name="Table_20_Contents">code</text:p>
          </table:table-cell>
          <table:table-cell table:style-name="Tableau3.B2" table:number-rows-spanned="12" office:value-type="string">
            <text:p text:style-name="Table_20_Contents">string /stdWrap</text:p>
          </table:table-cell>
          <table:table-cell table:style-name="Tableau3.C4" table:number-columns-spanned="2" office:value-type="string">
            <text:p text:style-name="Table_20_Contents">Code pour définir la présentation et l'action, tels qu'elle se présente dans la boutique. Au lieu de ces codes (en lettre majuscule) on s'est sert des flexforms dans le additif boutique. </text:p>
            <text:p text:style-name="Table_20_Contents"/>
            <text:p text:style-name="P23">Produits:</text:p>
          </table:table-cell>
          <table:covered-table-cell/>
          <table:table-cell table:style-name="Tableau3.E4" table:number-rows-spanned="12" office:value-type="string">
            <text:p text:style-name="Table_20_Contents">HELP</text:p>
          </table:table-cell>
        </table:table-row>
        <table:table-row>
          <table:covered-table-cell table:style-name="Tableau3.A5"/>
          <table:covered-table-cell table:style-name="Tableau3.B2"/>
          <table:table-cell table:style-name="Tableau3.C5" office:value-type="string">
            <text:p text:style-name="P27">Liste (LIST)</text:p>
            <text:p text:style-name="P27">Liste Geschenke (LISTGIFTS)</text:p>
            <text:p text:style-name="P27">Liste Besonderheiten <text:s/>(LISTHIGHLIGHTS)</text:p>
            <text:p text:style-name="P27">Liste Aktionen (LISTOFFERS)</text:p>
            <text:p text:style-name="P27">Liste Neue Artikel (LISTNEWITEMS)</text:p>
            <text:p text:style-name="P27">Einzelansicht (SINGLE)</text:p>
            <text:p text:style-name="P27"/>
            <text:p text:style-name="P27">Suche (SEARCH)</text:p>
          </table:table-cell>
          <table:table-cell table:style-name="Tableau3.D5" office:value-type="string">
            <text:p text:style-name="P26">Listage des produits</text:p>
            <text:p text:style-name="P27">Listage des cadeaux</text:p>
            <text:p text:style-name="P26"/>
            <text:p text:style-name="P26">Listage des produits <text:s/>spécialement intéressants.</text:p>
            <text:p text:style-name="P26"/>
            <text:p text:style-name="P26">Listage des produits qui comptent comme offre</text:p>
            <text:p text:style-name="P26">Listage des produits enregistres dernières.</text:p>
            <text:p text:style-name="P28">La revue en détail d'un article (aussi possible en liste) ou GET/POST "tt_products"</text:p>
            <text:p text:style-name="P27">dialogue de recherche des produits</text:p>
          </table:table-cell>
          <table:covered-table-cell table:style-name="Tableau3.E5"/>
        </table:table-row>
        <table:table-row>
          <table:covered-table-cell table:style-name="Tableau3.A6"/>
          <table:covered-table-cell table:style-name="Tableau3.B2"/>
          <table:table-cell table:style-name="Tableau3.C6" table:number-columns-spanned="2" office:value-type="string">
            <text:p text:style-name="P24"/>
            <text:p text:style-name="P24">Système monétaire:</text:p>
          </table:table-cell>
          <table:covered-table-cell/>
          <table:covered-table-cell table:style-name="Tableau3.E6"/>
        </table:table-row>
        <table:table-row>
          <table:covered-table-cell table:style-name="Tableau3.A7"/>
          <table:covered-table-cell table:style-name="Tableau3.B2"/>
          <table:table-cell table:style-name="Tableau3.C7" office:value-type="string">
            <text:p text:style-name="Table_20_Contents">Selector - <text:span text:style-name="T8">CURRENCY</text:span></text:p>
            <text:p text:style-name="P26">sélecteur monnaie</text:p>
          </table:table-cell>
          <table:table-cell table:style-name="Tableau3.D7" office:value-type="string">
            <text:p text:style-name="P39">boîte à sélectionner pour la monnaie.</text:p>
            <text:p text:style-name="P40"/>
          </table:table-cell>
          <table:covered-table-cell table:style-name="Tableau3.E7"/>
        </table:table-row>
        <table:table-row>
          <table:covered-table-cell table:style-name="Tableau3.A8"/>
          <table:covered-table-cell table:style-name="Tableau3.B2"/>
          <table:table-cell table:style-name="Tableau3.C8" table:number-columns-spanned="2" office:value-type="string">
            <text:p text:style-name="Table_20_Contents"/>
            <text:p text:style-name="P23">Panier d'achat:</text:p>
          </table:table-cell>
          <table:covered-table-cell/>
          <table:covered-table-cell table:style-name="Tableau3.E8"/>
        </table:table-row>
        <table:table-row>
          <table:covered-table-cell table:style-name="Tableau3.A9"/>
          <table:covered-table-cell table:style-name="Tableau3.B2"/>
          <table:table-cell table:style-name="Tableau3.C9" office:value-type="string">
            <text:p text:style-name="Table_20_Contents">Contenu (BASKET)</text:p>
            <text:p text:style-name="Table_20_Contents"/>
            <text:p text:style-name="Table_20_Contents"/>
            <text:p text:style-name="Table_20_Contents"/>
            <text:p text:style-name="Table_20_Contents"/>
            <text:p text:style-name="Table_20_Contents"/>
            <text:p text:style-name="Table_20_Contents"/>
            <text:p text:style-name="Table_20_Contents">Mini (OVERVIEW)</text:p>
            <text:p text:style-name="Table_20_Contents"/>
            <text:p text:style-name="Table_20_Contents">Eingabe Kundendaten (INFO)</text:p>
            <text:p text:style-name="Table_20_Contents">Eingabe Bezahlung (PAYMENT)</text:p>
            <text:p text:style-name="Table_20_Contents">Bestellung abschließen (FINALIZE)</text:p>
            <text:p text:style-name="Table_20_Contents"/>
          </table:table-cell>
          <table:table-cell table:style-name="Tableau3.D9" office:value-type="string">
            <text:p text:style-name="P26">Indique le panier d'achat avec les articles qui devaient être achetes.</text:p>
            <text:p text:style-name="P26">Le code 'BASKET' présente différents fonctions. Mais si on emploie des codes spécifiques telque INFO, PAYMENT et FINALIZE, ces fonctions peuvent se décomposer en plusieurs pages. Un petit panier d'achat, qui comport uniquement le nombre des produits</text:p>
            <text:p text:style-name="P26">Introduction d'adresse</text:p>
            <text:p text:style-name="P26"/>
            <text:p text:style-name="P27">Contrôle des dates du commande. Paiement pour système de paiement.</text:p>
            <text:p text:style-name="P26">Termine la commission et envoie l'information par émail sur l'utilisation de tt_products – page de remerciement pour l'ordre. </text:p>
          </table:table-cell>
          <table:covered-table-cell table:style-name="Tableau3.E9"/>
        </table:table-row>
        <table:table-row>
          <table:covered-table-cell table:style-name="Tableau3.A10"/>
          <table:covered-table-cell table:style-name="Tableau3.B2"/>
          <table:table-cell table:style-name="Tableau3.C10" table:number-columns-spanned="2" office:value-type="string">
            <text:p text:style-name="Table_20_Contents"/>
            <text:p text:style-name="P23">L'ordre:</text:p>
          </table:table-cell>
          <table:covered-table-cell/>
          <table:covered-table-cell table:style-name="Tableau3.E10"/>
        </table:table-row>
        <table:table-row>
          <table:covered-table-cell table:style-name="Tableau3.A11"/>
          <table:covered-table-cell table:style-name="Tableau3.B2"/>
          <table:table-cell table:style-name="Tableau3.C11" office:value-type="string">
            <text:p text:style-name="Table_20_Contents">Administration (<text:span text:style-name="T8">TRACKING)</text:span></text:p>
            <text:p text:style-name="P26"/>
            <text:p text:style-name="P26">Facture (BILL)</text:p>
            <text:p text:style-name="P26">Bon de livraisons (DELIVERY)</text:p>
            <text:p text:style-name="P26">Liste (ORDER)</text:p>
          </table:table-cell>
          <table:table-cell table:style-name="Tableau3.D11" office:value-type="string">
            <text:p text:style-name="P26">Contrôle de l'ordre de la factur et du bon de livraison.</text:p>
            <text:p text:style-name="P26"/>
            <text:p text:style-name="P26">montre le fichier du facture</text:p>
            <text:p text:style-name="P26">montre le fichier du livraison</text:p>
            <text:p text:style-name="P26"/>
            <text:p text:style-name="P26">annonce des ordres pour utilisateurs front</text:p>
          </table:table-cell>
          <table:covered-table-cell table:style-name="Tableau3.E11"/>
        </table:table-row>
        <table:table-row>
          <table:covered-table-cell table:style-name="Tableau3.A12"/>
          <table:covered-table-cell table:style-name="Tableau3.B2"/>
          <table:table-cell table:style-name="Tableau3.C12" table:number-columns-spanned="2" office:value-type="string">
            <text:p text:style-name="Table_20_Contents"/>
            <text:p text:style-name="P23">En générale:</text:p>
          </table:table-cell>
          <table:covered-table-cell/>
          <table:covered-table-cell table:style-name="Tableau3.E12"/>
        </table:table-row>
        <table:table-row>
          <table:covered-table-cell table:style-name="Tableau3.A13"/>
          <table:covered-table-cell table:style-name="Tableau3.B2"/>
          <table:table-cell table:style-name="Tableau3.C13" office:value-type="string">
            <text:p text:style-name="Table_20_Contents">Memo (MEMO)</text:p>
          </table:table-cell>
          <table:table-cell table:style-name="Tableau3.D13" office:value-type="string">
            <text:p text:style-name="P27">Rappel aux produits pour utilisateurs front</text:p>
          </table:table-cell>
          <table:covered-table-cell table:style-name="Tableau3.E13"/>
        </table:table-row>
        <table:table-row>
          <table:covered-table-cell table:style-name="Tableau3.A14"/>
          <table:covered-table-cell table:style-name="Tableau3.B2"/>
          <table:table-cell table:style-name="Tableau3.C14" office:value-type="string">
            <text:p text:style-name="Table_20_Contents">Aide (HELP)</text:p>
          </table:table-cell>
          <table:table-cell table:style-name="Tableau3.D14" office:value-type="string">
            <text:p text:style-name="P39">Instruction brève</text:p>
          </table:table-cell>
          <table:covered-table-cell table:style-name="Tableau3.E14"/>
        </table:table-row>
        <table:table-row>
          <table:covered-table-cell table:style-name="Tableau3.A15"/>
          <table:covered-table-cell table:style-name="Tableau3.B2"/>
          <table:table-cell table:style-name="Tableau3.C15" table:number-columns-spanned="2" office:value-type="string">
            <text:p text:style-name="Table_20_Contents"/>
            <text:p text:style-name="Table_20_Contents">N'utilisez plus des voies de CODE.</text:p>
          </table:table-cell>
          <table:covered-table-cell/>
          <table:covered-table-cell table:style-name="Tableau3.E15"/>
        </table:table-row>
        <table:table-row>
          <table:table-cell table:style-name="Tableau3.A16" office:value-type="string">
            <text:p text:style-name="Table_20_Contents">defaultCode</text:p>
          </table:table-cell>
          <table:table-cell table:style-name="Tableau3.B2" office:value-type="string">
            <text:p text:style-name="Table_20_Contents">string</text:p>
          </table:table-cell>
          <table:table-cell table:style-name="Tableau3.C16" table:number-columns-spanned="2" office:value-type="string">
            <text:p text:style-name="P31">Le code standard en cas de nul ne soit inscrite pour l'additif (voir en avant). Normalement cela n'est pas enregistre et un écran d'aide s'affiche. </text:p>
            <text:p text:style-name="P31"/>
            <text:p text:style-name="P20">Exemple:</text:p>
            <text:p text:style-name="Table_20_Contents_2f_PRE">plugin.tt_products.defaultCode = HELP</text:p>
          </table:table-cell>
          <table:covered-table-cell/>
          <table:table-cell table:style-name="Tableau3.E2" office:value-type="string">
            <text:p text:style-name="Table_20_Contents"/>
          </table:table-cell>
        </table:table-row>
        <table:table-row>
          <table:table-cell table:style-name="Tableau3.A17" office:value-type="string">
            <text:p text:style-name="Table_20_Contents">defaultProductID</text:p>
          </table:table-cell>
          <table:table-cell table:style-name="Tableau3.B2" office:value-type="string">
            <text:p text:style-name="Table_20_Contents">int+</text:p>
          </table:table-cell>
          <table:table-cell table:style-name="Tableau3.C17" table:number-columns-spanned="2" office:value-type="string">
            <text:p text:style-name="P31">La produitid standard sera montré, si le lien sur le script n'avait pas eu un paramètre "tt_products"<text:span text:style-name="T8">. Employez cette valeur standard, si vous avez reçu d'information d'erreur comme </text:span><text:line-break/>“GET/POST var 'tt_products' was missing.” .</text:p>
          </table:table-cell>
          <table:covered-table-cell/>
          <table:table-cell table:style-name="Tableau3.E2" office:value-type="string">
            <text:p text:style-name="Table_20_Contents"/>
          </table:table-cell>
        </table:table-row>
        <table:table-row>
          <table:table-cell table:style-name="Tableau3.A18" office:value-type="string">
            <text:p text:style-name="Table_20_Contents">recursive</text:p>
          </table:table-cell>
          <table:table-cell table:style-name="Tableau3.B2" office:value-type="string">
            <text:p text:style-name="Table_20_Contents">int+</text:p>
          </table:table-cell>
          <table:table-cell table:style-name="Tableau3.C18" table:number-columns-spanned="2" office:value-type="string">
            <text:p text:style-name="P31">Nombre des talons recursives pour l'annonce de la liste des produits</text:p>
          </table:table-cell>
          <table:covered-table-cell/>
          <table:table-cell table:style-name="Tableau3.E2" office:value-type="string">
            <text:p text:style-name="Table_20_Contents"/>
          </table:table-cell>
        </table:table-row>
        <table:table-row>
          <table:table-cell table:style-name="Tableau3.A19" office:value-type="string">
            <text:p text:style-name="Table_20_Contents">domain</text:p>
          </table:table-cell>
          <table:table-cell table:style-name="Tableau3.B2" office:value-type="string">
            <text:p text:style-name="Table_20_Contents">string</text:p>
          </table:table-cell>
          <table:table-cell table:style-name="Tableau3.C19" table:number-columns-spanned="2" office:value-type="string">
            <text:p text:style-name="Table_20_Contents">La url de la boutique. Si elle ne pas mis en oeuvre, elle est automatiquement connu. Comme ça les marqueurs <text:s/>###DOMAIN### seront remplaces.</text:p>
          </table:table-cell>
          <table:covered-table-cell/>
          <table:table-cell table:style-name="Tableau3.E2" office:value-type="string">
            <text:p text:style-name="Table_20_Contents"/>
          </table:table-cell>
        </table:table-row>
        <text:soft-page-break/>
        <table:table-row>
          <table:table-cell table:style-name="Tableau3.A20" office:value-type="string">
            <text:p text:style-name="Table_20_Contents">altMainMarkers</text:p>
          </table:table-cell>
          <table:table-cell table:style-name="Tableau3.B2" office:value-type="string">
            <text:p text:style-name="P32">(tableau des caractères)</text:p>
          </table:table-cell>
          <table:table-cell table:style-name="Tableau3.C20" table:number-columns-spanned="2" office:value-type="string">
            <text:p text:style-name="Table_20_Contents">Spécification d'alternatives sous marqueurs. Pour divers fichiers modèles principales design. Vous pouvez remplaces cette liste des sous marqueurs:<text:line-break/></text:p>
            <text:p text:style-name="Table_20_Contents_2f_PRE">TRACKING_WRONG_NUMBER</text:p>
            <text:p text:style-name="Table_20_Contents_2f_PRE">TRACKING_ENTER_NUMBER</text:p>
            <text:p text:style-name="Table_20_Contents_2f_PRE">BASKET_REQUIRED_INFO_MISSING</text:p>
            <text:p text:style-name="Table_20_Contents_2f_PRE">BASKET_TEMP</text:p>
            <text:p text:style-name="Table_20_Contents_2f_PRE">ITEM_SINGLE_DISPLAY_RECORDINSERT</text:p>
            <text:p text:style-name="Table_20_Contents_2f_PRE">ITEM_SINGLE_DISPLAY</text:p>
            <text:p text:style-name="Table_20_Contents_2f_PRE">ITEM_SEARCH</text:p>
            <text:p text:style-name="Table_20_Contents_2f_PRE">ITEM_LIST_TEMPLATE</text:p>
            <text:p text:style-name="Table_20_Contents_2f_PRE">ITEM_LIST_GIFTS_TEMPLATE</text:p>
            <text:p text:style-name="Table_20_Contents_2f_PRE">ITEM_SEARCH_EMPTY</text:p>
            <text:p text:style-name="Table_20_Contents_2f_PRE">BASKET_TEMPLATE</text:p>
            <text:p text:style-name="Table_20_Contents_2f_PRE">BASKET_INFO_TEMPLATE</text:p>
            <text:p text:style-name="Table_20_Contents_2f_PRE">BASKET_PAYMENT_TEMPLATE</text:p>
            <text:p text:style-name="Table_20_Contents_2f_PRE">BASKET_ORDERCONFIRMATION_TEMPLATE</text:p>
            <text:p text:style-name="Table_20_Contents_2f_PRE">EMAIL_PLAINTEXT_TEMPLATE</text:p>
            <text:p text:style-name="Table_20_Contents_2f_PRE">BILL_TEMPLATE</text:p>
            <text:p text:style-name="Table_20_Contents_2f_PRE">DELIVERY_TEMPLATE</text:p>
            <text:p text:style-name="Table_20_Contents_2f_PRE"/>
            <text:p text:style-name="Table_20_Contents_2f_PRE">/+ stdWrap</text:p>
            <text:p text:style-name="Table_20_Contents"/>
            <text:p text:style-name="P31"/>
            <text:p text:style-name="P20">Exemple:</text:p>
            <text:p text:style-name="Table_20_Contents_2f_PRE">altMainMarkers.BASKET_TEMPLATE = <text:s/>BASKET_DESIGN2</text:p>
            <text:p text:style-name="Table_20_Contents_2f_PRE">altMainMarkers.BASKET_TEMPLATE.wrap = ### | ###</text:p>
            <text:p text:style-name="Table_20_Contents_2f_PRE"/>
            <text:p text:style-name="Table_20_Contents">Cet example change les marqueurs principaux du panier d'achat régulier du standard ###BASKET_TEMPLATE### <text:s/>dans le design définie d'utilisateur design ###BASKET_DESIGN2### <text:s/>(dans la même fichier modèle HTML)</text:p>
          </table:table-cell>
          <table:covered-table-cell/>
          <table:table-cell table:style-name="Tableau3.E2" office:value-type="string">
            <text:p text:style-name="Table_20_Contents"/>
          </table:table-cell>
        </table:table-row>
        <table:table-row>
          <table:table-cell table:style-name="Tableau3.A21" office:value-type="string">
            <text:p text:style-name="Table_20_Contents">stdSearchFieldExt</text:p>
          </table:table-cell>
          <table:table-cell table:style-name="Tableau3.B2" office:value-type="string">
            <text:p text:style-name="P32">liste des champs</text:p>
          </table:table-cell>
          <table:table-cell table:style-name="Tableau3.C21" table:number-columns-spanned="2" office:value-type="string">
            <text:p text:style-name="Table_20_Contents">Voies de recherche en plus</text:p>
            <text:p text:style-name="Table_20_Contents">Le standard liste interne c'est <text:s/>title,note,itemnumber.</text:p>
            <text:p text:style-name="Table_20_Contents">Tous les voies indiques ici seront ajoutées à la fin.</text:p>
          </table:table-cell>
          <table:covered-table-cell/>
          <table:table-cell table:style-name="Tableau3.E2" office:value-type="string">
            <text:p text:style-name="Table_20_Contents"/>
          </table:table-cell>
        </table:table-row>
        <table:table-row>
          <table:table-cell table:style-name="Tableau3.A22" office:value-type="string">
            <text:p text:style-name="Table_20_Contents">limit</text:p>
          </table:table-cell>
          <table:table-cell table:style-name="Tableau3.B2" office:value-type="string">
            <text:p text:style-name="P4">int+</text:p>
          </table:table-cell>
          <table:table-cell table:style-name="Tableau3.C22" table:number-columns-spanned="2" office:value-type="string">
            <text:p text:style-name="Table_20_Contents">Le maximum nombre d'articles, qui sont montrés dans la vue d'un page.</text:p>
          </table:table-cell>
          <table:covered-table-cell/>
          <table:table-cell table:style-name="Tableau3.E22" office:value-type="string">
            <text:p text:style-name="Table_20_Contents">50</text:p>
          </table:table-cell>
        </table:table-row>
        <table:table-row>
          <table:table-cell table:style-name="Tableau3.A23" office:value-type="string">
            <text:p text:style-name="Table_20_Contents">limitImage</text:p>
          </table:table-cell>
          <table:table-cell table:style-name="Tableau3.B2" office:value-type="string">
            <text:p text:style-name="P4">int+</text:p>
          </table:table-cell>
          <table:table-cell table:style-name="Tableau3.C23" table:number-columns-spanned="2" office:value-type="string">
            <text:p text:style-name="Table_20_Contents">Le maximum nombre d'images, qui sont montrés pour un article dans la vue du liste.</text:p>
          </table:table-cell>
          <table:covered-table-cell/>
          <table:table-cell table:style-name="Tableau3.E23" office:value-type="string">
            <text:p text:style-name="Table_20_Contents">1</text:p>
          </table:table-cell>
        </table:table-row>
        <table:table-row>
          <table:table-cell table:style-name="Tableau3.A24" office:value-type="string">
            <text:p text:style-name="Table_20_Contents">limitImageSingle</text:p>
          </table:table-cell>
          <table:table-cell table:style-name="Tableau3.B2" office:value-type="string">
            <text:p text:style-name="P4">int+</text:p>
          </table:table-cell>
          <table:table-cell table:style-name="Tableau3.C24" table:number-columns-spanned="2" office:value-type="string">
            <text:p text:style-name="Table_20_Contents">Le maximum nombre d'images, qui sont montrés pour un article dans la vue du liste individuelle.</text:p>
          </table:table-cell>
          <table:covered-table-cell/>
          <table:table-cell table:style-name="Tableau3.E24" office:value-type="string">
            <text:p text:style-name="Table_20_Contents">1</text:p>
          </table:table-cell>
        </table:table-row>
        <table:table-row>
          <table:table-cell table:style-name="Tableau3.A25" office:value-type="string">
            <text:p text:style-name="Table_20_Contents">usePageContentImage</text:p>
          </table:table-cell>
          <table:table-cell table:style-name="Tableau3.B2" office:value-type="string">
            <text:p text:style-name="P4">boolean</text:p>
          </table:table-cell>
          <table:table-cell table:style-name="Tableau3.C25" table:number-columns-spanned="2" office:value-type="string">
            <text:p text:style-name="Table_20_Contents">En cas d'emploi les images seront déduise des éléments de la page des produits au lieu du tableau des produits. </text:p>
          </table:table-cell>
          <table:covered-table-cell/>
          <table:table-cell table:style-name="Tableau3.E2" office:value-type="string">
            <text:p text:style-name="Table_20_Contents"/>
          </table:table-cell>
        </table:table-row>
        <table:table-row>
          <table:table-cell table:style-name="Tableau3.A26" office:value-type="string">
            <text:p text:style-name="Table_20_Contents">separateImage</text:p>
          </table:table-cell>
          <table:table-cell table:style-name="Tableau3.B2" office:value-type="string">
            <text:p text:style-name="P4">boolean</text:p>
          </table:table-cell>
          <table:table-cell table:style-name="Tableau3.C26" table:number-columns-spanned="2" office:value-type="string">
            <text:p text:style-name="Table_20_Contents">Normalement tous les images seront montrées à la fois. A l'aide de <text:s/>separateImage=on on peut marquer avec ###PRODUCT_IMAGE3### <text:s/>pour chaque image individuelle. On commence à compter par 1.</text:p>
          </table:table-cell>
          <table:covered-table-cell/>
          <table:table-cell table:style-name="Tableau3.E2" office:value-type="string">
            <text:p text:style-name="Table_20_Contents"/>
          </table:table-cell>
        </table:table-row>
        <table:table-row>
          <table:table-cell table:style-name="Tableau3.A27" office:value-type="string">
            <text:p text:style-name="Table_20_Contents">image</text:p>
          </table:table-cell>
          <table:table-cell table:style-name="Tableau3.B2" office:value-type="string">
            <text:p text:style-name="Table_20_Contents">IMAGE cObject</text:p>
          </table:table-cell>
          <table:table-cell table:style-name="Tableau3.C27" table:number-columns-spanned="2" office:value-type="string">
            <text:p text:style-name="Table_20_Contents">La configuration d'image pour la vue en détail.</text:p>
          </table:table-cell>
          <table:covered-table-cell/>
          <table:table-cell table:style-name="Tableau3.E2" office:value-type="string">
            <text:p text:style-name="Table_20_Contents"/>
          </table:table-cell>
        </table:table-row>
        <table:table-row>
          <table:table-cell table:style-name="Tableau3.A28" office:value-type="string">
            <text:p text:style-name="Table_20_Contents">listImage</text:p>
          </table:table-cell>
          <table:table-cell table:style-name="Tableau3.B2" office:value-type="string">
            <text:p text:style-name="P4">IMAGE cObject</text:p>
          </table:table-cell>
          <table:table-cell table:style-name="Tableau3.C28" table:number-columns-spanned="2" office:value-type="string">
            <text:p text:style-name="Table_20_Contents">La configuration d'image pour la vue des listes.</text:p>
            <text:p text:style-name="Table_20_Contents_2f_PRE">listImage &gt;<text:line-break/>listImage {<text:line-break/>altImgResource.import = uploads/media/<text:line-break/>altImgResource.import.field = media<text:line-break/>altImgResource.import.listNum = 0<text:line-break/>}<text:line-break/></text:p>
            <text:p text:style-name="Table_20_Contents">Comme ça les images ne seront pas copiés ni indiqués dans le dossier <text:s/><text:span text:style-name="T9">/typo3temp/</text:span> <text:s/>. (Ça donne des problèmes avec les fonds transparents), mais alors direct de /uploads/pics/).</text:p>
          </table:table-cell>
          <table:covered-table-cell/>
          <table:table-cell table:style-name="Tableau3.E2" office:value-type="string">
            <text:p text:style-name="Table_20_Contents"/>
          </table:table-cell>
        </table:table-row>
        <table:table-row>
          <table:table-cell table:style-name="Tableau3.A29" office:value-type="string">
            <text:p text:style-name="Table_20_Contents">basketImage</text:p>
          </table:table-cell>
          <table:table-cell table:style-name="Tableau3.B2" office:value-type="string">
            <text:p text:style-name="P4">IMAGE cObject</text:p>
          </table:table-cell>
          <table:table-cell table:style-name="Tableau3.C29" table:number-columns-spanned="2" office:value-type="string">
            <text:p text:style-name="Table_20_Contents">La configuration pour le panier.</text:p>
          </table:table-cell>
          <table:covered-table-cell/>
          <table:table-cell table:style-name="Tableau3.E2" office:value-type="string">
            <text:p text:style-name="Table_20_Contents"/>
          </table:table-cell>
        </table:table-row>
        <table:table-row>
          <table:table-cell table:style-name="Tableau3.A30" office:value-type="string">
            <text:p text:style-name="Table_20_Contents">datasheetIcon</text:p>
          </table:table-cell>
          <table:table-cell table:style-name="Tableau3.B2" office:value-type="string">
            <text:p text:style-name="P4">IMAGE cObject</text:p>
          </table:table-cell>
          <table:table-cell table:style-name="Tableau3.C30" table:number-columns-spanned="2" office:value-type="string">
            <text:p text:style-name="Table_20_Contents">Le symbol pour la data page sera remplace par <text:s/>###ICON_DATASHEET### <text:s/>.</text:p>
          </table:table-cell>
          <table:covered-table-cell/>
          <table:table-cell table:style-name="Tableau3.E2" office:value-type="string">
            <text:p text:style-name="Table_20_Contents"/>
          </table:table-cell>
        </table:table-row>
        <table:table-row>
          <table:table-cell table:style-name="Tableau3.A31" office:value-type="string">
            <text:p text:style-name="Table_20_Contents">basketPic</text:p>
          </table:table-cell>
          <table:table-cell table:style-name="Tableau3.B2" office:value-type="string">
            <text:p text:style-name="P4">string</text:p>
          </table:table-cell>
          <table:table-cell table:style-name="Tableau3.C31" table:number-columns-spanned="2" office:value-type="string">
            <text:p text:style-name="Table_20_Contents">Lien URL sur l'image panier d'achat.</text:p>
          </table:table-cell>
          <table:covered-table-cell/>
          <table:table-cell table:style-name="Tableau3.E2" office:value-type="string">
            <text:p text:style-name="Table_20_Contents"/>
          </table:table-cell>
        </table:table-row>
        <table:table-row>
          <table:table-cell table:style-name="Tableau3.A32" office:value-type="string">
            <text:p text:style-name="Table_20_Contents">noImageAvailable </text:p>
          </table:table-cell>
          <table:table-cell table:style-name="Tableau3.B2" office:value-type="string">
            <text:p text:style-name="P4">resource</text:p>
          </table:table-cell>
          <table:table-cell table:style-name="Tableau3.C32" table:number-columns-spanned="2" office:value-type="string">
            <text:p text:style-name="Table_20_Contents">La date d'image, si un produit n'a pas d'image. Cette image serait générée par IMAGE cObject laquelle est indique dans l'image actuelle du produit. C'est une des IMAGE cObject dessus.</text:p>
          </table:table-cell>
          <table:covered-table-cell/>
          <table:table-cell table:style-name="Tableau3.E2" office:value-type="string">
            <text:p text:style-name="Table_20_Contents"/>
          </table:table-cell>
        </table:table-row>
        <text:soft-page-break/>
        <table:table-row>
          <table:table-cell table:style-name="Tableau3.A33" office:value-type="string">
            <text:p text:style-name="Table_20_Contents">displayListCatHeader</text:p>
          </table:table-cell>
          <table:table-cell table:style-name="Tableau3.B2" office:value-type="string">
            <text:p text:style-name="P4">boolean</text:p>
          </table:table-cell>
          <table:table-cell table:style-name="Tableau3.C33" table:number-columns-spanned="2" office:value-type="string">
            <text:p text:style-name="Table_20_Contents">Indication catégories titre en listes</text:p>
            <text:p text:style-name="Table_20_Contents">Quand cette option est mise, la catégorie titre (titre page) sera automatiquement montré dans les listes du produit. Ce n'est pas toujours souhaité, si vous même indiquez les titres dans les éleménts de "list".</text:p>
          </table:table-cell>
          <table:covered-table-cell/>
          <table:table-cell table:style-name="Tableau3.E33" office:value-type="string">
            <text:p text:style-name="Table_20_Contents">1</text:p>
          </table:table-cell>
        </table:table-row>
        <table:table-row>
          <table:table-cell table:style-name="Tableau3.A34" office:value-type="string">
            <text:p text:style-name="Table_20_Contents">displayBasketCatHeader</text:p>
          </table:table-cell>
          <table:table-cell table:style-name="Tableau3.B2" office:value-type="string">
            <text:p text:style-name="P4">boolean</text:p>
          </table:table-cell>
          <table:table-cell table:style-name="Tableau3.C34" table:number-columns-spanned="2" office:value-type="string">
            <text:p text:style-name="Table_20_Contents">Annonce catégories titre dans le panier du marchandise.</text:p>
            <text:p text:style-name="Table_20_Contents">Quand cette option est mise, alors les catégories titres seront automatiquement montrés dans les listes du panier.</text:p>
          </table:table-cell>
          <table:covered-table-cell/>
          <table:table-cell table:style-name="Tableau3.E34" office:value-type="string">
            <text:p text:style-name="Table_20_Contents">0</text:p>
          </table:table-cell>
        </table:table-row>
        <table:table-row>
          <table:table-cell table:style-name="Tableau3.A35" office:value-type="string">
            <text:p text:style-name="Table_20_Contents">displayBasketColumns</text:p>
          </table:table-cell>
          <table:table-cell table:style-name="Tableau3.B2" office:value-type="string">
            <text:p text:style-name="P4">int+</text:p>
          </table:table-cell>
          <table:table-cell table:style-name="Tableau3.C35" table:number-columns-spanned="2" office:value-type="string">
            <text:p text:style-name="Table_20_Contents">Nombre des colonnes en regard de LIST, SEARCH. On construit un tableau HTML pour lequel il faut utiliser des marqueurs spéciales pour le fichier modèle. Le ITEM_SINGLE_PRE_HTML <text:s/>et ITEM_SINGLE_POST_HTML doivent être avant et après les tags &lt;TD&gt;-&lt;/TD&gt; afinque le tableau soit mis correctement.</text:p>
            <text:p text:style-name="Table_20_Contents"/>
            <text:p text:style-name="P20">Exemple:</text:p>
            <text:p text:style-name="Table_20_Contents_2f_PRE">&lt;!-- ###ITEM_SINGLE### begin--&gt; <text:line-break/> ###ITEM_SINGLE_PRE_HTML### <text:line-break/> &lt;TD height="150" bgcolor="###GC1###" valign="bottom" align="center"&gt; <text:line-break/> &lt;!--###LINK_ITEM###--&gt; ###GW1B###&lt;b&gt;###PRODUCT_TITLE###&lt;/b&gt;###GW1E### <text:line-break/> &lt;!--###LINK_ITEM###--&gt; <text:line-break/> &lt;br&gt; <text:line-break/> ###PRODUCT_IMAGE### &lt;br&gt; <text:line-break/> ###GW1B### item count: ###GW1E### &lt;INPUT size="3" maxlength="4" type="text" name="###FIELD_NAME###" value="###FIELD_QTY###"&gt; <text:line-break/> &lt;p&gt; &lt;/TD&gt; <text:line-break/> ###ITEM_SINGLE_POST_HTML### <text:line-break/> &lt;!-- ###ITEM_SINGLE### end --&gt; <text:line-break/></text:p>
          </table:table-cell>
          <table:covered-table-cell/>
          <table:table-cell table:style-name="Tableau3.E2" office:value-type="string">
            <text:p text:style-name="Table_20_Contents"/>
          </table:table-cell>
        </table:table-row>
        <table:table-row>
          <table:table-cell table:style-name="Tableau3.A36" office:value-type="string">
            <text:p text:style-name="Table_20_Contents">CSSRowEven</text:p>
          </table:table-cell>
          <table:table-cell table:style-name="Tableau3.B2" office:value-type="string">
            <text:p text:style-name="P4">string</text:p>
          </table:table-cell>
          <table:table-cell table:style-name="Tableau3.C36" table:number-columns-spanned="2" office:value-type="string">
            <text:p text:style-name="Table_20_Contents">Cascading Stylesheets (CSS) pour lignes régulières dans la vue des listes.. </text:p>
          </table:table-cell>
          <table:covered-table-cell/>
          <table:table-cell table:style-name="Tableau3.E2" office:value-type="string">
            <text:p text:style-name="Table_20_Contents"/>
          </table:table-cell>
        </table:table-row>
        <table:table-row>
          <table:table-cell table:style-name="Tableau3.A37" office:value-type="string">
            <text:p text:style-name="Table_20_Contents">CSSRowUneven</text:p>
          </table:table-cell>
          <table:table-cell table:style-name="Tableau3.B2" office:value-type="string">
            <text:p text:style-name="P4">string</text:p>
          </table:table-cell>
          <table:table-cell table:style-name="Tableau3.C37" table:number-columns-spanned="2" office:value-type="string">
            <text:p text:style-name="Table_20_Contents">Voire ci dessus pour les lignes impairs.</text:p>
          </table:table-cell>
          <table:covered-table-cell/>
          <table:table-cell table:style-name="Tableau3.E2" office:value-type="string">
            <text:p text:style-name="Table_20_Contents"/>
          </table:table-cell>
        </table:table-row>
        <table:table-row>
          <table:table-cell table:style-name="Tableau3.A38" office:value-type="string">
            <text:p text:style-name="Table_20_Contents">CSSListDefault</text:p>
          </table:table-cell>
          <table:table-cell table:style-name="Tableau3.B2" office:value-type="string">
            <text:p text:style-name="P4">string</text:p>
          </table:table-cell>
          <table:table-cell table:style-name="Tableau3.C38" table:number-columns-spanned="2" office:value-type="string">
            <text:p text:style-name="Table_20_Contents">CSS pour inscriptions standardisées dans la liste.</text:p>
          </table:table-cell>
          <table:covered-table-cell/>
          <table:table-cell table:style-name="Tableau3.E2" office:value-type="string">
            <text:p text:style-name="Table_20_Contents"/>
          </table:table-cell>
        </table:table-row>
        <table:table-row>
          <table:table-cell table:style-name="Tableau3.A39" office:value-type="string">
            <text:p text:style-name="Table_20_Contents">CSSListCurrent</text:p>
          </table:table-cell>
          <table:table-cell table:style-name="Tableau3.B2" office:value-type="string">
            <text:p text:style-name="P4">string</text:p>
          </table:table-cell>
          <table:table-cell table:style-name="Tableau3.C39" table:number-columns-spanned="2" office:value-type="string">
            <text:p text:style-name="Table_20_Contents">CSS pour l'élément actuellement choisi de la liste.</text:p>
          </table:table-cell>
          <table:covered-table-cell/>
          <table:table-cell table:style-name="Tableau3.E2" office:value-type="string">
            <text:p text:style-name="Table_20_Contents"/>
          </table:table-cell>
        </table:table-row>
        <table:table-row>
          <table:table-cell table:style-name="Tableau3.A40" office:value-type="string">
            <text:p text:style-name="Table_20_Contents">NoSingleViewOnList</text:p>
          </table:table-cell>
          <table:table-cell table:style-name="Tableau3.B2" office:value-type="string">
            <text:p text:style-name="P4">boolean</text:p>
          </table:table-cell>
          <table:table-cell table:style-name="Tableau3.C40" table:number-columns-spanned="2" office:value-type="string">
            <text:p text:style-name="Table_20_Contents">Normalement on généré le lien sur la vue sßparee de la page avec le LIST Code. Mais si vous voulez metre en oeuvre vos propres pages pour la vue séparée avec le code SINGLE, il faut mettre 1..</text:p>
          </table:table-cell>
          <table:covered-table-cell/>
          <table:table-cell table:style-name="Tableau3.E2" office:value-type="string">
            <text:p text:style-name="Table_20_Contents"/>
          </table:table-cell>
        </table:table-row>
        <table:table-row>
          <table:table-cell table:style-name="Tableau3.A41" office:value-type="string">
            <text:p text:style-name="Table_20_Contents">itemMarkerArrayFunc</text:p>
          </table:table-cell>
          <table:table-cell table:style-name="Tableau3.B2" office:value-type="string">
            <text:p text:style-name="Table_20_Contents">function-name</text:p>
          </table:table-cell>
          <table:table-cell table:style-name="Tableau3.C41" table:number-columns-spanned="2" office:value-type="string">
            <text:p text:style-name="Table_20_Contents">A chaque fois qu'un produit est annoncé, soit dans le panier ou sur la vue individuelle, on active dans user_products la méthode getItemMarkerArray(). Cette fonction remplit un Array (une voie) et le rembourse, le soit-disant markerArray() avec clefs/valeurs pour le remplacement du fichier modèle.</text:p>
            <text:p text:style-name="Table_20_Contents">Si vous y introduisez un nom de fonction valable (voir type 'function-name' <text:s/>pour detail). Alors cet Array sera donné ensiute comme 2ème paramêtre à cette fonction. Le 1er paramètre à cette fonction <text:s/>est la propriété Typoscript.</text:p>
            <text:p text:style-name="Table_20_Contents"/>
            <text:p text:style-name="P19">Parent PHP-Object Référence:</text:p>
            <text:p text:style-name="Table_20_Contents">.parentObj property est une référence fixé pour le user_products Objekt (PHP) appelé. </text:p>
            <text:p text:style-name="Table_20_Contents"/>
            <text:p text:style-name="P19">Exemple:</text:p>
            <text:p text:style-name="Table_20_Contents">(pourvu, qu'une fonction ou classe soit inclut)</text:p>
            <text:p text:style-name="Table_20_Contents"/>
            <text:p text:style-name="Table_20_Contents_2f_PRE">itemMarkerArrayFunc = user_addFieldsMarkerArr</text:p>
            <text:p text:style-name="Table_20_Contents_2f_PRE">itemMarkerArrayFunc.simpleOption = 1</text:p>
          </table:table-cell>
          <table:covered-table-cell/>
          <table:table-cell table:style-name="Tableau3.E2" office:value-type="string">
            <text:p text:style-name="Table_20_Contents"/>
          </table:table-cell>
        </table:table-row>
        <text:soft-page-break/>
        <table:table-row>
          <table:table-cell table:style-name="Tableau3.A42" office:value-type="string">
            <text:p text:style-name="Table_20_Contents">PIDitemDisplay </text:p>
          </table:table-cell>
          <table:table-cell table:style-name="Tableau3.B2" office:value-type="string">
            <text:p text:style-name="Table_20_Contents">int+/<text:span text:style-name="T9">Array of integers</text:span></text:p>
          </table:table-cell>
          <table:table-cell table:style-name="Tableau3.C42" table:number-columns-spanned="2" office:value-type="string">
            <text:p text:style-name="Table_20_Contents">PID pour la vue détail.</text:p>
            <text:p text:style-name="Table_20_Contents">Si vous voulez qu'une propre page pour la vue en détail des produits soit responsable, alors vous indiquez ici la PID (page-uid). A cette place vous pouvez placer des conditions à plusieurs lignes. La condition where pourrait contenir des concaténations AND. La pid de la première condition remplit sera remboursée.</text:p>
            <text:p text:style-name="Table_20_Contents_2f_PRE"><text:line-break/>PIDitemDisplay {</text:p>
            <text:p text:style-name="Table_20_Contents_2f_PRE">10.type = sql <text:line-break/>10.where = color=red<text:line-break/>10.pid = 142 <text:line-break/>20.type = sql <text:line-break/>20.where = color=white <text:line-break/>20.pid = 143 <text:line-break/>}<text:line-break/></text:p>
            <text:p text:style-name="Table_20_Contents">Si vous mettez le type sur pid, alors on use le pid des dates du produit.</text:p>
            <text:p text:style-name="Table_20_Contents_2f_PRE">PIDitemDisplay {</text:p>
            <text:p text:style-name="Table_20_Contents_2f_PRE">10.type = pid</text:p>
            <text:p text:style-name="Table_20_Contents_2f_PRE">}</text:p>
          </table:table-cell>
          <table:covered-table-cell/>
          <table:table-cell table:style-name="Tableau3.E2" office:value-type="string">
            <text:p text:style-name="Table_20_Contents"/>
          </table:table-cell>
        </table:table-row>
        <table:table-row>
          <table:table-cell table:style-name="Tableau3.A43" office:value-type="string">
            <text:p text:style-name="Table_20_Contents">PIDsearch</text:p>
          </table:table-cell>
          <table:table-cell table:style-name="Tableau3.B2" office:value-type="string">
            <text:p text:style-name="Table_20_Contents">int+</text:p>
          </table:table-cell>
          <table:table-cell table:style-name="Tableau3.C43" table:number-columns-spanned="2" office:value-type="string">
            <text:p text:style-name="Table_20_Contents">PID pour page de recherche</text:p>
            <text:p text:style-name="Table_20_Contents">Si vous voulez que tous recherches de produit sont sur une page spéciale, introduisez alors le PID. ATTENTION: Si vous mettez PID, toutes les pages avec recherche questionnaire devait avoir le Code "SEARCH".</text:p>
            <text:p text:style-name="Table_20_Contents">PID für die Suchenseite</text:p>
          </table:table-cell>
          <table:covered-table-cell/>
          <table:table-cell table:style-name="Tableau3.E2" office:value-type="string">
            <text:p text:style-name="Table_20_Contents"/>
          </table:table-cell>
        </table:table-row>
        <table:table-row>
          <table:table-cell table:style-name="Tableau3.A44" office:value-type="string">
            <text:p text:style-name="Table_20_Contents">PIDbasket </text:p>
          </table:table-cell>
          <table:table-cell table:style-name="Tableau3.B2" office:value-type="string">
            <text:p text:style-name="P4">int+</text:p>
          </table:table-cell>
          <table:table-cell table:style-name="Tableau3.C44" table:number-columns-spanned="2" office:value-type="string">
            <text:p text:style-name="Table_20_Contents">PID page pour panier de marchandise.</text:p>
            <text:p text:style-name="Table_20_Contents">Si vous voulez ouvrir une page après changement de la somme d'un article, faite le ici.</text:p>
          </table:table-cell>
          <table:covered-table-cell/>
          <table:table-cell table:style-name="Tableau3.E2" office:value-type="string">
            <text:p text:style-name="Table_20_Contents"/>
          </table:table-cell>
        </table:table-row>
        <table:table-row>
          <table:table-cell table:style-name="Tableau3.A45" office:value-type="string">
            <text:p text:style-name="Table_20_Contents">PIDstoreRoot </text:p>
          </table:table-cell>
          <table:table-cell table:style-name="Tableau3.B2" office:value-type="string">
            <text:p text:style-name="Table_20_Contents">int+</text:p>
          </table:table-cell>
          <table:table-cell table:style-name="Tableau3.C45" table:number-columns-spanned="2" office:value-type="string">
            <text:p text:style-name="Table_20_Contents">PID pour la racine du boutique.</text:p>
            <text:p text:style-name="Table_20_Contents">C'est la PID de la rootPage (page racine) du boutique. Si elle n'est mise en oeuvre, la boutique travaille sur toutes les pages de l'origine de la Root (racine) de la page d'accueil. Ce sera mis en oeuvre par raison de performance, quand on travaille avec des pages en catégories.</text:p>
          </table:table-cell>
          <table:covered-table-cell/>
          <table:table-cell table:style-name="Tableau3.E2" office:value-type="string">
            <text:p text:style-name="Table_20_Contents"/>
          </table:table-cell>
        </table:table-row>
        <table:table-row>
          <table:table-cell table:style-name="Tableau3.A46" office:value-type="string">
            <text:p text:style-name="Table_20_Contents">PID_sys_products_orders</text:p>
          </table:table-cell>
          <table:table-cell table:style-name="Tableau3.B2" office:value-type="string">
            <text:p text:style-name="Table_20_Contents">int+</text:p>
          </table:table-cell>
          <table:table-cell table:style-name="Tableau3.C46" table:number-columns-spanned="2" office:value-type="string">
            <text:p text:style-name="Table_20_Contents">PID pour les phrases de date en sys_products_orders. Normalement vous les recevez par le PID de la page paiement (terminer).</text:p>
          </table:table-cell>
          <table:covered-table-cell/>
          <table:table-cell table:style-name="Tableau3.E2" office:value-type="string">
            <text:p text:style-name="Table_20_Contents"/>
          </table:table-cell>
        </table:table-row>
        <table:table-row>
          <table:table-cell table:style-name="Tableau3.A47" office:value-type="string">
            <text:p text:style-name="Table_20_Contents">PIDGiftsTable</text:p>
          </table:table-cell>
          <table:table-cell table:style-name="Tableau3.B2" office:value-type="string">
            <text:p text:style-name="Table_20_Contents">int+</text:p>
          </table:table-cell>
          <table:table-cell table:style-name="Tableau3.C47" table:number-columns-spanned="2" office:value-type="string">
            <text:p text:style-name="Table_20_Contents">PID pour la tt_products_gifts tableau. Les commissions pour les cadeaux seront entreposé ici.</text:p>
          </table:table-cell>
          <table:covered-table-cell/>
          <table:table-cell table:style-name="Tableau3.E2" office:value-type="string">
            <text:p text:style-name="Table_20_Contents"/>
          </table:table-cell>
        </table:table-row>
        <table:table-row>
          <table:table-cell table:style-name="Tableau3.A48" office:value-type="string">
            <text:p text:style-name="Table_20_Contents">PIDinfo</text:p>
          </table:table-cell>
          <table:table-cell table:style-name="Tableau3.B2" office:value-type="string">
            <text:p text:style-name="Table_20_Contents">int+</text:p>
          </table:table-cell>
          <table:table-cell table:style-name="Tableau3.C48" table:number-columns-spanned="2" office:value-type="string">
            <text:p text:style-name="Table_20_Contents">PID pour la page d'informations, ou sont mise noms et adresses.</text:p>
          </table:table-cell>
          <table:covered-table-cell/>
          <table:table-cell table:style-name="Tableau3.E2" office:value-type="string">
            <text:p text:style-name="Table_20_Contents"/>
          </table:table-cell>
        </table:table-row>
        <table:table-row>
          <table:table-cell table:style-name="Tableau3.A49" office:value-type="string">
            <text:p text:style-name="Table_20_Contents">PIDfinalize</text:p>
          </table:table-cell>
          <table:table-cell table:style-name="Tableau3.B2" office:value-type="string">
            <text:p text:style-name="Table_20_Contents">int+</text:p>
          </table:table-cell>
          <table:table-cell table:style-name="Tableau3.C49" table:number-columns-spanned="2" office:value-type="string">
            <text:p text:style-name="Table_20_Contents">PID pour la page après page de confirmation, ou l'utilisateur contrôle ses dates en accord des AGB (règlement générale d'affaire).</text:p>
          </table:table-cell>
          <table:covered-table-cell/>
          <table:table-cell table:style-name="Tableau3.E2" office:value-type="string">
            <text:p text:style-name="Table_20_Contents"/>
          </table:table-cell>
        </table:table-row>
        <table:table-row>
          <table:table-cell table:style-name="Tableau3.A50" office:value-type="string">
            <text:p text:style-name="Table_20_Contents">PIDthanks</text:p>
          </table:table-cell>
          <table:table-cell table:style-name="Tableau3.B2" office:value-type="string">
            <text:p text:style-name="Table_20_Contents">int+</text:p>
          </table:table-cell>
          <table:table-cell table:style-name="Tableau3.C50" table:number-columns-spanned="2" office:value-type="string">
            <text:p text:style-name="Table_20_Contents">PID pour la page de remerciement. <text:s/>BASKET_ORDERTHANKS_TEMPLATE sera mis en oeuvre ici. Autrement c'est identique au PIDfinalize. A cause de cela PIDfinalize ne doit pas être mise en même temps!</text:p>
          </table:table-cell>
          <table:covered-table-cell/>
          <table:table-cell table:style-name="Tableau3.E2" office:value-type="string">
            <text:p text:style-name="Table_20_Contents"/>
          </table:table-cell>
        </table:table-row>
        <table:table-row>
          <table:table-cell table:style-name="Tableau3.A51" office:value-type="string">
            <text:p text:style-name="Table_20_Contents">PIDtracking</text:p>
          </table:table-cell>
          <table:table-cell table:style-name="Tableau3.B2" office:value-type="string">
            <text:p text:style-name="Table_20_Contents">int+</text:p>
          </table:table-cell>
          <table:table-cell table:style-name="Tableau3.C51" table:number-columns-spanned="2" office:value-type="string">
            <text:p text:style-name="Table_20_Contents">PID pour la poursuite d'une commission.</text:p>
          </table:table-cell>
          <table:covered-table-cell/>
          <table:table-cell table:style-name="Tableau3.E2" office:value-type="string">
            <text:p text:style-name="Table_20_Contents"/>
          </table:table-cell>
        </table:table-row>
        <table:table-row>
          <table:table-cell table:style-name="Tableau3.A52" office:value-type="string">
            <text:p text:style-name="Table_20_Contents">paymentActivity</text:p>
          </table:table-cell>
          <table:table-cell table:style-name="Tableau3.B2" office:value-type="string">
            <text:p text:style-name="Table_20_Contents">string</text:p>
          </table:table-cell>
          <table:table-cell table:style-name="Tableau3.C52" table:number-columns-spanned="2" office:value-type="string">
            <text:p text:style-name="Table_20_Contents">Date d'échéance du paiement par un script de règlement individuel. Valeur possible: payment <text:s/>(paiement), finalize (terminer)</text:p>
          </table:table-cell>
          <table:covered-table-cell/>
          <table:table-cell table:style-name="Tableau3.E52" office:value-type="string">
            <text:p text:style-name="Table_20_Contents">finalize</text:p>
          </table:table-cell>
        </table:table-row>
        <table:table-row>
          <table:table-cell table:style-name="Tableau3.A53" office:value-type="string">
            <text:p text:style-name="Table_20_Contents">advanceOrderNumberWithInteger </text:p>
          </table:table-cell>
          <table:table-cell table:style-name="Tableau3.B2" office:value-type="string">
            <text:p text:style-name="Table_20_Contents">int+ , int+</text:p>
          </table:table-cell>
          <table:table-cell table:style-name="Tableau3.C53" table:number-columns-spanned="2" office:value-type="string">
            <text:p text:style-name="Table_20_Contents">Quand cette valeur est mise, le compteur des ordres augmente d'un nombre occasionnel entre [première entier] et [deuxième entier] à chaque commission.</text:p>
            <text:p text:style-name="Table_20_Contents"/>
            <text:p text:style-name="P20">Exemple:</text:p>
            <text:p text:style-name="Preformatted_20_Text">1,10 <text:s text:c="2"/>(Ça augmentera le compteur d'un nombre occasionnel entre 1 et 10)</text:p>
            <text:p text:style-name="Table_20_Contents_2f_PRE">5,5 <text:s text:c="3"/>(Ça ainsi augmentera le compteur chaque fois de 5)</text:p>
          </table:table-cell>
          <table:covered-table-cell/>
          <table:table-cell table:style-name="Tableau3.E2" office:value-type="string">
            <text:p text:style-name="Table_20_Contents"/>
          </table:table-cell>
        </table:table-row>
        <table:table-row>
          <table:table-cell table:style-name="Tableau3.A54" office:value-type="string">
            <text:p text:style-name="Table_20_Contents">alwaysAdvanceOrderNumber</text:p>
          </table:table-cell>
          <table:table-cell table:style-name="Tableau3.B2" office:value-type="string">
            <text:p text:style-name="Table_20_Contents">boolean</text:p>
          </table:table-cell>
          <table:table-cell table:style-name="Tableau3.C54" table:number-columns-spanned="2" office:value-type="string">
            <text:p text:style-name="Table_20_Contents">Avec ceci le numéro d'ordre augmente toujours et les numéros d'ordre vide ne seront plus employés. Il faut l'utiliser, si vous vous servez d'un script de paiement, qui n*'accepte pas de double numéro d'ordre.</text:p>
          </table:table-cell>
          <table:covered-table-cell/>
          <table:table-cell table:style-name="Tableau3.E2" office:value-type="string">
            <text:p text:style-name="Table_20_Contents"/>
          </table:table-cell>
        </table:table-row>
        <text:soft-page-break/>
        <table:table-row>
          <table:table-cell table:style-name="Tableau3.A55" office:value-type="string">
            <text:p text:style-name="Table_20_Contents">parseFunc </text:p>
          </table:table-cell>
          <table:table-cell table:style-name="Tableau3.B2" office:value-type="string">
            <text:p text:style-name="Table_20_Contents">-&gt;parseFunc</text:p>
            <text:p text:style-name="Table_20_Contents"/>
            <text:p text:style-name="Table_20_Contents">avec </text:p>
            <text:p text:style-name="Table_20_Contents">'CSS styled content'</text:p>
            <text:p text:style-name="Table_20_Contents">nicht verwendet </text:p>
          </table:table-cell>
          <table:table-cell table:style-name="Tableau3.C55" table:number-columns-spanned="2" office:value-type="string">
            <text:p text:style-name="Table_20_Contents">Quand l'installation 'CSS styled content' est mise, il faire un configuration dans lib.parseFunc_RTE au lieu d'ici.</text:p>
            <text:p text:style-name="Table_20_Contents">Cette fonction active le contrôle des descriptions du produit. Si vous voulez, par exemple, faire en sorte que dans la rubrique "Remarque" des HTML tags, qui serviront à faire un tableau, soient également présents, il faut alors placer les parseFunc.allowTags ou aussi les denyTags en conséquence.</text:p>
            <text:p text:style-name="Table_20_Contents">Pour que les directives HTML indiquées sur RTE apparaissent correctement il faut mettre les formules suivantes dans Root Template.<text:line-break/><text:line-break/><text:span text:style-name="T2">Par exemple:</text:span></text:p>
            <text:p text:style-name="Table_20_Contents_2f_PRE">keepNonMatchedTags = 1 <text:line-break/>RTE.default.proc.preserveTables = 1 </text:p>
            <text:p text:style-name="Preformatted_20_Text"/>
            <text:p text:style-name="P20">Par exemple:</text:p>
            <text:p text:style-name="Preformatted_20_Text">parseFunc.allowTags = table,tr,td,b,i,u,a,img,br,div,center,pre,font,hr,sub,sup,p,strong,em,li,ul,ol,blockquote,strike,span,h1,h2,h3,h4,h5,h6</text:p>
            <text:p text:style-name="Preformatted_20_Text">parseFunc.denyTags = * </text:p>
          </table:table-cell>
          <table:covered-table-cell/>
          <table:table-cell table:style-name="Tableau3.E55" office:value-type="string">
            <text:p text:style-name="Table_20_Contents">styles.content.parseFunc</text:p>
          </table:table-cell>
        </table:table-row>
        <table:table-row>
          <table:table-cell table:style-name="Tableau3.A56" office:value-type="string">
            <text:p text:style-name="Table_20_Contents">categoryHeader </text:p>
          </table:table-cell>
          <table:table-cell table:style-name="Tableau3.B2" office:value-type="string">
            <text:p text:style-name="Table_20_Contents">cObject</text:p>
          </table:table-cell>
          <table:table-cell table:style-name="Tableau3.C56" table:number-columns-spanned="2" office:value-type="string">
            <text:p text:style-name="Table_20_Contents">Fait le titre pour les catégories.</text:p>
            <text:p text:style-name="Table_20_Contents"/>
            <text:p text:style-name="P20">Par exemple:</text:p>
            <text:p text:style-name="P19"/>
            <text:p text:style-name="Table_20_Contents_2f_PRE">categoryHeader = TEXT</text:p>
            <text:p text:style-name="Table_20_Contents_2f_PRE">categoryHeader.current = 1</text:p>
          </table:table-cell>
          <table:covered-table-cell/>
          <table:table-cell table:style-name="Tableau3.E2" office:value-type="string">
            <text:p text:style-name="Table_20_Contents"/>
          </table:table-cell>
        </table:table-row>
        <table:table-row>
          <table:table-cell table:style-name="Tableau3.A57" office:value-type="string">
            <text:p text:style-name="Table_20_Contents">TAXpercentage</text:p>
          </table:table-cell>
          <table:table-cell table:style-name="Tableau3.B2" office:value-type="string">
            <text:p text:style-name="Table_20_Contents">double</text:p>
          </table:table-cell>
          <table:table-cell table:style-name="Tableau3.C57" table:number-columns-spanned="2" office:value-type="string">
            <text:p text:style-name="Table_20_Contents">Pour cent des taux de l'impôt.</text:p>
            <text:p text:style-name="Table_20_Contents">Double valeur (!) (cela signifie che vous devez utiliser le point '.' au lieu du virgule)</text:p>
            <text:p text:style-name="Table_20_Contents"/>
            <text:p text:style-name="P20">Par exemple:</text:p>
            <text:p text:style-name="Table_20_Contents_2f_PRE"># Der deutsche Steuersatz beträgt TAX 16%:</text:p>
            <text:p text:style-name="Table_20_Contents_2f_PRE">TAXpercentage = 16.00</text:p>
          </table:table-cell>
          <table:covered-table-cell/>
          <table:table-cell table:style-name="Tableau3.E2" office:value-type="string">
            <text:p text:style-name="Table_20_Contents"/>
          </table:table-cell>
        </table:table-row>
        <table:table-row>
          <table:table-cell table:style-name="Tableau3.A58" office:value-type="string">
            <text:p text:style-name="P33">TAXincluded</text:p>
          </table:table-cell>
          <table:table-cell table:style-name="Tableau3.B2" office:value-type="string">
            <text:p text:style-name="Table_20_Contents">boolean</text:p>
          </table:table-cell>
          <table:table-cell table:style-name="Tableau3.C58" table:number-columns-spanned="2" office:value-type="string">
            <text:p text:style-name="Table_20_Contents">Mettez ceci si le impôt est inclure dans les prix de la banque de données! (… naturellement le faire annuler qu'on le impôt n'est pas encore incluse et le impôt doit être additionné.) </text:p>
            <text:p text:style-name="Table_20_Contents">Tous les déroulements dans la boutique se rendent compte de cette configuration avec le calcul des prix.</text:p>
          </table:table-cell>
          <table:covered-table-cell/>
          <table:table-cell table:style-name="Tableau3.E58" office:value-type="string">
            <text:p text:style-name="Table_20_Contents">1</text:p>
          </table:table-cell>
        </table:table-row>
        <table:table-row>
          <table:table-cell table:style-name="Tableau3.A59" office:value-type="string">
            <text:p text:style-name="Table_20_Contents">priceDec</text:p>
          </table:table-cell>
          <table:table-cell table:style-name="Tableau3.B2" office:value-type="string">
            <text:p text:style-name="Table_20_Contents">int+</text:p>
          </table:table-cell>
          <table:table-cell table:style-name="Tableau3.C59" table:number-columns-spanned="2" office:value-type="string">
            <text:p text:style-name="Table_20_Contents">Nombres de chiffre après virgule du prix.</text:p>
          </table:table-cell>
          <table:covered-table-cell/>
          <table:table-cell table:style-name="Tableau3.E2" office:value-type="string">
            <text:p text:style-name="Table_20_Contents"/>
          </table:table-cell>
        </table:table-row>
        <table:table-row>
          <table:table-cell table:style-name="Tableau3.A60" office:value-type="string">
            <text:p text:style-name="Table_20_Contents">priceDecPoint</text:p>
          </table:table-cell>
          <table:table-cell table:style-name="Tableau3.B2" office:value-type="string">
            <text:p text:style-name="Table_20_Contents">string</text:p>
          </table:table-cell>
          <table:table-cell table:style-name="Tableau3.C60" table:number-columns-spanned="2" office:value-type="string">
            <text:p text:style-name="Table_20_Contents">Décimale du prix.</text:p>
          </table:table-cell>
          <table:covered-table-cell/>
          <table:table-cell table:style-name="Tableau3.E2" office:value-type="string">
            <text:p text:style-name="Table_20_Contents"/>
          </table:table-cell>
        </table:table-row>
        <table:table-row>
          <table:table-cell table:style-name="Tableau3.A61" office:value-type="string">
            <text:p text:style-name="Table_20_Contents">priceThousandPoint</text:p>
          </table:table-cell>
          <table:table-cell table:style-name="Tableau3.B2" office:value-type="string">
            <text:p text:style-name="Table_20_Contents">string</text:p>
          </table:table-cell>
          <table:table-cell table:style-name="Tableau3.C61" table:number-columns-spanned="2" office:value-type="string">
            <text:p text:style-name="Table_20_Contents">Virgules pour les milles si souhaité.</text:p>
          </table:table-cell>
          <table:covered-table-cell/>
          <table:table-cell table:style-name="Tableau3.E2" office:value-type="string">
            <text:p text:style-name="Table_20_Contents"/>
          </table:table-cell>
        </table:table-row>
        <table:table-row>
          <table:table-cell table:style-name="Tableau3.A62" office:value-type="string">
            <text:p text:style-name="Table_20_Contents">currencySymbol</text:p>
          </table:table-cell>
          <table:table-cell table:style-name="Tableau3.B2" office:value-type="string">
            <text:p text:style-name="Table_20_Contents">string</text:p>
          </table:table-cell>
          <table:table-cell table:style-name="Tableau3.C62" table:number-columns-spanned="2" office:value-type="string">
            <text:p text:style-name="Table_20_Contents">Symbole pour la monnaie. Se déroule dans l'administration.</text:p>
            <text:p text:style-name="Table_20_Contents"/>
            <text:p text:style-name="P19">Par exemple:</text:p>
            <text:p text:style-name="Table_20_Contents_2f_PRE">EUR</text:p>
            <text:p text:style-name="Table_20_Contents_2f_PRE">DKR</text:p>
            <text:p text:style-name="Table_20_Contents_2f_PRE">USD</text:p>
            <text:p text:style-name="Table_20_Contents_2f_PRE">$</text:p>
          </table:table-cell>
          <table:covered-table-cell/>
          <table:table-cell table:style-name="Tableau3.E2" office:value-type="string">
            <text:p text:style-name="Table_20_Contents"/>
          </table:table-cell>
        </table:table-row>
        <table:table-row>
          <table:table-cell table:style-name="Tableau3.A63" office:value-type="string">
            <text:p text:style-name="Table_20_Contents">lockLoginUserInfo</text:p>
          </table:table-cell>
          <table:table-cell table:style-name="Tableau3.B2" office:value-type="string">
            <text:p text:style-name="Table_20_Contents">boolean</text:p>
          </table:table-cell>
          <table:table-cell table:style-name="Tableau3.C63" table:number-columns-spanned="2" office:value-type="string">
            <text:p text:style-name="Table_20_Contents">En mettant sur 1 et un utilisateur est connecté, l'information d'adresse d'utilisateur pour l'adresse de la facture.</text:p>
          </table:table-cell>
          <table:covered-table-cell/>
          <table:table-cell table:style-name="Tableau3.E2" office:value-type="string">
            <text:p text:style-name="Table_20_Contents"/>
          </table:table-cell>
        </table:table-row>
        <table:table-row>
          <table:table-cell table:style-name="Tableau3.A64" office:value-type="string">
            <text:p text:style-name="Table_20_Contents">loginUserInfoAddress</text:p>
          </table:table-cell>
          <table:table-cell table:style-name="Tableau3.B2" office:value-type="string">
            <text:p text:style-name="Table_20_Contents">boolean</text:p>
          </table:table-cell>
          <table:table-cell table:style-name="Tableau3.C64" table:number-columns-spanned="2" office:value-type="string">
            <text:p text:style-name="Table_20_Contents">Si mise pour 1, le commutateur obtient que le champ adresse e construite de les champs address, country, zip et city du tableau fe_users.</text:p>
          </table:table-cell>
          <table:covered-table-cell/>
          <table:table-cell table:style-name="Tableau3.E2" office:value-type="string">
            <text:p text:style-name="Table_20_Contents"/>
          </table:table-cell>
        </table:table-row>
        <table:table-row>
          <table:table-cell table:style-name="Tableau3.A65" office:value-type="string">
            <text:p text:style-name="Table_20_Contents">requiredInfoFields</text:p>
          </table:table-cell>
          <table:table-cell table:style-name="Tableau3.B2" office:value-type="string">
            <text:p text:style-name="P32">list of string</text:p>
          </table:table-cell>
          <table:table-cell table:style-name="Tableau3.C65" table:number-columns-spanned="2" office:value-type="string">
            <text:p text:style-name="Table_20_Contents">Liste des champs, que sont nécessaires pour l'information d'adresse. Cette exemple décrit toutes les possibilités..</text:p>
            <text:p text:style-name="Table_20_Contents"><text:line-break/><text:span text:style-name="T2">Par exemple:</text:span></text:p>
            <text:p text:style-name="Table_20_Contents_2f_PRE">requiredInfoFields = name,address,telephone,fax,email,company,city,zip,state,country</text:p>
          </table:table-cell>
          <table:covered-table-cell/>
          <table:table-cell table:style-name="Tableau3.E2" office:value-type="string">
            <text:p text:style-name="Table_20_Contents"/>
          </table:table-cell>
        </table:table-row>
        <table:table-row>
          <table:table-cell table:style-name="Tableau3.A66" office:value-type="string">
            <text:p text:style-name="Table_20_Contents">orderBy</text:p>
          </table:table-cell>
          <table:table-cell table:style-name="Tableau3.B2" office:value-type="string">
            <text:p text:style-name="P4">string</text:p>
          </table:table-cell>
          <table:table-cell table:style-name="Tableau3.C66" table:number-columns-spanned="2" office:value-type="string">
            <text:p text:style-name="Table_20_Contents">Liste des champs d'après la liste des produits soit tri. Pour travailler ensemle avec l' Extension Shopsort: pid,category,sorting</text:p>
            <text:p text:style-name="Table_20_Contents">Au première colonne il faut toujours utiliser le champ pid.</text:p>
          </table:table-cell>
          <table:covered-table-cell/>
          <table:table-cell table:style-name="Tableau3.E66" office:value-type="string">
            <text:p text:style-name="Table_20_Contents">pid,category,title</text:p>
          </table:table-cell>
        </table:table-row>
        <text:soft-page-break/>
        <table:table-row>
          <table:table-cell table:style-name="Tableau3.A67" office:value-type="string">
            <text:p text:style-name="Table_20_Contents">orderByCategoryTitle</text:p>
          </table:table-cell>
          <table:table-cell table:style-name="Tableau3.B2" office:value-type="string">
            <text:p text:style-name="P4">boolean</text:p>
          </table:table-cell>
          <table:table-cell table:style-name="Tableau3.C67" table:number-columns-spanned="2" office:value-type="string">
            <text:p text:style-name="Table_20_Contents">Quand la liste des produits doit être tri selon le titre de la catégorie du tt_products_cat.</text:p>
            <text:p text:style-name="Table_20_Contents">Avec ça les configurations du orcerBy sont intitulés. </text:p>
          </table:table-cell>
          <table:covered-table-cell/>
          <table:table-cell table:style-name="Tableau3.E2" office:value-type="string">
            <text:p text:style-name="Table_20_Contents"/>
          </table:table-cell>
        </table:table-row>
        <table:table-row>
          <table:table-cell table:style-name="Tableau3.A68" office:value-type="string">
            <text:p text:style-name="Table_20_Contents">orderByItemNumberSg</text:p>
          </table:table-cell>
          <table:table-cell table:style-name="Tableau3.B2" office:value-type="string">
            <text:p text:style-name="P4">boolean</text:p>
          </table:table-cell>
          <table:table-cell table:style-name="Tableau3.C68" table:number-columns-spanned="2" office:value-type="string">
            <text:p text:style-name="Table_20_Contents">Si la vue en particulier doit être ranger d'après le numéro d'article ItemNumber au lieu de uid: </text:p>
            <text:p text:style-name="Table_20_Contents">###LINK_NEXT_SINGLE### et ###LINK_PREV_SINGLE### sont utilisés.</text:p>
          </table:table-cell>
          <table:covered-table-cell/>
          <table:table-cell table:style-name="Tableau3.E2" office:value-type="string">
            <text:p text:style-name="Table_20_Contents"/>
          </table:table-cell>
        </table:table-row>
        <table:table-row>
          <table:table-cell table:style-name="Tableau3.A69" office:value-type="string">
            <text:p text:style-name="Table_20_Contents">orderNumberPrefix</text:p>
          </table:table-cell>
          <table:table-cell table:style-name="Tableau3.B2" office:value-type="string">
            <text:p text:style-name="Table_20_Contents">string</text:p>
          </table:table-cell>
          <table:table-cell table:style-name="Tableau3.C69" table:number-columns-spanned="2" office:value-type="string">
            <text:p text:style-name="Table_20_Contents">Préfixe pour numéros d'ordres. Maximum de 10 signes. Quand le texte commence avec '%', le reste sera alors indique en PHP cadrage de date pour avoir temps/dates.</text:p>
          </table:table-cell>
          <table:covered-table-cell/>
          <table:table-cell table:style-name="Tableau3.E2" office:value-type="string">
            <text:p text:style-name="Table_20_Contents"/>
          </table:table-cell>
        </table:table-row>
        <table:table-row>
          <table:table-cell table:style-name="Tableau3.A70" office:value-type="string">
            <text:p text:style-name="Table_20_Contents">orderEmail_from</text:p>
          </table:table-cell>
          <table:table-cell table:style-name="Tableau3.B2" office:value-type="string">
            <text:p text:style-name="Table_20_Contents">string</text:p>
          </table:table-cell>
          <table:table-cell table:style-name="Tableau3.C70" table:number-columns-spanned="2" office:value-type="string">
            <text:p text:style-name="Table_20_Contents">Émail adresse de l'expéditeur pour émail de confirmation au client.</text:p>
          </table:table-cell>
          <table:covered-table-cell/>
          <table:table-cell table:style-name="Tableau3.E2" office:value-type="string">
            <text:p text:style-name="Table_20_Contents"/>
          </table:table-cell>
        </table:table-row>
        <table:table-row>
          <table:table-cell table:style-name="Tableau3.A71" office:value-type="string">
            <text:p text:style-name="Table_20_Contents">orderEmail_fromName</text:p>
          </table:table-cell>
          <table:table-cell table:style-name="Tableau3.B2" office:value-type="string">
            <text:p text:style-name="Table_20_Contents">string</text:p>
          </table:table-cell>
          <table:table-cell table:style-name="Tableau3.C71" table:number-columns-spanned="2" office:value-type="string">
            <text:p text:style-name="Table_20_Contents">Nom de l'expéditeur pour émail de confirmation au client.</text:p>
          </table:table-cell>
          <table:covered-table-cell/>
          <table:table-cell table:style-name="Tableau3.E2" office:value-type="string">
            <text:p text:style-name="Table_20_Contents"/>
          </table:table-cell>
        </table:table-row>
        <table:table-row>
          <table:table-cell table:style-name="Tableau3.A72" office:value-type="string">
            <text:p text:style-name="Table_20_Contents">orderEmail_to</text:p>
          </table:table-cell>
          <table:table-cell table:style-name="Tableau3.B2" office:value-type="string">
            <text:p text:style-name="P32">list of email-addresses</text:p>
          </table:table-cell>
          <table:table-cell table:style-name="Tableau3.C72" table:number-columns-spanned="2" office:value-type="string">
            <text:p text:style-name="Table_20_Contents">Une liste de bénéficiaires séparée par une barre.</text:p>
            <text:p text:style-name="Table_20_Contents">Boutique et administrateur/superviser émail adresse doivent mise en <text:span text:style-name="T17">œ</text:span>uvre ici!</text:p>
          </table:table-cell>
          <table:covered-table-cell/>
          <table:table-cell table:style-name="Tableau3.E2" office:value-type="string">
            <text:p text:style-name="Table_20_Contents"/>
          </table:table-cell>
        </table:table-row>
        <table:table-row>
          <table:table-cell table:style-name="Tableau3.A73" office:value-type="string">
            <text:p text:style-name="Table_20_Contents">orderEmail_subject</text:p>
          </table:table-cell>
          <table:table-cell table:style-name="Tableau3.B2" office:value-type="string">
            <text:p text:style-name="P4">string</text:p>
          </table:table-cell>
          <table:table-cell table:style-name="Tableau3.C73" table:number-columns-spanned="2" office:value-type="string">
            <text:p text:style-name="Table_20_Contents">En cas que la première ligne du sujet soit vide dans </text:p>
            <text:p text:style-name="Table_20_Contents"><text:s/>###EMAIL_PLAINTEXT_TEMPLATE### .</text:p>
          </table:table-cell>
          <table:covered-table-cell/>
          <table:table-cell table:style-name="Tableau3.E2" office:value-type="string">
            <text:p text:style-name="Table_20_Contents"/>
          </table:table-cell>
        </table:table-row>
        <table:table-row>
          <table:table-cell table:style-name="Tableau3.A74" office:value-type="string">
            <text:p text:style-name="Table_20_Contents">orderEmail_htmlmail</text:p>
          </table:table-cell>
          <table:table-cell table:style-name="Tableau3.B2" office:value-type="string">
            <text:p text:style-name="Table_20_Contents">boolean / string</text:p>
          </table:table-cell>
          <table:table-cell table:style-name="Tableau3.C74" table:number-columns-spanned="2" office:value-type="string">
            <text:p text:style-name="Table_20_Contents">En cas d'<text:span text:style-name="T17">œ</text:span>uvre l'émail d'ordre sera envoyée en format HTML. Quand <text:s text:c="2"/>orderEmail_htmlmail.removeImagesWithPrefix est mise, alors les images avec leurs tags HTML ne sront pas envoyées dans l'émail.</text:p>
          </table:table-cell>
          <table:covered-table-cell/>
          <table:table-cell table:style-name="Tableau3.E2" office:value-type="string">
            <text:p text:style-name="Table_20_Contents"/>
          </table:table-cell>
        </table:table-row>
        <table:table-row>
          <table:table-cell table:style-name="Tableau3.A75" office:value-type="string">
            <text:p text:style-name="Table_20_Contents">email_notify_default</text:p>
          </table:table-cell>
          <table:table-cell table:style-name="Tableau3.B2" office:value-type="string">
            <text:p text:style-name="Table_20_Contents">boolean</text:p>
          </table:table-cell>
          <table:table-cell table:style-name="Tableau3.C75" table:number-columns-spanned="2" office:value-type="string">
            <text:p text:style-name="Table_20_Contents">L'émail de confirmation au client est activé selon standing. Il peut le changer soi même dans le module administration d'ordre.</text:p>
          </table:table-cell>
          <table:covered-table-cell/>
          <table:table-cell table:style-name="Tableau3.E2" office:value-type="string">
            <text:p text:style-name="Table_20_Contents"/>
          </table:table-cell>
        </table:table-row>
        <table:table-row>
          <table:table-cell table:style-name="Tableau3.A76" office:value-type="string">
            <text:p text:style-name="Table_20_Contents">statusCodes</text:p>
          </table:table-cell>
          <table:table-cell table:style-name="Tableau3.B2" office:value-type="string">
            <text:p text:style-name="P32">Array of integers</text:p>
          </table:table-cell>
          <table:table-cell table:style-name="Tableau3.C76" table:number-columns-spanned="2" office:value-type="string">
            <text:p text:style-name="Table_20_Contents">Code d'état actuel, pour module administration d'ordre numéros au delà du 100 annulé une ordre dans l'administration d'ordre. </text:p>
            <text:p text:style-name="Table_20_Contents">Numéro 0 est l'etat d'une ordre non terminée (et d'autres ordres non terminées dans la banque de données peuvent être considérées balayures.</text:p>
            <text:p text:style-name="Table_20_Contents">Numéros entre 50-59 sont mis à la choix des clients.</text:p>
            <text:p text:style-name="Table_20_Contents">Numéros entre 60-69 sont des fonctions spéciaux </text:p>
            <text:p text:style-name="Table_20_Contents">Le numéro 1 est employé quand un ordre soit confirmé et change de 0 `1 1. Le numéro 1 ne peut pas être choisi de l'administrateur boutique.</text:p>
            <text:p text:style-name="Table_20_Contents">Cela sera inscrit dans les marqueurs ###STATUS_OPTIONS###.</text:p>
            <text:p text:style-name="Table_20_Contents"/>
            <text:p text:style-name="P19">Par exemple:</text:p>
            <text:p text:style-name="Table_20_Contents_2f_PRE">statusCodes {</text:p>
            <text:p text:style-name="Table_20_Contents_2f_PRE"><text:s text:c="4"/>1 = Ordres confirmés par client</text:p>
            <text:p text:style-name="Table_20_Contents_2f_PRE"><text:s text:c="4"/>2 = Ordre arrivé au boutique et accepté</text:p>
            <text:p text:style-name="Table_20_Contents_2f_PRE"><text:s text:c="4"/>10 = La boutique attend les articles d'un fournisseur</text:p>
            <text:p text:style-name="Table_20_Contents_2f_PRE"><text:s text:c="4"/>11 = La boutique attend le paiement du client.</text:p>
            <text:p text:style-name="Table_20_Contents_2f_PRE"><text:s text:c="4"/>12 = La boutique attend les marchandise du client</text:p>
            <text:p text:style-name="Table_20_Contents_2f_PRE"><text:s text:c="4"/>13 = L'ordre a été payé</text:p>
            <text:p text:style-name="Table_20_Contents_2f_PRE"><text:s text:c="4"/>20 = La marchandise a été envoyée au client</text:p>
            <text:p text:style-name="Table_20_Contents_2f_PRE"><text:s text:c="4"/>21 = Bons de cadeaux ont été envoyée au client</text:p>
            <text:p text:style-name="Table_20_Contents_2f_PRE"><text:s text:c="4"/>30 = Autre message du boutique</text:p>
            <text:p text:style-name="Table_20_Contents_2f_PRE"><text:s text:c="4"/>50 = Le client demande l'annulation de sa commission</text:p>
            <text:p text:style-name="Table_20_Contents_2f_PRE"><text:s text:c="4"/>51 = Information du client au boutique</text:p>
            <text:p text:style-name="Table_20_Contents_2f_PRE"><text:s text:c="4"/>60 = Envoi des bons de cadeaux au client </text:p>
            <text:p text:style-name="Table_20_Contents_2f_PRE"><text:s text:c="4"/>100 = Commande envoyée et terminée</text:p>
            <text:p text:style-name="Table_20_Contents_2f_PRE"><text:s text:c="4"/>101 = Commande terminée</text:p>
            <text:p text:style-name="Table_20_Contents_2f_PRE"><text:s text:c="4"/>200 = Commande radié</text:p>
            <text:p text:style-name="Table_20_Contents_2f_PRE">}</text:p>
          </table:table-cell>
          <table:covered-table-cell/>
          <table:table-cell table:style-name="Tableau3.E2" office:value-type="string">
            <text:p text:style-name="Table_20_Contents"/>
          </table:table-cell>
        </table:table-row>
        <table:table-row>
          <table:table-cell table:style-name="Tableau3.A77" office:value-type="string">
            <text:p text:style-name="Table_20_Contents">update_code</text:p>
          </table:table-cell>
          <table:table-cell table:style-name="Tableau3.B2" office:value-type="string">
            <text:p text:style-name="Table_20_Contents">string</text:p>
          </table:table-cell>
          <table:table-cell table:style-name="Tableau3.C77" table:number-columns-spanned="2" office:value-type="string">
            <text:p text:style-name="Table_20_Contents">Le mot de passe utilisé par l'administrateur de la boutique pour entrer dans l'administration de l'ordre dans le front de la boutique.</text:p>
            <text:p text:style-name="Table_20_Contents">Le 'code' se notre sur le formulaire quand un utilisateur backend se connecte. Il en faut encore un autre mot de passe.</text:p>
          </table:table-cell>
          <table:covered-table-cell/>
          <table:table-cell table:style-name="Tableau3.E77" office:value-type="string">
            <text:p text:style-name="Table_20_Contents">password</text:p>
          </table:table-cell>
        </table:table-row>
        <table:table-row>
          <table:table-cell table:style-name="Tableau3.A78" office:value-type="string">
            <text:p text:style-name="Table_20_Contents">statusDate_stdWrap</text:p>
          </table:table-cell>
          <table:table-cell table:style-name="Tableau3.B2" office:value-type="string">
            <text:p text:style-name="Table_20_Contents">-&gt;stdWrap </text:p>
          </table:table-cell>
          <table:table-cell table:style-name="Tableau3.C78" table:number-columns-spanned="2" office:value-type="string">
            <text:p text:style-name="Table_20_Contents">StdWrap pour la date actuelle</text:p>
            <text:p text:style-name="Table_20_Contents"/>
            <text:p text:style-name="P19">Par exemple:</text:p>
            <text:p text:style-name="Table_20_Contents_2f_PRE">%e-%m-%y %H:%M</text:p>
          </table:table-cell>
          <table:covered-table-cell/>
          <table:table-cell table:style-name="Tableau3.E2" office:value-type="string">
            <text:p text:style-name="Table_20_Contents"/>
          </table:table-cell>
        </table:table-row>
        <text:soft-page-break/>
        <table:table-row>
          <table:table-cell table:style-name="Tableau3.A79" office:value-type="string">
            <text:p text:style-name="Table_20_Contents">orderDate_stdWrap</text:p>
          </table:table-cell>
          <table:table-cell table:style-name="Tableau3.B2" office:value-type="string">
            <text:p text:style-name="Table_20_Contents">-&gt;stdWrap </text:p>
          </table:table-cell>
          <table:table-cell table:style-name="Tableau3.C79" table:number-columns-spanned="2" office:value-type="string">
            <text:p text:style-name="Table_20_Contents">StdWrap la date de l'ordre</text:p>
            <text:p text:style-name="Table_20_Contents"/>
            <text:p text:style-name="P19">Par exemple:</text:p>
            <text:p text:style-name="Table_20_Contents_2f_PRE">%e-%m-%y</text:p>
          </table:table-cell>
          <table:covered-table-cell/>
          <table:table-cell table:style-name="Tableau3.E2" office:value-type="string">
            <text:p text:style-name="Table_20_Contents"/>
          </table:table-cell>
        </table:table-row>
        <table:table-row>
          <table:table-cell table:style-name="Tableau3.A80" office:value-type="string">
            <text:p text:style-name="Table_20_Contents">displayCurrentRecord</text:p>
          </table:table-cell>
          <table:table-cell table:style-name="Tableau3.B2" office:value-type="string">
            <text:p text:style-name="Table_20_Contents">boolean</text:p>
          </table:table-cell>
          <table:table-cell table:style-name="Tableau3.C80" table:number-columns-spanned="2" office:value-type="string">
            <text:p text:style-name="Table_20_Contents">Activer divers changements dans la visualisation de l'ordre.</text:p>
            <text:p text:style-name="Table_20_Contents">Le résultat est générée du $cObj-&gt;data. </text:p>
            <text:p text:style-name="Table_20_Contents">Avec <text:span text:style-name="T17">ça on se serve des marqueurs au-dessous:</text:span></text:p>
            <text:p text:style-name="Table_20_Contents"><text:s/>###ITEM_SINGLE_DISPLAY_RECORDINSERT### au lieu de ###ITEM_SINGLE_DISPLAY### .</text:p>
          </table:table-cell>
          <table:covered-table-cell/>
          <table:table-cell table:style-name="Tableau3.E2" office:value-type="string">
            <text:p text:style-name="Table_20_Contents"/>
          </table:table-cell>
        </table:table-row>
        <table:table-row>
          <table:table-cell table:style-name="Tableau3.A81" office:value-type="string">
            <text:p text:style-name="Table_20_Contents">externalProcessing</text:p>
          </table:table-cell>
          <table:table-cell table:style-name="Tableau3.B2" office:value-type="string">
            <text:p text:style-name="Table_20_Contents">cObject</text:p>
          </table:table-cell>
          <table:table-cell table:style-name="Tableau3.C81" table:number-columns-spanned="2" office:value-type="string">
            <text:p text:style-name="Table_20_Contents">Cet objet peut activer l'appel du une fonction externe pour le changement du le panier d'achat. Ce traitement dépend des installations d'un autre boutique externe. La distribution est mise au debut de la distribution de la page du panier d'achat. Cet objet remplit à chaque fois la méthode main_products dans la classe user_products du fichier class.tx_ttproducts.php . On l'appelle toujours avant tout autre traitement dans la boutique. Voir descriptions classe dans le code.</text:p>
          </table:table-cell>
          <table:covered-table-cell/>
          <table:table-cell table:style-name="Tableau3.E2" office:value-type="string">
            <text:p text:style-name="Table_20_Contents"/>
          </table:table-cell>
        </table:table-row>
        <table:table-row>
          <table:table-cell table:style-name="Tableau3.A82" office:value-type="string">
            <text:p text:style-name="P4">externalProcessing_final</text:p>
          </table:table-cell>
          <table:table-cell table:style-name="Tableau3.B2" office:value-type="string">
            <text:p text:style-name="P4">cObject</text:p>
          </table:table-cell>
          <table:table-cell table:style-name="Tableau3.C82" table:number-columns-spanned="2" office:value-type="string">
            <text:p text:style-name="P34">cObject pour le template confirmation de l'ordre.</text:p>
          </table:table-cell>
          <table:covered-table-cell/>
          <table:table-cell table:style-name="Tableau3.E2" office:value-type="string">
            <text:p text:style-name="Table_20_Contents"/>
          </table:table-cell>
        </table:table-row>
        <table:table-row>
          <table:table-cell table:style-name="Tableau3.A83" office:value-type="string">
            <text:p text:style-name="Table_20_Contents">externalFinalizing</text:p>
          </table:table-cell>
          <table:table-cell table:style-name="Tableau3.B2" office:value-type="string">
            <text:p text:style-name="Table_20_Contents">cObject</text:p>
          </table:table-cell>
          <table:table-cell table:style-name="Tableau3.C83" table:number-columns-spanned="2" office:value-type="string">
            <text:p text:style-name="Table_20_Contents">Cet objet active une fonction qui fait des presentations dans un système de l'ordre externe. C'est une s<text:span text:style-name="T17">œ</text:span>ur des fonctions ci-dessous. Elles <text:s/>devaient employés ensemble. Cette fonction doit être activé tout suite après l'appel finalisation de l'ordre. </text:p>
            <text:p text:style-name="P26">Cette fonction permet par exemple de se débarasser chaque panier d'achat qui est possible par cObject externalProcessing. <text:s/></text:p>
            <text:p text:style-name="Table_20_Contents"><text:span text:style-name="T2">Attention:</text:span> L'annonce n'est nullement indiquée.</text:p>
          </table:table-cell>
          <table:covered-table-cell/>
          <table:table-cell table:style-name="Tableau3.E2" office:value-type="string">
            <text:p text:style-name="Table_20_Contents"/>
          </table:table-cell>
        </table:table-row>
        <table:table-row>
          <table:table-cell table:style-name="Tableau3.A84" office:value-type="string">
            <text:p text:style-name="Table_20_Contents">wrap1</text:p>
          </table:table-cell>
          <table:table-cell table:style-name="Tableau3.B2" office:value-type="string">
            <text:p text:style-name="P5">-&gt; stdWrap</text:p>
          </table:table-cell>
          <table:table-cell table:style-name="Tableau3.C84" table:number-columns-spanned="2" office:value-type="string">
            <text:p text:style-name="Table_20_Contents">Globaler Wrap 1. Sera partagé entre les marqueurs ###GW1B### et ###GW1E### . N'y mettez pas une valeur normale, mais employez un virgule pour marquer les deux parties.</text:p>
            <text:p text:style-name="Table_20_Contents"/>
            <text:p text:style-name="P19">Par exemple:</text:p>
            <text:p text:style-name="Table_20_Contents_2f_PRE">wrap1.wrap = &lt;B&gt; |&lt;/B&gt;</text:p>
          </table:table-cell>
          <table:covered-table-cell/>
          <table:table-cell table:style-name="Tableau3.E2" office:value-type="string">
            <text:p text:style-name="Table_20_Contents"/>
          </table:table-cell>
        </table:table-row>
        <table:table-row>
          <table:table-cell table:style-name="Tableau3.A85" office:value-type="string">
            <text:p text:style-name="Table_20_Contents">wrap2</text:p>
          </table:table-cell>
          <table:table-cell table:style-name="Tableau3.B2" office:value-type="string">
            <text:p text:style-name="Table_20_Contents">-&gt; stdWrap</text:p>
          </table:table-cell>
          <table:table-cell table:style-name="Tableau3.C85" table:number-columns-spanned="2" office:value-type="string">
            <text:p text:style-name="Table_20_Contents">Globaler Wrap 2 (voire ci-dessus) Marqueurs ###GW2B### et ###GW2E###</text:p>
          </table:table-cell>
          <table:covered-table-cell/>
          <table:table-cell table:style-name="Tableau3.E2" office:value-type="string">
            <text:p text:style-name="Table_20_Contents"/>
          </table:table-cell>
        </table:table-row>
        <table:table-row>
          <table:table-cell table:style-name="Tableau3.A86" office:value-type="string">
            <text:p text:style-name="Table_20_Contents">selectColor</text:p>
          </table:table-cell>
          <table:table-cell table:style-name="Tableau3.B2" office:value-type="string">
            <text:p text:style-name="Table_20_Contents">boolean</text:p>
          </table:table-cell>
          <table:table-cell table:style-name="Tableau3.C86" table:number-columns-spanned="2" office:value-type="string">
            <text:p text:style-name="Table_20_Contents">Si activé la couleur d'un produit est éligible avec une boîte a choix.</text:p>
          </table:table-cell>
          <table:covered-table-cell/>
          <table:table-cell table:style-name="Tableau3.E86" office:value-type="string">
            <text:p text:style-name="Table_20_Contents">1</text:p>
          </table:table-cell>
        </table:table-row>
        <table:table-row>
          <table:table-cell table:style-name="Tableau3.A87" office:value-type="string">
            <text:p text:style-name="Table_20_Contents">selectSize</text:p>
          </table:table-cell>
          <table:table-cell table:style-name="Tableau3.B2" office:value-type="string">
            <text:p text:style-name="Table_20_Contents">boolean</text:p>
          </table:table-cell>
          <table:table-cell table:style-name="Tableau3.C87" table:number-columns-spanned="2" office:value-type="string">
            <text:p text:style-name="Table_20_Contents">Si activé la taille d'un produit est éligible avec une boîte a choix.</text:p>
          </table:table-cell>
          <table:covered-table-cell/>
          <table:table-cell table:style-name="Tableau3.E87" office:value-type="string">
            <text:p text:style-name="Table_20_Contents">1</text:p>
          </table:table-cell>
        </table:table-row>
        <table:table-row>
          <table:table-cell table:style-name="Tableau3.A88" office:value-type="string">
            <text:p text:style-name="Table_20_Contents">selectGradings</text:p>
          </table:table-cell>
          <table:table-cell table:style-name="Tableau3.B2" office:value-type="string">
            <text:p text:style-name="Table_20_Contents">boolean</text:p>
          </table:table-cell>
          <table:table-cell table:style-name="Tableau3.C88" table:number-columns-spanned="2" office:value-type="string">
            <text:p text:style-name="Table_20_Contents">Si activé l'étalement d'un produit est éligible avec une boîte a choix.</text:p>
          </table:table-cell>
          <table:covered-table-cell/>
          <table:table-cell table:style-name="Tableau3.E88" office:value-type="string">
            <text:p text:style-name="Table_20_Contents">1</text:p>
          </table:table-cell>
        </table:table-row>
        <table:table-row>
          <table:table-cell table:style-name="Tableau3.A89" office:value-type="string">
            <text:p text:style-name="Table_20_Contents">color1</text:p>
          </table:table-cell>
          <table:table-cell table:style-name="Tableau3.B2" office:value-type="string">
            <text:p text:style-name="Table_20_Contents">string /stdWrap</text:p>
          </table:table-cell>
          <table:table-cell table:style-name="Tableau3.C89" table:number-columns-spanned="2" office:value-type="string">
            <text:p text:style-name="Table_20_Contents">Valeur pour ###GC1### marqueurs (Couleur globale 1)</text:p>
          </table:table-cell>
          <table:covered-table-cell/>
          <table:table-cell table:style-name="Tableau3.E2" office:value-type="string">
            <text:p text:style-name="Table_20_Contents"/>
          </table:table-cell>
        </table:table-row>
        <table:table-row>
          <table:table-cell table:style-name="Tableau3.A90" office:value-type="string">
            <text:p text:style-name="Table_20_Contents">color2</text:p>
          </table:table-cell>
          <table:table-cell table:style-name="Tableau3.B2" office:value-type="string">
            <text:p text:style-name="Table_20_Contents">string /stdWrap</text:p>
          </table:table-cell>
          <table:table-cell table:style-name="Tableau3.C90" table:number-columns-spanned="2" office:value-type="string">
            <text:p text:style-name="Table_20_Contents">Valeur pourr ###GC2### marqueurs ( Couleur globale 2)</text:p>
          </table:table-cell>
          <table:covered-table-cell/>
          <table:table-cell table:style-name="Tableau3.E2" office:value-type="string">
            <text:p text:style-name="Table_20_Contents"/>
          </table:table-cell>
        </table:table-row>
        <table:table-row>
          <table:table-cell table:style-name="Tableau3.A91" office:value-type="string">
            <text:p text:style-name="Table_20_Contents">color3</text:p>
          </table:table-cell>
          <table:table-cell table:style-name="Tableau3.B2" office:value-type="string">
            <text:p text:style-name="Table_20_Contents">string /stdWrap</text:p>
          </table:table-cell>
          <table:table-cell table:style-name="Tableau3.C91" table:number-columns-spanned="2" office:value-type="string">
            <text:p text:style-name="Table_20_Contents">Valeur pour ###GC3### marqueurs ( Couleur globale 3)</text:p>
          </table:table-cell>
          <table:covered-table-cell/>
          <table:table-cell table:style-name="Tableau3.E2" office:value-type="string">
            <text:p text:style-name="Table_20_Contents"/>
          </table:table-cell>
        </table:table-row>
        <table:table-row>
          <table:table-cell table:style-name="Tableau3.A92" office:value-type="string">
            <text:p text:style-name="P4">useArticles</text:p>
          </table:table-cell>
          <table:table-cell table:style-name="Tableau3.B2" office:value-type="string">
            <text:p text:style-name="P4">boolean</text:p>
          </table:table-cell>
          <table:table-cell table:style-name="Tableau3.C92" table:number-columns-spanned="2" office:value-type="string">
            <text:p text:style-name="Table_20_Contents">Si vous voulez utiliser des produits en divers langages, vous devez mettrer cela pour 1. Le champ inStock du tableaux d'articles serait utilise au lieux de cela du tableau des produits.</text:p>
          </table:table-cell>
          <table:covered-table-cell/>
          <table:table-cell table:style-name="Tableau3.E2" office:value-type="string">
            <text:p text:style-name="Table_20_Contents"/>
          </table:table-cell>
        </table:table-row>
        <table:table-row>
          <table:table-cell table:style-name="Tableau3.A93" office:value-type="string">
            <text:p text:style-name="P4">priceTagObj</text:p>
          </table:table-cell>
          <table:table-cell table:style-name="Tableau3.B2" office:value-type="string">
            <text:p text:style-name="P4">IMAGE</text:p>
          </table:table-cell>
          <table:table-cell table:style-name="Tableau3.C93" table:number-columns-spanned="2" office:value-type="string">
            <text:p text:style-name="P34">Image pour affichage des prix</text:p>
          </table:table-cell>
          <table:covered-table-cell/>
          <table:table-cell table:style-name="Tableau3.E2" office:value-type="string">
            <text:p text:style-name="Table_20_Contents"/>
          </table:table-cell>
        </table:table-row>
        <table:table-row>
          <table:table-cell table:style-name="Tableau3.A94" office:value-type="string">
            <text:p text:style-name="P4">usePriceTag</text:p>
          </table:table-cell>
          <table:table-cell table:style-name="Tableau3.B2" office:value-type="string">
            <text:p text:style-name="P4">boolean</text:p>
          </table:table-cell>
          <table:table-cell table:style-name="Tableau3.C94" table:number-columns-spanned="2" office:value-type="string">
            <text:p text:style-name="P34">Si activé l'objet <text:span text:style-name="T1">priceTagObj est utilise. Si non, le prix est affiché comme texte normale.</text:span></text:p>
          </table:table-cell>
          <table:covered-table-cell/>
          <table:table-cell table:style-name="Tableau3.E94" office:value-type="string">
            <text:p text:style-name="Table_20_Contents">0</text:p>
          </table:table-cell>
        </table:table-row>
        <table:table-row>
          <table:table-cell table:style-name="Tableau3.A95" office:value-type="string">
            <text:p text:style-name="P4">useStaticInfoCountry</text:p>
          </table:table-cell>
          <table:table-cell table:style-name="Tableau3.B2" office:value-type="string">
            <text:p text:style-name="P4">boolean</text:p>
          </table:table-cell>
          <table:table-cell table:style-name="Tableau3.C95" table:number-columns-spanned="2" office:value-type="string">
            <text:p text:style-name="P34">Si activé, le court champ static_info_country de la tableau fe_users et utilisé au lieu de le champ country.</text:p>
          </table:table-cell>
          <table:covered-table-cell/>
          <table:table-cell table:style-name="Tableau3.E95" office:value-type="string">
            <text:p text:style-name="Table_20_Contents">0</text:p>
          </table:table-cell>
        </table:table-row>
        <table:table-row>
          <table:table-cell table:style-name="Tableau3.A96" office:value-type="string">
            <text:p text:style-name="P4">whereGift</text:p>
          </table:table-cell>
          <table:table-cell table:style-name="Tableau3.B2" office:value-type="string">
            <text:p text:style-name="P4">string</text:p>
          </table:table-cell>
          <table:table-cell table:style-name="Tableau3.C96" table:number-columns-spanned="2" office:value-type="string">
            <text:p text:style-name="P34">Diesee SQL Where Bedingung bestimmt, welche Produits als Geschenke (Gutscheine) anzusehen sind.</text:p>
          </table:table-cell>
          <table:covered-table-cell/>
          <table:table-cell table:style-name="Tableau3.E2" office:value-type="string">
            <text:p text:style-name="Table_20_Contents"/>
          </table:table-cell>
        </table:table-row>
        <table:table-row>
          <table:table-cell table:style-name="Tableau3.A97" office:value-type="string">
            <text:p text:style-name="Table_20_Contents">payment / shipping</text:p>
          </table:table-cell>
          <table:table-cell table:style-name="Tableau3.B2" office:value-type="string">
            <text:p text:style-name="Table_20_Contents">(see below)</text:p>
          </table:table-cell>
          <table:table-cell table:style-name="Tableau3.C97" table:number-columns-spanned="2" office:value-type="string">
            <text:p text:style-name="Table_20_Contents">Konfiguration der Bezahlungsarten und Liefermethoden. Hier werden die Textausgaben, die Kosten und zusätzliche Berechnungen und Einstellungen für Bezahlsysteme eingestellt.</text:p>
            <text:p text:style-name="Table_20_Contents">Siehe Description weiter unten!</text:p>
          </table:table-cell>
          <table:covered-table-cell/>
          <table:table-cell table:style-name="Tableau3.E2" office:value-type="string">
            <text:p text:style-name="Table_20_Contents"/>
          </table:table-cell>
        </table:table-row>
      </table:table>
      <text:p text:style-name="P5">[tsref:(script).productsLib]</text:p>
      <text:h text:style-name="Heading_20_3" text:outline-level="3"/>
      <text:h text:style-name="P46" text:outline-level="3">Configuration pour payement et <text:s/>expédition</text:h>
      <text:p text:style-name="Text_20_body">Die Bezahlung und der Versand sind einander von der Konfiguration her sehr ähnlich. Daher haben sie im wesentlichen dieselbe Liste an Eigenschaften mit Anmerkungen, wenn eine Eigenschaft nur bei einem zutrifft. Der Konfiguration der Bezahlung und des Versands bietet die Möglichkeit, verschiedene Versandarten und Bezahlmethoden für den Benutzer anzugeben. Außerdem können Sie festlegen, ob es über Auswahlknöpfe oder eine Auswahlbox wählbar sein soll.</text:p>
      <text:p text:style-name="Text_20_body">Die Nummer der ausgewählten Bezahl- und Versandmethode wird am Ende der Template Datei in der Dankeschön-Seite wieder ausgewertet, damit nur der entsprechende Text dort aufscheint. Sie können mit diesen Einstellungen auch die Ausführung von besonderen PHP Skripten veranlassen. Das ist alles möglich.</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Propriété:</text:p>
            </table:table-cell>
            <table:table-cell table:style-name="Tableau4.B1" office:value-type="string">
              <text:p text:style-name="Table_20_Heading">Type date:</text:p>
            </table:table-cell>
            <table:table-cell table:style-name="Tableau4.A1" office:value-type="string">
              <text:p text:style-name="Table_20_Heading">Description:</text:p>
            </table:table-cell>
            <table:table-cell table:style-name="Tableau4.D1" office:value-type="string">
              <text:p text:style-name="Table_20_Heading">Ajustement d'avance:</text:p>
            </table:table-cell>
          </table:table-row>
        </table:table-header-rows>
        <table:table-row>
          <table:table-cell table:style-name="Tableau4.A2" office:value-type="string">
            <text:p text:style-name="Table_20_Contents">radio</text:p>
          </table:table-cell>
          <table:table-cell table:style-name="Tableau4.B2" office:value-type="string">
            <text:p text:style-name="Table_20_Contents">boolean</text:p>
          </table:table-cell>
          <table:table-cell table:style-name="Tableau4.C2" office:value-type="string">
            <text:p text:style-name="Table_20_Contents">Wenn gesetzt, werden Auswahlknöpfe angezeigt, ansonsten eine Auswahlbox.</text:p>
          </table:table-cell>
          <table:table-cell table:style-name="Tableau4.D2" office:value-type="string">
            <text:p text:style-name="Table_20_Contents">0</text:p>
          </table:table-cell>
        </table:table-row>
        <table:table-row>
          <table:table-cell table:style-name="Tableau4.A3" office:value-type="string">
            <text:p text:style-name="Table_20_Contents">template </text:p>
          </table:table-cell>
          <table:table-cell table:style-name="Tableau4.B2" office:value-type="string">
            <text:p text:style-name="Table_20_Contents">string</text:p>
          </table:table-cell>
          <table:table-cell table:style-name="Tableau4.C3" office:value-type="string">
            <text:p text:style-name="P19">(Nur Layout Auswahlknöpfe)</text:p>
            <text:p text:style-name="Table_20_Contents">Wenn .radio gesetzt ist, dann wird dieser Text als 'template' für die Auswahlknöpfe verwendet.</text:p>
            <text:p text:style-name="Table_20_Contents"/>
            <text:p text:style-name="P19">Standard ist (in einer Zeile):</text:p>
            <text:p text:style-name="P19"/>
            <text:p text:style-name="Table_20_Contents_2f_PRE">&lt;nobr&gt;###IMAGE### &lt;input type="radio" name="recs[tt_products]['.$key.']" onClick="submit()" value="###VALUE###"###CHECKED###&gt; ###TITLE###&lt;/nobr&gt;&lt;BR&gt;</text:p>
          </table:table-cell>
          <table:table-cell table:style-name="Tableau4.D3" office:value-type="string">
            <text:p text:style-name="Table_20_Contents"/>
          </table:table-cell>
        </table:table-row>
        <table:table-row>
          <table:table-cell table:style-name="Tableau4.A4" office:value-type="string">
            <text:p text:style-name="Table_20_Contents">wrap</text:p>
          </table:table-cell>
          <table:table-cell table:style-name="Tableau4.B2" office:value-type="string">
            <text:p text:style-name="Table_20_Contents">string</text:p>
          </table:table-cell>
          <table:table-cell table:style-name="Tableau4.C4" office:value-type="string">
            <text:p text:style-name="P19">(Nur Auswahlbox Layout)</text:p>
            <text:p text:style-name="Table_20_Contents">Wenn .radio 0 ist, dann wird dieser Text um die &lt;option&gt; Tags in einem &lt;select&gt;-Tag <text:s/>ausgegeben.</text:p>
            <text:p text:style-name="Table_20_Contents"/>
            <text:p text:style-name="P19">Standard ist (in einer Zeile):</text:p>
            <text:p text:style-name="P19"/>
            <text:p text:style-name="Table_20_Contents_2f_PRE">'&lt;select name="recs[tt_products]['.$key.']" onChange="submit()"&gt;|&lt;/select&gt;'</text:p>
          </table:table-cell>
          <table:table-cell table:style-name="Tableau4.D3" office:value-type="string">
            <text:p text:style-name="Table_20_Contents"/>
          </table:table-cell>
        </table:table-row>
        <table:table-row>
          <table:table-cell table:style-name="Tableau4.A5" office:value-type="string">
            <text:p text:style-name="Table_20_Contents">TAXpercentage</text:p>
          </table:table-cell>
          <table:table-cell table:style-name="Tableau4.B2" office:value-type="string">
            <text:p text:style-name="Table_20_Contents">double</text:p>
          </table:table-cell>
          <table:table-cell table:style-name="Tableau4.C5" office:value-type="string">
            <text:p text:style-name="Table_20_Contents">Steuersatz.</text:p>
            <text:p text:style-name="Table_20_Contents">Double Wert (!) (das bedeutet, daß der Punkt '.' für die Dezimaltrennung verwendet werden muß)</text:p>
            <text:p text:style-name="Table_20_Contents">Das ersetzt die frühere Eigenschaft <text:span text:style-name="T1">priceNoTax. Dieser Steuersatz kann sich von dem globalen mit dem gleichen Namen unterscheiden.</text:span></text:p>
            <text:p text:style-name="Table_20_Contents"/>
            <text:p text:style-name="P19">Par exemple:</text:p>
            <text:p text:style-name="Table_20_Contents_2f_PRE"># Dänischer Steuersatz beträgt 25%:</text:p>
            <text:p text:style-name="Table_20_Contents_2f_PRE">payment.TAXpercentage = 25.00</text:p>
          </table:table-cell>
          <table:table-cell table:style-name="Tableau4.D3" office:value-type="string">
            <text:p text:style-name="Table_20_Contents"/>
          </table:table-cell>
        </table:table-row>
        <table:table-row>
          <table:table-cell table:style-name="Tableau4.A6" office:value-type="string">
            <text:p text:style-name="P32">Array von Ganzzahlen</text:p>
          </table:table-cell>
          <table:table-cell table:style-name="Tableau4.B2" office:value-type="string">
            <text:p text:style-name="Table_20_Contents"/>
          </table:table-cell>
          <table:table-cell table:style-name="Tableau4.C6" office:value-type="string">
            <text:p text:style-name="Table_20_Contents">Konfiguration, siehe unten</text:p>
            <text:p text:style-name="Table_20_Contents"/>
            <text:p text:style-name="P19">Beispiels:</text:p>
            <text:p text:style-name="Table_20_Contents_2f_PRE">TAXpercentage = 12</text:p>
            <text:p text:style-name="Table_20_Contents_2f_PRE">10.title = Credit card</text:p>
            <text:p text:style-name="Table_20_Contents_2f_PRE">10.image.file = media/logos/dankort.gif</text:p>
            <text:p text:style-name="Table_20_Contents_2f_PRE">10.priceTax = </text:p>
            <text:p text:style-name="Table_20_Contents_2f_PRE">10.percentOfGoodstotal = 0</text:p>
            <text:p text:style-name="Table_20_Contents_2f_PRE">10.calculationScript = media/scripts/products_comp_calcScript.inc</text:p>
            <text:p text:style-name="Table_20_Contents_2f_PRE"/>
            <text:p text:style-name="Table_20_Contents_2f_PRE">30.title = By mail</text:p>
            <text:p text:style-name="Table_20_Contents_2f_PRE">30.image.file = media/logos/postdanmark.gif</text:p>
            <text:p text:style-name="Table_20_Contents_2f_PRE">30.priceTax = 40</text:p>
            <text:p text:style-name="Table_20_Contents_2f_PRE"/>
          </table:table-cell>
          <table:table-cell table:style-name="Tableau4.D3" office:value-type="string">
            <text:p text:style-name="Table_20_Contents"/>
          </table:table-cell>
        </table:table-row>
        <table:table-row>
          <table:table-cell table:style-name="Tableau4.A7" table:number-columns-spanned="4" office:value-type="string">
            <text:p text:style-name="P3">Konfiguration der Einträge zur Bezahlung / Versand</text:p>
          </table:table-cell>
          <table:covered-table-cell/>
          <table:covered-table-cell/>
          <table:covered-table-cell/>
        </table:table-row>
        <table:table-row>
          <table:table-cell table:style-name="Tableau4.A8" office:value-type="string">
            <text:p text:style-name="P4">title</text:p>
          </table:table-cell>
          <table:table-cell table:style-name="Tableau4.B2" office:value-type="string">
            <text:p text:style-name="Table_20_Contents">string</text:p>
          </table:table-cell>
          <table:table-cell table:style-name="Tableau4.C8" office:value-type="string">
            <text:p text:style-name="Table_20_Contents">Name des Eintrags, z.B. “Master Card” oder “Postversandl”</text:p>
          </table:table-cell>
          <table:table-cell table:style-name="Tableau4.D3" office:value-type="string">
            <text:p text:style-name="Table_20_Contents"/>
          </table:table-cell>
        </table:table-row>
        <table:table-row>
          <table:table-cell table:style-name="Tableau4.A9" office:value-type="string">
            <text:p text:style-name="P4">image</text:p>
          </table:table-cell>
          <table:table-cell table:style-name="Tableau4.B2" office:value-type="string">
            <text:p text:style-name="Table_20_Contents">IMAGE cObject</text:p>
          </table:table-cell>
          <table:table-cell table:style-name="Tableau4.C9" office:value-type="string">
            <text:p text:style-name="Table_20_Contents">Logo Bild für den Eintrag</text:p>
          </table:table-cell>
          <table:table-cell table:style-name="Tableau4.D3" office:value-type="string">
            <text:p text:style-name="Table_20_Contents"/>
          </table:table-cell>
        </table:table-row>
        <text:soft-page-break/>
        <table:table-row>
          <table:table-cell table:style-name="Tableau4.A10" office:value-type="string">
            <text:p text:style-name="P4">priceTax</text:p>
          </table:table-cell>
          <table:table-cell table:style-name="Tableau4.B2" office:value-type="string">
            <text:p text:style-name="Table_20_Contents">double or<text:line-break/>array <text:span text:style-name="T10">of integers</text:span></text:p>
          </table:table-cell>
          <table:table-cell table:style-name="Tableau4.C10" office:value-type="string">
            <text:p text:style-name="Table_20_Contents">Preis eines Eintrags, inkl. Steuer</text:p>
            <text:p text:style-name="Table_20_Contents">Verwenden Sie Ganzzahlen, um die minimale Anzahl an Artikeln festzulegen, für die der Preis gültig ist. 6 Artikel und mehr würden in diesem Beispiel 5.8 Euro kosten.<text:line-break/>Mit dem Typ weight können Sie auch die Versandkosten nach Gewicht der Produits berechnen.</text:p>
            <text:p text:style-name="P19"/>
            <text:p text:style-name="P19">Par exemple:</text:p>
            <text:p text:style-name="Table_20_Contents_2f_PRE">30.priceTax.type = count<text:line-break/>30.priceTax.1 = 4</text:p>
            <text:p text:style-name="Table_20_Contents_2f_PRE">30.priceTax.6 = 5.8</text:p>
          </table:table-cell>
          <table:table-cell table:style-name="Tableau4.D3" office:value-type="string">
            <text:p text:style-name="Table_20_Contents"/>
          </table:table-cell>
        </table:table-row>
        <table:table-row>
          <table:table-cell table:style-name="Tableau4.A11" office:value-type="string">
            <text:p text:style-name="P36">priceNoTax</text:p>
          </table:table-cell>
          <table:table-cell table:style-name="Tableau4.B2" office:value-type="string">
            <text:p text:style-name="Table_20_Contents">double</text:p>
          </table:table-cell>
          <table:table-cell table:style-name="Tableau4.C11" office:value-type="string">
            <text:p text:style-name="P37">wird eingestellt<text:span text:style-name="T6"> (1</text:span><text:span text:style-name="T7">st</text:span><text:span text:style-name="T6"> July 2008)</text:span></text:p>
            <text:p text:style-name="Table_20_Contents">Preis eines Artikels ohne Steuer</text:p>
            <text:p text:style-name="Table_20_Contents">Achtung: hier müssen Sie den Steuersatz selber berechnen!</text:p>
          </table:table-cell>
          <table:table-cell table:style-name="Tableau4.D11" office:value-type="string">
            <text:p text:style-name="Table_20_Contents">verwenden <text:s/>Sie TAXpercentage</text:p>
          </table:table-cell>
        </table:table-row>
        <table:table-row>
          <table:table-cell table:style-name="Tableau4.A12" office:value-type="string">
            <text:p text:style-name="P4">priceFactWeight</text:p>
          </table:table-cell>
          <table:table-cell table:style-name="Tableau4.B2" office:value-type="string">
            <text:p text:style-name="Table_20_Contents">double</text:p>
          </table:table-cell>
          <table:table-cell table:style-name="Tableau4.C12" office:value-type="string">
            <text:p text:style-name="Table_20_Contents"><text:span text:style-name="T2">nur Versand:<text:line-break/></text:span>Der Preis wird aus dem Gewicht aller Produits berechnet. Das wird zum Gesamtpreis dazugezählt.</text:p>
            <text:p text:style-name="Table_20_Contents">Das Gewicht wird mit diesem Faktor multipliziert, um den Versandpreis zu erhöhen.</text:p>
          </table:table-cell>
          <table:table-cell table:style-name="Tableau4.D3" office:value-type="string">
            <text:p text:style-name="Table_20_Contents"/>
          </table:table-cell>
        </table:table-row>
        <table:table-row>
          <table:table-cell table:style-name="Tableau4.A13" office:value-type="string">
            <text:p text:style-name="P4">priceNoReseller</text:p>
          </table:table-cell>
          <table:table-cell table:style-name="Tableau4.B2" office:value-type="string">
            <text:p text:style-name="Table_20_Contents">int+</text:p>
          </table:table-cell>
          <table:table-cell table:style-name="Tableau4.C13" office:value-type="string">
            <text:p text:style-name="Table_20_Contents">Preis Nummer für Wiederverkäufer. Im Moment kann hier nur 2 eingegeben werden. price2 wird aber nur dann verwendet, wenn der Wert größer als 0 ist.</text:p>
            <text:p text:style-name="Table_20_Contents"/>
            <text:p text:style-name="P19">Par exemple:</text:p>
            <text:p text:style-name="Table_20_Contents_2f_PRE">[usergroup = 1] </text:p>
            <text:p text:style-name="Table_20_Contents_2f_PRE">priceNoReseller = 2</text:p>
            <text:p text:style-name="Table_20_Contents_2f_PRE">[global]</text:p>
            <text:p text:style-name="Table_20_Contents_2f_PRE">...</text:p>
          </table:table-cell>
          <table:table-cell table:style-name="Tableau4.D3" office:value-type="string">
            <text:p text:style-name="Table_20_Contents"/>
          </table:table-cell>
        </table:table-row>
        <table:table-row>
          <table:table-cell table:style-name="Tableau4.A14" office:value-type="string">
            <text:p text:style-name="P4">getDiscountPrice</text:p>
          </table:table-cell>
          <table:table-cell table:style-name="Tableau4.B2" office:value-type="string">
            <text:p text:style-name="Table_20_Contents">boolean</text:p>
          </table:table-cell>
          <table:table-cell table:style-name="Tableau4.C14" office:value-type="string">
            <text:p text:style-name="Table_20_Contents">Wenn gesetzt, wird der Discount Preis auch für normale Kunden gewährt, ohne daß sie zu einer Frontend Benutzergruppe in einer Discount Gruppe gehören müssen.</text:p>
          </table:table-cell>
          <table:table-cell table:style-name="Tableau4.D3" office:value-type="string">
            <text:p text:style-name="Table_20_Contents"/>
          </table:table-cell>
        </table:table-row>
        <table:table-row>
          <table:table-cell table:style-name="Tableau4.A15" office:value-type="string">
            <text:p text:style-name="P4">percentOfGoodstotal</text:p>
          </table:table-cell>
          <table:table-cell table:style-name="Tableau4.B2" office:value-type="string">
            <text:p text:style-name="P5">double</text:p>
          </table:table-cell>
          <table:table-cell table:style-name="Tableau4.C15" office:value-type="string">
            <text:p text:style-name="Table_20_Contents">Preis eines Artikels, <text:s/>berechnet über einen Prozentsatz des Gesamtbetrags vor der Bezahlung/Versand</text:p>
          </table:table-cell>
          <table:table-cell table:style-name="Tableau4.D3" office:value-type="string">
            <text:p text:style-name="Table_20_Contents"/>
          </table:table-cell>
        </table:table-row>
        <table:table-row>
          <table:table-cell table:style-name="Tableau4.A16" office:value-type="string">
            <text:p text:style-name="P4">percentOfTotalShipping</text:p>
          </table:table-cell>
          <table:table-cell table:style-name="Tableau4.B2" office:value-type="string">
            <text:p text:style-name="P5">double</text:p>
          </table:table-cell>
          <table:table-cell table:style-name="Tableau4.C16" office:value-type="string">
            <text:p text:style-name="P19">nur Versand:</text:p>
            <text:p text:style-name="Table_20_Contents">Wenn gesetzt, werden die Kosten für das Bezahlsystem als Prozente vom gesamten Produktpreis inklusive der Versandkosten und der Steuer errechnet.</text:p>
          </table:table-cell>
          <table:table-cell table:style-name="Tableau4.D3" office:value-type="string">
            <text:p text:style-name="Table_20_Contents"/>
          </table:table-cell>
        </table:table-row>
        <table:table-row>
          <table:table-cell table:style-name="Tableau4.A17" office:value-type="string">
            <text:p text:style-name="P4">discountGroupName</text:p>
          </table:table-cell>
          <table:table-cell table:style-name="Tableau4.B2" office:value-type="string">
            <text:p text:style-name="P5">string</text:p>
          </table:table-cell>
          <table:table-cell table:style-name="Tableau4.C17" office:value-type="string">
            <text:p text:style-name="Table_20_Contents">Name der Frontend Gruppe für einen Discount Preis</text:p>
          </table:table-cell>
          <table:table-cell table:style-name="Tableau4.D3" office:value-type="string">
            <text:p text:style-name="Table_20_Contents"/>
          </table:table-cell>
        </table:table-row>
        <table:table-row>
          <table:table-cell table:style-name="Tableau4.A18" office:value-type="string">
            <text:p text:style-name="P4">calculationScript</text:p>
          </table:table-cell>
          <table:table-cell table:style-name="Tableau4.B2" office:value-type="string">
            <text:p text:style-name="Table_20_Contents">resouce</text:p>
          </table:table-cell>
          <table:table-cell table:style-name="Tableau4.C18" office:value-type="string">
            <text:p text:style-name="Table_20_Contents">PHP Skript, das inkludiert wird. Es soll die internen Arrays zur Berechnung heranziehen.</text:p>
            <text:p text:style-name="Table_20_Contents">Dieses Skript kann dazu verwendet werden, um <text:s/>eine besondere Gebühr für Bezahlung/Versand zu berechnen.</text:p>
            <text:p text:style-name="Table_20_Contents">Für eine Beispielsanwendung siehe <text:s/>pi/products_comp_calcScript.inc, das zeigt wie der Endbetrag um 5.75% seines eigenen Wertes erhöht wird, um die Gebühren der internationalen Kreditkarten Organisation abzudecken.</text:p>
            <text:p text:style-name="Table_20_Contents">Das Berechnungsskript erhält die TypoScript Eigenschaften im $conf Array.</text:p>
          </table:table-cell>
          <table:table-cell table:style-name="Tableau4.D3" office:value-type="string">
            <text:p text:style-name="Table_20_Contents"/>
          </table:table-cell>
        </table:table-row>
        <table:table-row>
          <table:table-cell table:style-name="Tableau4.A19" office:value-type="string">
            <text:p text:style-name="P4">handleScript</text:p>
          </table:table-cell>
          <table:table-cell table:style-name="Tableau4.B2" office:value-type="string">
            <text:p text:style-name="Table_20_Contents">resource</text:p>
          </table:table-cell>
          <table:table-cell table:style-name="Tableau4.C19" office:value-type="string">
            <text:p text:style-name="Table_20_Contents">PHP Skript, das nach dem Abschluß einer Bestellung aufgerufen wird.</text:p>
            <text:p text:style-name="Table_20_Contents">Dieses Skript muß sich selber um die Bildschirmausgabe und um den Abschluß der Bestellung kümmern.</text:p>
            <text:p text:style-name="Table_20_Contents">Siehe pi/payment_DIBS.php als Beispiel. </text:p>
            <text:p text:style-name="Table_20_Contents">Die Eigenschaften des Handle Skripts werden an die Funktion als $conf Array übergeben. Der Inhalt der Variable $content muß den HTML-Inhalt als Ergebnis zurückliefern.</text:p>
          </table:table-cell>
          <table:table-cell table:style-name="Tableau4.D3" office:value-type="string">
            <text:p text:style-name="Table_20_Contents"/>
          </table:table-cell>
        </table:table-row>
        <table:table-row>
          <table:table-cell table:style-name="Tableau4.A20" office:value-type="string">
            <text:p text:style-name="P4">handleURL</text:p>
          </table:table-cell>
          <table:table-cell table:style-name="Tableau4.B2" office:value-type="string">
            <text:p text:style-name="Table_20_Contents">string</text:p>
          </table:table-cell>
          <table:table-cell table:style-name="Tableau4.C20" office:value-type="string">
            <text:p text:style-name="Table_20_Contents">Wenn gesetzt, wird dieses handleURL anstelle der Dankeschön-Seite (über PIDthanks) ausgegeben, damit z.B. ein handleScript die Information bzgl. Bezahlsystem usw. Verarbeiten kann.</text:p>
          </table:table-cell>
          <table:table-cell table:style-name="Tableau4.D3" office:value-type="string">
            <text:p text:style-name="Table_20_Contents"/>
          </table:table-cell>
        </table:table-row>
        <table:table-row>
          <table:table-cell table:style-name="Tableau4.A21" office:value-type="string">
            <text:p text:style-name="P4">handleTarget</text:p>
          </table:table-cell>
          <table:table-cell table:style-name="Tableau4.B2" office:value-type="string">
            <text:p text:style-name="Table_20_Contents">string</text:p>
          </table:table-cell>
          <table:table-cell table:style-name="Tableau4.C21" office:value-type="string">
            <text:p text:style-name="Table_20_Contents">Alternatives Target der HTML-Form.</text:p>
          </table:table-cell>
          <table:table-cell table:style-name="Tableau4.D3" office:value-type="string">
            <text:p text:style-name="Table_20_Contents"/>
          </table:table-cell>
        </table:table-row>
        <text:soft-page-break/>
        <table:table-row>
          <table:table-cell table:style-name="Tableau4.A22" office:value-type="string">
            <text:p text:style-name="P4">excludePayment</text:p>
          </table:table-cell>
          <table:table-cell table:style-name="Tableau4.B2" office:value-type="string">
            <text:p text:style-name="P32">list of integers</text:p>
          </table:table-cell>
          <table:table-cell table:style-name="Tableau4.C22" office:value-type="string">
            <text:p text:style-name="P19">nur Versand:</text:p>
            <text:p text:style-name="Table_20_Contents">Dies ist eine Liste an Schlüsseln der Bezahlmethoden (ihre Nummern), <text:s text:c="3"/>die für eine bestimmte Versandart nicht angezeigt werden. <text:s/>Wenn zum Beispiel Leute Waren im Geschäft kaufen, dann möchten Sie nicht, daß diese Geld überweisen oder Online bezahlen, sondern daß sie die Waren sofort bar bezahlen. <text:s/>Daher können Sie diese Bezahlmethoden ausschließen.</text:p>
            <text:p text:style-name="Table_20_Contents"/>
            <text:p text:style-name="P19">Par exemple:</text:p>
            <text:p text:style-name="Table_20_Contents_2f_PRE">...</text:p>
            <text:p text:style-name="Table_20_Contents_2f_PRE"><text:s text:c="2"/>40.title = Abholen der Waren im Geschäft</text:p>
            <text:p text:style-name="Table_20_Contents_2f_PRE"><text:s text:c="2"/>40.excludePayment = 10,40</text:p>
            <text:p text:style-name="Table_20_Contents_2f_PRE">}</text:p>
          </table:table-cell>
          <table:table-cell table:style-name="Tableau4.D3" office:value-type="string">
            <text:p text:style-name="Table_20_Contents"/>
          </table:table-cell>
        </table:table-row>
        <table:table-row>
          <table:table-cell table:style-name="Tableau4.A23" office:value-type="string">
            <text:p text:style-name="P4">show</text:p>
          </table:table-cell>
          <table:table-cell table:style-name="Tableau4.B2" office:value-type="string">
            <text:p text:style-name="P4">boolean</text:p>
          </table:table-cell>
          <table:table-cell table:style-name="Tableau4.C23" office:value-type="string">
            <text:p text:style-name="P34">Wenn das gesetzt ist, wird der Eintrag in der Liste angezeigt.</text:p>
          </table:table-cell>
          <table:table-cell table:style-name="Tableau4.D23" office:value-type="string">
            <text:p text:style-name="Table_20_Contents">1</text:p>
          </table:table-cell>
        </table:table-row>
        <table:table-row>
          <table:table-cell table:style-name="Tableau4.A24" office:value-type="string">
            <text:p text:style-name="P4">showLimit</text:p>
          </table:table-cell>
          <table:table-cell table:style-name="Tableau4.B2" office:value-type="string">
            <text:p text:style-name="P4">double</text:p>
          </table:table-cell>
          <table:table-cell table:style-name="Tableau4.C24" office:value-type="string">
            <text:p text:style-name="P34">Wenn gesetzt, dann wird der Eintrag nur dan angezeigt, wenn zumindest diese Anzahl an Produkten im Warenkorb liegt. <text:line-break/>0 ... zeige diesen Eintrag immer an</text:p>
          </table:table-cell>
          <table:table-cell table:style-name="Tableau4.D24" office:value-type="string">
            <text:p text:style-name="Table_20_Contents">0</text:p>
          </table:table-cell>
        </table:table-row>
        <table:table-row>
          <table:table-cell table:style-name="Tableau4.A25" office:value-type="string">
            <text:p text:style-name="P4">type</text:p>
          </table:table-cell>
          <table:table-cell table:style-name="Tableau4.B2" office:value-type="string">
            <text:p text:style-name="Table_20_Contents">string</text:p>
          </table:table-cell>
          <table:table-cell table:style-name="Tableau4.C25" office:value-type="string">
            <text:p text:style-name="Table_20_Contents">Bedeutung der Nummer:<text:line-break/>count ... die Anzahl der Produits</text:p>
            <text:p text:style-name="Table_20_Contents">weight ... das berechnete Gewicht in Gramm<text:line-break/>price ... der Gesamtpreis der Produits</text:p>
          </table:table-cell>
          <table:table-cell table:style-name="Tableau4.D3" office:value-type="string">
            <text:p text:style-name="Table_20_Contents"/>
          </table:table-cell>
        </table:table-row>
        <table:table-row>
          <table:table-cell table:style-name="Tableau4.A26" office:value-type="string">
            <text:p text:style-name="P4">WherePIDMinPrice</text:p>
          </table:table-cell>
          <table:table-cell table:style-name="Tableau4.B2" office:value-type="string">
            <text:p text:style-name="P32">list of integers</text:p>
          </table:table-cell>
          <table:table-cell table:style-name="Tableau4.C26" office:value-type="string">
            <text:p text:style-name="Table_20_Contents"><text:span text:style-name="T2">nur Versand:</text:span><text:line-break/>Setzen eines Minimalpreises für den Versand, wenn es einen Artikel im Warenkorb gibt, der aus dem Sysfolder mit der angegebenen PID stammt.</text:p>
            <text:p text:style-name="Table_20_Contents">Wobei 155 die PID ist und 7.5 ist der Minimalpreis, der als Versandkosten berechnet wird, wenn zumindest ein Artikel im Warenkorb mit der PID liegt.</text:p>
            <text:p text:style-name="P19"/>
            <text:p text:style-name="P19">Par exemple:</text:p>
            <text:p text:style-name="Table_20_Contents_2f_PRE">plugin.tt_products.shipping { <text:line-break/> 10.title = Paket <text:line-break/> 10.priceTax.type = weight <text:line-break/> 10.priceTax.WherePIDMinPrice.155 = 7.5 <text:line-break/> 10.priceTax.1 = 1.5 <text:line-break/> 10.priceTax.500 = 2.5 <text:line-break/> 10.priceTax.1000 =3.5 <text:line-break/>}</text:p>
          </table:table-cell>
          <table:table-cell table:style-name="Tableau4.D3" office:value-type="string">
            <text:p text:style-name="Table_20_Contents"/>
          </table:table-cell>
        </table:table-row>
      </table:table>
      <text:p text:style-name="Text_20_body"/>
      <text:h text:style-name="Heading_20_3" text:outline-level="3">Pricecalc, discountprice und creditpoints Konfiguration</text:h>
      <text:p text:style-name="Text_20_body">Die Preisberechnung (pricecalc) gibt Ihnen die Möglichkeit, Preissummen über die Produits über eine Berechnungstabelle zu ermitteln. Der Discount Preis (discountprice) wird für Kunden verwendet, die Frontend Benutzer sind und zur Gruppe mit dem Namen gehören, der über <text:span text:style-name="T1">discountGroupName gesetzt worden ist.. </text:span></text:p>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Propriété:</text:p>
            </table:table-cell>
            <table:table-cell table:style-name="Tableau5.B1" office:value-type="string">
              <text:p text:style-name="Table_20_Heading">Type date :</text:p>
            </table:table-cell>
            <table:table-cell table:style-name="Tableau5.A1" office:value-type="string">
              <text:p text:style-name="Table_20_Heading">Description:</text:p>
            </table:table-cell>
            <table:table-cell table:style-name="Tableau5.D1" office:value-type="string">
              <text:p text:style-name="Table_20_Heading">Ajustement d'avance:</text:p>
            </table:table-cell>
          </table:table-row>
        </table:table-header-rows>
        <table:table-row>
          <table:table-cell table:style-name="Tableau5.A2" table:number-rows-spanned="4" office:value-type="string">
            <text:p text:style-name="P4">prod</text:p>
          </table:table-cell>
          <table:table-cell table:style-name="Tableau5.B2" table:number-rows-spanned="4" office:value-type="string">
            <text:p text:style-name="P32">Zweischneidige Liste von Ganzzahlen</text:p>
          </table:table-cell>
          <table:table-cell table:style-name="Tableau5.C2" office:value-type="string">
            <text:p text:style-name="P34">Die linke Seite der Integer kennzeichnet Zeilen, die zusammengehören. Die Bedeutung der rechten Integer ergibt sich aus den Einstellungen jeder Zeile.<text:line-break/></text:p>
          </table:table-cell>
          <table:table-cell table:style-name="Tableau5.D2" table:number-rows-spanned="4" office:value-type="string">
            <text:p text:style-name="Table_20_Contents">0</text:p>
          </table:table-cell>
        </table:table-row>
        <table:table-row>
          <table:covered-table-cell table:style-name="Tableau5.A3"/>
          <table:covered-table-cell table:style-name="Tableau5.B2"/>
          <table:table-cell table:style-name="Tableau5.C3" office:value-type="string">
            <text:p text:style-name="P18">Pricecalc:</text:p>
            <text:p text:style-name="P35">Spezielle Preise für die Produits. Wo 1 Produkt 4.99 kostet, dort werden 2 Produits 8.99 kosten. <text:s/>Mit discountprice wird der Preis für ein Produkt eingegeben, mit pricecalc ist es der Preis für alle Produits zusammen, für die eines davon 4.99 als Preis im Sysfolder eines x-beliebigen Produktes eingetragen ist. Der discountprice überschreibt die Ergebnisse von pricecalc, weil hier immer das niedrigere Ergebnis als Endpreis herauskommen muß. Wenn das Preisfeld price2 verwendet wird, dann überschreibt dieses alle Preisberechnungen.</text:p>
            <text:p text:style-name="P35"/>
            <text:p text:style-name="P19">Par exemple:</text:p>
            <text:p text:style-name="Table_20_Contents_2f_PRE">pricecalc {</text:p>
            <text:p text:style-name="Table_20_Contents_2f_PRE"><text:s text:c="2"/>10.type = count</text:p>
            <text:p text:style-name="Table_20_Contents_2f_PRE"><text:s text:c="2"/>10.field = price</text:p>
            <text:p text:style-name="Table_20_Contents_2f_PRE"><text:s text:c="2"/>10.where = <text:line-break/> <text:s/>10.prod.1 = 4.99</text:p>
            <text:p text:style-name="Table_20_Contents_2f_PRE"><text:s text:c="2"/>10.prod.2 = 8.99</text:p>
            <text:p text:style-name="Table_20_Contents_2f_PRE"><text:s text:c="2"/>10.prod.5 = 19.99</text:p>
            <text:p text:style-name="Table_20_Contents_2f_PRE"><text:s text:c="2"/>20.type = count</text:p>
            <text:p text:style-name="Table_20_Contents_2f_PRE"><text:s text:c="2"/>20.field = price</text:p>
            <text:p text:style-name="Table_20_Contents_2f_PRE"><text:s text:c="2"/>20.where = <text:line-break/> <text:s/>20.prod.1 = 6.99</text:p>
            <text:p text:style-name="Table_20_Contents_2f_PRE"><text:s text:c="2"/>20.prod.2 = 13.98</text:p>
            <text:p text:style-name="Table_20_Contents_2f_PRE"><text:s text:c="2"/>20.prod.5 = 29.99</text:p>
            <text:p text:style-name="Table_20_Contents_2f_PRE">}</text:p>
            <text:p text:style-name="Table_20_Contents_2f_PRE"/>
          </table:table-cell>
          <table:covered-table-cell table:style-name="Tableau5.D3"/>
        </table:table-row>
        <table:table-row>
          <table:covered-table-cell table:style-name="Tableau5.A4"/>
          <table:covered-table-cell table:style-name="Tableau5.B2"/>
          <table:table-cell table:style-name="Tableau5.C4" office:value-type="string">
            <text:p text:style-name="P18">Discountprice:</text:p>
            <text:p text:style-name="P35">Hier werden die Preise der Produits entsprechend der Typ-Einstellung berechnet. Bei 'count' werden die Preise der Artikel zusammengezählt.</text:p>
            <text:p text:style-name="P35">Die 'additive'-Einstellung bewirkt, daß die Artikel über alle Konfigurations-Zeilen hinweg zusammengezählt werden und nicht wie sonst, nur zeilenweise.</text:p>
            <text:p text:style-name="P35"/>
            <text:p text:style-name="P19">Par exemple:</text:p>
            <text:p text:style-name="Table_20_Contents_2f_PRE">discountprice {</text:p>
            <text:p text:style-name="Table_20_Contents_2f_PRE"><text:s text:c="2"/>10.type = count</text:p>
            <text:p text:style-name="Table_20_Contents_2f_PRE"><text:s text:c="2"/>10.field = price<text:line-break/> <text:s/>10.additive = 1</text:p>
            <text:p text:style-name="Table_20_Contents_2f_PRE"><text:s text:c="2"/>10.where =</text:p>
            <text:p text:style-name="Table_20_Contents_2f_PRE"><text:s text:c="2"/>10.prod.1 = 4.99</text:p>
            <text:p text:style-name="Table_20_Contents_2f_PRE"><text:s text:c="2"/>10.prod.100 = 2.49</text:p>
            <text:p text:style-name="Table_20_Contents_2f_PRE"><text:s text:c="2"/>10.prod.1050 = 2.39</text:p>
            <text:p text:style-name="Table_20_Contents_2f_PRE"><text:s text:c="2"/>20.type = count</text:p>
            <text:p text:style-name="Table_20_Contents_2f_PRE"><text:s text:c="2"/>20.field = price<text:line-break/> <text:s/>20.where =</text:p>
            <text:p text:style-name="Table_20_Contents_2f_PRE"><text:s text:c="2"/>20.prod.1 = 6.99</text:p>
            <text:p text:style-name="Table_20_Contents_2f_PRE"><text:s text:c="2"/>20.prod.100 = 2.59</text:p>
            <text:p text:style-name="Table_20_Contents_2f_PRE"><text:s text:c="2"/>20.prod.1050 = 2.49</text:p>
            <text:p text:style-name="Table_20_Contents_2f_PRE">}</text:p>
            <text:p text:style-name="Table_20_Contents_2f_PRE"/>
          </table:table-cell>
          <table:covered-table-cell table:style-name="Tableau5.D4"/>
        </table:table-row>
        <table:table-row>
          <table:covered-table-cell table:style-name="Tableau5.A5"/>
          <table:covered-table-cell table:style-name="Tableau5.B2"/>
          <table:table-cell table:style-name="Tableau5.C5" office:value-type="string">
            <text:p text:style-name="P18">Creditpoins:</text:p>
            <text:p text:style-name="P35">Damit wird eingestellt, wieviele Gutscheinpunkte jemand erhalten wird, wenn er Artikel im Shop kauft. Die Werte auf der rechten Seite sind die Prozente der bestellten Artikel, wenn 'type=price' ist.</text:p>
            <text:p text:style-name="P19"><text:line-break/>Par exemple:</text:p>
            <text:p text:style-name="Table_20_Contents_2f_PRE">creditpoints {</text:p>
            <text:p text:style-name="Table_20_Contents_2f_PRE"><text:s text:c="2"/>pricefactor = 0.5</text:p>
            <text:p text:style-name="Table_20_Contents_2f_PRE"><text:s text:c="2"/>10.type = price</text:p>
            <text:p text:style-name="Table_20_Contents_2f_PRE"><text:s text:c="2"/>10.prod.1 <text:s text:c="2"/>= 0.02</text:p>
            <text:p text:style-name="Table_20_Contents_2f_PRE"><text:s text:c="2"/>10.prod.101 = 0.04</text:p>
            <text:p text:style-name="Table_20_Contents_2f_PRE"><text:s text:c="2"/>10.prod.501 = 0.06</text:p>
            <text:p text:style-name="Table_20_Contents_2f_PRE">}</text:p>
          </table:table-cell>
          <table:covered-table-cell table:style-name="Tableau5.D5"/>
        </table:table-row>
        <table:table-row>
          <table:table-cell table:style-name="Tableau5.A6" office:value-type="string">
            <text:p text:style-name="P4">additive</text:p>
          </table:table-cell>
          <table:table-cell table:style-name="Tableau5.B2" office:value-type="string">
            <text:p text:style-name="P4">double</text:p>
          </table:table-cell>
          <table:table-cell table:style-name="Tableau5.C6" office:value-type="string">
            <text:p text:style-name="P34">Nur für discountprice gültig. Wenn gesetzt, werden alle Produits von allen Discount-Preisen zusammengezählt, um den effektiven Disount-Preis zu berechnen. Wenn nicht gesezt, dann werden nur die Produits mit demselben Preis zusammengezählt.</text:p>
          </table:table-cell>
          <table:table-cell table:style-name="Tableau5.D6" office:value-type="string">
            <text:p text:style-name="Table_20_Contents"/>
          </table:table-cell>
        </table:table-row>
        <text:soft-page-break/>
        <table:table-row>
          <table:table-cell table:style-name="Tableau5.A7" office:value-type="string">
            <text:p text:style-name="P4">type</text:p>
          </table:table-cell>
          <table:table-cell table:style-name="Tableau5.B2" office:value-type="string">
            <text:p text:style-name="Table_20_Contents">string</text:p>
          </table:table-cell>
          <table:table-cell table:style-name="Tableau5.C7" office:value-type="string">
            <text:p text:style-name="Table_20_Contents">Die Bedeutung der Ganzzahl auf der rechten Seite, die normalerweise zusammengezählt wird:<text:line-break/>count ... die Anzahl der Produits (nur pricecalc und discountprice)<text:line-break/>price <text:s/>... das verwendete Preisfeld (nur creditpoints)</text:p>
          </table:table-cell>
          <table:table-cell table:style-name="Tableau5.D6" office:value-type="string">
            <text:p text:style-name="Table_20_Contents"/>
          </table:table-cell>
        </table:table-row>
        <table:table-row>
          <table:table-cell table:style-name="Tableau5.A8" office:value-type="string">
            <text:p text:style-name="P4">pricefactor</text:p>
          </table:table-cell>
          <table:table-cell table:style-name="Tableau5.B2" office:value-type="string">
            <text:p text:style-name="Table_20_Contents">double</text:p>
          </table:table-cell>
          <table:table-cell table:style-name="Tableau5.C8" office:value-type="string">
            <text:p text:style-name="Table_20_Contents">Damit wird berechnet, wieviel Geld jemand für seine Gutscheinpunkte erhalten wird. 2 Gutscheinpunkte werden 1 Euro an Gutschrift in der eingestellten Währung ergeben.</text:p>
            <text:p text:style-name="Table_20_Contents"/>
            <text:p text:style-name="P18">Par exemple:</text:p>
            <text:p text:style-name="Table_20_Contents_2f_PRE">creditpoints {</text:p>
            <text:p text:style-name="Table_20_Contents_2f_PRE"><text:s text:c="2"/>pricefactor = 0.5</text:p>
            <text:p text:style-name="Table_20_Contents_2f_PRE">}</text:p>
          </table:table-cell>
          <table:table-cell table:style-name="Tableau5.D6" office:value-type="string">
            <text:p text:style-name="Table_20_Contents"/>
          </table:table-cell>
        </table:table-row>
      </table:table>
      <text:p text:style-name="P5">[tsref:(script).productsLib.payment/(script).productsLib.shipping]</text:p>
      <text:p text:style-name="Text_20_body"/>
      <text:h text:style-name="Heading_20_3" text:outline-level="3">Prit du zk_products 1.3.2 </text:h>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Table_20_Heading">Propriété:</text:p>
            </table:table-cell>
            <table:table-cell table:style-name="Tableau6.A1" office:value-type="string">
              <text:p text:style-name="Table_20_Heading">Type date :</text:p>
            </table:table-cell>
            <table:table-cell table:style-name="Tableau6.A1" office:value-type="string">
              <text:p text:style-name="Table_20_Heading">Description:</text:p>
            </table:table-cell>
            <table:table-cell table:style-name="Tableau6.D1" office:value-type="string">
              <text:p text:style-name="Table_20_Heading">Ajustement d'avance:</text:p>
            </table:table-cell>
          </table:table-row>
        </table:table-header-rows>
        <table:table-row>
          <table:table-cell table:style-name="Tableau6.A2" office:value-type="string">
            <text:p text:style-name="Table_20_Contents">max_note_length</text:p>
          </table:table-cell>
          <table:table-cell table:style-name="Tableau6.A2" office:value-type="string">
            <text:p text:style-name="Table_20_Contents">int+</text:p>
          </table:table-cell>
          <table:table-cell table:style-name="Tableau6.A2" office:value-type="string">
            <text:p text:style-name="Table_20_Contents">Die Bemerkung zu einem Artikel wir in der Listendarstellung nach max_note_length Zeichen abgebrochen. Dahinter werden noch 3 Punkte angehängt...</text:p>
            <text:p text:style-name="Table_20_Contents">Das kann aber unschön sein, wenn Sie HTML in diesem Feld verwenden. Denn wenn ein HTML-Tag nicht abgeschlossen wird, kann die ganze Darstellung chaotisch sein.</text:p>
          </table:table-cell>
          <table:table-cell table:style-name="Tableau6.D2" office:value-type="float" office:value="100">
            <text:p text:style-name="P38">100</text:p>
          </table:table-cell>
        </table:table-row>
        <table:table-row>
          <table:table-cell table:style-name="Tableau6.A2" office:value-type="string">
            <text:p text:style-name="Table_20_Contents">specialPreparation</text:p>
          </table:table-cell>
          <table:table-cell table:style-name="Tableau6.A2" office:value-type="string">
            <text:p text:style-name="Table_20_Contents">string</text:p>
          </table:table-cell>
          <table:table-cell table:style-name="Tableau6.A2" office:value-type="string">
            <text:p text:style-name="Table_20_Contents">Dieser Text wird Ihre ###PRODUCT_SPECIAL_PREP### Markierungen ersetzen.</text:p>
          </table:table-cell>
          <table:table-cell table:style-name="Tableau6.D2">
            <text:p text:style-name="P38"/>
          </table:table-cell>
        </table:table-row>
        <table:table-row>
          <table:table-cell table:style-name="Tableau6.A2" office:value-type="string">
            <text:p text:style-name="Table_20_Contents">createUsers</text:p>
          </table:table-cell>
          <table:table-cell table:style-name="Tableau6.A2" office:value-type="string">
            <text:p text:style-name="Table_20_Contents">Boolean</text:p>
          </table:table-cell>
          <table:table-cell table:style-name="Tableau6.A2" office:value-type="string">
            <text:p text:style-name="Table_20_Contents">Wenn Sie das und PIDuserFolder setzen, dann wird für jeden Kunden, der nicht eingeloggt ist, und dessen Email-Adresse noch nicht als Benutzer gespeichert wurde, als neuer Frontend Benutzer erzeugt.</text:p>
            <text:p text:style-name="Table_20_Contents">Eine Email mit dem Benutzernamen (seine E-mail Adresse) und dem Paßwort wird ihm zugesendet. (siehe ###EMAIL_NEWUSER_TEMPLATE###)</text:p>
          </table:table-cell>
          <table:table-cell table:style-name="Tableau6.D2" office:value-type="float" office:value="0">
            <text:p text:style-name="P38">0</text:p>
          </table:table-cell>
        </table:table-row>
        <table:table-row>
          <table:table-cell table:style-name="Tableau6.A2" office:value-type="string">
            <text:p text:style-name="Table_20_Contents">PIDuserFolder</text:p>
          </table:table-cell>
          <table:table-cell table:style-name="Tableau6.A2" office:value-type="string">
            <text:p text:style-name="Table_20_Contents">int+</text:p>
          </table:table-cell>
          <table:table-cell table:style-name="Tableau6.A2" office:value-type="string">
            <text:p text:style-name="Table_20_Contents">Der sysfolder, wo neue Benutzer abgespeichert werden sollen.</text:p>
          </table:table-cell>
          <table:table-cell table:style-name="Tableau6.D2" office:value-type="float" office:value="116">
            <text:p text:style-name="P38">116</text:p>
          </table:table-cell>
        </table:table-row>
        <table:table-row>
          <table:table-cell table:style-name="Tableau6.A2" office:value-type="string">
            <text:p text:style-name="Table_20_Contents">memberOfGroup</text:p>
          </table:table-cell>
          <table:table-cell table:style-name="Tableau6.A2" office:value-type="string">
            <text:p text:style-name="Table_20_Contents">int+</text:p>
          </table:table-cell>
          <table:table-cell table:style-name="Tableau6.A2" office:value-type="string">
            <text:p text:style-name="Table_20_Contents">Die ID der Frontend Benutzergruppe, der die neu erzeugten Frontend Benutzer angehören.</text:p>
          </table:table-cell>
          <table:table-cell table:style-name="Tableau6.D2" office:value-type="float" office:value="1">
            <text:p text:style-name="P38">1</text:p>
          </table:table-cell>
        </table:table-row>
        <table:table-row>
          <table:table-cell table:style-name="Tableau6.A2" office:value-type="string">
            <text:p text:style-name="Table_20_Contents">PIDmemo</text:p>
          </table:table-cell>
          <table:table-cell table:style-name="Tableau6.A2" office:value-type="string">
            <text:p text:style-name="Table_20_Contents">int+</text:p>
          </table:table-cell>
          <table:table-cell table:style-name="Tableau6.A2" office:value-type="string">
            <text:p text:style-name="Table_20_Contents">Die ID der Memo Seite</text:p>
          </table:table-cell>
          <table:table-cell table:style-name="Tableau6.D2">
            <text:p text:style-name="P38"/>
          </table:table-cell>
        </table:table-row>
        <table:table-row>
          <table:table-cell table:style-name="Tableau6.A2" office:value-type="string">
            <text:p text:style-name="Table_20_Contents">PIDagb</text:p>
          </table:table-cell>
          <table:table-cell table:style-name="Tableau6.A2" office:value-type="string">
            <text:p text:style-name="Table_20_Contents">int+</text:p>
          </table:table-cell>
          <table:table-cell table:style-name="Tableau6.A2" office:value-type="string">
            <text:p text:style-name="Table_20_Contents">Die PID einer Seite mit den Allgemeinen Geschäftsbedingungen (“AGB”)</text:p>
            <text:p text:style-name="Table_20_Contents">Nur wenn hier eine Seiten-Id eingetragen ist, wird geprüft, ob die <text:s/>AGB vom Benutzer durch das Setzen eines Häckchen vor 'Akzeptieren der AGB' akzeptiert worden sind.</text:p>
          </table:table-cell>
          <table:table-cell table:style-name="Tableau6.D2" office:value-type="float" office:value="0">
            <text:p text:style-name="P38">0</text:p>
          </table:table-cell>
        </table:table-row>
        <table:table-row>
          <table:table-cell table:style-name="Tableau6.A2" office:value-type="string">
            <text:p text:style-name="Table_20_Contents">Agbtarget</text:p>
          </table:table-cell>
          <table:table-cell table:style-name="Tableau6.A2" office:value-type="string">
            <text:p text:style-name="Table_20_Contents">Small</text:p>
          </table:table-cell>
          <table:table-cell table:style-name="Tableau6.A2" office:value-type="string">
            <text:p text:style-name="Table_20_Contents">Das Target-Attribut im Link einer PIDagb</text:p>
          </table:table-cell>
          <table:table-cell table:style-name="Tableau6.D9" office:value-type="string">
            <text:p text:style-name="Table_20_Contents">_blank</text:p>
          </table:table-cell>
        </table:table-row>
        <table:table-row>
          <table:table-cell table:style-name="Tableau6.A2" office:value-type="string">
            <text:p text:style-name="Table_20_Contents">AGBattachment</text:p>
          </table:table-cell>
          <table:table-cell table:style-name="Tableau6.A2" office:value-type="string">
            <text:p text:style-name="Table_20_Contents">Resource</text:p>
          </table:table-cell>
          <table:table-cell table:style-name="Tableau6.A2" office:value-type="string">
            <text:p text:style-name="Table_20_Contents">Wenn diese Datei existiert, wird sie an die Email der Bestellbestätigung an den Kunden als Anhang mitgesendet. Der Shop Administrator wird keinen AGB als Anhang per Email erhalten, aber sehr wohl eine CSV Datei mit den Bestelldaten, wenn Sie das konfiguriert haben.</text:p>
          </table:table-cell>
          <table:table-cell table:style-name="Tableau6.D9" office:value-type="string">
            <text:p text:style-name="Table_20_Contents">Fileadmin/agb.pdf</text:p>
          </table:table-cell>
        </table:table-row>
        <table:table-row>
          <table:table-cell table:style-name="Tableau6.A2" office:value-type="string">
            <text:p text:style-name="Table_20_Contents">GiftAttachment</text:p>
          </table:table-cell>
          <table:table-cell table:style-name="Tableau6.A2" office:value-type="string">
            <text:p text:style-name="Table_20_Contents">Resource</text:p>
          </table:table-cell>
          <table:table-cell table:style-name="Tableau6.A2" office:value-type="string">
            <text:p text:style-name="Table_20_Contents">Wenn diese Datei existiert, wird sie an die Email zum Versenden eines Geschenkgutscheins angehängt.</text:p>
          </table:table-cell>
          <table:table-cell table:style-name="Tableau6.D9" office:value-type="string">
            <text:p text:style-name="Table_20_Contents"/>
          </table:table-cell>
        </table:table-row>
        <table:table-row>
          <table:table-cell table:style-name="Tableau6.A2" office:value-type="string">
            <text:p text:style-name="Table_20_Contents">generateCSV</text:p>
          </table:table-cell>
          <table:table-cell table:style-name="Tableau6.A2" office:value-type="string">
            <text:p text:style-name="Table_20_Contents">Boolean</text:p>
          </table:table-cell>
          <table:table-cell table:style-name="Tableau6.A2" office:value-type="string">
            <text:p text:style-name="Table_20_Contents">Erzeugt aus jeder Bestellung eine CSV-Datei. Diese Datei wird auf dem Server abgespeichert und per Email an den Shop Administrator versendet (mit einer Bestellbestätigung).</text:p>
          </table:table-cell>
          <table:table-cell table:style-name="Tableau6.D2" office:value-type="float" office:value="0">
            <text:p text:style-name="P38">0</text:p>
          </table:table-cell>
        </table:table-row>
        <table:table-row>
          <table:table-cell table:style-name="Tableau6.A2" office:value-type="string">
            <text:p text:style-name="Table_20_Contents">CSVdestination</text:p>
          </table:table-cell>
          <table:table-cell table:style-name="Tableau6.A2" office:value-type="string">
            <text:p text:style-name="Table_20_Contents">../csvorders/</text:p>
          </table:table-cell>
          <table:table-cell table:style-name="Tableau6.A2" office:value-type="string">
            <text:p text:style-name="Table_20_Contents">Das Verzeichnis auf dem Server, wohin die CSV Dateien abgespeichert werden. Dieses Verzeichnis sollte nicht über Http zugänglich sein, weil sonst ein jeder die Daten Ihrer Kunden und der von ihnen gemachten Bestellungen einsehen könnte.</text:p>
            <text:p text:style-name="Table_20_Contents">Also stellen Sie dieses Verzeichnis nicht unter den Pfad von fileadmin, oder geben Sie ihm wenigstens einen schwer zu erratenden Namen.</text:p>
          </table:table-cell>
          <table:table-cell table:style-name="Tableau6.D9" office:value-type="string">
            <text:p text:style-name="Table_20_Contents">../csvorders/</text:p>
          </table:table-cell>
        </table:table-row>
        <text:soft-page-break/>
        <table:table-row>
          <table:table-cell table:style-name="Tableau6.A2" office:value-type="string">
            <text:p text:style-name="Table_20_Contents">CSVfields</text:p>
          </table:table-cell>
          <table:table-cell table:style-name="Tableau6.A2" office:value-type="string">
            <text:p text:style-name="Table_20_Contents">string</text:p>
          </table:table-cell>
          <table:table-cell table:style-name="Tableau6.A2" office:value-type="string">
            <text:p text:style-name="Table_20_Contents">Angabe, welche Produktdaten als CSV gespeichert werden sollen. Standardmäßig werden alle Felder bis auf Bemerkung verwendet.</text:p>
          </table:table-cell>
          <table:table-cell table:style-name="Tableau6.D9" office:value-type="string">
            <text:p text:style-name="Table_20_Contents">(Long, long list)</text:p>
          </table:table-cell>
        </table:table-row>
        <table:table-row>
          <table:table-cell table:style-name="Tableau6.A2" office:value-type="string">
            <text:p text:style-name="Table_20_Contents">CSVinOneLine</text:p>
          </table:table-cell>
          <table:table-cell table:style-name="Tableau6.A2" office:value-type="string">
            <text:p text:style-name="Table_20_Contents">boolean</text:p>
          </table:table-cell>
          <table:table-cell table:style-name="Tableau6.A2" office:value-type="string">
            <text:p text:style-name="Table_20_Contents">Wenn Sie das auf 1 setzen, werden zusätzliche Informationen (Versand, Bezahlung, Adreßdaten, Mitteilung zur Lieferung) an den ersten bestellten Artikel angehängt. Das vereinfacht den Import dieser Dateien.</text:p>
            <text:p text:style-name="Table_20_Contents">Wenn Sie das auf 0 gestellt lassen, wird diese Datei in Programmen wie Excel am besten angezeigt.</text:p>
          </table:table-cell>
          <table:table-cell table:style-name="Tableau6.D2" office:value-type="float" office:value="0">
            <text:p text:style-name="P38">0</text:p>
          </table:table-cell>
        </table:table-row>
        <table:table-row>
          <table:table-cell table:style-name="Tableau6.A2" office:value-type="string">
            <text:p text:style-name="Table_20_Contents">alwaysInStock</text:p>
          </table:table-cell>
          <table:table-cell table:style-name="Tableau6.A2" office:value-type="string">
            <text:p text:style-name="Table_20_Contents">boolean</text:p>
          </table:table-cell>
          <table:table-cell table:style-name="Tableau6.A2" office:value-type="string">
            <text:p text:style-name="Table_20_Contents">Wenn gesetzt, wird die Anzahl der Produits auf Lager nach einem Kauf nicht reduziert.</text:p>
          </table:table-cell>
          <table:table-cell table:style-name="Tableau6.D2" office:value-type="float" office:value="1">
            <text:p text:style-name="P38">1</text:p>
          </table:table-cell>
        </table:table-row>
        <table:table-row>
          <table:table-cell table:style-name="Tableau6.A2" office:value-type="string">
            <text:p text:style-name="Table_20_Contents">showNotinStock</text:p>
          </table:table-cell>
          <table:table-cell table:style-name="Tableau6.A2" office:value-type="string">
            <text:p text:style-name="Table_20_Contents">boolean</text:p>
          </table:table-cell>
          <table:table-cell table:style-name="Tableau6.A2" office:value-type="string">
            <text:p text:style-name="Table_20_Contents">Wenn gesetzt, dann werden die Produits auch dann angezeigt, wenn sie nicht auf Lager sind.</text:p>
          </table:table-cell>
          <table:table-cell table:style-name="Tableau6.D2">
            <text:p text:style-name="P38"/>
          </table:table-cell>
        </table:table-row>
        <table:table-row>
          <table:table-cell table:style-name="Tableau6.A2" office:value-type="string">
            <text:p text:style-name="Table_20_Contents">notInStockMessage</text:p>
          </table:table-cell>
          <table:table-cell table:style-name="Tableau6.A2" office:value-type="string">
            <text:p text:style-name="Table_20_Contents">string</text:p>
          </table:table-cell>
          <table:table-cell table:style-name="Tableau6.A2" office:value-type="string">
            <text:p text:style-name="Table_20_Contents">Siehe oben. Das wird angezeigt, wenn keine Produits auf Lager sind und wenn showNotinStock gesetzt ist.</text:p>
          </table:table-cell>
          <table:table-cell table:style-name="Tableau6.D9" office:value-type="string">
            <text:p text:style-name="Table_20_Contents">Not in stock</text:p>
          </table:table-cell>
        </table:table-row>
        <table:table-row>
          <table:table-cell table:style-name="Tableau6.A2" office:value-type="string">
            <text:p text:style-name="P33">inStockPieces</text:p>
          </table:table-cell>
          <table:table-cell table:style-name="Tableau6.A2" office:value-type="string">
            <text:p text:style-name="Table_20_Contents">string</text:p>
          </table:table-cell>
          <table:table-cell table:style-name="Tableau6.A2" office:value-type="string">
            <text:p text:style-name="Table_20_Contents">Das ist die Einheit für Produits auf Lager inStock. </text:p>
          </table:table-cell>
          <table:table-cell table:style-name="Tableau6.D9" office:value-type="string">
            <text:p text:style-name="Table_20_Contents">pieces</text:p>
          </table:table-cell>
        </table:table-row>
        <table:table-row>
          <table:table-cell table:style-name="Tableau6.A2" office:value-type="string">
            <text:p text:style-name="Table_20_Contents">newItemDays</text:p>
          </table:table-cell>
          <table:table-cell table:style-name="Tableau6.A2" office:value-type="string">
            <text:p text:style-name="Table_20_Contents">int+</text:p>
          </table:table-cell>
          <table:table-cell table:style-name="Tableau6.A2" office:value-type="string">
            <text:p text:style-name="Table_20_Contents">In LISTNEWITEMS werden die in den letzten n Tagen neu hinzugekommenen Artikel angezeigt.</text:p>
          </table:table-cell>
          <table:table-cell table:style-name="Tableau6.D2" office:value-type="float" office:value="7">
            <text:p text:style-name="P38">7</text:p>
          </table:table-cell>
        </table:table-row>
        <table:table-row>
          <table:table-cell table:style-name="Tableau6.A2" office:value-type="string">
            <text:p text:style-name="Table_20_Contents">bulkilyWarning</text:p>
          </table:table-cell>
          <table:table-cell table:style-name="Tableau6.A2" office:value-type="string">
            <text:p text:style-name="Table_20_Contents">string</text:p>
          </table:table-cell>
          <table:table-cell table:style-name="Tableau6.A2" office:value-type="string">
            <text:p text:style-name="Table_20_Contents">Text für ###BULKILY_WARNING### für sperrige Produits</text:p>
          </table:table-cell>
          <table:table-cell table:style-name="Tableau6.D9" office:value-type="string">
            <text:p text:style-name="Table_20_Contents"/>
          </table:table-cell>
        </table:table-row>
        <table:table-row>
          <table:table-cell table:style-name="Tableau6.A2" office:value-type="string">
            <text:p text:style-name="Table_20_Contents">bulkilyAddition</text:p>
          </table:table-cell>
          <table:table-cell table:style-name="Tableau6.A2" office:value-type="string">
            <text:p text:style-name="Table_20_Contents">int+</text:p>
          </table:table-cell>
          <table:table-cell table:style-name="Tableau6.A2" office:value-type="string">
            <text:p text:style-name="Table_20_Contents">Betrag um den die Versandkosten für ein sperriges Produkt erhöht werden.</text:p>
          </table:table-cell>
          <table:table-cell table:style-name="Tableau6.D9" office:value-type="string">
            <text:p text:style-name="Table_20_Contents"/>
          </table:table-cell>
        </table:table-row>
        <table:table-row>
          <table:table-cell table:style-name="Tableau6.A2" office:value-type="string">
            <text:p text:style-name="Table_20_Contents">bulkilyFeeTax</text:p>
          </table:table-cell>
          <table:table-cell table:style-name="Tableau6.A2" office:value-type="string">
            <text:p text:style-name="Table_20_Contents">int+</text:p>
          </table:table-cell>
          <table:table-cell table:style-name="Tableau6.A2" office:value-type="string">
            <text:p text:style-name="Table_20_Contents">Steuerbetrag in Prozent für das Versenden eines Sperrguts</text:p>
          </table:table-cell>
          <table:table-cell table:style-name="Tableau6.D9" office:value-type="string">
            <text:p text:style-name="Table_20_Contents"/>
          </table:table-cell>
        </table:table-row>
        <table:table-row>
          <table:table-cell table:style-name="Tableau6.A24" table:number-columns-spanned="4" office:value-type="string">
            <text:p text:style-name="Table_20_Heading">Neue Einstellungen für die payment/shipping Konfiguration</text:p>
          </table:table-cell>
          <table:covered-table-cell/>
          <table:covered-table-cell/>
          <table:covered-table-cell/>
        </table:table-row>
        <table:table-row>
          <table:table-cell table:style-name="Tableau6.A2" office:value-type="string">
            <text:p text:style-name="Table_20_Contents">visibleForGroupID</text:p>
          </table:table-cell>
          <table:table-cell table:style-name="Tableau6.A2" office:value-type="string">
            <text:p text:style-name="Table_20_Contents">int+</text:p>
          </table:table-cell>
          <table:table-cell table:style-name="Tableau6.A2" office:value-type="string">
            <text:p text:style-name="P18">nur Bezahlung:</text:p>
            <text:p text:style-name="P35">Diese Bezahlmethode ist nur verfügbar, wenn ein Benutzer eingeloggt ist und wenn er ein Mitglied dieser Benutzergruppe ist.</text:p>
          </table:table-cell>
          <table:table-cell table:style-name="Tableau6.D9" office:value-type="string">
            <text:p text:style-name="Table_20_Contents"/>
          </table:table-cell>
        </table:table-row>
        <table:table-row>
          <table:table-cell table:style-name="Tableau6.A2" office:value-type="string">
            <text:p text:style-name="Table_20_Contents">addRequiredInfoFields</text:p>
          </table:table-cell>
          <table:table-cell table:style-name="Tableau6.A2" office:value-type="string">
            <text:p text:style-name="Table_20_Contents">string</text:p>
          </table:table-cell>
          <table:table-cell table:style-name="Tableau6.A2" office:value-type="string">
            <text:p text:style-name="P18">nur Bezahlung:</text:p>
            <text:p text:style-name="Table_20_Contents">Zusätzlich benötigte Felder auf der INFO Seite, wenn diese Bezahlmethode ausgewählt worden ist. Brauchbar für Bezahlungen mit der Kreditkarte.</text:p>
          </table:table-cell>
          <table:table-cell table:style-name="Tableau6.D9" office:value-type="string">
            <text:p text:style-name="Table_20_Contents"/>
          </table:table-cell>
        </table:table-row>
      </table:table>
      <text:p text:style-name="Text_20_body"/>
      <text:h text:style-name="Heading_20_3" text:outline-level="3">payment_DIBS.php</text:h>
      <text:p text:style-name="Text_20_body">Eigenschaften des handleScript für eine Schnittstelle zu DIBS (http://www.architrade.com/uk/):</text:p>
      <table:table table:name="Tableau7" table:style-name="Tableau7">
        <table:table-column table:style-name="Tableau7.A"/>
        <table:table-column table:style-name="Tableau7.B"/>
        <table:table-column table:style-name="Tableau7.C"/>
        <table:table-column table:style-name="Tableau7.D"/>
        <table:table-header-rows>
          <table:table-row>
            <table:table-cell table:style-name="Tableau7.A1" office:value-type="string">
              <text:p text:style-name="Table_20_Heading">Propriété:</text:p>
            </table:table-cell>
            <table:table-cell table:style-name="Tableau7.B1" office:value-type="string">
              <text:p text:style-name="Table_20_Heading">Type date:</text:p>
            </table:table-cell>
            <table:table-cell table:style-name="Tableau7.A1" office:value-type="string">
              <text:p text:style-name="Table_20_Heading">Description:</text:p>
            </table:table-cell>
            <table:table-cell table:style-name="Tableau7.D1" office:value-type="string">
              <text:p text:style-name="Table_20_Heading">Ajustement d'avance:</text:p>
            </table:table-cell>
          </table:table-row>
        </table:table-header-rows>
        <table:table-row>
          <table:table-cell table:style-name="Tableau7.A2" office:value-type="string">
            <text:p text:style-name="Table_20_Contents">templateFile</text:p>
          </table:table-cell>
          <table:table-cell table:style-name="Tableau7.B2" office:value-type="string">
            <text:p text:style-name="Table_20_Contents">resource</text:p>
          </table:table-cell>
          <table:table-cell table:style-name="Tableau7.C2" office:value-type="string">
            <text:p text:style-name="Table_20_Contents">Template Datei für die Verwendung mit DIBS<text:line-break/>Sie müssen folgende Zeile in die FORM des tt_products Templates eintragen, bevor das DIBS Skript aufgerufen wird:</text:p>
            <text:p text:style-name="Table_20_Contents"/>
            <text:p text:style-name="Table_20_Contents_2f_PRE">&lt;input type="hidden" name="products_cmd" value="cardno"&gt;</text:p>
          </table:table-cell>
          <table:table-cell table:style-name="Tableau7.D2" office:value-type="string">
            <text:p text:style-name="Table_20_Contents"/>
          </table:table-cell>
        </table:table-row>
        <table:table-row>
          <table:table-cell table:style-name="Tableau7.A3" office:value-type="string">
            <text:p text:style-name="Table_20_Contents">soloe </text:p>
          </table:table-cell>
          <table:table-cell table:style-name="Tableau7.B2" office:value-type="string">
            <text:p text:style-name="Table_20_Contents">boolean</text:p>
          </table:table-cell>
          <table:table-cell table:style-name="Tableau7.C3" office:value-type="string">
            <text:p text:style-name="Table_20_Contents">Wenn gesetzt, verwendet dieses Skript Unter-Templates mit der Markierung ###DIBS_SOLOE_TEMPLATE### anstelle der standardmäßigen Markierung ###DIBS_CARDNO_TEMPLATE###</text:p>
          </table:table-cell>
          <table:table-cell table:style-name="Tableau7.D2" office:value-type="string">
            <text:p text:style-name="Table_20_Contents"/>
          </table:table-cell>
        </table:table-row>
        <table:table-row>
          <table:table-cell table:style-name="Tableau7.A4" office:value-type="string">
            <text:p text:style-name="Table_20_Contents">direct</text:p>
          </table:table-cell>
          <table:table-cell table:style-name="Tableau7.B2" office:value-type="string">
            <text:p text:style-name="Table_20_Contents">boolean</text:p>
          </table:table-cell>
          <table:table-cell table:style-name="Tableau7.C4" office:value-type="string">
            <text:p text:style-name="Table_20_Contents">Wenn gesetzt, verwendet dieses Skript Unter-Templates mit der Markierung ###DIBS_DIRECT_TEMPLATE### anstelle der standardmäßigen Markierung ###DIBS_CARDNO_TEMPLATE###</text:p>
          </table:table-cell>
          <table:table-cell table:style-name="Tableau7.D2" office:value-type="string">
            <text:p text:style-name="Table_20_Contents"/>
          </table:table-cell>
        </table:table-row>
        <table:table-row>
          <table:table-cell table:style-name="Tableau7.A5" office:value-type="string">
            <text:p text:style-name="Table_20_Contents">merchant</text:p>
          </table:table-cell>
          <table:table-cell table:style-name="Tableau7.B2" office:value-type="string">
            <text:p text:style-name="Table_20_Contents">boolean</text:p>
          </table:table-cell>
          <table:table-cell table:style-name="Tableau7.C5" office:value-type="string">
            <text:p text:style-name="P31">Händler id</text:p>
          </table:table-cell>
          <table:table-cell table:style-name="Tableau7.D2" office:value-type="string">
            <text:p text:style-name="Table_20_Contents"/>
          </table:table-cell>
        </table:table-row>
        <table:table-row>
          <table:table-cell table:style-name="Tableau7.A6" office:value-type="string">
            <text:p text:style-name="Table_20_Contents">currency</text:p>
          </table:table-cell>
          <table:table-cell table:style-name="Tableau7.B2" office:value-type="string">
            <text:p text:style-name="Table_20_Contents">int+</text:p>
          </table:table-cell>
          <table:table-cell table:style-name="Tableau7.C6" office:value-type="string">
            <text:p text:style-name="Table_20_Contents">Währungsnummer, ISO4217 Format</text:p>
          </table:table-cell>
          <table:table-cell table:style-name="Tableau7.D2" office:value-type="string">
            <text:p text:style-name="Table_20_Contents"/>
          </table:table-cell>
        </table:table-row>
        <table:table-row>
          <table:table-cell table:style-name="Tableau7.A7" office:value-type="string">
            <text:p text:style-name="Table_20_Contents">relayURL</text:p>
          </table:table-cell>
          <table:table-cell table:style-name="Tableau7.B2" office:value-type="string">
            <text:p text:style-name="Table_20_Contents">string</text:p>
          </table:table-cell>
          <table:table-cell table:style-name="Tableau7.C7" office:value-type="string">
            <text:p text:style-name="Table_20_Contents">Die Url des Shop dessen gesicherter Server den Warenkorb übernimmt.</text:p>
          </table:table-cell>
          <table:table-cell table:style-name="Tableau7.D2" office:value-type="string">
            <text:p text:style-name="Table_20_Contents"/>
          </table:table-cell>
        </table:table-row>
        <table:table-row>
          <table:table-cell table:style-name="Tableau7.A8" office:value-type="string">
            <text:p text:style-name="Table_20_Contents">test</text:p>
          </table:table-cell>
          <table:table-cell table:style-name="Tableau7.B2" office:value-type="string">
            <text:p text:style-name="Table_20_Contents">boolean</text:p>
          </table:table-cell>
          <table:table-cell table:style-name="Tableau7.C8" office:value-type="string">
            <text:p text:style-name="Table_20_Contents">Wenn gesetzt, wird das Test-Feld in der FORM gesetzt.</text:p>
          </table:table-cell>
          <table:table-cell table:style-name="Tableau7.D2" office:value-type="string">
            <text:p text:style-name="Table_20_Contents"/>
          </table:table-cell>
        </table:table-row>
        <text:soft-page-break/>
        <table:table-row>
          <table:table-cell table:style-name="Tableau7.A9" office:value-type="string">
            <text:p text:style-name="Table_20_Contents">cardType</text:p>
          </table:table-cell>
          <table:table-cell table:style-name="Tableau7.B2" office:value-type="string">
            <text:p text:style-name="Table_20_Contents">string</text:p>
          </table:table-cell>
          <table:table-cell table:style-name="Tableau7.C9" office:value-type="string">
            <text:p text:style-name="Table_20_Contents">Kartentyp,</text:p>
            <text:p text:style-name="Table_20_Contents"/>
            <text:p text:style-name="P19">Beispielwerte:</text:p>
            <text:p text:style-name="Table_20_Contents_2f_PRE">DK = Dankort</text:p>
            <text:p text:style-name="Table_20_Contents_2f_PRE">V-DK = Visa-Dankort</text:p>
            <text:p text:style-name="Table_20_Contents_2f_PRE">MC(DK) = Mastercard/Eurocard issued in Danmark</text:p>
            <text:p text:style-name="Table_20_Contents_2f_PRE">VISA = Visakort issued abroad</text:p>
            <text:p text:style-name="Table_20_Contents_2f_PRE">MC = Mastercard/Eurocard issued abroad</text:p>
            <text:p text:style-name="Table_20_Contents_2f_PRE">DIN(DK) = Diners Club, Denmark</text:p>
            <text:p text:style-name="Table_20_Contents_2f_PRE">DIN = Diners Club, international</text:p>
          </table:table-cell>
          <table:table-cell table:style-name="Tableau7.D2" office:value-type="string">
            <text:p text:style-name="Table_20_Contents"/>
          </table:table-cell>
        </table:table-row>
        <table:table-row>
          <table:table-cell table:style-name="Tableau7.A10" office:value-type="string">
            <text:p text:style-name="Table_20_Contents">account</text:p>
          </table:table-cell>
          <table:table-cell table:style-name="Tableau7.B2" office:value-type="string">
            <text:p text:style-name="Table_20_Contents">string</text:p>
          </table:table-cell>
          <table:table-cell table:style-name="Tableau7.C10" office:value-type="string">
            <text:p text:style-name="Table_20_Contents">DIBS Kontoeigenschaft</text:p>
          </table:table-cell>
          <table:table-cell table:style-name="Tableau7.D2" office:value-type="string">
            <text:p text:style-name="Table_20_Contents"/>
          </table:table-cell>
        </table:table-row>
        <table:table-row>
          <table:table-cell table:style-name="Tableau7.A11" office:value-type="string">
            <text:p text:style-name="Table_20_Contents">addOrderInfo</text:p>
          </table:table-cell>
          <table:table-cell table:style-name="Tableau7.B2" office:value-type="string">
            <text:p text:style-name="Table_20_Contents">boolean</text:p>
          </table:table-cell>
          <table:table-cell table:style-name="Tableau7.C11" office:value-type="string">
            <text:p text:style-name="Table_20_Contents">Wenn gesetzt, werden die Bestelldaten an die FORM angehängt. DIBS kann diese Information auswerten und zusammen mit den Bezahlinformationen anzeigen.</text:p>
          </table:table-cell>
          <table:table-cell table:style-name="Tableau7.D2" office:value-type="string">
            <text:p text:style-name="Table_20_Contents"/>
          </table:table-cell>
        </table:table-row>
        <table:table-row>
          <table:table-cell table:style-name="Tableau7.A12" office:value-type="string">
            <text:p text:style-name="Table_20_Contents">k1 </text:p>
            <text:p text:style-name="Table_20_Contents">k2</text:p>
          </table:table-cell>
          <table:table-cell table:style-name="Tableau7.B2" office:value-type="string">
            <text:p text:style-name="Table_20_Contents">string</text:p>
          </table:table-cell>
          <table:table-cell table:style-name="Tableau7.C12" office:value-type="string">
            <text:p text:style-name="Table_20_Contents">DIBS Schlüsselwerte</text:p>
          </table:table-cell>
          <table:table-cell table:style-name="Tableau7.D2" office:value-type="string">
            <text:p text:style-name="Table_20_Contents"/>
          </table:table-cell>
        </table:table-row>
      </table:table>
      <text:p text:style-name="P5">[tsref:(script).productsLib.paymentDIBS]</text:p>
      <text:h text:style-name="P45" text:outline-level="2">Tutorial</text:h>
      <text:h text:style-name="Heading_20_4" text:outline-level="4">Configuration exemple du Inter-Photo A/S (www.inter-photo.dk):</text:h>
      <text:p text:style-name="Text_20_body"/>
      <text:p text:style-name="Preformatted_20_Text">xxxxx.xxxx {</text:p>
      <text:p text:style-name="Preformatted_20_Text"><text:s text:c="2"/>10.title = Dankort, VISA-Dankort</text:p>
      <text:p text:style-name="Preformatted_20_Text"><text:s text:c="2"/>10.image.file = media/logos/dankort.gif</text:p>
      <text:p text:style-name="Preformatted_20_Text"><text:s text:c="2"/>10.image.params = align=absmiddle vspace=2</text:p>
      <text:p text:style-name="Preformatted_20_Text"><text:s text:c="2"/>10.handleScript = media/scripts/payment_DIBS.php</text:p>
      <text:p text:style-name="Preformatted_20_Text"><text:s text:c="2"/>10.handleScript {</text:p>
      <text:p text:style-name="Preformatted_20_Text"><text:s text:c="4"/>merchant = xxxxx</text:p>
      <text:p text:style-name="Preformatted_20_Text"><text:s text:c="4"/>test = 0</text:p>
      <text:p text:style-name="Preformatted_20_Text"><text:s text:c="4"/>k1 = xxxxx</text:p>
      <text:p text:style-name="Preformatted_20_Text"><text:s text:c="4"/>k2 = xxxxx</text:p>
      <text:p text:style-name="Preformatted_20_Text"><text:s text:c="4"/>currency = 208</text:p>
      <text:p text:style-name="Preformatted_20_Text"><text:s text:c="4"/>addOrderInfo = 1</text:p>
      <text:p text:style-name="Preformatted_20_Text"><text:s text:c="4"/>account =</text:p>
      <text:p text:style-name="Preformatted_20_Text"><text:s text:c="4"/>cardType = DK,V-DK</text:p>
      <text:p text:style-name="Preformatted_20_Text"><text:s text:c="4"/>relayURL = http://www.inter-photo.dk/index.php?id=204</text:p>
      <text:p text:style-name="Standard"><text:s text:c="2"/>}</text:p>
      <text:p text:style-name="Preformatted_20_Text"><text:s text:c="2"/>10.handleURL = index.php?204</text:p>
      <text:p text:style-name="Preformatted_20_Text"><text:s text:c="2"/>10.handleTarget = _top</text:p>
      <text:p text:style-name="Preformatted_20_Text"/>
      <text:p text:style-name="Preformatted_20_Text"><text:s text:c="2"/>20 &lt; .10</text:p>
      <text:p text:style-name="Preformatted_20_Text"><text:s text:c="2"/>20.title = Unibank e-betaling</text:p>
      <text:p text:style-name="Preformatted_20_Text"><text:s text:c="2"/>20.image.file = media/logos/soloe.gif</text:p>
      <text:p text:style-name="Preformatted_20_Text"><text:s text:c="2"/>20.handleScript.soloe=1</text:p>
      <text:p text:style-name="Standard">}</text:p>
      <text:p text:style-name="Preformatted_20_Text"/>
      <text:h text:style-name="Heading_20_4" text:outline-level="4">Exemple liste des produits, pour que le titre du produit serait le titre de la page</text:h>
      <text:p text:style-name="Text_20_body">Wenn Sie den Titel eines Produkts in eine Markierung einlesen wollen, z.B. für die Verwendung mit automake_template oder Ähnlichem, dann probieren Sie diesen Code aus:</text:p>
      <text:p text:style-name="Text_20_body"><text:span text:style-name="Strong_20_Emphasis">Auszug aus dem Code:</text:span></text:p>
      <text:p text:style-name="Preformatted_20_Text"># setzen Sie zuerst den Seitentitel auf den Titel der aktuellen Seite</text:p>
      <text:p text:style-name="Preformatted_20_Text">temp.pagetitle = TEXT</text:p>
      <text:p text:style-name="Preformatted_20_Text">temp.pagetitle.field = title</text:p>
      <text:p text:style-name="Preformatted_20_Text"/>
      <text:p text:style-name="Preformatted_20_Text"># jetzt überschreiben Sie den mit dem Titel des Produkts, wenn das Feld nicht leer ist</text:p>
      <text:p text:style-name="Preformatted_20_Text">[globalVar = GP:tt_products &gt; 0]</text:p>
      <text:p text:style-name="Preformatted_20_Text">temp.pagetitle = COA</text:p>
      <text:p text:style-name="Preformatted_20_Text">temp.pagetitle {</text:p>
      <text:p text:style-name="Preformatted_20_Text"><text:s text:c="4"/>10 = RECORDS</text:p>
      <text:p text:style-name="Preformatted_20_Text"><text:s text:c="4"/>10 {</text:p>
      <text:p text:style-name="Preformatted_20_Text"><text:s text:c="8"/>source.data = GPvar:tt_products</text:p>
      <text:p text:style-name="Preformatted_20_Text"><text:s text:c="8"/>tables = tt_products</text:p>
      <text:p text:style-name="Preformatted_20_Text"><text:s text:c="8"/>conf.tt_products = TEXT</text:p>
      <text:p text:style-name="Preformatted_20_Text"><text:s text:c="8"/>conf.tt_products {</text:p>
      <text:p text:style-name="Preformatted_20_Text"><text:s text:c="11"/>field = title</text:p>
      <text:p text:style-name="Standard"><text:s text:c="8"/>}</text:p>
      <text:p text:style-name="Standard"><text:s text:c="4"/>}</text:p>
      <text:p text:style-name="Standard">}</text:p>
      <text:p text:style-name="Preformatted_20_Text">// Für die Einzelansicht eines Datensatzes muß der Cache ausgeschaltet werden.</text:p>
      <text:p text:style-name="Preformatted_20_Text">config.no_cache = 1</text:p>
      <text:p text:style-name="Preformatted_20_Text">[global]</text:p>
      <text:p text:style-name="Preformatted_20_Text"/>
      <text:p text:style-name="Preformatted_20_Text">temp.mainTemplate = TEMPLATE</text:p>
      <text:p text:style-name="Preformatted_20_Text">temp.mainTemplate {</text:p>
      <text:p text:style-name="Preformatted_20_Text"><text:s text:c="4"/># Einspeisen des Inhalts aus dem Auto-Parser in das TEMPLATE cObject:</text:p>
      <text:p text:style-name="Preformatted_20_Text"><text:s text:c="4"/>template =&lt; plugin.tx_automaketemplate_pi1</text:p>
      <text:p text:style-name="Preformatted_20_Text"><text:s text:c="4"/># Wähle nur den Inhalt zwischen den &lt;body&gt;-Tags</text:p>
      <text:p text:style-name="Preformatted_20_Text"><text:s text:c="4"/>workOnSubpart = DOCUMENT_BODY</text:p>
      <text:p text:style-name="Preformatted_20_Text"><text:s text:c="4"/>subparts.title &lt; temp.pagetitle</text:p>
      <text:p text:style-name="Standard">....</text:p>
      <text:h text:style-name="Heading_20_4" text:outline-level="4"><text:soft-page-break/></text:h>
      <text:h text:style-name="Heading_20_4" text:outline-level="4">Exemple fichiers modèle</text:h>
      <text:p text:style-name="P2">Hier kommt der Teil eines Templates, wenn der Benutzer automatisch als Frontend Benutzer registriert worden ist.</text:p>
      <text:p text:style-name="Preformatted_20_Text">&lt;BR&gt;&lt;BR&gt;&lt;BR&gt;&lt;BR&gt;&lt;HR&gt;&lt;BR&gt;&lt;BR&gt;&lt;BR&gt; &lt;h3&gt;EMAIL_NEWUSER_TEMPLATE&lt;/h3&gt; &lt;em&gt; Teil, der als Template für die Emails zur Verständigung über das Anlegen eines Benutzers verschickt wird. Die erste Zeile wird in die Betreff-Zeile der Email eingetragen.&lt;br&gt; &lt;/em&gt;&lt;br&gt; &lt;pre&gt; &lt;!-- ###EMAIL_NEWUSER_TEMPLATE### begin --&gt; Es wurde ein neuer Benutzer angelegt. Sehr geehrter Herr ###PERSON_NAME###, Sie haben zum ersten Mal eine Bestellung auf <text:a xlink:type="simple" xlink:href="http://..................../" text:style-name="Internet_20_link" text:visited-style-name="Visited_20_Internet_20_Link">http://..................../</text:a> getätigt. Um Ihnen in Zukunft das Bestellen zu erleichtern, haben wir ein Benutzerkonto für Sie eingerichtet. Ihre Benutzerkonto Daten: Benutzername: ###USERNAME### Paßwort: ###PASSWORD###</text:p>
      <text:p text:style-name="Preformatted_20_Text"><text:s/>Mit freundlichen Grüßen,</text:p>
      <text:p text:style-name="Preformatted_20_Text"><text:s/>Ihr Shopmaster &lt;!-- ###EMAIL_NEWUSER_TEMPLATE### end --&gt; &lt;/pre&gt; </text:p>
      <text:h text:style-name="Heading_20_4" text:outline-level="4">Exemple bananaGuard</text:h>
      <text:p text:style-name="Text_20_body">(siehe das deutsche example_template_bill_de.tmpl von <text:a xlink:type="simple" xlink:href="http://bananaguard.de/" text:style-name="Internet_20_link" text:visited-style-name="Visited_20_Internet_20_Link">http://bananaguard.de</text:a>)</text:p>
      <text:p text:style-name="Text_20_body">Sie können das Backend dieses Shops unter <text:a xlink:type="simple" xlink:href="http://tt-products.zedwoo.de/" text:style-name="Internet_20_link" text:visited-style-name="Visited_20_Internet_20_Link">http://tt-products.zedwoo.de/</text:a> ansehen.</text:p>
      <text:p text:style-name="Text_20_body">Dieses Beispiel beinhaltet spezielle Preisberechnungen und die automatische Erzeugung einer Rechnung und eines Lieferscheins. Sie müssen die TYPO3-Erweiterungen feuser_admin und <text:span text:style-name="Emphasis"><text:span text:style-name="T1">conf_userts</text:span></text:span><text:span text:style-name="T1"> installieren, wenn Sie ein ähnliches Shop aufbauen möchten. Fertigen Sie eine Kopie des example_template_bill_de.tmpl in fileadmin/tmpl_files/products_eur_.tmp an. Damit Sie dieses Template verwenden können, müssen Sie nach '?id=' im Text suchen und dahinter die PIDs des Warenkorbs mit jener auf Ihrem System ersetzen.</text:span></text:p>
      <text:p text:style-name="Text_20_body">Die Seiten und Plugins auf dem Seitenbaum sind:</text:p>
      <text:p text:style-name="Text_20_body">- 'BananaGuard' mit dem Haupttemplate Ihrer Wahl und</text:p>
      <text:p text:style-name="Text_20_body"><text:tab/><text:span text:style-name="T11">Constants:</text:span> </text:p>
      <text:p text:style-name="Preformatted_20_Text">plugin.tx_srfeuserregister_pi1.email = info@shopms.de</text:p>
      <text:p text:style-name="Preformatted_20_Text">plugin.tx_srfeuserregister_pi1.confirmPID = 83 ... Sie müssen Ihre confirm PID hier eintragen.</text:p>
      <text:p text:style-name="Preformatted_20_Text">styles.content.loginform.pid = 108 ... Die PID des Benutzer sysfolder. </text:p>
      <text:p text:style-name="Text_20_body">-- 'Home', das eine Verknüpfung zu BananaGuard ist</text:p>
      <text:p text:style-name="Text_20_body">-- 'Preise und Versand' mit speziellen Informationen über Preise und Versand</text:p>
      <text:p text:style-name="Text_20_body">-- 'BananaShop' mit einem eigenen Template für das Shop</text:p>
      <text:p text:style-name="Text_20_body"><text:tab/><text:span text:style-name="T11">Constants:</text:span></text:p>
      <text:p text:style-name="Preformatted_20_Text">plugin.tt_products.file.templateFile = typo3/ext/tt_products/pi/products_eur_.tmpl</text:p>
      <text:p text:style-name="Preformatted_20_Text">plugin.tt_products.TAXpercentage = 16</text:p>
      <text:p text:style-name="Preformatted_20_Text">plugin.tt_products.priceDecPoint = .</text:p>
      <text:p text:style-name="Preformatted_20_Text">plugin.tt_products.maxW_list = 80</text:p>
      <text:p text:style-name="Preformatted_20_Text">plugin.tt_products.outputfolder = fileadmin/data</text:p>
      <text:p text:style-name="Preformatted_20_Text"/>
      <text:p text:style-name="Preformatted_20_Text">plugin.tt_products.color2 = #003399</text:p>
      <text:p text:style-name="Preformatted_20_Text">plugin.tt_products.color1 = #FFFFFF</text:p>
      <text:p text:style-name="Preformatted_20_Text">plugin.tt_products.wrap2 = &lt;font face="verdana" size=2 color=white&gt; | &lt;/font&gt;</text:p>
      <text:p text:style-name="Preformatted_20_Text">content.tableCellColor = #003399</text:p>
      <text:p text:style-name="Table_20_Contents_2f_PRE"/>
      <text:p text:style-name="P22"><text:span text:style-name="T8"><text:tab/></text:span>Setup:</text:p>
      <text:p text:style-name="Preformatted_20_Text">plugin.tt_products.code.field = select_key</text:p>
      <text:p text:style-name="Preformatted_20_Text">plugin.tt_products.AlwaysInStock = 1</text:p>
      <text:p text:style-name="Preformatted_20_Text"/>
      <text:p text:style-name="Preformatted_20_Text">plugin.tt_products.statusCodes.1 = Bestellungseingang</text:p>
      <text:p text:style-name="Preformatted_20_Text">plugin.tt_products.statusCodes.11 = Der bananaSHOP wartet auf Ihren Zahlungseingang</text:p>
      <text:p text:style-name="Preformatted_20_Text">plugin.tt_products.statusCodes.20 = Ihre Ware wird versendet</text:p>
      <text:p text:style-name="Preformatted_20_Text">plugin.tt_products.statusCodes.101 = Bestellung abgeschlossen</text:p>
      <text:p text:style-name="Preformatted_20_Text">plugin.tt_products.statusCodes.200 = Bestellung storniert</text:p>
      <text:p text:style-name="Preformatted_20_Text"/>
      <text:p text:style-name="Preformatted_20_Text">plugin.tt_products.orderEmail_from = info@bananaguard.de</text:p>
      <text:p text:style-name="Preformatted_20_Text">plugin.tt_products.orderEmail_fromName = bananaGUARD.de</text:p>
      <text:p text:style-name="Preformatted_20_Text">plugin.tt_products.orderEmail_to = info@bananaguard.de</text:p>
      <text:p text:style-name="Preformatted_20_Text">orderNumberPrefix = order2005_</text:p>
      <text:p text:style-name="Preformatted_20_Text"/>
      <text:p text:style-name="Preformatted_20_Text">plugin.tt_products.discountGroupName = Team</text:p>
      <text:p text:style-name="Preformatted_20_Text">plugin.tt_products.lockLoginUserInfo=true</text:p>
      <text:p text:style-name="Preformatted_20_Text"/>
      <text:p text:style-name="Preformatted_20_Text">plugin.tt_products.displayBasketColumns = 3</text:p>
      <text:p text:style-name="Preformatted_20_Text">plugin.tt_products.outputFolder = {$plugin.tt_products.outputfolder} </text:p>
      <text:p text:style-name="Preformatted_20_Text"/>
      <text:p text:style-name="Preformatted_20_Text"><text:soft-page-break/>plugin.tt_products {</text:p>
      <text:p text:style-name="Preformatted_20_Text"><text:s text:c="2"/>payment &gt;</text:p>
      <text:p text:style-name="Preformatted_20_Text"/>
      <text:p text:style-name="Preformatted_20_Text">payment {</text:p>
      <text:p text:style-name="Preformatted_20_Text"><text:s text:c="2"/>radio = 1 </text:p>
      <text:p text:style-name="Preformatted_20_Text"><text:s text:c="2"/>TAXpercentage = 16</text:p>
      <text:p text:style-name="Preformatted_20_Text"><text:s text:c="2"/>10.title = Vorkasse</text:p>
      <text:p text:style-name="Preformatted_20_Text"><text:s text:c="2"/>20.title = PayPal</text:p>
      <text:p text:style-name="Preformatted_20_Text"><text:s text:c="2"/>20.percentOfTotalShipping = 0.04</text:p>
      <text:p text:style-name="Preformatted_20_Text"><text:s text:c="2"/>30.title = Nachnahme</text:p>
      <text:p text:style-name="Preformatted_20_Text"><text:s text:c="2"/>30.discountDeactive = 1</text:p>
      <text:p text:style-name="Preformatted_20_Text"><text:s text:c="2"/>30.priceTax.1 = 4</text:p>
      <text:p text:style-name="Preformatted_20_Text"><text:s text:c="2"/>30.priceTax.6 = 5.8</text:p>
      <text:p text:style-name="Preformatted_20_Text"><text:s text:c="2"/>30.showLimit = 99</text:p>
      <text:p text:style-name="Standard"><text:s/>} </text:p>
      <text:p text:style-name="Preformatted_20_Text"/>
      <text:p text:style-name="Preformatted_20_Text">shipping {</text:p>
      <text:p text:style-name="Preformatted_20_Text"><text:s text:c="2"/>radio = 1</text:p>
      <text:p text:style-name="Preformatted_20_Text"><text:s text:c="2"/>TAXpercentage = 16</text:p>
      <text:p text:style-name="Preformatted_20_Text"><text:s text:c="2"/>10.title = Deutschland</text:p>
      <text:p text:style-name="Preformatted_20_Text"><text:s text:c="2"/>10.image.file =</text:p>
      <text:p text:style-name="Preformatted_20_Text"><text:s text:c="2"/>10.priceTax.type = count </text:p>
      <text:p text:style-name="Preformatted_20_Text"><text:s text:c="2"/>10.priceTax.1 = 2.5</text:p>
      <text:p text:style-name="Preformatted_20_Text"><text:s text:c="2"/>10.priceTax.6 = 4.8</text:p>
      <text:p text:style-name="Preformatted_20_Text"><text:s text:c="2"/>10.priceTax.50 = 10</text:p>
      <text:p text:style-name="Preformatted_20_Text"><text:s text:c="2"/>10.priceTax.100 = 25</text:p>
      <text:p text:style-name="Preformatted_20_Text"><text:s text:c="2"/>10.priceTax.120 = 30</text:p>
      <text:p text:style-name="Preformatted_20_Text"><text:s text:c="2"/>10.priceTax.300 = 150</text:p>
      <text:p text:style-name="Preformatted_20_Text"><text:s text:c="2"/>10.percentOfGoodstotal = 0</text:p>
      <text:p text:style-name="Preformatted_20_Text"/>
      <text:p text:style-name="Preformatted_20_Text"><text:s text:c="2"/>20.title = Europa (nicht Deutschland)</text:p>
      <text:p text:style-name="Preformatted_20_Text"><text:s text:c="2"/>20.image.file =</text:p>
      <text:p text:style-name="Preformatted_20_Text"><text:s text:c="2"/>20.priceTax.type = count </text:p>
      <text:p text:style-name="Preformatted_20_Text"><text:s text:c="2"/>20.priceTax.1 = 8.8</text:p>
      <text:p text:style-name="Preformatted_20_Text"><text:s text:c="2"/>20.priceTax.6 = 11.8</text:p>
      <text:p text:style-name="Preformatted_20_Text"><text:s text:c="2"/>20.priceTax.50 = 11.8</text:p>
      <text:p text:style-name="Preformatted_20_Text"><text:s text:c="2"/>20.priceTax.100 = 25</text:p>
      <text:p text:style-name="Preformatted_20_Text"><text:s text:c="2"/>20.priceTax.120 = 30</text:p>
      <text:p text:style-name="Preformatted_20_Text"><text:s text:c="2"/>20.priceTax.300 = 150</text:p>
      <text:p text:style-name="Preformatted_20_Text"><text:s text:c="2"/>20.percentOfGoodstotal = 0</text:p>
      <text:p text:style-name="Preformatted_20_Text"/>
      <text:p text:style-name="Preformatted_20_Text"><text:s text:c="2"/>30.title = Selbstabholung</text:p>
      <text:p text:style-name="Preformatted_20_Text"><text:s text:c="2"/>30.image.file =</text:p>
      <text:p text:style-name="Preformatted_20_Text"><text:s text:c="2"/>30.priceTax.1 = 0</text:p>
      <text:p text:style-name="Preformatted_20_Text"><text:s text:c="2"/>30.percentOfGoodstotal = 0</text:p>
      <text:p text:style-name="Standard"><text:s text:c="2"/>}</text:p>
      <text:p text:style-name="Preformatted_20_Text"/>
      <text:p text:style-name="Preformatted_20_Text">pricecalc {</text:p>
      <text:p text:style-name="Preformatted_20_Text"><text:s text:c="2"/>type = count</text:p>
      <text:p text:style-name="Preformatted_20_Text"><text:s text:c="2"/>field = price</text:p>
      <text:p text:style-name="Preformatted_20_Text"><text:s text:c="2"/>10.prod.1 = 4.99</text:p>
      <text:p text:style-name="Preformatted_20_Text"><text:s text:c="2"/>10.prod.2 = 8.99</text:p>
      <text:p text:style-name="Preformatted_20_Text"><text:s text:c="2"/>10.prod.5 = 19.99</text:p>
      <text:p text:style-name="Preformatted_20_Text"><text:s text:c="2"/>20.prod.1 = 6.99</text:p>
      <text:p text:style-name="Preformatted_20_Text"><text:s text:c="2"/>20.prod.2 = 13.98</text:p>
      <text:p text:style-name="Preformatted_20_Text"><text:s text:c="2"/>20.prod.5 = 29.99</text:p>
      <text:p text:style-name="Standard">}</text:p>
      <text:p text:style-name="Preformatted_20_Text"/>
      <text:p text:style-name="Preformatted_20_Text">discountprice {</text:p>
      <text:p text:style-name="Text_20_body">10.type = count</text:p>
      <text:p text:style-name="Text_20_body">10.field = price 10.additive = 1</text:p>
      <text:p text:style-name="Text_20_body">10.where =</text:p>
      <text:p text:style-name="Text_20_body">10.prod.1 = 4.99</text:p>
      <text:p text:style-name="Text_20_body">10.prod.100 = 2.89</text:p>
      <text:p text:style-name="Text_20_body">10.prod.1050 = 2.77</text:p>
      <text:p text:style-name="Text_20_body">20.type = count</text:p>
      <text:p text:style-name="Text_20_body">20.field = price 20.where =</text:p>
      <text:p text:style-name="Text_20_body">20.prod.1 = 6.99</text:p>
      <text:p text:style-name="Text_20_body">20.prod.100 = 3.00</text:p>
      <text:p text:style-name="Text_20_body"><text:soft-page-break/>20.prod.1050 = 2.89</text:p>
      <text:p text:style-name="Standard">}</text:p>
      <text:p text:style-name="Standard">}</text:p>
      <text:p text:style-name="Preformatted_20_Text"/>
      <text:p text:style-name="Preformatted_20_Text">plugin.tt_products.basketImage.imageLinkWrap.height = 800</text:p>
      <text:p text:style-name="Preformatted_20_Text">plugin.tt_products.listImage.file.maxW = 150</text:p>
      <text:p text:style-name="Preformatted_20_Text">plugin.tt_products.shipping.40 &gt;</text:p>
      <text:p text:style-name="Preformatted_20_Text">plugin.tt_products.PIDagb =</text:p>
      <text:p text:style-name="Preformatted_20_Text"><text:s/>plugin.tt_products.createUsers = 1</text:p>
      <text:p text:style-name="Preformatted_20_Text">plugin.tt_products.orderEmail_htmlmail = 1</text:p>
      <text:p text:style-name="Preformatted_20_Text"/>
      <text:p text:style-name="Text_20_body"/>
      <text:p text:style-name="Text_20_body"><text:tab/><text:span text:style-name="T11">Plugin:</text:span></text:p>
      <text:p text:style-name="P25"><text:tab/>Produits , CODE: LIST</text:p>
      <text:p text:style-name="P25">Les pages suivantes:</text:p>
      <text:p text:style-name="P25">--- 'Panier' </text:p>
      <text:p text:style-name="Text_20_body"><text:tab/><text:span text:style-name="T11">Plugin:</text:span></text:p>
      <text:p text:style-name="P25"><text:tab/>Produits, CODE: BASKET, Sur la marge l'élément du contenu 'login' qui indique la page 'panier d'achat'</text:p>
      <text:p text:style-name="P25">--- 'Caisse'</text:p>
      <text:p text:style-name="Text_20_body"><text:tab/><text:span text:style-name="T11">Plugin:</text:span></text:p>
      <text:p text:style-name="P25"><text:tab/>Produits , CODE: PAYMENT, FINALIZE, INFO</text:p>
      <text:p text:style-name="P25">--- 'Bestellungsstatus'</text:p>
      <text:p text:style-name="Text_20_body"><text:tab/><text:span text:style-name="T11">Plugin:</text:span></text:p>
      <text:p text:style-name="P25"><text:tab/>Produits , CODE: TRACKING</text:p>
      <text:p text:style-name="P25">--- 'Facture'</text:p>
      <text:p text:style-name="Text_20_body"><text:tab/><text:span text:style-name="T11">Plugin:</text:span></text:p>
      <text:p text:style-name="P25"><text:tab/>Produits , CODE: BILL</text:p>
      <text:p text:style-name="P25">--- 'Livraison'</text:p>
      <text:p text:style-name="Text_20_body"><text:tab/><text:span text:style-name="T11">Plugin:</text:span></text:p>
      <text:p text:style-name="P25"><text:tab/>Produits, CODE: DELIVERY</text:p>
      <text:p text:style-name="P25">--- 'Articles' Sysfolder</text:p>
      <text:p text:style-name="Text_20_body"><text:tab/><text:span text:style-name="T11">Plugin:</text:span></text:p>
      <text:p text:style-name="P25"><text:tab/>Produits, CODE: LIST</text:p>
      <text:p text:style-name="P25">-- 'Kontakt/Bestellung' beinhaltet eine Form, Text und ein Login</text:p>
      <text:p text:style-name="P25">-- 'BananaINSIDER' nur nach dem Frontend Login sichtbar, beinhaltet eine Login Plugin auf dem rechten Rand</text:p>
      <text:p text:style-name="P25"><text:tab/>Die Gruppe 'Team' hat Zugriff auf diese Seite.</text:p>
      <text:p text:style-name="P25">--- 'My profile' </text:p>
      <text:p text:style-name="Text_20_body"><text:tab/><text:span text:style-name="T11">Plugin:</text:span></text:p>
      <text:p text:style-name="P25"><text:tab/>Front End Benutzer Registrierung</text:p>
      <text:p text:style-name="P25">--- 'INSIDER Infos'</text:p>
      <text:p text:style-name="P25">--- 'bananaBOARD'</text:p>
      <text:p text:style-name="Text_20_body"><text:tab/><text:span text:style-name="T11">Plugin:</text:span></text:p>
      <text:p text:style-name="P25"><text:tab/>Board, Tree, CODE: FORUM, POSTFORM</text:p>
      <text:p text:style-name="P25">-- 'Users'<text:tab/>Sysfolder der Gruppe 'Team'</text:p>
      <text:h text:style-name="Heading_20_2" text:outline-level="2">Problèmes connues</text:h>
      <text:p text:style-name="Text_20_body">- S'il vous plait visitez la page web <text:a xlink:type="simple" xlink:href="http://wiki.typo3.org/index.php/Ext_tt_products" text:style-name="Internet_20_link" text:visited-style-name="Visited_20_Internet_20_Link">http://wiki.typo3.org/index.php/Ext_tt_products</text:a> . - Téléchargez la dernière version du développement par <text:a xlink:type="simple" xlink:href="http://jambage.com/index.php?id=170" text:style-name="Internet_20_link" text:visited-style-name="Visited_20_Internet_20_Link">http://jambage.com/index.php?id=170</text:a> .</text:p>
      <text:h text:style-name="Heading_20_2" text:outline-level="2">To-Do Liste</text:h>
      <text:p text:style-name="Text_20_body">- tableaux des plusieurs langages – liste souhaite: <text:a xlink:type="simple" xlink:href="http://wiki.typo3.org/index.php/Ext_tt_products#Wishlist" text:style-name="Internet_20_link" text:visited-style-name="Visited_20_Internet_20_Link">http://wiki.typo3.org/index.php/Ext_tt_products#Wishlist </text:a></text:p>
      <text:h text:style-name="Heading_20_2" text:outline-level="2">Changelog</text:h>
      <text:p text:style-name="Text_20_body">Voir aussi le fichier tt_products/ChangeLog </text:p>
      <text:list text:style-name="L6">
        <text:list-item>
          <text:p text:style-name="P57">26.03.2005 Apporter des codes du Klaus Zierer (zk_products), affichage liste plusieurs colonnes, facture, bon de livraison et calcul pris spéciaux par Franz Holzinger</text:p>
        </text:list-item>
        <text:list-item>
          <text:p text:style-name="P57"><text:span text:style-name="T12">06.05.2005 <text:s/>deuxième prix et prix pour accessoires par </text:span><text:span text:style-name="T13">Jens Schmietendorf, Example fichier modèle du </text:span><text:a xlink:type="simple" xlink:href="http://bananaguard.de/" text:style-name="Internet_20_link" text:visited-style-name="Visited_20_Internet_20_Link"><text:span text:style-name="T13">http://bananaguard.de</text:span></text:a> , zk_products 1.3.2 du Klaus Zierer, T.V.A. par Franz Holzinger </text:p>
        </text:list-item>
        <text:list-item>
          <text:p text:style-name="P57">23.06.2005 products_mail.inc efface, <text:span text:style-name="T13">Exemple fichier modèle du</text:span> Franz Holzinger </text:p>
        </text:list-item>
        <text:list-item>
          <text:p text:style-name="P57">26.07.2005 Affichage des ordres, points de cadeaux système et publicité d'amitié par Bert Hiddink </text:p>
        </text:list-item>
        <text:list-item>
          <text:p text:style-name="P57">03.08.2005 Notations du forum zk_products Forum, PIDtracking </text:p>
        </text:list-item>
        <text:list-item>
          <text:p text:style-name="P57">11.09.2005 Cadeaux bons -14.09.2005 Flexforms au lieux des CODEs </text:p>
        </text:list-item>
        <text:list-item>
          <text:p text:style-name="P57">05.10.2005 Compléments par Andrea Herzog-Kienast (--&gt; Chercher traducteur pour le manuel anglais et fran<text:span text:style-name="T17">çais</text:span>) </text:p>
        </text:list-item>
        <text:list-item>
          <text:p text:style-name="P57">13.10.2005 Cadeaux bons et publicité d'amitié -28.10.2005 Additions sont remplaces par largeur avec entrance dans le tableau d'articl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Arial" svg:font-family="Arial"/>
    <style:font-face style:name="Arial Unicode MS" svg:font-family="'Arial Unicode MS'"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DejaVu Sans" svg:font-family="'DejaVu Sans'" style:font-adornments="Normal" style:font-family-generic="swiss" style:font-pitch="variable"/>
    <style:font-face style:name="HG Mincho Light J" svg:font-family="'HG Mincho Light J'" style:font-pitch="variable"/>
    <style:font-face style:name="Monospace" svg:font-family="Monospace"/>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horndale" svg:font-family="Thorndale" style:font-family-generic="roman"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contextual-spacing="false"/>
      <style:text-properties style:font-name="Tahoma1"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Tahoma1"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style:contextual-spacing="false" fo:text-align="start" style:justify-single-word="false" style:page-number="auto" fo:break-before="page" fo:background-color="transparent" style:vertical-align="auto">
        <style:tab-stops/>
        <style:drop-cap/>
      </style:paragraph-properties>
      <style:text-properties fo:color="#69a550" loext:opacity="100%" style:font-name="Tahoma"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style:contextual-spacing="false" fo:text-align="start" style:justify-single-word="false" style:page-number="auto" fo:break-before="page" fo:keep-with-next="always">
        <style:tab-stops/>
      </style:paragraph-properties>
      <style:text-properties fo:color="#666666" loext:opacity="100%" style:font-name="Tahoma1"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style:contextual-spacing="false" fo:text-align="start" style:justify-single-word="false" style:page-number="auto" fo:break-before="auto" fo:break-after="auto" fo:keep-with-next="always"/>
      <style:text-properties fo:color="#69a550" loext:opacity="100%" style:font-name="Tahoma"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loext:opacity="100%" style:font-name="Tahoma1"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loext:opacity="100%" style:font-name="Arial3"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style: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1"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1"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loext:opacity="100%" style:font-name="Tahoma1"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Tahoma1"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loext:opacity="100%" style:font-name="Tahoma"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loext:opacity="100%" style:font-name="Tahoma1"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ab-stops>
          <style:tab-stop style:position="1cm"/>
          <style:tab-stop style:position="2cm"/>
          <style:tab-stop style:position="3cm"/>
          <style:tab-stop style:position="4.001cm"/>
        </style:tab-stops>
      </style:paragraph-properties>
      <style:text-properties fo:color="#333366" loext:opacity="100%"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loext:opacity="100%" style:text-underline-style="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Labels" style:family="graphic">
      <style:graphic-properties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draw:line text:anchor-type="paragraph" draw:z-index="34" draw:name="Shape1" draw:style-name="Mgr1" draw:text-style-name="MP2" svg:x1="-0.003cm" svg:y1="0.778cm" svg:x2="17.684cm" svg:y2="0.778cm"><text:p/></draw:line><text:span text:style-name="MT1"><draw:frame draw:style-name="Mfr1" draw:name="Grafik2" text:anchor-type="as-char" svg:y="-0.529cm" svg:width="2.29cm" svg:height="0.55cm" draw:z-index="69"><draw:image xlink:href="Pictures/100000000000007B00000022693D9AF4.png" xlink:type="simple" xlink:show="embed" xlink:actuate="onLoad" draw:mime-type="image/png"/></draw:frame></text:span><text:span text:style-name="MT1"><text:s/></text:span><text:span text:style-name="MT1"><text:title>EXT: Documentation Française tt_products</text:title></text:span><text:span text:style-name="MT1"><text:s/>- </text:span><text:span text:style-name="MT1"><text:subject>doc_ttproducts_fr</text:subject></text:span><text:span text:style-name="MT2"><text:tab/></text:span><text:span text:style-name="MT1"><text:chapter text:display="number" text:outline-level="2"/></text:span><text:span text:style-name="MT1"> </text:span><text:span text:style-name="MT1"><text:chapter text:display="name" text:outline-level="2">Changelog</text:chapter></text:span></text:p>
      </style:header>
      <style:footer>
        <text:p text:style-name="MP3"><text:page-number text:select-page="current">1</text:page-number></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EXT: Documentation Française tt_products</dc:title>
    <dc:subject>doc_ttproducts_fr</dc:subject>
    <meta:initial-creator>Kasper Skårhøj</meta:initial-creator>
    <meta:creation-date>2002-11-01T00:32:00</meta:creation-date>
    <dc:creator>Holzinger Franz</dc:creator>
    <dc:date>2010-02-15T07:14:21</dc:date>
    <meta:printed-by>Kasper Skårhøj</meta:printed-by>
    <meta:print-date>2002-12-11T11:38:18</meta:print-date>
    <meta:keyword>forEditors</meta:keyword>
    <meta:keyword>forIntermediates</meta:keyword>
    <meta:keyword>tt_products</meta:keyword>
    <meta:keyword>shop</meta:keyword>
    <meta:keyword>produit</meta:keyword>
    <meta:editing-cycles>630</meta:editing-cycles>
    <meta:editing-duration>PT57H29M37S</meta:editing-duration>
    <meta:document-statistic meta:table-count="8" meta:image-count="3" meta:object-count="0" meta:page-count="35" meta:paragraph-count="1383" meta:word-count="10014" meta:character-count="71226" meta:non-whitespace-character-count="61963"/>
    <meta:user-defined meta:name="Author">Franz Holzinger</meta:user-defined>
    <meta:user-defined meta:name="Email">franz@ttproducts.de</meta:user-defined>
    <meta:user-defined meta:name="Info 4"/>
    <meta:user-defined meta:name="language (en, de, fr, nl, dk, es, ... )">fr</meta:user-defined>
  </office:meta>
</office:document-meta>
</file>